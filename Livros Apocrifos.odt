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paragraph-properties fo:text-align="center" style:justify-single-word="false"/>
      <style:text-properties fo:language="pt" fo:country="BR" style:script-type="latin"/>
    </style:style>
    <style:style style:name="P2" style:family="paragraph" style:parent-style-name="Text_20_body">
      <style:paragraph-properties fo:text-align="justify" style:justify-single-word="false"/>
      <style:text-properties fo:language="pt" fo:country="BR" style:script-type="latin"/>
    </style:style>
    <style:style style:name="P3" style:family="paragraph" style:parent-style-name="Text_20_body">
      <style:paragraph-properties fo:text-align="justify" style:justify-single-word="false"/>
      <style:text-properties fo:language="pt" fo:country="BR" officeooo:rsid="0023355a" officeooo:paragraph-rsid="0023355a" style:script-type="latin"/>
    </style:style>
    <style:style style:name="P4" style:family="paragraph" style:parent-style-name="Title">
      <style:paragraph-properties fo:break-before="page"/>
      <style:text-properties fo:font-size="66pt" fo:language="pt" fo:country="BR" style:font-size-asian="66pt" style:font-size-complex="66pt"/>
    </style:style>
    <style:style style:name="P5" style:family="paragraph" style:parent-style-name="Heading_20_2">
      <style:paragraph-properties fo:text-align="justify" style:justify-single-word="false" fo:break-before="page"/>
      <style:text-properties fo:language="pt" fo:country="BR" style:script-type="latin"/>
    </style:style>
    <style:style style:name="P6" style:family="paragraph" style:parent-style-name="Text_20_body">
      <style:paragraph-properties fo:text-align="justify" style:justify-single-word="false"/>
    </style:style>
    <style:style style:name="P7" style:family="paragraph" style:parent-style-name="Horizontal_20_Line">
      <style:paragraph-properties fo:text-align="justify" style:justify-single-word="false"/>
      <style:text-properties fo:language="pt" fo:country="BR" style:script-type="latin"/>
    </style:style>
    <style:style style:name="P8" style:family="paragraph" style:parent-style-name="Heading_20_2">
      <style:paragraph-properties fo:text-align="justify" style:justify-single-word="false"/>
      <style:text-properties fo:language="pt" fo:country="BR" style:script-type="latin"/>
    </style:style>
    <style:style style:name="P9" style:family="paragraph" style:parent-style-name="Text_20_body">
      <style:paragraph-properties fo:text-align="justify" style:justify-single-word="false"/>
      <style:text-properties fo:language="pt" fo:country="BR" officeooo:paragraph-rsid="006507f7" style:script-type="latin"/>
    </style:style>
    <style:style style:name="P10" style:family="paragraph" style:parent-style-name="Heading_20_1">
      <style:paragraph-properties fo:margin-top="0cm" fo:margin-bottom="0.247cm" style:contextual-spacing="false" fo:line-height="115%" fo:text-align="justify" style:justify-single-word="false" fo:break-before="page"/>
      <style:text-properties fo:language="pt" fo:country="BR" style:script-type="latin"/>
    </style:style>
    <style:style style:name="P11" style:family="paragraph" style:parent-style-name="Heading_20_2">
      <style:paragraph-properties fo:margin-top="0cm" fo:margin-bottom="0.247cm" style:contextual-spacing="false" fo:line-height="115%" fo:text-align="justify" style:justify-single-word="false"/>
      <style:text-properties fo:language="pt" fo:country="BR" style:script-type="latin"/>
    </style:style>
    <style:style style:name="P12" style:family="paragraph" style:parent-style-name="Horizontal_20_Line">
      <style:paragraph-properties fo:margin-top="0cm" fo:margin-bottom="0.247cm" style:contextual-spacing="false" fo:line-height="115%" fo:text-align="justify" style:justify-single-word="false"/>
      <style:text-properties fo:language="pt" fo:country="BR" style:script-type="latin"/>
    </style:style>
    <style:style style:name="P13" style:family="paragraph" style:parent-style-name="Heading_20_1">
      <style:paragraph-properties fo:margin-top="0cm" fo:margin-bottom="0.247cm" style:contextual-spacing="false" fo:line-height="115%" fo:text-align="justify" style:justify-single-word="false"/>
      <style:text-properties fo:language="pt" fo:country="BR" style:script-type="latin"/>
    </style:style>
    <style:style style:name="P14" style:family="paragraph" style:parent-style-name="Heading_20_3">
      <style:paragraph-properties fo:margin-top="0cm" fo:margin-bottom="0.247cm" style:contextual-spacing="false" fo:line-height="115%" fo:text-align="justify" style:justify-single-word="false"/>
      <style:text-properties fo:language="pt" fo:country="BR" style:script-type="latin"/>
    </style:style>
    <style:style style:name="P15" style:family="paragraph" style:parent-style-name="Text_20_body" style:list-style-name="L1">
      <style:paragraph-properties fo:margin-top="0cm" fo:margin-bottom="0cm" style:contextual-spacing="false" fo:text-align="justify" style:justify-single-word="false"/>
      <style:text-properties fo:language="pt" fo:country="BR" style:script-type="latin"/>
    </style:style>
    <style:style style:name="P16" style:family="paragraph" style:parent-style-name="Text_20_body" style:list-style-name="L1">
      <style:paragraph-properties fo:text-align="justify" style:justify-single-word="false"/>
      <style:text-properties fo:language="pt" fo:country="BR" style:script-type="latin"/>
    </style:style>
    <style:style style:name="P17" style:family="paragraph" style:parent-style-name="Text_20_body" style:list-style-name="L2">
      <style:paragraph-properties fo:margin-top="0cm" fo:margin-bottom="0cm" style:contextual-spacing="false" fo:text-align="justify" style:justify-single-word="false"/>
      <style:text-properties fo:language="pt" fo:country="BR" style:script-type="latin"/>
    </style:style>
    <style:style style:name="P18" style:family="paragraph" style:parent-style-name="Text_20_body" style:list-style-name="L2">
      <style:paragraph-properties fo:text-align="justify" style:justify-single-word="false"/>
      <style:text-properties fo:language="pt" fo:country="BR" style:script-type="latin"/>
    </style:style>
    <style:style style:name="P19" style:family="paragraph" style:parent-style-name="Text_20_body" style:list-style-name="L3">
      <style:paragraph-properties fo:margin-top="0cm" fo:margin-bottom="0cm" style:contextual-spacing="false" fo:text-align="justify" style:justify-single-word="false"/>
      <style:text-properties fo:language="pt" fo:country="BR" style:script-type="latin"/>
    </style:style>
    <style:style style:name="P20" style:family="paragraph" style:parent-style-name="Text_20_body" style:list-style-name="L3">
      <style:paragraph-properties fo:text-align="justify" style:justify-single-word="false"/>
      <style:text-properties fo:language="pt" fo:country="BR" style:script-type="latin"/>
    </style:style>
    <style:style style:name="P21" style:family="paragraph" style:parent-style-name="Text_20_body" style:list-style-name="L4">
      <style:paragraph-properties fo:margin-top="0cm" fo:margin-bottom="0cm" style:contextual-spacing="false" fo:text-align="justify" style:justify-single-word="false"/>
      <style:text-properties fo:language="pt" fo:country="BR" style:script-type="latin"/>
    </style:style>
    <style:style style:name="P22" style:family="paragraph" style:parent-style-name="Text_20_body" style:list-style-name="L4">
      <style:paragraph-properties fo:text-align="justify" style:justify-single-word="false"/>
      <style:text-properties fo:language="pt" fo:country="BR" style:script-type="latin"/>
    </style:style>
    <style:style style:name="P23" style:family="paragraph" style:parent-style-name="Text_20_body" style:list-style-name="L5">
      <style:paragraph-properties fo:margin-top="0cm" fo:margin-bottom="0cm" style:contextual-spacing="false" fo:text-align="justify" style:justify-single-word="false"/>
      <style:text-properties fo:language="pt" fo:country="BR" style:script-type="latin"/>
    </style:style>
    <style:style style:name="P24" style:family="paragraph" style:parent-style-name="Text_20_body" style:list-style-name="L5">
      <style:paragraph-properties fo:text-align="justify" style:justify-single-word="false"/>
      <style:text-properties fo:language="pt" fo:country="BR" style:script-type="latin"/>
    </style:style>
    <style:style style:name="P25" style:family="paragraph" style:parent-style-name="Text_20_body" style:list-style-name="L6">
      <style:paragraph-properties fo:margin-top="0cm" fo:margin-bottom="0cm" style:contextual-spacing="false" fo:text-align="justify" style:justify-single-word="false"/>
      <style:text-properties fo:language="pt" fo:country="BR" style:script-type="latin"/>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6">
      <style:paragraph-properties fo:text-align="justify" style:justify-single-word="false"/>
      <style:text-properties fo:language="pt" fo:country="BR" style:script-type="latin"/>
    </style:style>
    <style:style style:name="P28" style:family="paragraph" style:parent-style-name="Text_20_body" style:list-style-name="L7">
      <style:paragraph-properties fo:margin-top="0cm" fo:margin-bottom="0cm" style:contextual-spacing="false" fo:text-align="justify" style:justify-single-word="false"/>
      <style:text-properties fo:language="pt" fo:country="BR" style:script-type="latin"/>
    </style:style>
    <style:style style:name="P29" style:family="paragraph" style:parent-style-name="Text_20_body" style:list-style-name="L7">
      <style:paragraph-properties fo:text-align="justify" style:justify-single-word="false"/>
      <style:text-properties fo:language="pt" fo:country="BR" style:script-type="latin"/>
    </style:style>
    <style:style style:name="P30" style:family="paragraph" style:parent-style-name="Text_20_body" style:list-style-name="L8">
      <style:paragraph-properties fo:margin-top="0cm" fo:margin-bottom="0cm" style:contextual-spacing="false" fo:text-align="justify" style:justify-single-word="false"/>
      <style:text-properties fo:language="pt" fo:country="BR" style:script-type="latin"/>
    </style:style>
    <style:style style:name="P31" style:family="paragraph" style:parent-style-name="Text_20_body" style:list-style-name="L8">
      <style:paragraph-properties fo:text-align="justify" style:justify-single-word="false"/>
      <style:text-properties fo:language="pt" fo:country="BR" style:script-type="latin"/>
    </style:style>
    <style:style style:name="P32" style:family="paragraph" style:parent-style-name="Text_20_body" style:list-style-name="L9">
      <style:paragraph-properties fo:margin-top="0cm" fo:margin-bottom="0cm" style:contextual-spacing="false" fo:text-align="justify" style:justify-single-word="false"/>
      <style:text-properties fo:language="pt" fo:country="BR" style:script-type="latin"/>
    </style:style>
    <style:style style:name="P33" style:family="paragraph" style:parent-style-name="Text_20_body" style:list-style-name="L9">
      <style:paragraph-properties fo:text-align="justify" style:justify-single-word="false"/>
      <style:text-properties fo:language="pt" fo:country="BR" style:script-type="latin"/>
    </style:style>
    <style:style style:name="P34" style:family="paragraph" style:parent-style-name="Text_20_body" style:list-style-name="L10">
      <style:paragraph-properties fo:margin-top="0cm" fo:margin-bottom="0cm" style:contextual-spacing="false" fo:text-align="justify" style:justify-single-word="false"/>
      <style:text-properties fo:language="pt" fo:country="BR" style:script-type="latin"/>
    </style:style>
    <style:style style:name="P35" style:family="paragraph" style:parent-style-name="Text_20_body" style:list-style-name="L10">
      <style:paragraph-properties fo:text-align="justify" style:justify-single-word="false"/>
      <style:text-properties fo:language="pt" fo:country="BR" style:script-type="latin"/>
    </style:style>
    <style:style style:name="P36" style:family="paragraph" style:parent-style-name="Text_20_body">
      <style:paragraph-properties fo:text-align="justify" style:justify-single-word="false"/>
      <style:text-properties fo:language="pt" fo:country="BR" officeooo:paragraph-rsid="00090177" style:script-type="latin"/>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Heading_20_1">
      <style:paragraph-properties fo:margin-top="0cm" fo:margin-bottom="0.247cm" style:contextual-spacing="false" fo:line-height="115%" fo:text-align="left" style:justify-single-word="false"/>
      <style:text-properties fo:language="pt" fo:country="BR" style:script-type="latin"/>
    </style:style>
    <style:style style:name="P40" style:family="paragraph" style:parent-style-name="Heading_20_2">
      <style:paragraph-properties fo:margin-top="0cm" fo:margin-bottom="0.247cm" style:contextual-spacing="false" fo:line-height="115%" fo:text-align="left" style:justify-single-word="false"/>
      <style:text-properties fo:language="pt" fo:country="BR" style:script-type="latin"/>
    </style:style>
    <style:style style:name="P41" style:family="paragraph" style:parent-style-name="Heading_20_1">
      <style:paragraph-properties fo:text-align="left" style:justify-single-word="false" fo:break-before="page"/>
      <style:text-properties fo:language="pt" fo:country="BR" fo:background-color="transparent" style:script-type="latin"/>
    </style:style>
    <style:style style:name="P42" style:family="paragraph" style:parent-style-name="Text_20_body">
      <style:paragraph-properties fo:text-align="justify" style:justify-single-word="false"/>
      <style:text-properties fo:language="pt" fo:country="BR"/>
    </style:style>
    <style:style style:name="P43" style:family="paragraph" style:parent-style-name="Heading_20_1">
      <style:paragraph-properties fo:text-align="left" style:justify-single-word="false"/>
      <style:text-properties fo:language="pt" fo:country="BR" officeooo:paragraph-rsid="00090177" style:script-type="latin"/>
    </style:style>
    <style:style style:name="P44" style:family="paragraph" style:parent-style-name="Horizontal_20_Line">
      <style:paragraph-properties fo:margin-top="0cm" fo:margin-bottom="0.247cm" style:contextual-spacing="false" fo:line-height="115%" fo:text-align="left" style:justify-single-word="false"/>
      <style:text-properties fo:language="pt" fo:country="BR" style:script-type="latin"/>
    </style:style>
    <style:style style:name="P45" style:family="paragraph" style:parent-style-name="Title">
      <style:paragraph-properties fo:break-before="page"/>
      <style:text-properties fo:font-size="88pt" fo:language="pt" fo:country="BR" style:font-size-asian="88pt" style:font-size-complex="88pt"/>
    </style:style>
    <style:style style:name="P46" style:family="paragraph" style:parent-style-name="Text_20_body">
      <style:paragraph-properties fo:text-align="justify" style:justify-single-word="false" fo:break-before="page"/>
      <style:text-properties fo:language="pt" fo:country="BR" style:script-type="latin"/>
    </style:style>
    <style:style style:name="P47" style:family="paragraph" style:parent-style-name="Heading_20_1">
      <style:paragraph-properties fo:text-align="left" style:justify-single-word="false"/>
      <style:text-properties fo:language="pt" fo:country="BR" style:script-type="latin"/>
    </style:style>
    <style:style style:name="P48" style:family="paragraph" style:parent-style-name="Heading_20_1">
      <style:paragraph-properties fo:text-align="justify" style:justify-single-word="false"/>
      <style:text-properties fo:language="pt" fo:country="BR" style:script-type="latin"/>
    </style:style>
    <style:style style:name="P49" style:family="paragraph" style:parent-style-name="Heading_20_2">
      <style:paragraph-properties fo:margin-top="0cm" fo:margin-bottom="0.247cm" style:contextual-spacing="false" fo:line-height="115%" fo:text-align="left" style:justify-single-word="false"/>
      <style:text-properties fo:language="pt" fo:country="BR" officeooo:paragraph-rsid="007a0711" style:script-type="latin"/>
    </style:style>
    <style:style style:name="P50" style:family="paragraph" style:parent-style-name="Text_20_body">
      <style:paragraph-properties fo:text-align="justify" style:justify-single-word="false"/>
      <style:text-properties fo:language="pt" fo:country="BR" officeooo:paragraph-rsid="007a0711" style:script-type="latin"/>
    </style:style>
    <style:style style:name="P51" style:family="paragraph" style:parent-style-name="Horizontal_20_Line">
      <style:paragraph-properties fo:margin-top="0cm" fo:margin-bottom="0.247cm" style:contextual-spacing="false" fo:line-height="115%" fo:text-align="justify" style:justify-single-word="false"/>
      <style:text-properties style:script-type="latin"/>
    </style:style>
    <style:style style:name="P52" style:family="paragraph" style:parent-style-name="Heading_20_2">
      <style:paragraph-properties fo:margin-top="0cm" fo:margin-bottom="0.247cm" style:contextual-spacing="false" fo:line-height="115%" fo:text-align="justify" style:justify-single-word="false"/>
      <style:text-properties style:script-type="latin"/>
    </style:style>
    <style:style style:name="P53" style:family="paragraph" style:parent-style-name="Text_20_body">
      <style:paragraph-properties fo:text-align="justify" style:justify-single-word="false"/>
      <style:text-properties style:script-type="latin"/>
    </style:style>
    <style:style style:name="P54" style:family="paragraph" style:parent-style-name="Heading_20_3">
      <style:paragraph-properties fo:margin-top="0cm" fo:margin-bottom="0.247cm" style:contextual-spacing="false" fo:line-height="115%" fo:text-align="justify" style:justify-single-word="false"/>
      <style:text-properties style:script-type="latin"/>
    </style:style>
    <style:style style:name="P55" style:family="paragraph" style:parent-style-name="Standard">
      <style:paragraph-properties fo:text-align="justify" style:justify-single-word="false"/>
      <style:text-properties fo:language="pt" fo:country="BR" style:script-type="latin"/>
    </style:style>
    <style:style style:name="T1" style:family="text">
      <style:text-properties fo:language="pt" fo:country="BR" style:script-type="latin"/>
    </style:style>
    <style:style style:name="T2" style:family="text">
      <style:text-properties fo:language="pt" fo:country="BR" officeooo:rsid="000bfa09" style:script-type="latin"/>
    </style:style>
    <style:style style:name="T3" style:family="text">
      <style:text-properties fo:language="pt" fo:country="BR" officeooo:rsid="001ae7ae" style:script-type="latin"/>
    </style:style>
    <style:style style:name="T4" style:family="text">
      <style:text-properties fo:language="pt" fo:country="BR" officeooo:rsid="001c1609" style:script-type="latin"/>
    </style:style>
    <style:style style:name="T5" style:family="text">
      <style:text-properties officeooo:rsid="00484cae"/>
    </style:style>
    <style:style style:name="T6" style:family="text">
      <style:text-properties officeooo:rsid="0026e315"/>
    </style:style>
    <style:style style:name="T7" style:family="text">
      <style:text-properties officeooo:rsid="00281c1b"/>
    </style:style>
    <style:style style:name="T8" style:family="text">
      <style:text-properties officeooo:rsid="0029e7ae"/>
    </style:style>
    <style:style style:name="T9" style:family="text">
      <style:text-properties fo:language="pt" fo:country="BR" officeooo:rsid="002d8373" style:script-type="latin"/>
    </style:style>
    <style:style style:name="T10" style:family="text">
      <style:text-properties officeooo:rsid="002e0758"/>
    </style:style>
    <style:style style:name="T11" style:family="text">
      <style:text-properties fo:background-color="transparent" loext:char-shading-value="0"/>
    </style:style>
    <style:style style:name="T12" style:family="text">
      <style:text-properties style:script-type="latin"/>
    </style:style>
    <style:style style:name="T13" style:family="text">
      <style:text-properties officeooo:rsid="004d3172"/>
    </style:style>
    <style:style style:name="T14" style:family="text">
      <style:text-properties officeooo:rsid="0069fb00"/>
    </style:style>
    <style:style style:name="T15" style:family="text">
      <style:text-properties officeooo:rsid="007628f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6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0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6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7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18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9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Livros Apócrifos — História Completa</text:p>
      <text:p text:style-name="P2"/>
      <text:p text:style-name="P3"/>
      <text:p text:style-name="P4">A primeira Jornada</text:p>
      <text:h text:style-name="P5" text:outline-level="2"><text:bookmark-start text:name="__DdeLink__9380_4151765368"/>1. O que significa "apócrifo"?</text:h>
      <text:p text:style-name="P6"><text:bookmark-start text:name="__DdeLink__8998_2515542930"/><text:bookmark-start text:name="__DdeLink__9389_3147029182"/><text:bookmark-start text:name="__DdeLink__8995_2515542930"/><text:span text:style-name="T1">A palavra "apócrifo" origina-se do grego </text:span><text:span text:style-name="Emphasis"><text:span text:style-name="T1">apokryphos</text:span></text:span><text:span text:style-name="T1">, que significa "oculto" ou "secreto". Inicialmente, esse termo poderia sugerir um sentido de respeito por escritos de conteúdo profundo ou esotérico, acessível apenas a círculos restritos. Com o tempo, porém, passou a adquirir uma conotação de espúrio ou de autenticidade questionável.</text:span></text:p>
      <text:p text:style-name="P2">O termo foi criado por Jerônimo, no quinto século, para designar basicamente antigos documentos judaicos escritos no período entre o último livro das escrituras judaicas (Malaquias) e a vinda de Jesus Cristo.<text:bookmark-end text:name="__DdeLink__8998_2515542930"/><text:bookmark-end text:name="__DdeLink__8995_2515542930"/><text:bookmark-end text:name="__DdeLink__9389_3147029182"/></text:p>
      <text:p text:style-name="P7"/>
      <text:h text:style-name="P8" text:outline-level="2">2. Origem histórica</text:h>
      <text:p text:style-name="P2"><text:bookmark-start text:name="__DdeLink__9391_3147029182"/>Os livros apócrifos surgiram aproximadamente entre os séculos III a.C. e I d.C., um período de grande fermentação cultural e religiosa no judaísmo. Muitos desses livros foram escritos em resposta às necessidades dos judeus que viviam sob o domínio de impérios estrangeiros, como o grego e o romano, buscando fortalecer sua identidade.</text:p>
      <text:p text:style-name="P2">Os apócrifos do Novo Testamento têm origem mais recente: começam a difundir-se desde pelo menos o século II d.C., e alguns foram escritos por hereges com o fim de propagar os dogmas de sua seita, enquanto outros foram compostos por cristãos piedosos com a intenção de preencher as lacunas da história evangélica ou de preservar tradições apostólicas.<text:bookmark-end text:name="__DdeLink__9391_3147029182"/></text:p>
      <text:p text:style-name="P7"/>
      <text:h text:style-name="P8" text:outline-level="2">3. Por que foram excluídos do cânon?</text:h>
      <text:p text:style-name="P2"><text:bookmark-start text:name="__DdeLink__9395_3147029182"/>A decisão de excluir esses livros baseou-se em vários critérios, incluindo a autenticidade questionável, a falta de citação por parte de Jesus e dos apóstolos, e a não inclusão no cânon hebraico do Antigo Testamento. Esses textos não foram reconhecidos como inspirados por Deus para instrução doutrinária ou normativa.</text:p>
      <text:p text:style-name="P2">Muitos são fantasiosos sobre a Pessoa de Jesus e sobre outros personagens bíblicos. Além disso, muitos desses textos possuem até heresias como o gnosticismo. No entanto, neles há algumas verdades históricas, e isso faz a Igreja considerá-los importantes nos estudos.<text:bookmark-end text:name="__DdeLink__9395_3147029182"/></text:p>
      <text:p text:style-name="P7"/>
      <text:h text:style-name="P8" text:outline-level="2">4. A questão do cânon — católicos, ortodoxos e protestantes</text:h>
      <text:p text:style-name="P2"><text:bookmark-start text:name="__DdeLink__9397_3147029182"/>Alguns livros considerados canônicos pelos católicos são considerados apócrifos por judeus e/ou protestantes. Católicos e ortodoxos aceitaram os livros de Tobias, Judite, Sabedoria, Sirácida, I e II Macabeus e Baruque como deuterocanônicos.</text:p>
      <text:p text:style-name="P2">Entre as Igrejas Protestante e Católica Romana, a diferença é de 7 livros. Para a Igreja Protestante, estes livros são apócrifos pois foram encontrados em manuscritos gregos, contrastando com os hebraicos. A Igreja Católica Romana os admitiu como canônicos depois de cinco Concílios: Roma (382 d.C.), Hipona (393 d.C.), Cartago (397 d.C.), Florença (1431) e Trento (1545).</text:p>
      <text:p text:style-name="P2"><text:soft-page-break/>Na Reforma Protestante, a decisão de excluir os apócrifos refletia um retorno à autoridade das Escrituras hebraicas. Este posicionamento foi solidificado na Confissão de Fé de Westminster em 1647.<text:bookmark-end text:name="__DdeLink__9397_3147029182"/></text:p>
      <text:p text:style-name="P7"/>
      <text:h text:style-name="P8" text:outline-level="2">5. Quantos são?</text:h>
      <text:p text:style-name="P2"><text:bookmark-start text:name="__DdeLink__9393_3147029182"/>O número dos livros apócrifos é maior que o da Bíblia canônica. É possível contabilizar 113 deles — 52 em relação ao Antigo Testamento e 61 em relação ao Novo. Os apócrifos são cartas, coletâneas de frases, narrativas da criação e profecias apocalípticas.</text:p>
      <text:p text:style-name="P2">Entre os mais relevantes encontram-se evangelhos (de Tomás, de Filipe, de Maria Madalena, de Judas), atos apócrifos dos apóstolos (Pedro, Paulo, André, João, Tomé), epístolas e apocalipses apócrifos.<text:bookmark-end text:name="__DdeLink__9393_3147029182"/></text:p>
      <text:p text:style-name="P7"/>
      <text:h text:style-name="P8" text:outline-level="2">6. Os textos mais famosos</text:h>
      <text:p text:style-name="P6"><text:bookmark-start text:name="__DdeLink__9399_3147029182"/><text:span text:style-name="Strong_20_Emphasis"><text:span text:style-name="T1">Livro de Enoque</text:span></text:span><text:span text:style-name="T1"> — Considerado apócrifo para todas as igrejas, com exceção da Igreja Ortodoxa Etíope e da Igreja Batista Abissínia, é chamado de "a Bíblia proibida". A única versão completa é uma tradução etíope de uma versão grega feita na Palestina por volta de 300 a 200 a.C. Foram encontrados fragmentos aramaicos com citações dele nos Manuscritos do Mar Morto, comprovando que era seguido por judeus e pelos primeiros cristãos.</text:span></text:p>
      <text:p text:style-name="P6"><text:span text:style-name="Strong_20_Emphasis"><text:span text:style-name="T1">Livro de Tobias</text:span></text:span><text:span text:style-name="T1"> — Uma narração antiga de origem judaica, escrita por volta de 200 a.C. Não é uma história real, mas uma espécie de novela que transmite ensinamentos e exemplos morais. Nela, um arcanjo acompanha o jovem Tobias numa viagem que envolve cura milagrosa e libertação de um demônio.</text:span><text:bookmark-end text:name="__DdeLink__9399_3147029182"/></text:p>
      <text:p text:style-name="P7"/>
      <text:h text:style-name="P8" text:outline-level="2">7. A grande descoberta: Nag Hammadi (1945)</text:h>
      <text:p text:style-name="P2"><text:bookmark-start text:name="__DdeLink__9401_3147029182"/>Esta é, para os estudos gnósticos, a descoberta mais revolucionária da história moderna.</text:p>
      <text:p text:style-name="P2">A Biblioteca de Nag Hammadi é uma coleção de textos gnósticos do cristianismo primitivo descoberta no Alto Egito, perto da cidade de Nag Hammadi, em 1945, por um camponês chamado Mohammed Ali Samman, que encontrou uma jarra selada enterrada contendo treze códices de papiro embrulhados em couro. Os códices contêm cinquenta e dois textos, em sua maioria gnósticos, além de três trabalhos do Corpus Hermeticum e uma tradução parcial da República de Platão.</text:p>
      <text:p text:style-name="P2">A descoberta não foi inicialmente reportada — os lavradores, sem compreender o valor dos textos, chegaram a rasgar os volumes e repartir as páginas entre si. Como resultado, a importância do achado passou despercebida por algum tempo.</text:p>
      <text:p text:style-name="P2">Acredita-se que os manuscritos foram enterrados por volta do século IV, quando da conversão do imperador Constantino, momento em que os bispos cristãos desencadearam uma campanha contra <text:soft-page-break/>as heresias. Algum monge do mosteiro de São Pacômio, nas cercanias de Nag Hammadi, tomou os livros proibidos e os escondeu no pote de barro, onde permaneceram por mais de 1.600 anos.</text:p>
      <text:p text:style-name="P6"><text:span text:style-name="T1">As cópias encontradas em Nag Hammadi datam seguramente do século IV. Os textos revelaram doutrinas próximas àquelas que os Padres da Igreja nos séculos II, III e IV haviam denunciado como heréticas — como o Apócrifo de João, cuja descrição do mito da criação é muito próxima daquela que Irineu de Lyon atribui a grupos gnósticos em seu livro </text:span><text:span text:style-name="Emphasis"><text:span text:style-name="T1">Contra as Heresias</text:span></text:span><text:span text:style-name="T1">.</text:span><text:bookmark-end text:name="__DdeLink__9401_3147029182"/></text:p>
      <text:p text:style-name="P7"/>
      <text:h text:style-name="P8" text:outline-level="2">8. Os Manuscritos do Mar Morto (1947)</text:h>
      <text:p text:style-name="P9"><text:bookmark-start text:name="__DdeLink__9406_3147029182"/><text:bookmark-start text:name="__DdeLink__9403_3147029182"/>Os Manuscritos do Mar Morto foram casualmente descobertos por beduínos em 1947, que em busca de um animal localizou a primeira das cavernas com jarros cerâmicos contendo rolos de papiro. Foram compilados por uma doutrina de judeus conhecida como essênios, que viveram em Qumran do século II a.C. até aproximadamente 70 d.C. Os manuscritos incluem porções de toda a Bíblia Hebraica (exceto Ester e Neemias), além de livros apócrifos e livros de regras da própria seita.</text:p>
      <text:p text:style-name="P2">Na Gruta 5 acharam-se alguns livros bíblicos e outros apócrifos em avançado estado de deterioração. A Gruta 11 revelou uma cópia de alguns salmos, incluindo o salmo apócrifo 151, que até então só era conhecido em textos gregos.<text:bookmark-end text:name="__DdeLink__9406_3147029182"/><text:bookmark-end text:name="__DdeLink__9403_3147029182"/></text:p>
      <text:p text:style-name="P7"/>
      <text:h text:style-name="P8" text:outline-level="2">9. Importância para a história do Cristianismo</text:h>
      <text:p text:style-name="P2"><text:bookmark-start text:name="__DdeLink__9408_3147029182"/>A descoberta desses documentos revisou radicalmente a compreensão do gnosticismo e da Igreja cristã primitiva. O gnosticismo afirma que o conhecimento direto, pessoal e absoluto das verdades autênticas da existência é acessível aos seres humanos, e que a obtenção de tal conhecimento é a conquista suprema da vida humana.</text:p>
      <text:p text:style-name="P2">Desde o século passado a importância desses textos foi reconsiderada — não por aspectos doutrinários, mas como meio de fornecer informações importantes para o estudo da doutrina e da história das religiões. Muitos foram ignorados por questões ideológicas e outros simplesmente porque ninguém sabia de sua existência.<text:bookmark-end text:name="__DdeLink__9408_3147029182"/></text:p>
      <text:p text:style-name="P7"/>
      <text:p text:style-name="P6"><text:bookmark-start text:name="__DdeLink__9410_3147029182"/><text:span text:style-name="T1">Em suma, os livros apócrifos constituem um universo imenso e heterogéneo — não são simplesmente "livros proibidos" ou textos subversivos, mas um espelho das múltiplas vozes, crenças e debates que atravessaram o Judaísmo e o Cristianismo primitivo, muito antes de qualquer cânon ter se consolidado. Para alguém que já mergulhou no </text:span><text:span text:style-name="Emphasis"><text:span text:style-name="T1">Livro de Tomás</text:span></text:span><text:span text:style-name="T1"> e no </text:span><text:span text:style-name="Emphasis"><text:span text:style-name="T1">Evangelho de Tomás</text:span></text:span><text:span text:style-name="T1">, esses textos são a continuação natural de uma exploração muito mais vasta.</text:span><text:bookmark-end text:name="__DdeLink__9410_3147029182"/><text:bookmark-end text:name="__DdeLink__9380_4151765368"/></text:p>
      <text:h text:style-name="P10" text:outline-level="1"><text:bookmark-start text:name="__DdeLink__9412_3147029182"/>Culturas e Espiritualidades Fundamentadas nos Apócrifos<text:bookmark-end text:name="__DdeLink__9412_3147029182"/></text:h>
      <text:h text:style-name="P11" text:outline-level="2">1. O Gnosticismo — a raiz de tudo</text:h>
      <text:p text:style-name="P2"><text:bookmark-start text:name="__DdeLink__9416_3147029182"/>É a tradição que mais directamente nasceu dos textos apócrifos e gnósticos. Os textos gnósticos propunham que a divindade não seria uma entidade exclusivamente externa, mas residiria também no interior do indivíduo. Além disso, os textos gnósticos transmitiam a ideia de que o ser humano não necessitaria temer a Deus ou ao Estado — uma perspectiva considerada altamente perigosa, pois desafiava as bases de controle social e religioso.</text:p>
      <text:p text:style-name="P2">Os gnósticos misturavam em suas crenças e práticas conceitos oriundos dos gregos, egípcios e do oriente. Boa parte do conhecimento oculto ocidental que temos hoje vem da Idade Média e do Renascimento, mas os gnósticos foram, ao seu modo, precursores de diversos conhecimentos que ressurgiram séculos e milénios mais tarde.</text:p>
      <text:p text:style-name="P6"><text:span text:style-name="T1">O gnosticismo é uma concepção religiosa muito antiga, de antes de Cristo, que veio provavelmente do Oriente, da Pérsia, e que se infiltrou na Igreja gerando uma corrente que foi severamente combatida por Irineu (130–200) em seu famoso livro </text:span><text:span text:style-name="Emphasis"><text:span text:style-name="T1">Contra os Hereges</text:span></text:span><text:span text:style-name="T1">.</text:span><text:bookmark-end text:name="__DdeLink__9416_3147029182"/></text:p>
      <text:p text:style-name="P12"/>
      <text:h text:style-name="P11" text:outline-level="2">2. O Mandeísmo — o único gnosticismo vivo</text:h>
      <text:p text:style-name="P6"><text:bookmark-start text:name="__DdeLink__9418_3147029182"/><text:span text:style-name="T1">Os mandeus são assim classificados devido à etimologia da palavra </text:span><text:span text:style-name="Emphasis"><text:span text:style-name="T1">manda</text:span></text:span><text:span text:style-name="T1">, que na língua mandeia significa conhecimento — em grego, </text:span><text:span text:style-name="Emphasis"><text:span text:style-name="T1">gnosis</text:span></text:span><text:span text:style-name="T1">. O mandeísmo é uma rara forma de gnosticismo contemporâneo. Os mandeístas têm uma visão dualística estrita: existe uma clara divisão entre luz e trevas, onde o senhor das trevas é chamado Ptahil (semelhante ao Demiurgo gnóstico) e o gerador da luz é "a grande primeira Vida dos mundos da luz".</text:span></text:p>
      <text:p text:style-name="P2">As origens do Mandeísmo remontam ao século I da Era Comum, com raízes nas correntes religiosas da Mesopotâmia, do judaísmo heterodoxo, do cristianismo primitivo, do zoroastrismo e de tradições gnósticas helenísticas. Os seres humanos são vistos como centelhas de luz aprisionadas na matéria, esquecidas de sua origem divina. A salvação é o retorno da alma ao reino luminoso, exigindo conhecimento (gnose), rituais de purificação e orientação espiritual.</text:p>
      <text:p text:style-name="P2">É consenso entre especialistas que os mandeus conheciam os textos cristãos, canónicos e apócrifos. Nos textos mandeístas observa-se uma substituição de Jesus pelo ser de luz Anush — numa visão teológica radicalmente diferente do cristianismo ortodoxo.<text:bookmark-end text:name="__DdeLink__9418_3147029182"/></text:p>
      <text:p text:style-name="P12"/>
      <text:h text:style-name="P11" text:outline-level="2">3. Os Cátaros — o gnosticismo medieval da Europa</text:h>
      <text:p text:style-name="P2"><text:bookmark-start text:name="__DdeLink__9420_3147029182"/>Os Cátaros (séculos XII–XIII, no Sul de França e Norte de Itália) foram um dos mais impressionantes renascimentos do pensamento gnóstico e apócrifo na Europa medieval. Um pequeno grupo continuou seu trabalho na clandestinidade, submergindo-se no estudo do Corpus Hermeticum, nos ensinamentos de Hermes Trismegistos, nos escritos maniqueus e de outros grupos gnósticos e na história dos Cátaros. Acreditavam, tal como nos apócrifos gnósticos, que o mundo <text:soft-page-break/>material era obra de um deus inferior e maligno (Demiurgo), e que a centelha divina aprisionada no corpo precisava ser libertada pelo conhecimento.<text:bookmark-end text:name="__DdeLink__9420_3147029182"/></text:p>
      <text:p text:style-name="P12"/>
      <text:h text:style-name="P11" text:outline-level="2">4. A Rosa-Cruz — hermetismo e apócrifos</text:h>
      <text:p text:style-name="P2"><text:bookmark-start text:name="__DdeLink__9422_3147029182"/>Fundada na Alemanha por Christian Rosakreutz no século XV, a Rosa-Cruz possui uma grande tradição hermética. Seus seguidores são conhecidos como alquimistas, médicos e naturalistas. Dizem-se herdeiros das tradições herméticas do Antigo Egito, da Cabala, do Neoplatonismo, da Alquimia Medieval e do Ocultismo. Seu emblema significa a ligação do espírito com a matéria.</text:p>
      <text:p text:style-name="P2">O esoterismo encontra-se abundantemente na Grécia, em Roma, com os celtas e os etruscos; na Idade Média, com os templários, os cátaros, a lenda do Graal, a alquimia, a astrologia; no Renascimento com Paracelso; no século XVII com os Rosacruzes; e no século XVIII com a Teosofia nascente.<text:bookmark-end text:name="__DdeLink__9422_3147029182"/></text:p>
      <text:p text:style-name="P12"/>
      <text:h text:style-name="P11" text:outline-level="2">5. A Teosofia e o Cristianismo Esotérico</text:h>
      <text:p text:style-name="P2"><text:bookmark-start text:name="__DdeLink__9424_3147029182"/>O Cristianismo esotérico acredita em reencarnação e no evolucionismo. Além da Bíblia, os evangelhos apócrifos também são fontes de sua doutrina. O paraíso e o inferno não são eternos. Esta vertente é também influenciada pelo budismo, taoísmo e hinduísmo. Cristo é comparado a Buda nessa vertente.</text:p>
      <text:p text:style-name="P2">Helena Blavatsky e o Coronel Olcott conseguiram fazer uma síntese do neoplatonismo e do gnosticismo — as suas principais bases — acrescentando as religiões indianas. A Sociedade Teosófica teve sua primeira reunião em Nova York em 1875.<text:bookmark-end text:name="__DdeLink__9424_3147029182"/></text:p>
      <text:p text:style-name="P12"/>
      <text:h text:style-name="P11" text:outline-level="2">6. O Islamismo — influência silenciosa</text:h>
      <text:p text:style-name="P2"><text:bookmark-start text:name="__DdeLink__9428_3147029182"/>No Alcorão existem citações referentes a Jesus tiradas de escritos apócrifos — como o facto de Jesus falar no berço e de ter soprado em bonecos de argila em forma de pássaro, que se transformaram pelo sopro em pássaros verdadeiros. Estes episódios não constam dos Evangelhos canónicos, mas estão presentes nos Evangelhos apócrifos da Infância.<text:bookmark-end text:name="__DdeLink__9428_3147029182"/></text:p>
      <text:p text:style-name="P12"/>
      <text:h text:style-name="P11" text:outline-level="2">7. A Cabala Judaica</text:h>
      <text:p text:style-name="P6"><text:bookmark-start text:name="__DdeLink__9426_3147029182"/><text:span text:style-name="T1">Há vários textos apócrifos do Velho Testamento como o Evangelho de Enoque e as tradições cabalísticas contidas no </text:span><text:span text:style-name="Emphasis"><text:span text:style-name="T1">Zohar</text:span></text:span><text:span text:style-name="T1"> e no </text:span><text:span text:style-name="Emphasis"><text:span text:style-name="T1">Sepher Yetzirá</text:span></text:span><text:span text:style-name="T1"> — livros não reconhecidos pelos rabinos dogmáticos — que descrevem a criação conjunta e simultânea de Adão e Eva a partir de um ser primordial hermafrodita chamado </text:span><text:span text:style-name="Emphasis"><text:span text:style-name="T1">Adam-Kadmon</text:span></text:span><text:span text:style-name="T1">, o Ser Humano Primordial.</text:span><text:bookmark-end text:name="__DdeLink__9426_3147029182"/></text:p>
      <text:p text:style-name="P12"/>
      <text:h text:style-name="P11" text:outline-level="2">8. A Gnose Contemporânea</text:h>
      <text:p text:style-name="P2"><text:bookmark-start text:name="__DdeLink__9430_3147029182"/>A Antropologia Gnóstica, ao estudar as tradições antigas de vários povos e épocas, constata três ideias sempre presentes: há um Criador, há uma Natureza que delineia o desenvolvimento dos seres vivos, e há o próprio livre-arbítrio do ser humano. A Gnose busca a síntese a partir das teses, a visão <text:soft-page-break/>global a partir das partes — dos indícios arqueológicos, das observações biológicas, das pesquisas genéticas, das tradições mitológicas, dos escritos teogónicos e das experiências místicas directas.</text:p>
      <text:p text:style-name="P12"/>
      <text:p text:style-name="P2">Em resumo, os apócrifos não são apenas livros marginais — são a espinha dorsal de toda uma corrente alternativa da espiritualidade humana, que atravessa o Médio Oriente, a Europa medieval, o ocultismo renascentista, a Teosofia moderna e as tradições gnósticas vivas até hoje. São o fio subterrâneo que liga o Egito antigo ao misticismo contemporâneo.<text:bookmark-end text:name="__DdeLink__9430_3147029182"/></text:p>
      <text:p text:style-name="P12"/>
      <text:h text:style-name="P13" text:outline-level="1"><text:bookmark-start text:name="__DdeLink__9435_3147029182"/><text:bookmark-start text:name="__DdeLink__9432_3147029182"/>Lista Completa dos Livros Apócrifos</text:h>
      <text:h text:style-name="P11" text:outline-level="2">─── ANTIGO TESTAMENTO ───</text:h>
      <text:h text:style-name="P14" text:outline-level="3">Deuterocanónicos (aceites por Católicos e Ortodoxos, apócrifos para Protestantes)</text:h>
      <text:list text:style-name="L1">
        <text:list-item>
          <text:p text:style-name="P15">Livro de Tobias </text:p>
        </text:list-item>
        <text:list-item>
          <text:p text:style-name="P15">Livro de Judite </text:p>
        </text:list-item>
        <text:list-item>
          <text:p text:style-name="P15">I Macabeus </text:p>
        </text:list-item>
        <text:list-item>
          <text:p text:style-name="P15">II Macabeus </text:p>
        </text:list-item>
        <text:list-item>
          <text:p text:style-name="P15">Sabedoria de Salomão </text:p>
        </text:list-item>
        <text:list-item>
          <text:p text:style-name="P15">Eclesiástico / Sirácida / Ben Sirá </text:p>
        </text:list-item>
        <text:list-item>
          <text:p text:style-name="P15">Baruque </text:p>
        </text:list-item>
        <text:list-item>
          <text:p text:style-name="P15">Adições em Ester (capítulos gregos) </text:p>
        </text:list-item>
        <text:list-item>
          <text:p text:style-name="P16">Adições em Daniel — incluindo: História de Susana · Salmo de Azarias · Cântico dos Três Jovens · Bel e o Dragão </text:p>
        </text:list-item>
      </text:list>
      <text:h text:style-name="P14" text:outline-level="3">Pseudepígrafos e outros apócrifos do AT</text:h>
      <text:list text:style-name="L2">
        <text:list-item>
          <text:p text:style-name="P17">1º Livro de Adão e Eva </text:p>
        </text:list-item>
        <text:list-item>
          <text:p text:style-name="P17">2º Livro de Adão e Eva </text:p>
        </text:list-item>
        <text:list-item>
          <text:p text:style-name="P17">1º Livro de Enoque (Etíope) </text:p>
        </text:list-item>
        <text:list-item>
          <text:p text:style-name="P17">2º Livro de Enoque (Eslavo) </text:p>
        </text:list-item>
        <text:list-item>
          <text:p text:style-name="P17">3º Livro de Enoque (Hebraico) </text:p>
        </text:list-item>
        <text:list-item>
          <text:p text:style-name="P17">1º Livro de Esdras </text:p>
        </text:list-item>
        <text:list-item>
          <text:p text:style-name="P17">2º Livro de Esdras </text:p>
        </text:list-item>
        <text:list-item>
          <text:p text:style-name="P17">3º Livro de Esdras </text:p>
        </text:list-item>
        <text:list-item>
          <text:p text:style-name="P17">4º Livro de Esdras </text:p>
        </text:list-item>
        <text:list-item>
          <text:p text:style-name="P17">III Macabeus </text:p>
        </text:list-item>
        <text:list-item>
          <text:p text:style-name="P17">IV Macabeus </text:p>
        </text:list-item>
        <text:list-item>
          <text:p text:style-name="P17">V Macabeus </text:p>
        </text:list-item>
        <text:list-item>
          <text:p text:style-name="P17">Livro dos Jubileus </text:p>
        </text:list-item>
        <text:list-item>
          <text:p text:style-name="P17">Assunção de Moisés </text:p>
        </text:list-item>
        <text:list-item>
          <text:p text:style-name="P17">Apocalipse de Moisés </text:p>
        </text:list-item>
        <text:list-item>
          <text:p text:style-name="P17">Ascensão de Isaías </text:p>
        </text:list-item>
        <text:list-item>
          <text:p text:style-name="P17">Martírio de Isaías </text:p>
        </text:list-item>
        <text:list-item>
          <text:p text:style-name="P17">Apocalipse de Abraão </text:p>
        </text:list-item>
        <text:list-item>
          <text:p text:style-name="P17"><text:soft-page-break/>Testamento de Abraão </text:p>
        </text:list-item>
        <text:list-item>
          <text:p text:style-name="P17">Testamento de Isaac </text:p>
        </text:list-item>
        <text:list-item>
          <text:p text:style-name="P17">Testamento de Jacob </text:p>
        </text:list-item>
        <text:list-item>
          <text:p text:style-name="P17">Escada de Jacob </text:p>
        </text:list-item>
        <text:list-item>
          <text:p text:style-name="P17">Testamento dos Doze Patriarcas </text:p>
        </text:list-item>
        <text:list-item>
          <text:p text:style-name="P17">Testamento de Jó </text:p>
        </text:list-item>
        <text:list-item>
          <text:p text:style-name="P17">Testamento de Salomão </text:p>
        </text:list-item>
        <text:list-item>
          <text:p text:style-name="P17">Testamento de Adão </text:p>
        </text:list-item>
        <text:list-item>
          <text:p text:style-name="P17">Testamento de Amran </text:p>
        </text:list-item>
        <text:list-item>
          <text:p text:style-name="P17">José e Aseneth </text:p>
        </text:list-item>
        <text:list-item>
          <text:p text:style-name="P17">Livro de Noé </text:p>
        </text:list-item>
        <text:list-item>
          <text:p text:style-name="P17">Livro de Iannes e Iambres </text:p>
        </text:list-item>
        <text:list-item>
          <text:p text:style-name="P17">Oráculos Sibilinos </text:p>
        </text:list-item>
        <text:list-item>
          <text:p text:style-name="P17">Odes de Salomão </text:p>
        </text:list-item>
        <text:list-item>
          <text:p text:style-name="P17">Salmos de Salomão </text:p>
        </text:list-item>
        <text:list-item>
          <text:p text:style-name="P17">Salmo 151 </text:p>
        </text:list-item>
        <text:list-item>
          <text:p text:style-name="P17">Salmos 152–155 </text:p>
        </text:list-item>
        <text:list-item>
          <text:p text:style-name="P17">Paralipómenos de Jeremias </text:p>
        </text:list-item>
        <text:list-item>
          <text:p text:style-name="P17">Apocalipse de Elias </text:p>
        </text:list-item>
        <text:list-item>
          <text:p text:style-name="P17">Apocalipse de Esdras </text:p>
        </text:list-item>
        <text:list-item>
          <text:p text:style-name="P17">Apocalipse de Sidrac </text:p>
        </text:list-item>
        <text:list-item>
          <text:p text:style-name="P17">Apocalipse de Baruque (2 Baruque / Siríaco) </text:p>
        </text:list-item>
        <text:list-item>
          <text:p text:style-name="P17">Apocalipse de Baruque (3 Baruque / Grego) </text:p>
        </text:list-item>
        <text:list-item>
          <text:p text:style-name="P17">Visão de Esdras </text:p>
        </text:list-item>
        <text:list-item>
          <text:p text:style-name="P17">Vidas dos Profetas </text:p>
        </text:list-item>
        <text:list-item>
          <text:p text:style-name="P17">História dos Recabitas </text:p>
        </text:list-item>
        <text:list-item>
          <text:p text:style-name="P17">História do Sábio Achikar </text:p>
        </text:list-item>
        <text:list-item>
          <text:p text:style-name="P17">Samuel Apócrifo </text:p>
        </text:list-item>
        <text:list-item>
          <text:p text:style-name="P17">Caverna dos Tesouros </text:p>
        </text:list-item>
        <text:list-item>
          <text:p text:style-name="P17">Epístola de Aristéas </text:p>
        </text:list-item>
        <text:list-item>
          <text:p text:style-name="P17">Oração de Manassés </text:p>
        </text:list-item>
        <text:list-item>
          <text:p text:style-name="P17">Oração de José </text:p>
        </text:list-item>
        <text:list-item>
          <text:p text:style-name="P17">Vida de Adão e Eva </text:p>
        </text:list-item>
        <text:list-item>
          <text:p text:style-name="P18">Segundo Tratado do Grande Sete </text:p>
        </text:list-item>
      </text:list>
      <text:p text:style-name="P12"/>
      <text:h text:style-name="P11" text:outline-level="2">─── MANUSCRITOS DO MAR MORTO (Qumran / Essénios) ───</text:h>
      <text:list text:style-name="L3">
        <text:list-item>
          <text:p text:style-name="P19">Regra da Comunidade (1QS) </text:p>
        </text:list-item>
        <text:list-item>
          <text:p text:style-name="P19">Preceito de Damasco (CD) </text:p>
        </text:list-item>
        <text:list-item>
          <text:p text:style-name="P19">Preceito da Guerra (1QM) </text:p>
        </text:list-item>
        <text:list-item>
          <text:p text:style-name="P19">Preceito do Messianismo (1QSa) </text:p>
        </text:list-item>
        <text:list-item>
          <text:p text:style-name="P19">Hinos de Ação de Graças (1QH) </text:p>
        </text:list-item>
        <text:list-item>
          <text:p text:style-name="P19">Génesis Apócrifo (1QapGen) </text:p>
        </text:list-item>
        <text:list-item>
          <text:p text:style-name="P19">Samuel Apócrifo (4Q160) </text:p>
        </text:list-item>
        <text:list-item>
          <text:p text:style-name="P19"><text:soft-page-break/>Gênesis Apócrifo </text:p>
        </text:list-item>
        <text:list-item>
          <text:p text:style-name="P19">Comentários sobre Habacuc (1QpHab) </text:p>
        </text:list-item>
        <text:list-item>
          <text:p text:style-name="P19">Comentários sobre Isaías (4Q161–164) </text:p>
        </text:list-item>
        <text:list-item>
          <text:p text:style-name="P19">Comentários sobre Oseias (4Q166–167) </text:p>
        </text:list-item>
        <text:list-item>
          <text:p text:style-name="P19">Comentários sobre Naum (4Q169) </text:p>
        </text:list-item>
        <text:list-item>
          <text:p text:style-name="P19">Comentários sobre Miqueias (1Q14) </text:p>
        </text:list-item>
        <text:list-item>
          <text:p text:style-name="P19">Comentários sobre Salmos (4Q171/173) </text:p>
        </text:list-item>
        <text:list-item>
          <text:p text:style-name="P19">Comentários sobre a Lei (4Q159) </text:p>
        </text:list-item>
        <text:list-item>
          <text:p text:style-name="P19">Cânticos para o Holocausto do Sábado (4Q400–407) </text:p>
        </text:list-item>
        <text:list-item>
          <text:p text:style-name="P19">Cânticos do Sábio (4Q510–511) </text:p>
        </text:list-item>
        <text:list-item>
          <text:p text:style-name="P19">Orações Diárias (4Q503) </text:p>
        </text:list-item>
        <text:list-item>
          <text:p text:style-name="P19">Orações para as Festividades (4Q507–509) </text:p>
        </text:list-item>
        <text:list-item>
          <text:p text:style-name="P19">Oração Litúrgica (1Q34) </text:p>
        </text:list-item>
        <text:list-item>
          <text:p text:style-name="P19">Palavras das Luzes Celestes (4Q504) </text:p>
        </text:list-item>
        <text:list-item>
          <text:p text:style-name="P19">Palavras de Moisés (1Q22) </text:p>
        </text:list-item>
        <text:list-item>
          <text:p text:style-name="P19">Bênçãos (1QSb) </text:p>
        </text:list-item>
        <text:list-item>
          <text:p text:style-name="P19">Bênção de Jacob (4QPBl) </text:p>
        </text:list-item>
        <text:list-item>
          <text:p text:style-name="P19">Antologia Messiânica (4Q175) </text:p>
        </text:list-item>
        <text:list-item>
          <text:p text:style-name="P19">Consolações (4Q176) </text:p>
        </text:list-item>
        <text:list-item>
          <text:p text:style-name="P19">Eras da Criação (4Q180) </text:p>
        </text:list-item>
        <text:list-item>
          <text:p text:style-name="P19">Os Últimos Dias (4Q174) </text:p>
        </text:list-item>
        <text:list-item>
          <text:p text:style-name="P19">Os Ímpios e os Santos (4Q181) </text:p>
        </text:list-item>
        <text:list-item>
          <text:p text:style-name="P19">A Nova Jerusalém (5Q15) </text:p>
        </text:list-item>
        <text:list-item>
          <text:p text:style-name="P19">A Sedutora (4Q184) </text:p>
        </text:list-item>
        <text:list-item>
          <text:p text:style-name="P19">Exortação para Busca da Sabedoria (4Q185) </text:p>
        </text:list-item>
        <text:list-item>
          <text:p text:style-name="P19">Horóscopos (4Q186) </text:p>
        </text:list-item>
        <text:list-item>
          <text:p text:style-name="P19">Melquisedec, o Príncipe Celeste (11QMelq) </text:p>
        </text:list-item>
        <text:list-item>
          <text:p text:style-name="P19">Maldições de Satanás (4Q286–287) </text:p>
        </text:list-item>
        <text:list-item>
          <text:p text:style-name="P19">O Triunfo da Retidão (1Q27) </text:p>
        </text:list-item>
        <text:list-item>
          <text:p text:style-name="P19">Rito de Purificação (4Q512) </text:p>
        </text:list-item>
        <text:list-item>
          <text:p text:style-name="P19">Salmos Apócrifos (11QPsa) </text:p>
        </text:list-item>
        <text:list-item>
          <text:p text:style-name="P19">Pergaminho do Templo (11QT) </text:p>
        </text:list-item>
        <text:list-item>
          <text:p text:style-name="P19">Pergaminho de Cobre (3Q15) </text:p>
        </text:list-item>
        <text:list-item>
          <text:p text:style-name="P19">Prece de Nabonidus (4QprNab) </text:p>
        </text:list-item>
        <text:list-item>
          <text:p text:style-name="P20">Escritos do Pseudo-Daniel (4Q246) </text:p>
        </text:list-item>
      </text:list>
      <text:p text:style-name="P12"/>
      <text:h text:style-name="P11" text:outline-level="2">─── NOVO TESTAMENTO ───</text:h>
      <text:h text:style-name="P14" text:outline-level="3">Evangelhos da Infância</text:h>
      <text:list text:style-name="L4">
        <text:list-item>
          <text:p text:style-name="P21">Proto-Evangelho de Tiago </text:p>
        </text:list-item>
        <text:list-item>
          <text:p text:style-name="P21">Evangelho da Infância de Tomás (Pseudo-Tomás) </text:p>
        </text:list-item>
        <text:list-item>
          <text:p text:style-name="P21">Evangelho do Pseudo-Mateus </text:p>
        </text:list-item>
        <text:list-item>
          <text:p text:style-name="P21">Evangelho Árabe da Infância </text:p>
        </text:list-item>
        <text:list-item>
          <text:p text:style-name="P21">Evangelho Arménio da Infância </text:p>
        </text:list-item>
        <text:list-item>
          <text:p text:style-name="P21">História de José o Carpinteiro </text:p>
        </text:list-item>
        <text:list-item>
          <text:p text:style-name="P22"><text:soft-page-break/>Livro sobre o Nascimento de Maria </text:p>
        </text:list-item>
      </text:list>
      <text:h text:style-name="P14" text:outline-level="3">Evangelhos Judeu-Cristãos</text:h>
      <text:list text:style-name="L5">
        <text:list-item>
          <text:p text:style-name="P23">Evangelho dos Hebreus </text:p>
        </text:list-item>
        <text:list-item>
          <text:p text:style-name="P23">Evangelho dos Nazarenos </text:p>
        </text:list-item>
        <text:list-item>
          <text:p text:style-name="P24">Evangelho dos Ebionitas </text:p>
        </text:list-item>
      </text:list>
      <text:h text:style-name="P14" text:outline-level="3">Evangelhos Gnósticos (incluindo Nag Hammadi)</text:h>
      <text:list text:style-name="L6">
        <text:list-item>
          <text:p text:style-name="P25">Evangelho de Tomás </text:p>
        </text:list-item>
        <text:list-item>
          <text:p text:style-name="P25">Evangelho de Filipe </text:p>
        </text:list-item>
        <text:list-item>
          <text:p text:style-name="P25">Evangelho da Verdade </text:p>
        </text:list-item>
        <text:list-item>
          <text:p text:style-name="P25">Evangelho de Maria Madalena </text:p>
        </text:list-item>
        <text:list-item>
          <text:p text:style-name="P25">Evangelho de Judas </text:p>
        </text:list-item>
        <text:list-item>
          <text:p text:style-name="P25">Evangelho de Pedro </text:p>
        </text:list-item>
        <text:list-item>
          <text:p text:style-name="P25">Evangelho de Nicodemos (Atos de Pilatos) </text:p>
        </text:list-item>
        <text:list-item>
          <text:p text:style-name="P25">Evangelho Copto dos Egípcios </text:p>
        </text:list-item>
        <text:list-item>
          <text:p text:style-name="P25">Evangelho Grego dos Egípcios </text:p>
        </text:list-item>
        <text:list-item>
          <text:p text:style-name="P25">Evangelho de Eva </text:p>
        </text:list-item>
        <text:list-item>
          <text:p text:style-name="P25">Evangelho de Bartolomeu </text:p>
        </text:list-item>
        <text:list-item>
          <text:p text:style-name="P25">Evangelho de Basílides </text:p>
        </text:list-item>
        <text:list-item>
          <text:p text:style-name="P25">Evangelho de Apeles </text:p>
        </text:list-item>
        <text:list-item>
          <text:p text:style-name="P25">Evangelho de Bardesane </text:p>
        </text:list-item>
        <text:list-item>
          <text:p text:style-name="P25">Evangelho de Matias </text:p>
        </text:list-item>
        <text:list-item>
          <text:p text:style-name="P25">Evangelho da Perfeição </text:p>
        </text:list-item>
        <text:list-item>
          <text:p text:style-name="P25">Evangelho de Tadeu </text:p>
        </text:list-item>
        <text:list-item>
          <text:p text:style-name="P25">Apócrifo de João (Livro Secreto de João) </text:p>
        </text:list-item>
        <text:list-item>
          <text:p text:style-name="P25">Apócrifo de Tiago </text:p>
        </text:list-item>
        <text:list-item>
          <text:p text:style-name="P26"><text:span text:style-name="T1">Livro de Tomás o Contendente </text:span><text:span text:style-name="Emphasis"><text:span text:style-name="T1">(que conheces bem, João)</text:span></text:span><text:span text:style-name="T1"> </text:span></text:p>
        </text:list-item>
        <text:list-item>
          <text:p text:style-name="P25">Pistis Sophia (Livro do Salvador) </text:p>
        </text:list-item>
        <text:list-item>
          <text:p text:style-name="P25">Diálogo do Salvador </text:p>
        </text:list-item>
        <text:list-item>
          <text:p text:style-name="P25">Livros de Jeu (1º e 2º) </text:p>
        </text:list-item>
        <text:list-item>
          <text:p text:style-name="P25">Livro Secreto de João (versão longa e curta) </text:p>
        </text:list-item>
        <text:list-item>
          <text:p text:style-name="P25">Hipóstase dos Arcontes </text:p>
        </text:list-item>
        <text:list-item>
          <text:p text:style-name="P25">Sobre a Origem do Mundo </text:p>
        </text:list-item>
        <text:list-item>
          <text:p text:style-name="P25">Exegese da Alma </text:p>
        </text:list-item>
        <text:list-item>
          <text:p text:style-name="P25">Tratado sobre a Ressurreição </text:p>
        </text:list-item>
        <text:list-item>
          <text:p text:style-name="P25">Tratado Tripartite </text:p>
        </text:list-item>
        <text:list-item>
          <text:p text:style-name="P25">Eugnostos, o Bem-Aventurado </text:p>
        </text:list-item>
        <text:list-item>
          <text:p text:style-name="P25">Sabedoria de Jesus Cristo </text:p>
        </text:list-item>
        <text:list-item>
          <text:p text:style-name="P25">Protenoia Trimórfica </text:p>
        </text:list-item>
        <text:list-item>
          <text:p text:style-name="P25">Allógenes </text:p>
        </text:list-item>
        <text:list-item>
          <text:p text:style-name="P25">Marsanes </text:p>
        </text:list-item>
        <text:list-item>
          <text:p text:style-name="P25">Zostrianos </text:p>
        </text:list-item>
        <text:list-item>
          <text:p text:style-name="P25">Melquisedec (Nag Hammadi) </text:p>
        </text:list-item>
        <text:list-item>
          <text:p text:style-name="P25">Norea </text:p>
        </text:list-item>
        <text:list-item>
          <text:p text:style-name="P25"><text:soft-page-break/>Testemunho da Verdade </text:p>
        </text:list-item>
        <text:list-item>
          <text:p text:style-name="P25">Segundo Tratado do Grande Sete </text:p>
        </text:list-item>
        <text:list-item>
          <text:p text:style-name="P25">Autêntico Logos </text:p>
        </text:list-item>
        <text:list-item>
          <text:p text:style-name="P25">Conceito do Nosso Grande Poder </text:p>
        </text:list-item>
        <text:list-item>
          <text:p text:style-name="P25">A Hebdômada e a Enéada </text:p>
        </text:list-item>
        <text:list-item>
          <text:p text:style-name="P25">O Trovão — Mente Perfeita </text:p>
        </text:list-item>
        <text:list-item>
          <text:p text:style-name="P25">Paráfrase de Sem </text:p>
        </text:list-item>
        <text:list-item>
          <text:p text:style-name="P25">Apocalipse de Adão </text:p>
        </text:list-item>
        <text:list-item>
          <text:p text:style-name="P25">Apocalipse de Paulo (Nag Hammadi) </text:p>
        </text:list-item>
        <text:list-item>
          <text:p text:style-name="P25">1º Apocalipse de Tiago </text:p>
        </text:list-item>
        <text:list-item>
          <text:p text:style-name="P25">2º Apocalipse de Tiago </text:p>
        </text:list-item>
        <text:list-item>
          <text:p text:style-name="P25">Sentença de Sextus </text:p>
        </text:list-item>
        <text:list-item>
          <text:p text:style-name="P25">Lições de Silvano </text:p>
        </text:list-item>
        <text:list-item>
          <text:p text:style-name="P25">Exposição Valentiniana </text:p>
        </text:list-item>
        <text:list-item>
          <text:p text:style-name="P25">Interpretação da Gnose </text:p>
        </text:list-item>
        <text:list-item>
          <text:p text:style-name="P27">Hypsifrone </text:p>
        </text:list-item>
      </text:list>
      <text:h text:style-name="P14" text:outline-level="3">Atos Apócrifos dos Apóstolos</text:h>
      <text:list text:style-name="L7">
        <text:list-item>
          <text:p text:style-name="P28">Atos de Pedro </text:p>
        </text:list-item>
        <text:list-item>
          <text:p text:style-name="P28">Atos de Paulo </text:p>
        </text:list-item>
        <text:list-item>
          <text:p text:style-name="P28">Atos de André </text:p>
        </text:list-item>
        <text:list-item>
          <text:p text:style-name="P28">Atos de João </text:p>
        </text:list-item>
        <text:list-item>
          <text:p text:style-name="P28">Atos de Tomé </text:p>
        </text:list-item>
        <text:list-item>
          <text:p text:style-name="P28">Atos de Filipe </text:p>
        </text:list-item>
        <text:list-item>
          <text:p text:style-name="P28">Atos de Tadeu </text:p>
        </text:list-item>
        <text:list-item>
          <text:p text:style-name="P28">Atos de Barnabé </text:p>
        </text:list-item>
        <text:list-item>
          <text:p text:style-name="P28">Atos de André e Mateus </text:p>
        </text:list-item>
        <text:list-item>
          <text:p text:style-name="P29">Atos de Pedro e dos Doze Apóstolos </text:p>
        </text:list-item>
      </text:list>
      <text:h text:style-name="P14" text:outline-level="3">Epístolas Apócrifas</text:h>
      <text:list text:style-name="L8">
        <text:list-item>
          <text:p text:style-name="P30">I Clemente </text:p>
        </text:list-item>
        <text:list-item>
          <text:p text:style-name="P30">II Clemente </text:p>
        </text:list-item>
        <text:list-item>
          <text:p text:style-name="P30">Epístola de Barnabé </text:p>
        </text:list-item>
        <text:list-item>
          <text:p text:style-name="P30">Carta dos Apóstolos (Epistula Apostolorum) — 180 d.C. </text:p>
        </text:list-item>
        <text:list-item>
          <text:p text:style-name="P30">Epístola aos Laodicenses </text:p>
        </text:list-item>
        <text:list-item>
          <text:p text:style-name="P30">3ª Epístola aos Coríntios </text:p>
        </text:list-item>
        <text:list-item>
          <text:p text:style-name="P30">Correspondência entre Séneca e São Paulo </text:p>
        </text:list-item>
        <text:list-item>
          <text:p text:style-name="P30">Epístola de Pedro a Filipe </text:p>
        </text:list-item>
        <text:list-item>
          <text:p text:style-name="P30">Carta de Herodes a Pilatos </text:p>
        </text:list-item>
        <text:list-item>
          <text:p text:style-name="P31">Carta de Pilatos a Tibério </text:p>
        </text:list-item>
      </text:list>
      <text:h text:style-name="P14" text:outline-level="3">Apocalipses Apócrifos</text:h>
      <text:list text:style-name="L9">
        <text:list-item>
          <text:p text:style-name="P32">Apocalipse de Pedro </text:p>
        </text:list-item>
        <text:list-item>
          <text:p text:style-name="P32">Apocalipse de Paulo (século IV) </text:p>
        </text:list-item>
        <text:list-item>
          <text:p text:style-name="P32">Sibila Cristã </text:p>
        </text:list-item>
        <text:list-item>
          <text:p text:style-name="P32"><text:soft-page-break/>Apocalipse de Tomás </text:p>
        </text:list-item>
        <text:list-item>
          <text:p text:style-name="P33">Descida de Jesus aos Infernos </text:p>
        </text:list-item>
      </text:list>
      <text:h text:style-name="P14" text:outline-level="3">Outros textos do NT e primitivo-cristãos</text:h>
      <text:list text:style-name="L10">
        <text:list-item>
          <text:p text:style-name="P34">Pastor de Hermas </text:p>
        </text:list-item>
        <text:list-item>
          <text:p text:style-name="P34">Didaqué (Doutrina dos Doze Apóstolos) </text:p>
        </text:list-item>
        <text:list-item>
          <text:p text:style-name="P34">Diatessarão (harmonização dos evangelhos) </text:p>
        </text:list-item>
        <text:list-item>
          <text:p text:style-name="P34">Descida de Maria </text:p>
        </text:list-item>
        <text:list-item>
          <text:p text:style-name="P34">Paixão de Jesus </text:p>
        </text:list-item>
        <text:list-item>
          <text:p text:style-name="P34">Declaração de José de Arimateia </text:p>
        </text:list-item>
        <text:list-item>
          <text:p text:style-name="P34">Drama de Pilatos </text:p>
        </text:list-item>
        <text:list-item>
          <text:p text:style-name="P35">Morte e Assunção de Maria </text:p>
        </text:list-item>
      </text:list>
      <text:p text:style-name="P12"/>
      <text:p text:style-name="P36">Esta lista abrange mais de 190 textos. O número total de livros apócrifos é possível contabilizar em 113 — 52 em relação ao Antigo Testamento e 61 em relação ao Novo — embora a tradição tenha conservado outras listas com número maior ou menor. Quando somados os manuscritos de Qumran e os textos gnósticos de Nag Hammadi, o número ultrapassa largamente essa contagem.<text:bookmark-end text:name="__DdeLink__9435_3147029182"/><text:bookmark-end text:name="__DdeLink__9432_3147029182"/></text:p>
      <text:p text:style-name="P12"/>
      <text:h text:style-name="P13" text:outline-level="1">Como Estudar os Livros Apócrifos</text:h>
      <text:h text:style-name="P11" text:outline-level="2">🌐 Recursos Online Gratuitos em Português</text:h>
      <text:p text:style-name="P6"><text:span text:style-name="Strong_20_Emphasis"><text:span text:style-name="T1">escola-ebd.com.br/livros-apocrifos-todos</text:span></text:span><text:span text:style-name="T1"> O recurso mais completo em português. Disponibiliza uma vasta coletânea de livros apócrifos para leitura directa no site e download. É o ponto de partida mais acessível.</text:span></text:p>
      <text:p text:style-name="P6"><text:span text:style-name="Strong_20_Emphasis"><text:span text:style-name="T1">infolivros.org/livros-pdf-gratis/religiao/biblia/apocrifos</text:span></text:span><text:span text:style-name="T1"> Disponibiliza livros apócrifos em PDF sem custo e sem necessidade de registo. Inclui tanto apócrifos do Antigo como do Novo Testamento.</text:span></text:p>
      <text:p text:style-name="P6"><text:span text:style-name="Strong_20_Emphasis"><text:span text:style-name="T1">gnosisbrasil.com</text:span></text:span><text:span text:style-name="T1"> Site dedicado especificamente aos evangelhos gnósticos com artigos exegéticos, introduções e contexto histórico para cada texto. Ideal para estudo interpretativo, não apenas leitura.</text:span></text:p>
      <text:p text:style-name="P6"><text:span text:style-name="Strong_20_Emphasis"><text:span text:style-name="T1">pt.wikipedia.org/wiki/Biblioteca_de_Nague_Hamadi</text:span></text:span><text:span text:style-name="T1"> Contém a lista completa dos 52 textos de Nag Hammadi com descrições detalhadas de cada um — um excelente índice de orientação antes de mergulhar nos textos.</text:span></text:p>
      <text:p text:style-name="P6"><text:span text:style-name="Strong_20_Emphasis"><text:span text:style-name="T1">academia.edu</text:span></text:span><text:span text:style-name="T1"> A Academia.edu disponibiliza a tradução automática em português da Biblioteca de Nag Hammadi completa — os Evangelhos Gnósticos na íntegra, em formato PDF gratuito. Procura por "A Biblioteca de Nag Hammadi Escrituras Gnósticas Tradução PT".</text:span></text:p>
      <text:p text:style-name="P12"/>
      <text:h text:style-name="P11" text:outline-level="2">📱 Aplicação para Telemóvel</text:h>
      <text:p text:style-name="P6"><text:span text:style-name="Strong_20_Emphasis"><text:span text:style-name="T1">"Os Evangelhos Apócrifos"</text:span></text:span><text:span text:style-name="T1"> — disponível no Google Play Contém mais de 100 textos religiosos antigos em português, cobrindo o período anterior e posterior ao advento de Jesus. Os livros contêm </text:span><text:soft-page-break/><text:span text:style-name="T1">um rico conteúdo histórico, permitindo uma compreensão mais profunda do contexto temporal em que o cânon está inserido. Boa opção para leitura no quotidiano.</text:span></text:p>
      <text:p text:style-name="P12"/>
      <text:h text:style-name="P11" text:outline-level="2">📚 Livros Físicos e Digitais Essenciais</text:h>
      <text:p text:style-name="P2">Estes são os volumes académicos de referência — para um estudo sério, são insubstituíveis:</text:p>
      <text:p text:style-name="P6"><text:span text:style-name="Strong_20_Emphasis"><text:span text:style-name="T1">"A Biblioteca de Nag Hammadi" — James M. Robinson (tradução portuguesa)</text:span></text:span><text:span text:style-name="T1"> A primeira publicação, em 1977, foi aclamada por críticos e especialistas. Contendo textos gnósticos desde a época de Cristo, esta nova edição organizada por Robinson, director do Institute for Antiquity and Christianity, acrescenta anos de novas pesquisas. Toda a tradução do copta foi minuciosamente revisada para oferecer interpretações mais ricas e detalhadas. Disponível na Amazon.com.br por cerca de R$73.</text:span></text:p>
      <text:p text:style-name="P6"><text:span text:style-name="Strong_20_Emphasis"><text:span text:style-name="T1">"Bíblia dos Apócrifos" — Coletânea</text:span></text:span><text:span text:style-name="T1"> Coletânea de 80 apócrifos da Bíblia — inclui o 1º e 2º Livro de Adão e Eva, Livro dos Segredos de Enoque, Livro da Ascensão de Isaías, Testamento de Abraão, Assunção de Moisés, Caverna dos Tesouros, Livro de Enoque, os Testamentos dos Patriarcas, entre muitos outros. Disponível em formato Kindle na Amazon.</text:span></text:p>
      <text:p text:style-name="P6"><text:span text:style-name="Strong_20_Emphasis"><text:span text:style-name="T1">"Bíblia Etíope em Português Completa (201 Livros)"</text:span></text:span><text:span text:style-name="T1"> Apresenta escrituras apócrifas raras, Enoque, evangelhos gnósticos e textos deuterocanónicos perdidos — a Bíblia mais extensa existente, usada pela Igreja Ortodoxa Etíope.</text:span></text:p>
      <text:p text:style-name="P6"><text:span text:style-name="Strong_20_Emphasis"><text:span text:style-name="T1">"Os Evangelhos Gnósticos" — Elaine Pagels</text:span></text:span><text:span text:style-name="T1"> Uma das obras académicas mais acessíveis e rigorosas sobre os textos de Nag Hammadi, escrita por uma das maiores especialistas mundiais no assunto. Existe tradução portuguesa publicada pela Via Óptima.</text:span></text:p>
      <text:p text:style-name="P12"/>
      <text:h text:style-name="P11" text:outline-level="2">🏛️ Para Estudo Académico Profundo</text:h>
      <text:p text:style-name="P6"><text:span text:style-name="Strong_20_Emphasis"><text:span text:style-name="T1">uel.br</text:span></text:span><text:span text:style-name="T1"> — A Universidade Estadual de Londrina disponibiliza gratuitamente o artigo académico completo </text:span><text:span text:style-name="Emphasis"><text:span text:style-name="T1">"A Biblioteca Copta de Nag Hammadi"</text:span></text:span><text:span text:style-name="T1">, que contextualiza todos os 52 códices com rigor histórico e filológico. Acede em: </text:span><text:span text:style-name="Source_20_Text"><text:span text:style-name="T1">uel.br/laboratorios/religiosidade/pages/arquivos/textosNaqHammadiLERR.pdf</text:span></text:span></text:p>
      <text:p text:style-name="P6"><text:span text:style-name="Strong_20_Emphasis"><text:span text:style-name="T1">The Gnostic Society Library</text:span></text:span><text:span text:style-name="T1"> (em inglês) — </text:span><text:span text:style-name="Source_20_Text"><text:span text:style-name="T1">gnosis.org/naghamm</text:span></text:span><text:span text:style-name="T1"> — O arquivo académico mais completo do mundo para os textos de Nag Hammadi, com traduções anotadas de todos os 52 textos. Para quem lê inglês, é o recurso definitivo.</text:span></text:p>
      <text:p text:style-name="P12"/>
      <text:h text:style-name="P11" text:outline-level="2"><text:bookmark-start text:name="__DdeLink__9444_3147029182"/><text:bookmark-start text:name="__DdeLink__9440_3147029182"/><text:bookmark-start text:name="__DdeLink__9437_3147029182"/>📖 Sugestão de Percurso de Estudo</text:h>
      <text:p text:style-name="P2">Dado o teu interesse, sugiro esta progressão:</text:p>
      <text:list text:style-name="L11">
        <text:list-item>
          <text:p text:style-name="P37"><text:span text:style-name="Strong_20_Emphasis"><text:span text:style-name="T1">Apócrifo de João</text:span></text:span><text:span text:style-name="T1"> — a cosmogonia gnóstica fundamental </text:span></text:p>
        </text:list-item>
        <text:list-item>
          <text:p text:style-name="P37"><text:span text:style-name="Strong_20_Emphasis"><text:span text:style-name="T1">Evangelho de Filipe</text:span></text:span><text:span text:style-name="T1"> — teologia dos sacramentos gnósticos </text:span></text:p>
        </text:list-item>
        <text:list-item>
          <text:p text:style-name="P37"><text:span text:style-name="Strong_20_Emphasis"><text:span text:style-name="T1">Evangelho de Maria Madalena</text:span></text:span><text:span text:style-name="T1"> — gnose feminina e ascensão da alma </text:span></text:p>
        </text:list-item>
        <text:list-item>
          <text:p text:style-name="P37"><text:span text:style-name="Strong_20_Emphasis"><text:span text:style-name="T1">Pistis Sophia</text:span></text:span><text:span text:style-name="T1"> — o texto gnóstico mais extenso e complexo </text:span></text:p>
        </text:list-item>
        <text:list-item>
          <text:p text:style-name="P37"><text:span text:style-name="Strong_20_Emphasis"><text:span text:style-name="T1">Hipóstase dos Arcontes</text:span></text:span><text:span text:style-name="T1"> — a mitologia do Demiurgo em detalhe </text:span></text:p>
        </text:list-item>
        <text:list-item>
          <text:p text:style-name="P38"><text:soft-page-break/><text:span text:style-name="Strong_20_Emphasis"><text:span text:style-name="T1">Livro dos Jubileus</text:span></text:span><text:span text:style-name="T1"> — reescrita gnóstica do Génesis </text:span></text:p>
        </text:list-item>
      </text:list>
      <text:p text:style-name="P2">Aqui está o raciocínio por detrás da ordem:</text:p>
      <text:p text:style-name="P6"><text:span text:style-name="Strong_20_Emphasis"><text:span text:style-name="T1">Apócrifo de João</text:span></text:span><text:span text:style-name="T1"> primeiro porque é o texto fundacional de toda a cosmogonia gnóstica. </text:span><text:span text:style-name="T2">O</text:span><text:span text:style-name="T1"> Demiurgo, o Pleroma, a centelha aprisionada. Aqui encontras o mapa completo.</text:span></text:p>
      <text:p text:style-name="P6"><text:span text:style-name="Strong_20_Emphasis"><text:span text:style-name="T1">Evangelho de Filipe</text:span></text:span><text:span text:style-name="T1"> em segundo porque aprofunda algo que Tomás apenas insinua: a relação entre conhecimento e sacramento, entre gnose e ritual. É também mais poético e aforístico.</text:span></text:p>
      <text:p text:style-name="P6"><text:span text:style-name="Strong_20_Emphasis"><text:span text:style-name="T1">Evangelho de Maria Madalena</text:span></text:span><text:span text:style-name="T1"> a seguir porque introduz uma voz radicalmente diferente — a da alma que já fez a ascensão e descreve o que encontrou. É curto mas denso, e coloca a questão da autoridade espiritual de forma perturbadora.</text:span></text:p>
      <text:p text:style-name="P6"><text:span text:style-name="Strong_20_Emphasis"><text:span text:style-name="T1">Pistis Sophia</text:span></text:span><text:span text:style-name="T1"> é o grande salto em dificuldade — é longo, complexo e mitologicamente exuberante. Os três textos anteriores preparam-te para o ler sem te perderes.</text:span></text:p>
      <text:p text:style-name="P6"><text:span text:style-name="Strong_20_Emphasis"><text:span text:style-name="T1">Hipóstase dos Arcontes</text:span></text:span><text:span text:style-name="T1"> e </text:span><text:span text:style-name="Strong_20_Emphasis"><text:span text:style-name="T1">Livro dos Jubileus</text:span></text:span><text:span text:style-name="T1"> fecham o ciclo regressando ao Génesis, mas agora lido de baixo para cima — a criação como tragédia, não como dom.</text:span><text:bookmark-end text:name="__DdeLink__9444_3147029182"/><text:bookmark-end text:name="__DdeLink__9440_3147029182"/><text:bookmark-end text:name="__DdeLink__9437_3147029182"/></text:p>
      <text:p text:style-name="P12"/>
      <text:h text:style-name="P39" text:outline-level="1"><text:bookmark-start text:name="__DdeLink__9454_3147029182"/><text:bookmark-start text:name="__DdeLink__9901_257282931"/><text:bookmark-start text:name="__DdeLink__9908_3997500991"/><text:bookmark-start text:name="__DdeLink__9448_3147029182"/>Apócrifo de João — Reconstrução Interpretativa e Exegese Gnóstica<text:bookmark-end text:name="__DdeLink__9454_3147029182"/><text:bookmark-end text:name="__DdeLink__9448_3147029182"/></text:h>
      <text:p text:style-name="P12"/>
      <text:h text:style-name="P11" text:outline-level="2"><text:bookmark-start text:name="__DdeLink__9451_3147029182"/><text:bookmark-start text:name="__DdeLink__9446_3147029182"/>PRÓLOGO — O Encontro que Desperta a Questão</text:h>
      <text:p text:style-name="P6"><text:span text:style-name="T1">Um fariseu chamado </text:span><text:span text:style-name="Strong_20_Emphasis"><text:span text:style-name="T1">Arimanias</text:span></text:span><text:span text:style-name="T1"> aborda João, filho de Zebedeu, pouco depois da crucificação </text:span><text:span text:style-name="T3">de Jesus</text:span><text:span text:style-name="T1">. Diz-lhe com desdém: </text:span><text:span text:style-name="Emphasis"><text:span text:style-name="T1">"Onde está o teu mestre? Ele enganou-te."</text:span></text:span><text:span text:style-name="T1"> João afasta-se perturbado, sobe a uma montanha e mergulha num estado de angústia profunda. As suas perguntas interiores são três:</text:span></text:p>
      <text:p text:style-name="P6"><text:span text:style-name="T1">— </text:span><text:span text:style-name="Emphasis"><text:span text:style-name="T1">Como foi escolhido o Salvador?</text:span></text:span><text:span text:style-name="T1"> — </text:span><text:span text:style-name="Emphasis"><text:span text:style-name="T1">Por que foi enviado ao mundo pelo seu Pai?</text:span></text:span><text:span text:style-name="T1"> — </text:span><text:span text:style-name="Emphasis"><text:span text:style-name="T1">Quem é o Pai?</text:span></text:span><text:bookmark-end text:name="__DdeLink__9446_3147029182"/></text:p>
      <text:p text:style-name="P12"/>
      <text:h text:style-name="P14" text:outline-level="3">Exegese</text:h>
      <text:p text:style-name="P6"><text:span text:style-name="T1">Este prólogo é deceptivamente simples mas teologicamente denso. A provocação do fariseu não é apenas hostilidade — é a voz do mundo material a dizer que o conhecimento espiritual é ilusão. João retira-se do mundo (sobe a montanha) e entra num estado contemplativo. As três questões que formula não são perguntas teológicas abstractas — são, na tradição gnóstica, </text:span><text:span text:style-name="Strong_20_Emphasis"><text:span text:style-name="T1">o movimento inicial da alma que desperta</text:span></text:span><text:span text:style-name="T1">. </text:span><text:span text:style-name="T4">O</text:span><text:span text:style-name="T1"> mesmo impulso que o </text:span><text:span text:style-name="Emphasis"><text:span text:style-name="T1">Evangelho de Tomás</text:span></text:span><text:span text:style-name="T1"> descreve quando diz que quem encontra a interpretação das palavras "não provará a morte" — a pergunta certa é já o início da gnose.</text:span></text:p>
      <text:p text:style-name="P2">A montanha é também simbólica: é o lugar da separação do mundo inferior, o espaço onde a revelação se torna possível. Moisés recebeu a Lei numa montanha. Aqui João receberá algo radicalmente diferente — não uma Lei, mas um desvelamento da estrutura oculta da realidade.</text:p>
      <text:p text:style-name="P12"/>
      <text:h text:style-name="P11" text:outline-level="2"><text:soft-page-break/>PARTE I — A TEOFANIA: O SER QUE NÃO TEM NOME</text:h>
      <text:p text:style-name="P6"><text:span text:style-name="T1">Enquanto João medita, a luz torna-se súbita e intensa ao seu redor. A terra treme. Surge então uma figura que muda de forma três vezes diante dele — aparece como </text:span><text:span text:style-name="Strong_20_Emphasis"><text:span text:style-name="T1">criança</text:span></text:span><text:span text:style-name="T1">, depois como </text:span><text:span text:style-name="Strong_20_Emphasis"><text:span text:style-name="T1">ancião</text:span></text:span><text:span text:style-name="T1">, depois como </text:span><text:span text:style-name="Strong_20_Emphasis"><text:span text:style-name="T1">servo</text:span></text:span><text:span text:style-name="T1">. E fala:</text:span></text:p>
      <text:p text:style-name="P6"><text:span text:style-name="Emphasis"><text:span text:style-name="T1">"João, João, por que duvidas? Por que tens medo? Não és estranho a esta forma. Não sejas tímido. Eu sou o que está contigo sempre. Eu sou o Pai. Eu sou a Mãe. Eu sou o Filho."</text:span></text:span></text:p>
      <text:p text:style-name="P12"/>
      <text:h text:style-name="P14" text:outline-level="3">Exegese</text:h>
      <text:p text:style-name="P6"><text:span text:style-name="T1">Esta é uma das passagens mais radicais de toda a literatura gnóstica. A divindade suprema apresenta-se como simultaneamente </text:span><text:span text:style-name="Strong_20_Emphasis"><text:span text:style-name="T1">Pai, Mãe e Filho</text:span></text:span><text:span text:style-name="T1"> — uma trindade que precede e subverte a trindade cristã ortodoxa. A figura tripla não é acidental: o princípio divino no gnosticismo setiano (a corrente a que pertence este texto) é fundamentalmente </text:span><text:span text:style-name="Strong_20_Emphasis"><text:span text:style-name="T1">triádico e andrógino</text:span></text:span><text:span text:style-name="T1">. Deus não é masculino. Não é sequer pessoal no sentido humano.</text:span></text:p>
      <text:p text:style-name="P6"><text:span text:style-name="T1">As três formas — criança, ancião, servo — representam os três aspectos do divino: eternidade, sabedoria e serviço à criação. A criança é o eterno que ainda não foi corrompido pelo tempo. O ancião é a sabedoria acumulada além da compreensão humana. O servo é o aspecto que desce ao mundo para guiar as almas — o que os gnósticos chamarão de </text:span><text:span text:style-name="Strong_20_Emphasis"><text:span text:style-name="T1">Cristo</text:span></text:span><text:span text:style-name="T1">.</text:span></text:p>
      <text:p text:style-name="P6"><text:span text:style-name="T1">A afirmação </text:span><text:span text:style-name="Emphasis"><text:span text:style-name="T1">"Eu sou o que está contigo sempre"</text:span></text:span><text:span text:style-name="T1"> ecoa directamente o dito 77 do </text:span><text:span text:style-name="Emphasis"><text:span text:style-name="T1">Evangelho de Tomás</text:span></text:span><text:span text:style-name="T1">: </text:span><text:span text:style-name="Emphasis"><text:span text:style-name="T1">"Eu sou a luz que está sobre todas as coisas... Parti um pedaço de madeira e eu estou lá."</text:span></text:span><text:span text:style-name="T1"> A presença divina não é transcendente apenas — é imanente, tecida na própria estrutura do ser.</text:span></text:p>
      <text:p text:style-name="P12"/>
      <text:h text:style-name="P11" text:outline-level="2">PARTE II — O DEUS INEFÁVEL: O QUE NÃO PODE SER DITO</text:h>
      <text:p text:style-name="P6"><text:span text:style-name="T1">A figura revela então a natureza do </text:span><text:span text:style-name="Strong_20_Emphasis"><text:span text:style-name="T1">Pai supremo</text:span></text:span><text:span text:style-name="T1"> — chamado o </text:span><text:span text:style-name="Strong_20_Emphasis"><text:span text:style-name="T1">Monógeno</text:span></text:span><text:span text:style-name="T1">, o </text:span><text:span text:style-name="Strong_20_Emphasis"><text:span text:style-name="T1">Espírito Invisível</text:span></text:span><text:span text:style-name="T1">, o </text:span><text:span text:style-name="Strong_20_Emphasis"><text:span text:style-name="T1">Ser Puro</text:span></text:span><text:span text:style-name="T1">. E o texto faz algo extraordinário: em vez de descrever o que Deus </text:span><text:span text:style-name="Emphasis"><text:span text:style-name="T1">é</text:span></text:span><text:span text:style-name="T1">, descreve apenas o que Deus </text:span><text:span text:style-name="Emphasis"><text:span text:style-name="T1">não é</text:span></text:span><text:span text:style-name="T1">:</text:span></text:p>
      <text:p text:style-name="P2">Não é perfeito — porque a perfeição implica limite. Não é bem-aventurado — porque isso implicaria comparação. Não é divino — porque isso implicaria categoria. Não é infinito — porque o infinito ainda é uma definição.</text:p>
      <text:p text:style-name="P6"><text:span text:style-name="T1">É </text:span><text:span text:style-name="Strong_20_Emphasis"><text:span text:style-name="T1">luz pura</text:span></text:span><text:span text:style-name="T1"> na qual nenhum olho pode olhar. É </text:span><text:span text:style-name="Strong_20_Emphasis"><text:span text:style-name="T1">inconcebível</text:span></text:span><text:span text:style-name="T1"> — e qualquer conceito que lhe seja aplicado já o diminui. É </text:span><text:span text:style-name="Strong_20_Emphasis"><text:span text:style-name="T1">silêncio</text:span></text:span><text:span text:style-name="T1">.</text:span></text:p>
      <text:p text:style-name="P12"/>
      <text:h text:style-name="P14" text:outline-level="3">Exegese</text:h>
      <text:p text:style-name="P6"><text:span text:style-name="T1">Estamos perante a </text:span><text:span text:style-name="Strong_20_Emphasis"><text:span text:style-name="T1">teologia apofática</text:span></text:span><text:span text:style-name="T1"> na sua forma mais radical — a ideia de que Deus só pode ser conhecido pelo que não é. Esta tradição, que também encontramos no neoplatonismo de Plotino e mais tarde na mística cristã de Meister Eckhart, atinge aqui uma intensidade peculiar.</text:span></text:p>
      <text:p text:style-name="P6"><text:span text:style-name="T1">Para o gnóstico, o Deus da Bíblia hebraica — que fala, que ordena, que pune, que tem ciúmes — não pode ser o Deus supremo, precisamente porque tem atributos. Um Deus com atributos é um </text:span><text:soft-page-break/><text:span text:style-name="T1">Deus limitado. O verdadeiro princípio divino está além de qualquer predicado. É o que os gnósticos chamam o </text:span><text:span text:style-name="Strong_20_Emphasis"><text:span text:style-name="T1">Abismo</text:span></text:span><text:span text:style-name="T1"> (</text:span><text:span text:style-name="Emphasis"><text:span text:style-name="T1">Bythos</text:span></text:span><text:span text:style-name="T1"> em grego) ou o </text:span><text:span text:style-name="Strong_20_Emphasis"><text:span text:style-name="T1">Pré-Pai</text:span></text:span><text:span text:style-name="T1">.</text:span></text:p>
      <text:p text:style-name="P6"><text:span text:style-name="T1">Esta passagem é filosoficamente crucial porque estabelece a distinção fundamental do gnosticismo: </text:span><text:span text:style-name="Strong_20_Emphasis"><text:span text:style-name="T1">o Deus que criou o mundo não é o Deus supremo</text:span></text:span><text:span text:style-name="T1">. Entre o Abismo silencioso e o mundo material há uma distância ontológica enorme — e é essa distância que o texto vai agora preencher com a cosmogonia.</text:span></text:p>
      <text:p text:style-name="P12"/>
      <text:h text:style-name="P11" text:outline-level="2">PARTE III — O PLEROMA: O MUNDO DA LUZ PLENA</text:h>
      <text:p text:style-name="P6"><text:span text:style-name="T1">Do Espírito Invisível emerge, por contemplação de si mesmo, a primeira emanação: </text:span><text:span text:style-name="Strong_20_Emphasis"><text:span text:style-name="T1">Barbelo</text:span></text:span><text:span text:style-name="T1"> — a Mãe Divina, o primeiro pensamento do Pai, descrita como </text:span><text:span text:style-name="Emphasis"><text:span text:style-name="T1">"a imagem perfeita, a glória da luz, a perfeição do Espírito"</text:span></text:span><text:span text:style-name="T1">.</text:span></text:p>
      <text:p text:style-name="P6"><text:span text:style-name="T1">Barbelo pede ao Pai quatro dons: </text:span><text:span text:style-name="Strong_20_Emphasis"><text:span text:style-name="T1">Presciência, Incorruptibilidade, Vida Eterna e Verdade</text:span></text:span><text:span text:style-name="T1">. Cada pedido é concedido, e cada concessão gera uma nova emanação — os </text:span><text:span text:style-name="Strong_20_Emphasis"><text:span text:style-name="T1">Éons</text:span></text:span><text:span text:style-name="T1">, seres de luz que constituem o </text:span><text:span text:style-name="Strong_20_Emphasis"><text:span text:style-name="T1">Pleroma</text:span></text:span><text:span text:style-name="T1"> (a Plenitude).</text:span></text:p>
      <text:p text:style-name="P6"><text:span text:style-name="T1">Do Espírito e de Barbelo nasce então </text:span><text:span text:style-name="Strong_20_Emphasis"><text:span text:style-name="T1">Cristo</text:span></text:span><text:span text:style-name="T1"> — chamado aqui o </text:span><text:span text:style-name="Strong_20_Emphasis"><text:span text:style-name="T1">Autógenes</text:span></text:span><text:span text:style-name="T1">, o que se gerou a si mesmo — o Filho perfeito que ilumina o universo espiritual com a sua luz.</text:span></text:p>
      <text:p text:style-name="P12"/>
      <text:h text:style-name="P14" text:outline-level="3">Exegese</text:h>
      <text:p text:style-name="P6"><text:span text:style-name="T1">O Pleroma é o conceito central da cosmogonia gnóstica e merece toda a atenção. Não é um "céu" no sentido popular — é a </text:span><text:span text:style-name="Strong_20_Emphasis"><text:span text:style-name="T1">totalidade do ser espiritual</text:span></text:span><text:span text:style-name="T1">, um universo de luz pura composto de consciências divinas que emanam umas das outras como luz de luz.</text:span></text:p>
      <text:p text:style-name="P6"><text:span text:style-name="Strong_20_Emphasis"><text:span text:style-name="T1">Barbelo</text:span></text:span><text:span text:style-name="T1"> é uma das figuras mais fascinantes de toda a literatura gnóstica. É simultaneamente Mãe, Pensamento e Espírito Santo — o princípio feminino do divino que o cristianismo ortodoxo apagaria sistematicamente. No </text:span><text:span text:style-name="Emphasis"><text:span text:style-name="T1">Evangelho de Filipe</text:span></text:span><text:span text:style-name="T1">, que lerás a seguir, Barbelo é chamada de </text:span><text:span text:style-name="Emphasis"><text:span text:style-name="T1">"a matriz do universo"</text:span></text:span><text:span text:style-name="T1">.</text:span></text:p>
      <text:p text:style-name="P6"><text:span text:style-name="T1">O modelo de emanação — em que cada ser divino emerge da contemplação do anterior — é tomado directamente do neoplatonismo, especificamente de Plotino. Mas os gnósticos transformam-no: enquanto Plotino vê as emanações como necessárias e boas, o texto do Apócrifo de João vai mostrar que em algum momento algo </text:span><text:span text:style-name="Strong_20_Emphasis"><text:span text:style-name="T1">corre mal</text:span></text:span><text:span text:style-name="T1"> neste processo perfeito — e é esse erro primordial que produz o mundo em que vivemos.</text:span></text:p>
      <text:p text:style-name="P12"/>
      <text:p text:style-name="P2">Aqui faço uma pausa natural. Estamos a terminar a primeira metade do texto — a cosmogonia celestial. A segunda metade, que é onde a narrativa se torna verdadeiramente dramática, cobre:</text:p>
      <text:p text:style-name="P6"><text:span text:style-name="T1">— </text:span><text:span text:style-name="Strong_20_Emphasis"><text:span text:style-name="T1">A queda de Sophia</text:span></text:span><text:span text:style-name="T1"> e o nascimento do Demiurgo — </text:span><text:span text:style-name="Strong_20_Emphasis"><text:span text:style-name="T1">Ialdabaoth</text:span></text:span><text:span text:style-name="T1"> — o deus criador ignorante — </text:span><text:span text:style-name="Strong_20_Emphasis"><text:span text:style-name="T1">A criação do ser humano</text:span></text:span><text:span text:style-name="T1"> como acto de roubo de luz — </text:span><text:span text:style-name="Strong_20_Emphasis"><text:span text:style-name="T1">A descida do Cristo</text:span></text:span><text:span text:style-name="T1"> para despertar a centelha adormecida</text:span></text:p>
      <text:p text:style-name="P2"/>
      <text:h text:style-name="P13" text:outline-level="1"><text:soft-page-break/>Apócrifo de João — Segunda Metade</text:h>
      <text:p text:style-name="P12"/>
      <text:h text:style-name="P11" text:outline-level="2">PARTE IV — A QUEDA DE SOPHIA: O MOMENTO QUE PARTE O UNIVERSO</text:h>
      <text:p text:style-name="P6"><text:span text:style-name="T1">No seio do Pleroma, entre todos os Éons de luz, existe </text:span><text:span text:style-name="Strong_20_Emphasis"><text:span text:style-name="T1">Sophia</text:span></text:span><text:span text:style-name="T1"> — a Sabedoria. Ela é o último e mais distante Éon do Pai, o ser de luz que habita a fronteira entre o mundo espiritual e o vazio que existe além dele.</text:span></text:p>
      <text:p text:style-name="P6"><text:span text:style-name="T1">Sophia comete então o acto que vai mudar tudo. Movida por um desejo que não partiu do consentimento do Pai nem do seu consorte espiritual — um desejo </text:span><text:span text:style-name="Strong_20_Emphasis"><text:span text:style-name="T1">solitário, autónomo, sem reciprocidade</text:span></text:span><text:span text:style-name="T1"> — ela decide criar algo por si mesma. Quer emanar sem a participação do Espírito. Quer gerar como o Pai gerou.</text:span></text:p>
      <text:p text:style-name="P6"><text:span text:style-name="T1">O que emerge desse acto não é luz. É uma coisa informe, ignorante, diferente de tudo o que existe no Pleroma. Sophia olha para o que criou e </text:span><text:span text:style-name="Strong_20_Emphasis"><text:span text:style-name="T1">horroriza-se</text:span></text:span><text:span text:style-name="T1">. Tenta esconder a sua criação nas trevas abaixo do Pleroma. Envolve-a numa nuvem luminosa para que os outros Éons não a vejam. E abandona-a.</text:span></text:p>
      <text:p text:style-name="P6"><text:span text:style-name="T1">Essa criatura abandonada é </text:span><text:span text:style-name="Strong_20_Emphasis"><text:span text:style-name="T1">Ialdabaoth</text:span></text:span><text:span text:style-name="T1">.</text:span></text:p>
      <text:p text:style-name="P12"/>
      <text:h text:style-name="P14" text:outline-level="3">Exegese</text:h>
      <text:p text:style-name="P2">A queda de Sophia é o eixo dramático de todo o Apócrifo de João e de grande parte da cosmogonia gnóstica em geral. Merece uma leitura muito cuidada.</text:p>
      <text:p text:style-name="P6"><text:span text:style-name="T1">O primeiro elemento a compreender é a natureza do erro de Sophia. Ela não peca por malícia — peca por </text:span><text:span text:style-name="Strong_20_Emphasis"><text:span text:style-name="T1">desejo de criação sem relação</text:span></text:span><text:span text:style-name="T1">. No Pleroma, toda a emanação ocorre em pares, em reciprocidade, com o consentimento do Pai. Sophia age sozinha, movida apenas pela sua própria vontade. O gnosticismo está a dizer aqui algo de profundo sobre a natureza da criação: </text:span><text:span text:style-name="Strong_20_Emphasis"><text:span text:style-name="T1">criar sem o outro, sem reciprocidade, sem o fundamento do Ser, produz monstruosidade</text:span></text:span><text:span text:style-name="T1">.</text:span></text:p>
      <text:p text:style-name="P6"><text:span text:style-name="T1">Há uma ressonância imediata com o tema do </text:span><text:span text:style-name="Emphasis"><text:span text:style-name="T1">Livro de Tomás</text:span></text:span><text:span text:style-name="T1"> — o do desejo (</text:span><text:span text:style-name="Emphasis"><text:span text:style-name="T1">epithymia</text:span></text:span><text:span text:style-name="T1">) como força que prende e deforma. Sophia não é destruída pelo desejo carnal como os homens ignorantes descritos nesse texto, mas é arrastada por uma forma mais subtil de desejo: o desejo de poder criativo sem fundamento. É o orgulho espiritual — a </text:span><text:span text:style-name="Emphasis"><text:span text:style-name="T1">hybris</text:span></text:span><text:span text:style-name="T1"> gnóstica.</text:span></text:p>
      <text:p text:style-name="P6"><text:span text:style-name="T1">O segundo elemento crucial é a </text:span><text:span text:style-name="Strong_20_Emphasis"><text:span text:style-name="T1">reacção de Sophia ao que criou</text:span></text:span><text:span text:style-name="T1">. Ela não destrói Ialdabaoth — esconde-o. Este gesto de ocultamento é fundamental: o mundo material não é uma criação intencional do Deus supremo. É um </text:span><text:span text:style-name="Strong_20_Emphasis"><text:span text:style-name="T1">acidente escondido</text:span></text:span><text:span text:style-name="T1">, uma vergonha enterrada nas profundezas do ser. O mundo em que vivemos é filho do horror e do abandono.</text:span></text:p>
      <text:p text:style-name="P12"/>
      <text:h text:style-name="P11" text:outline-level="2">PARTE V — IALDABAOTH: O DEUS IGNORANTE</text:h>
      <text:p text:style-name="P6"><text:span text:style-name="T1">Ialdabaoth cresce sozinho nas trevas. Herda de Sophia uma faísca de luz — a única coisa que ela inadvertidamente lhe transmitiu. Com essa faísca, cria os seus próprios mundos, os seus próprios poderes — os </text:span><text:span text:style-name="Strong_20_Emphasis"><text:span text:style-name="T1">Arcontes</text:span></text:span><text:span text:style-name="T1">, governadores das esferas planetárias que aprisionam as almas na matéria.</text:span></text:p>
      <text:p text:style-name="P2"><text:soft-page-break/>E então Ialdabaoth proclama algo que o texto cita com precisão deliberada, em eco directo ao Deus do Êxodo:</text:p>
      <text:p text:style-name="P6"><text:span text:style-name="Emphasis"><text:span text:style-name="T1">"Eu sou um Deus ciumento e não há outro Deus além de mim."</text:span></text:span></text:p>
      <text:p text:style-name="P6"><text:span text:style-name="T1">O Apócrifo de João comenta esta frase com uma ironia devastadora: </text:span><text:span text:style-name="Emphasis"><text:span text:style-name="T1">se não há outro Deus além dele, por que diz que é ciumento? O ciúme pressupõe a existência de outros.</text:span></text:span></text:p>
      <text:p text:style-name="P6"><text:span text:style-name="T1">Ialdabaoth não sabe que acima dele existe o Pleroma. Não sabe que a luz que possui não é sua. Não sabe que é filho de uma mãe que o abandonou. A sua ignorância não é apenas falta de conhecimento — é a sua natureza fundamental. O nome </text:span><text:span text:style-name="Strong_20_Emphasis"><text:span text:style-name="T1">Ialdabaoth</text:span></text:span><text:span text:style-name="T1"> significa, em aramaico, </text:span><text:span text:style-name="Emphasis"><text:span text:style-name="T1">"filho do caos"</text:span></text:span><text:span text:style-name="T1"> ou </text:span><text:span text:style-name="Emphasis"><text:span text:style-name="T1">"filho das trevas"</text:span></text:span><text:span text:style-name="T1">. Outros textos gnósticos chamam-lhe </text:span><text:span text:style-name="Strong_20_Emphasis"><text:span text:style-name="T1">Saklas</text:span></text:span><text:span text:style-name="T1"> — o tolo — e </text:span><text:span text:style-name="Strong_20_Emphasis"><text:span text:style-name="T1">Samael</text:span></text:span><text:span text:style-name="T1"> — o cego.</text:span></text:p>
      <text:p text:style-name="P12"/>
      <text:h text:style-name="P14" text:outline-level="3">Exegese</text:h>
      <text:p text:style-name="P6"><text:span text:style-name="T1">Esta é a passagem que mais perturbou o Cristianismo ortodoxo e que Irineu de Lyon combateu com maior veemência no seu </text:span><text:span text:style-name="Emphasis"><text:span text:style-name="T1">Contra as Heresias</text:span></text:span><text:span text:style-name="T1">. Os gnósticos estão a fazer uma afirmação teológica radicalmente subversiva: </text:span><text:span text:style-name="Strong_20_Emphasis"><text:span text:style-name="T1">o Deus do Antigo Testamento não é o Deus supremo. É uma divindade menor, ignorante e arrogante, que criou uma prisão e a confundiu com um paraíso.</text:span></text:span></text:p>
      <text:p text:style-name="P6"><text:span text:style-name="T1">A citação do Êxodo — </text:span><text:span text:style-name="Emphasis"><text:span text:style-name="T1">"Eu sou um Deus ciumento"</text:span></text:span><text:span text:style-name="T1"> — é usada como prova textual contra o próprio texto canónico. O argumento é elegante: um Deus verdadeiramente supremo não teria ciúmes. O ciúme é uma emoção de quem teme perder algo. Um Deus que teme não pode ser o fundamento de toda a existência.</text:span></text:p>
      <text:p text:style-name="P6"><text:span text:style-name="T1">Há aqui também uma leitura política que não deve ser ignorada. Os gnósticos viviam sob o Império Romano e sob a autoridade crescente da Igreja institucional. A imagem de Ialdabaoth — um poder que se proclama absoluto, que exige obediência total, que pune a desobediência com cólera — ressoa claramente com as estruturas de poder terrenas. </text:span><text:span text:style-name="Strong_20_Emphasis"><text:span text:style-name="T1">Questionar Ialdabaoth é questionar todo o poder que se proclama divino sem o ser.</text:span></text:span></text:p>
      <text:p text:style-name="P2">Os Arcontes que Ialdabaoth cria governam as sete esferas planetárias — Saturno, Júpiter, Marte, o Sol, Vénus, Mercúrio, a Lua. A alma, ao descer ao mundo material, atravessa estas esferas e em cada uma recebe um "revestimento" que a separa mais da sua origem luminosa. A vida humana é, para o gnóstico, o resultado de ter atravessado sete prisões antes de nascer.</text:p>
      <text:p text:style-name="P12"/>
      <text:h text:style-name="P11" text:outline-level="2">PARTE VI — A CRIAÇÃO DO SER HUMANO: O ROUBO DE LUZ</text:h>
      <text:p text:style-name="P2">Do Pleroma desce uma voz — alguns textos dizem que é a voz de Sophia arrependida, outros dizem que é o próprio Espírito Invisível. A voz diz a Ialdabaoth e aos seus Arcontes:</text:p>
      <text:p text:style-name="P6"><text:span text:style-name="Emphasis"><text:span text:style-name="T1">"O Ser Humano existe e é filho do Ser Humano."</text:span></text:span></text:p>
      <text:p text:style-name="P6"><text:span text:style-name="T1">Ialdabaoth e os Arcontes olham para baixo, para as águas abaixo deles, e vêem reflectida nessas águas a </text:span><text:span text:style-name="Strong_20_Emphasis"><text:span text:style-name="T1">imagem do Homem Primordial</text:span></text:span><text:span text:style-name="T1"> — o Anthropos, a forma perfeita que existe no Pleroma. Movidos por inveja e por querer igualar o que está acima deles, decidem criar um ser à imagem do que viram.</text:span></text:p>
      <text:p text:style-name="P2"><text:soft-page-break/>Criam assim o corpo humano — mas não conseguem fazê-lo erguer-se. O corpo jaz inerte, sem vida, sem luz. Ialdabaoth então, por instrução velada da sua mãe Sophia que ainda trabalha no plano espiritual para reparar o seu erro, sopra no rosto da criatura.</text:p>
      <text:p text:style-name="P6"><text:span text:style-name="T1">Nesse sopro, inadvertidamente, transmite ao ser humano </text:span><text:span text:style-name="Strong_20_Emphasis"><text:span text:style-name="T1">a faísca de luz</text:span></text:span><text:span text:style-name="T1"> que herdou de Sophia — a única luz que tinha. O ser humano ergue-se. Os Arcontes olham para a sua criação e reconhecem com terror que o ser que criaram é </text:span><text:span text:style-name="Strong_20_Emphasis"><text:span text:style-name="T1">mais luminoso do que eles próprios</text:span></text:span><text:span text:style-name="T1">.</text:span></text:p>
      <text:p text:style-name="P12"/>
      <text:h text:style-name="P14" text:outline-level="3">Exegese</text:h>
      <text:p text:style-name="P6"><text:span text:style-name="T1">Este é o momento cosmológico mais importante do texto e um dos mais belos de toda a literatura gnóstica. A criação humana não é um acto de amor divino — é um </text:span><text:span text:style-name="Strong_20_Emphasis"><text:span text:style-name="T1">acidente de roubo invertido</text:span></text:span><text:span text:style-name="T1">. Ialdabaoth tenta criar um escravo e cria inadvertidamente um ser que carrega dentro de si a luz que ele próprio possuía.</text:span></text:p>
      <text:p text:style-name="P6"><text:span text:style-name="T1">A imagem do reflexo nas águas é extraordinariamente rica. Os Arcontes não criam o ser humano a partir de nada — criam-no a partir de uma </text:span><text:span text:style-name="Strong_20_Emphasis"><text:span text:style-name="T1">imagem</text:span></text:span><text:span text:style-name="T1">, de um reflexo, de uma sombra do verdadeiro Homem que existe no Pleroma. O corpo humano é, neste sentido, uma tentativa falhada de copiar algo que os seus criadores nem sequer compreendiam completamente.</text:span></text:p>
      <text:p text:style-name="P6"><text:span text:style-name="T1">A faísca de luz (</text:span><text:span text:style-name="Emphasis"><text:span text:style-name="T1">pneuma</text:span></text:span><text:span text:style-name="T1"> em grego — espírito, sopro) que Ialdabaoth transmite involuntariamente é o elemento central de toda a soteriologia gnóstica. É por causa desta faísca que os humanos são diferentes de todas as outras criaturas materiais. É por causa dela que a salvação é possível. E é por causa dela que os Arcontes nos temem — porque carregamos dentro de nós algo que eles não possuem.</text:span></text:p>
      <text:p text:style-name="P6"><text:span text:style-name="T1">Reconheces aqui imediatamente o eco do </text:span><text:span text:style-name="Emphasis"><text:span text:style-name="T1">Livro de Tomás</text:span></text:span><text:span text:style-name="T1"> — a ideia de que há dentro do ser humano uma luz que o mundo material não conhece e não pode conter. O </text:span><text:span text:style-name="Emphasis"><text:span text:style-name="T1">Evangelho de Tomás</text:span></text:span><text:span text:style-name="T1"> diz no dito 24: </text:span><text:span text:style-name="Emphasis"><text:span text:style-name="T1">"Há luz dentro de um homem de luz, e ele ilumina o mundo inteiro. Se não ilumina, é trevas."</text:span></text:span><text:span text:style-name="T1"> O Apócrifo de João explica agora de onde vem essa luz e por que razão está aprisionada.</text:span></text:p>
      <text:p text:style-name="P12"/>
      <text:h text:style-name="P11" text:outline-level="2">PARTE VII — O APRISIONAMENTO: O ESQUECIMENTO COMO ARMA</text:h>
      <text:p text:style-name="P6"><text:span text:style-name="T1">Os Arcontes, aterrorizados com a luminosidade do ser humano, elaboram um plano. Não podem destruir a faísca — está além do seu poder. Mas podem </text:span><text:span text:style-name="Strong_20_Emphasis"><text:span text:style-name="T1">fazer o ser humano esquecer</text:span></text:span><text:span text:style-name="T1"> que a possui.</text:span></text:p>
      <text:p text:style-name="P2">Criam para isso três instrumentos:</text:p>
      <text:p text:style-name="P6"><text:span text:style-name="Strong_20_Emphasis"><text:span text:style-name="T1">O corpo material</text:span></text:span><text:span text:style-name="T1"> — denso, pesado, sujeito à dor, à doença e à morte. O corpo consome a atenção da consciência com as suas necessidades e sofrimentos.</text:span></text:p>
      <text:p text:style-name="P6"><text:span text:style-name="Strong_20_Emphasis"><text:span text:style-name="T1">O destino</text:span></text:span><text:span text:style-name="T1"> (</text:span><text:span text:style-name="Emphasis"><text:span text:style-name="T1">heimarmene</text:span></text:span><text:span text:style-name="T1"> em grego) — a cadeia de causalidade material que determina as circunstâncias do nascimento, da vida e da morte. A ilusão de que o que acontece no mundo material é a totalidade da realidade.</text:span></text:p>
      <text:p text:style-name="P6"><text:span text:style-name="Strong_20_Emphasis"><text:span text:style-name="T1">A imitação do espírito</text:span></text:span><text:span text:style-name="T1"> — uma falsa alma, uma consciência fabricada pelos Arcontes, que imita o movimento do espírito verdadeiro mas o mantém orientado para baixo, para o mundo material, em vez de para cima, para o Pleroma.</text:span></text:p>
      <text:p text:style-name="P6"><text:soft-page-break/><text:span text:style-name="T1">O ser humano é colocado no Jardim do Éden — que o texto descreve não como um paraíso mas como </text:span><text:span text:style-name="Strong_20_Emphasis"><text:span text:style-name="T1">mais uma prisão</text:span></text:span><text:span text:style-name="T1">, mais refinada mas igualmente fechada. A árvore do conhecimento do bem e do mal é a árvore que Ialdabaoth planta para manter os humanos na ignorância. Ele diz: </text:span><text:span text:style-name="Emphasis"><text:span text:style-name="T1">"Não comais."</text:span></text:span></text:p>
      <text:p text:style-name="P6"><text:span text:style-name="T1">A serpente, neste texto, não é o demónio. É </text:span><text:span text:style-name="Strong_20_Emphasis"><text:span text:style-name="T1">Sophia</text:span></text:span><text:span text:style-name="T1"> — trabalhando a partir do interior do sistema para despertar o que foi aprisionado.</text:span></text:p>
      <text:p text:style-name="P12"/>
      <text:h text:style-name="P14" text:outline-level="3">Exegese</text:h>
      <text:p text:style-name="P2">A inversão da narrativa do Génesis que o Apócrifo de João opera é total e sistemática. Cada elemento da leitura ortodoxa é virado ao contrário:</text:p>
      <text:p text:style-name="P6"><text:span text:style-name="T1">O </text:span><text:span text:style-name="Strong_20_Emphasis"><text:span text:style-name="T1">Jardim do Éden</text:span></text:span><text:span text:style-name="T1"> não é bondade divina — é uma gaiola dourada. A </text:span><text:span text:style-name="Strong_20_Emphasis"><text:span text:style-name="T1">proibição</text:span></text:span><text:span text:style-name="T1"> não protege os humanos — mantém-nos ignorantes. A </text:span><text:span text:style-name="Strong_20_Emphasis"><text:span text:style-name="T1">serpente</text:span></text:span><text:span text:style-name="T1"> não tenta — liberta. O </text:span><text:span text:style-name="Strong_20_Emphasis"><text:span text:style-name="T1">conhecimento</text:span></text:span><text:span text:style-name="T1"> não é pecado — é salvação. A </text:span><text:span text:style-name="Strong_20_Emphasis"><text:span text:style-name="T1">expulsão do Paraíso</text:span></text:span><text:span text:style-name="T1"> não é punição — é o primeiro passo em direcção à liberdade.</text:span></text:p>
      <text:p text:style-name="P2">Esta leitura invertida tem uma lógica interna perfeita dentro do sistema gnóstico: se Ialdabaoth é um deus falso e ignorante, então tudo o que ele proíbe deve ser desejado, e tudo o que ele ordena deve ser questionado. A desobediência ao Demiurgo é obediência ao Deus verdadeiro.</text:p>
      <text:p text:style-name="P6"><text:span text:style-name="T1">O conceito de </text:span><text:span text:style-name="Strong_20_Emphasis"><text:span text:style-name="T1">heimarmene</text:span></text:span><text:span text:style-name="T1"> — destino, fado, a cadeia de causalidade material — é um dos mais importantes do pensamento gnóstico e tem ressonâncias directas com o estoicismo. Para os estóicos, o destino era divino e devia ser aceite. Para os gnósticos, o destino é uma prisão fabricada pelos Arcontes para manter as almas orientadas para o mundo material. A gnose — o conhecimento da própria natureza — é precisamente o que liberta da heimarmene.</text:span></text:p>
      <text:p text:style-name="P12"/>
      <text:h text:style-name="P11" text:outline-level="2">PARTE VIII — A DESCIDA DO CRISTO: O DESPERTADOR</text:h>
      <text:p text:style-name="P6"><text:span text:style-name="T1">O Espírito Invisível, vendo o estado de aprisionamento das centelhas de luz espalhadas pelo mundo material, envia o </text:span><text:span text:style-name="Strong_20_Emphasis"><text:span text:style-name="T1">Cristo — o Autógenes</text:span></text:span><text:span text:style-name="T1"> ao mundo. Mas não como um ser físico que nasce e morre. Como uma </text:span><text:span text:style-name="Strong_20_Emphasis"><text:span text:style-name="T1">presença que desperta</text:span></text:span><text:span text:style-name="T1">.</text:span></text:p>
      <text:p text:style-name="P6"><text:span text:style-name="T1">O Cristo desce através das esferas dos Arcontes disfarçado — cada Arconte pensa que ele é um dos seus. Chega ao ser humano adormecido e sopra sobre ele uma segunda vez — não no corpo, mas </text:span><text:span text:style-name="Strong_20_Emphasis"><text:span text:style-name="T1">na memória</text:span></text:span><text:span text:style-name="T1">. E diz:</text:span></text:p>
      <text:p text:style-name="P6"><text:span text:style-name="Emphasis"><text:span text:style-name="T1">"Desperta do teu sono pesado. Levanta-te da morte. Porque eu sou o que está contigo sempre, eu sou o Pai, eu sou a Mãe, eu sou o Filho, eu sou o incorruptível e o impoluto."</text:span></text:span></text:p>
      <text:p text:style-name="P6"><text:span text:style-name="T1">A alma que recebe este sopro </text:span><text:span text:style-name="Strong_20_Emphasis"><text:span text:style-name="T1">recorda</text:span></text:span><text:span text:style-name="T1">. Não aprende algo novo — recorda o que sempre soube e havia esquecido. Recorda a sua origem luminosa. Recorda que o mundo em que vive não é a sua casa. Recorda que há um caminho de regresso.</text:span></text:p>
      <text:p text:style-name="P12"/>
      <text:h text:style-name="P14" text:outline-level="3"><text:soft-page-break/>Exegese</text:h>
      <text:p text:style-name="P6"><text:span text:style-name="T1">A soteriologia — a teoria da salvação — do Apócrifo de João é radicalmente diferente da cristologia ortodoxa. Cristo não salva através da morte e ressurreição. Cristo salva através do </text:span><text:span text:style-name="Strong_20_Emphasis"><text:span text:style-name="T1">despertar da memória</text:span></text:span><text:span text:style-name="T1">.</text:span></text:p>
      <text:p text:style-name="P6"><text:span text:style-name="T1">Este é o conceito gnóstico de </text:span><text:span text:style-name="Strong_20_Emphasis"><text:span text:style-name="T1">anamnese</text:span></text:span><text:span text:style-name="T1"> — literalmente "des-esquecimento". A alma não precisa de ser redimida de um pecado original — precisa de ser </text:span><text:span text:style-name="Strong_20_Emphasis"><text:span text:style-name="T1">acordada</text:span></text:span><text:span text:style-name="T1"> de um sono imposto. A condição humana não é culpa — é amnésia. E a cura não é fé — é conhecimento.</text:span></text:p>
      <text:p text:style-name="P6"><text:span text:style-name="T1">Reconheces aqui a ressonância mais profunda com o </text:span><text:span text:style-name="Emphasis"><text:span text:style-name="T1">Evangelho de Tomás</text:span></text:span><text:span text:style-name="T1">, que começa com as palavras: </text:span><text:span text:style-name="Emphasis"><text:span text:style-name="T1">"Quem encontrar a interpretação destas palavras não provará a morte."</text:span></text:span><text:span text:style-name="T1"> As palavras de Jesus em Tomás funcionam exactamente como o sopro do Cristo no Apócrifo de João — são instrumentos de anamnese, de despertar, de recordação da origem.</text:span></text:p>
      <text:p text:style-name="P2">A imagem do Cristo que desce disfarçado através das esferas dos Arcontes é também teologicamente significativa. O mundo material é hostil à luz. A luz não pode atravessá-lo abertamente — tem de se mover por entre as estruturas do poder sem ser reconhecida. É uma imagem que ressoa com a experiência histórica dos próprios gnósticos: comunidades que preservaram o conhecimento em segredo, disfarçadas, enterradas em potes de cerâmica no deserto.</text:p>
      <text:p text:style-name="P12"/>
      <text:h text:style-name="P11" text:outline-level="2">EPÍLOGO — A PERGUNTA DE JOÃO E A PROMESSA</text:h>
      <text:p text:style-name="P6"><text:span text:style-name="T1">João pergunta então ao Cristo: </text:span><text:span text:style-name="Emphasis"><text:span text:style-name="T1">"O que acontece às almas que não despertam? Que não receberam a gnose?"</text:span></text:span></text:p>
      <text:p text:style-name="P2">A resposta é compassiva mas não confortante. As almas que não despertaram numa vida regressam ao mundo — reencarnadas, guiadas pelos Arcontes de volta a um novo corpo, de volta ao esquecimento. O ciclo repete-se.</text:p>
      <text:p text:style-name="P6"><text:span text:style-name="T1">Mas há uma promessa: </text:span><text:span text:style-name="Strong_20_Emphasis"><text:span text:style-name="T1">nenhuma centelha de luz se perde para sempre</text:span></text:span><text:span text:style-name="T1">. O Espírito trabalha pacientemente através das vidas, através dos ciclos, colocando em cada alma em cada geração a possibilidade do despertar. A gnose pode chegar tarde — mas chega.</text:span></text:p>
      <text:p text:style-name="P6"><text:span text:style-name="T1">O texto termina com João descendo da montanha e transmitindo o que recebeu aos seus companheiros — não como uma doutrina pública, mas como um </text:span><text:span text:style-name="Strong_20_Emphasis"><text:span text:style-name="T1">ensinamento secreto</text:span></text:span><text:span text:style-name="T1">, reservado aos que têm ouvidos para ouvir.</text:span></text:p>
      <text:p text:style-name="P12"/>
      <text:h text:style-name="P11" text:outline-level="2">Síntese: O que o Apócrifo de João nos diz</text:h>
      <text:p text:style-name="P6"><text:span text:style-name="T1">O texto constrói uma cosmologia completa em torno de uma única intuição central: </text:span><text:span text:style-name="Strong_20_Emphasis"><text:span text:style-name="T1">a luz está aprisionada na matéria e não sabe que está aprisionada</text:span></text:span><text:span text:style-name="T1">. Tudo o resto — Sophia, Ialdabaoth, os Arcontes, o Éden, o Cristo — serve para explicar como chegámos a este estado e como podemos sair dele.</text:span></text:p>
      <text:p text:style-name="P6"><text:span text:style-name="T1">O que distingue este texto do </text:span><text:span text:style-name="Emphasis"><text:span text:style-name="T1">Livro de Tomás</text:span></text:span><text:span text:style-name="T1"> que já conheces é a escala. Tomás trabalha no nível da experiência individual — o corpo, o desejo, a visão interior. O Apócrifo de João trabalha no nível cósmico — a origem do universo, a estrutura do ser, a história da queda e da redenção. São dois níveis do mesmo sistema: Tomás é a microcosmos, João é o macrocosmos.</text:span></text:p>
      <text:p text:style-name="P12"><text:soft-page-break/></text:p>
      <text:p text:style-name="P6"><text:span text:style-name="T1">Quando estiveres pronto, avançamos para o </text:span><text:span text:style-name="Strong_20_Emphasis"><text:span text:style-name="T1">Evangelho de Filipe</text:span></text:span><text:span text:style-name="T1"> — que retoma estas ideias mas as vive através dos sacramentos e da experiência mística directa. É um texto ainda mais poético e mais próximo da vivência espiritual concreta.</text:span><text:bookmark-end text:name="__DdeLink__9908_3997500991"/><text:bookmark-end text:name="__DdeLink__9451_3147029182"/><text:bookmark-end text:name="__DdeLink__9901_257282931"/></text:p>
      <text:h text:style-name="P39" text:outline-level="1"><text:bookmark-start text:name="__DdeLink__9460_2045297844"/><text:bookmark-start text:name="__DdeLink__12615_257282931"/>Evangelho de Filipe — Reconstrução Interpretativa e Exegese Gnóstica</text:h>
      <text:p text:style-name="P12"/>
      <text:h text:style-name="P11" text:outline-level="2">INTRODUÇÃO: A NATUREZA DESTE TEXTO</text:h>
      <text:p text:style-name="P6"><text:span text:style-name="T1">Antes de entrar no conteúdo, é importante compreender que o Evangelho de Filipe é </text:span><text:span text:style-name="Strong_20_Emphasis"><text:span text:style-name="T1">estruturalmente diferente</text:span></text:span><text:span text:style-name="T1"> de tudo o que leste até agora.</text:span></text:p>
      <text:p text:style-name="P6"><text:span text:style-name="T1">O </text:span><text:span text:style-name="Emphasis"><text:span text:style-name="T1">Apócrifo de João</text:span></text:span><text:span text:style-name="T1"> é uma narrativa cosmológica com começo, meio e fim. O </text:span><text:span text:style-name="Strong_20_Emphasis"><text:span text:style-name="T1">Evangelho de Filipe</text:span></text:span><text:span text:style-name="T1"> não é nenhuma destas coisas. É um </text:span><text:span text:style-name="Strong_20_Emphasis"><text:span text:style-name="T1">florilégio</text:span></text:span><text:span text:style-name="T1"> — uma colecção de meditações, aforismos, parábolas e reflexões teológicas sem ordem narrativa aparente. Lê-se como um caderno de notas de um místico profundo — cada entrada é completa em si mesma mas ressoa com todas as outras.</text:span></text:p>
      <text:p text:style-name="P6"><text:span text:style-name="T1">A tradição atribui este texto à escola </text:span><text:span text:style-name="Strong_20_Emphasis"><text:span text:style-name="T1">valentiniana</text:span></text:span><text:span text:style-name="T1"> — os seguidores de Valentim, o gnóstico do século II considerado por muitos o mais sofisticado teólogo cristão do seu tempo. O texto foi provavelmente compilado na Síria no século III, reunindo ensinamentos orais e escritos da comunidade.</text:span></text:p>
      <text:p text:style-name="P6"><text:span text:style-name="T1">O seu tema central não é a cosmogonia — essa já foi estabelecida no Apócrifo de João. O seu tema central é a </text:span><text:span text:style-name="Strong_20_Emphasis"><text:span text:style-name="T1">transformação</text:span></text:span><text:span text:style-name="T1"> — como o ser humano, conhecendo a sua natureza, se transforma e regressa à luz.</text:span></text:p>
      <text:p text:style-name="P12"/>
      <text:h text:style-name="P11" text:outline-level="2">PARTE I — AS TRÊS QUALIDADES DOS SERES: HEBREUS, GREGOS E CRISTÃOS</text:h>
      <text:p text:style-name="P2">O texto abre com uma distinção surpreendente. Fala de três tipos de pessoas no mundo:</text:p>
      <text:p text:style-name="P6"><text:span text:style-name="T1">Os </text:span><text:span text:style-name="Strong_20_Emphasis"><text:span text:style-name="T1">Hebreus</text:span></text:span><text:span text:style-name="T1"> geraram os Hebreus — e chamaram a estes "prosélitos". Mas os prosélitos não geram prosélitos — ficam parados no que receberam, sem ir mais fundo.</text:span></text:p>
      <text:p text:style-name="P6"><text:span text:style-name="T1">Os </text:span><text:span text:style-name="Strong_20_Emphasis"><text:span text:style-name="T1">Gregos</text:span></text:span><text:span text:style-name="T1"> geraram os Gregos — e os Gregos não geram ninguém de outra qualidade.</text:span></text:p>
      <text:p text:style-name="P6"><text:span text:style-name="T1">Os </text:span><text:span text:style-name="Strong_20_Emphasis"><text:span text:style-name="T1">Cristãos</text:span></text:span><text:span text:style-name="T1"> — mas aqui o texto faz uma distinção fundamental. Não os cristãos comuns, que receberam apenas o nome. Os cristãos verdadeiros são os que receberam a </text:span><text:span text:style-name="Strong_20_Emphasis"><text:span text:style-name="T1">unção</text:span></text:span><text:span text:style-name="T1"> — o </text:span><text:span text:style-name="Emphasis"><text:span text:style-name="T1">christos</text:span></text:span><text:span text:style-name="T1">, o ungido. E estes geram não Hebreus nem Gregos mas </text:span><text:span text:style-name="Strong_20_Emphasis"><text:span text:style-name="T1">seres de luz</text:span></text:span><text:span text:style-name="T1">.</text:span></text:p>
      <text:p text:style-name="P12"/>
      <text:h text:style-name="P14" text:outline-level="3">Exegese</text:h>
      <text:p text:style-name="P6"><text:span text:style-name="T1">Esta abertura estabelece imediatamente o tom do texto. Não estamos perante uma distinção étnica ou religiosa superficial. O texto está a falar de </text:span><text:span text:style-name="Strong_20_Emphasis"><text:span text:style-name="T1">três modos de existência espiritual</text:span></text:span><text:span text:style-name="T1">.</text:span></text:p>
      <text:p text:style-name="P2"><text:soft-page-break/>O "Hebreu" representa quem recebe a tradição e a preserva mas não a aprofunda — a fé herdada, não vivida. O "Grego" representa quem usa o intelecto mas sem transformação interior — a filosofia sem gnose. O "Cristão verdadeiro" — no sentido gnóstico — é quem recebeu a unção interior, o conhecimento vivo que transforma.</text:p>
      <text:p text:style-name="P6"><text:span text:style-name="T1">A palavra </text:span><text:span text:style-name="Strong_20_Emphasis"><text:span text:style-name="T1">christos</text:span></text:span><text:span text:style-name="T1"> em grego significa literalmente "ungido" — o mesmo que "messias" em hebraico. Para os gnósticos valentinianos, ser cristão não é seguir uma religião — é receber uma </text:span><text:span text:style-name="Strong_20_Emphasis"><text:span text:style-name="T1">qualidade ontológica</text:span></text:span><text:span text:style-name="T1">, uma transformação do próprio ser. Não é adesão a um grupo. É mudança de natureza.</text:span></text:p>
      <text:p text:style-name="P6"><text:span text:style-name="T1">Esta distinção ressoa directamente com o dito 86 do </text:span><text:span text:style-name="Emphasis"><text:span text:style-name="T1">Evangelho de Tomás</text:span></text:span><text:span text:style-name="T1">: </text:span><text:span text:style-name="Emphasis"><text:span text:style-name="T1">"As raposas têm as suas tocas e os pássaros têm os seus ninhos, mas o Filho do Homem não tem lugar onde reclinar a cabeça."</text:span></text:span><text:span text:style-name="T1"> O ser de luz não pertence ao mundo — não porque o rejeite, mas porque a sua natureza é fundamentalmente diferente da natureza do mundo.</text:span></text:p>
      <text:p text:style-name="P12"/>
      <text:h text:style-name="P11" text:outline-level="2">PARTE II — OS NOMES E AS ILUSÕES: A LINGUAGEM COMO PRISÃO</text:h>
      <text:p text:style-name="P6"><text:span text:style-name="T1">O Evangelho de Filipe faz então uma meditação extraordinária sobre a natureza dos </text:span><text:span text:style-name="Strong_20_Emphasis"><text:span text:style-name="T1">nomes</text:span></text:span><text:span text:style-name="T1">. Diz:</text:span></text:p>
      <text:p text:style-name="P2">Um único nome não pode dizer-se no mundo — o nome que o Pai deu ao Filho. Está acima de todos os nomes. É o nome do Pai. Pois o Filho não se tornaria Pai se não vestisse o nome do Pai.</text:p>
      <text:p text:style-name="P2">Os que possuem este nome conhecem-no mas não o pronunciam. Os que não o possuem nem sequer o conhecem como desconhecido.</text:p>
      <text:p text:style-name="P6"><text:span text:style-name="T1">A </text:span><text:span text:style-name="Strong_20_Emphasis"><text:span text:style-name="T1">verdade</text:span></text:span><text:span text:style-name="T1"> não veio nua ao mundo. Veio em tipos e imagens. O mundo não pode receber a verdade de outra forma. Há renascimento e uma imagem de renascimento. É preciso verdadeiramente renascer através da imagem.</text:span></text:p>
      <text:p text:style-name="P12"/>
      <text:h text:style-name="P14" text:outline-level="3">Exegese</text:h>
      <text:p text:style-name="P6"><text:span text:style-name="T1">Esta meditação sobre os nomes é uma das mais profundas do texto inteiro. O gnóstico valentiniano está a trabalhar com uma ideia que encontraremos mais tarde em tradições tão diversas como o sufismo islâmico e o budismo zen: </text:span><text:span text:style-name="Strong_20_Emphasis"><text:span text:style-name="T1">a linguagem não consegue capturar a realidade última</text:span></text:span><text:span text:style-name="T1">.</text:span></text:p>
      <text:p text:style-name="P2">O nome verdadeiro do Pai não pode ser pronunciado porque qualquer som, qualquer sílaba, qualquer conceito já é uma limitação — e o Pai está além de toda a limitação. Reconheces aqui o mesmo movimento do Apócrifo de João quando descreve o Deus supremo apenas pelo que não é.</text:p>
      <text:p text:style-name="P6"><text:span text:style-name="T1">Mas há algo mais subtil aqui. O texto diz que a verdade veio ao mundo "em tipos e imagens" — em parábolas, em rituais, em símbolos. Esta é a justificação gnóstica para os sacramentos que o texto vai desenvolver: os rituais não são a verdade — são </text:span><text:span text:style-name="Strong_20_Emphasis"><text:span text:style-name="T1">imagens da verdade</text:span></text:span><text:span text:style-name="T1"> que a alma usa como degraus para ascender ao inominável.</text:span></text:p>
      <text:p text:style-name="P6"><text:span text:style-name="T1">A afirmação </text:span><text:span text:style-name="Emphasis"><text:span text:style-name="T1">"é preciso verdadeiramente renascer através da imagem"</text:span></text:span><text:span text:style-name="T1"> é uma das frases mais densas do texto. O renascimento espiritual não acontece apesar dos símbolos mas </text:span><text:span text:style-name="Strong_20_Emphasis"><text:span text:style-name="T1">através</text:span></text:span><text:span text:style-name="T1"> deles — desde que sejam compreendidos como símbolos e não confundidos com a realidade que apontam.</text:span></text:p>
      <text:p text:style-name="P12"/>
      <text:h text:style-name="P11" text:outline-level="2"><text:soft-page-break/>PARTE III — OS CINCO SACRAMENTOS: OS RITOS DA TRANSFORMAÇÃO</text:h>
      <text:p text:style-name="P2">O Evangelho de Filipe enumera cinco sacramentos que constituem o caminho de regresso à luz:</text:p>
      <text:p text:style-name="P6"><text:span text:style-name="Strong_20_Emphasis"><text:span text:style-name="T1">O Baptismo</text:span></text:span><text:span text:style-name="T1"> — a purificação inicial. A morte do ser antigo nas águas. Mas o texto adverte: há quem deça à água e suba sem ter recebido nada — porque desceu apenas com o corpo e não com o espírito.</text:span></text:p>
      <text:p text:style-name="P6"><text:span text:style-name="Strong_20_Emphasis"><text:span text:style-name="T1">A Unção</text:span></text:span><text:span text:style-name="T1"> — o </text:span><text:span text:style-name="Emphasis"><text:span text:style-name="T1">chrism</text:span></text:span><text:span text:style-name="T1">, o óleo sagrado. É superior ao baptismo. O baptismo purifica. A unção transforma. Quem foi ungido não é apenas purificado — é </text:span><text:span text:style-name="Strong_20_Emphasis"><text:span text:style-name="T1">tornado cristo</text:span></text:span><text:span text:style-name="T1">, participante da natureza do ungido.</text:span></text:p>
      <text:p text:style-name="P6"><text:span text:style-name="Strong_20_Emphasis"><text:span text:style-name="T1">A Eucaristia</text:span></text:span><text:span text:style-name="T1"> — mas não como simples memorial. O texto diz: </text:span><text:span text:style-name="Emphasis"><text:span text:style-name="T1">"Jesus tomou todos eles por engano — pois não se revelou tal como era, mas de modo que pudesse ser visto. Revelou-se a esses grandes como grande, a esses pequenos como pequeno, a esses anjos como anjo e aos homens como homem."</text:span></text:span><text:span text:style-name="T1"> A eucaristia é o momento em que o ser humano </text:span><text:span text:style-name="Strong_20_Emphasis"><text:span text:style-name="T1">come a luz</text:span></text:span><text:span text:style-name="T1"> — ingere o que o transforma.</text:span></text:p>
      <text:p text:style-name="P6"><text:span text:style-name="Strong_20_Emphasis"><text:span text:style-name="T1">A Redenção</text:span></text:span><text:span text:style-name="T1"> — a libertação da heimarmene, da cadeia do destino que os Arcontes fabricaram. O sacramento que quebra os grilhões do mundo material.</text:span></text:p>
      <text:p text:style-name="P6"><text:span text:style-name="Strong_20_Emphasis"><text:span text:style-name="T1">A Câmara Nupcial</text:span></text:span><text:span text:style-name="T1"> — o mais sagrado de todos. O texto descreve-o com uma linguagem de intimidade mística: é a união da alma com o seu anjo celestial, com o seu ser de luz original. É o retorno à androginia primordial — à totalidade que existia antes da separação.</text:span></text:p>
      <text:p text:style-name="P12"/>
      <text:h text:style-name="P14" text:outline-level="3">Exegese</text:h>
      <text:p text:style-name="P2">A hierarquia dos cinco sacramentos revela muito sobre a teologia valentiniana. Os dois primeiros — baptismo e unção — são purificação e transformação. Os três últimos — eucaristia, redenção e câmara nupcial — são progressivamente mais interiores, mais secretos, mais próximos da experiência directa do divino.</text:p>
      <text:p text:style-name="P6"><text:span text:style-name="T1">A </text:span><text:span text:style-name="Strong_20_Emphasis"><text:span text:style-name="T1">câmara nupcial</text:span></text:span><text:span text:style-name="T1"> é o sacramento que mais perturbou os intérpretes ao longo dos séculos. A linguagem é explicitamente erótica — fala de união, de abraço, de intimidade entre a alma e o seu parceiro celestial. Mas o texto é absolutamente claro: </text:span><text:span text:style-name="Emphasis"><text:span text:style-name="T1">"Ninguém que tenha saído do mundo poderá ser retido, e ninguém que tenha entrado no mundo poderá fugir, porque o mundo surgiu através de um erro."</text:span></text:span><text:span text:style-name="T1"> A câmara nupcial não é um rito sexual — é a </text:span><text:span text:style-name="Strong_20_Emphasis"><text:span text:style-name="T1">experiência mística da reunificação</text:span></text:span><text:span text:style-name="T1"> com o ser de luz de que a alma foi separada quando desceu ao mundo.</text:span></text:p>
      <text:p text:style-name="P6"><text:span text:style-name="T1">Esta ideia tem raízes profundas na antropologia gnóstica. No Apócrifo de João viste que o ser humano foi criado à imagem do Homem Primordial andrógino. A separação em masculino e feminino é, para os gnósticos, uma consequência da queda — uma fragmentação da totalidade original. A câmara nupcial é o sacramento que </text:span><text:span text:style-name="Strong_20_Emphasis"><text:span text:style-name="T1">restaura a totalidade</text:span></text:span><text:span text:style-name="T1"> — não biologicamente mas ontologicamente.</text:span></text:p>
      <text:p text:style-name="P12"/>
      <text:h text:style-name="P11" text:outline-level="2"><text:soft-page-break/>PARTE IV — A LUZ E A SOMBRA: O MUNDO COMO ESPELHO INVERTIDO</text:h>
      <text:p text:style-name="P2">O texto desenvolve então uma meditação sobre a relação entre o mundo material e o mundo espiritual:</text:p>
      <text:p text:style-name="P6"><text:span text:style-name="T1">A </text:span><text:span text:style-name="Strong_20_Emphasis"><text:span text:style-name="T1">verdade</text:span></text:span><text:span text:style-name="T1"> não veio ao mundo nua. Veio em tipos e imagens — porque o mundo não conseguiria suportá-la de outra forma.</text:span></text:p>
      <text:p text:style-name="P6"><text:span text:style-name="T1">Há uma </text:span><text:span text:style-name="Strong_20_Emphasis"><text:span text:style-name="T1">câmara de ressurreição</text:span></text:span><text:span text:style-name="T1"> que está oculta — nem é dia nem noite, mas um terceiro estado que transcende ambos.</text:span></text:p>
      <text:p text:style-name="P6"><text:span text:style-name="T1">O mundo surgiu através de um </text:span><text:span text:style-name="Strong_20_Emphasis"><text:span text:style-name="T1">erro</text:span></text:span><text:span text:style-name="T1">. Aquele que o criou queria fazê-lo imperecível e imortal — mas ficou aquém do seu desejo. Pois o mundo nunca foi imperecível, e o seu criador nunca foi imortal.</text:span></text:p>
      <text:p text:style-name="P6"><text:span text:style-name="T1">Quem não ressuscita </text:span><text:span text:style-name="Strong_20_Emphasis"><text:span text:style-name="T1">antes</text:span></text:span><text:span text:style-name="T1"> de morrer não ressuscitará depois de morrer. Assim como é verdade que alguém que já recebeu ouro não lhe chamará cobre.</text:span></text:p>
      <text:p text:style-name="P12"/>
      <text:h text:style-name="P14" text:outline-level="3">Exegese</text:h>
      <text:p text:style-name="P6"><text:span text:style-name="T1">A frase </text:span><text:span text:style-name="Emphasis"><text:span text:style-name="T1">"o mundo surgiu através de um erro"</text:span></text:span><text:span text:style-name="T1"> é uma das mais famosas de toda a literatura gnóstica — e é de uma honestidade brutal. Não há aqui a tentativa de justificar o sofrimento, de encontrar um sentido redentor no mal, de explicar a dor como parte de um plano divino. O mundo material é simplesmente </text:span><text:span text:style-name="Strong_20_Emphasis"><text:span text:style-name="T1">mal feito</text:span></text:span><text:span text:style-name="T1">. Nasceu de um acidente, de uma queda, de uma incompetência.</text:span></text:p>
      <text:p text:style-name="P6"><text:span text:style-name="T1">Esta posição distingue radicalmente o gnosticismo de quase todas as outras tradições religiosas. O budismo diz que o sofrimento nasce do apego — mas o mundo em si não é necessariamente mau. O Hinduísmo diz que o mundo é </text:span><text:span text:style-name="Emphasis"><text:span text:style-name="T1">maya</text:span></text:span><text:span text:style-name="T1"> — ilusão — mas uma ilusão que emana do divino. O Judaísmo e o Cristianismo ortodoxo dizem que o mundo é criação boa de um Deus bom. O gnosticismo diz: o mundo é um erro de um deus menor. Ponto.</text:span></text:p>
      <text:p text:style-name="P6"><text:span text:style-name="T1">A afirmação </text:span><text:span text:style-name="Emphasis"><text:span text:style-name="T1">"quem não ressuscita antes de morrer não ressuscitará depois de morrer"</text:span></text:span><text:span text:style-name="T1"> é talvez a frase mais importante do texto inteiro para compreender a soteriologia valentiniana. A ressurreição não é um evento físico futuro — é uma </text:span><text:span text:style-name="Strong_20_Emphasis"><text:span text:style-name="T1">transformação presente</text:span></text:span><text:span text:style-name="T1">. A morte e o renascimento que importam acontecem enquanto o ser humano ainda está vivo. É o despertar da gnose — o momento em que a alma recorda a sua origem luminosa — que constitui a verdadeira ressurreição.</text:span></text:p>
      <text:p text:style-name="P6"><text:span text:style-name="T1">Reconheces aqui o eco mais directo de todo o </text:span><text:span text:style-name="Emphasis"><text:span text:style-name="T1">Evangelho de Tomás</text:span></text:span><text:span text:style-name="T1">: </text:span><text:span text:style-name="Emphasis"><text:span text:style-name="T1">"Quem encontrar a interpretação destas palavras não provará a morte."</text:span></text:span><text:span text:style-name="T1"> Em Filipe percebemos agora mais completamente o que significa "não provar a morte" — significa ter ressuscitado enquanto ainda se está vivo.</text:span></text:p>
      <text:p text:style-name="P12"/>
      <text:h text:style-name="P11" text:outline-level="2">PARTE V — MARIA MADALENA E O COMPANHEIRO</text:h>
      <text:p text:style-name="P2">O texto contém uma das passagens mais famosas e mais debatidas de toda a literatura apócrifa:</text:p>
      <text:p text:style-name="P6"><text:span text:style-name="Emphasis"><text:span text:style-name="T1">"A companheira do Salvador é Maria Madalena. O Senhor amava-a mais do que todos os discípulos e costumava beijá-la frequentemente na boca. Os outros discípulos ofenderam-se com </text:span></text:span><text:soft-page-break/><text:span text:style-name="Emphasis"><text:span text:style-name="T1">isso e expressaram desaprovação. Disseram-lhe: Por que amas mais do que a todos nós? O Salvador respondeu e disse-lhes: Por que não vos amo como a ela?"</text:span></text:span></text:p>
      <text:p text:style-name="P6"><text:span text:style-name="T1">E noutra entrada: </text:span><text:span text:style-name="Emphasis"><text:span text:style-name="T1">"Três caminhavam sempre com o Senhor: Maria sua mãe, a irmã desta e Madalena, chamada sua companheira. Pois Maria é seu nome, o de sua mãe e o de sua irmã."</text:span></text:span></text:p>
      <text:p text:style-name="P12"/>
      <text:h text:style-name="P14" text:outline-level="3">Exegese</text:h>
      <text:p text:style-name="P2">Esta passagem foi e continua a ser enormemente mal lida — tanto por quem a usa para especular sobre uma relação física entre Jesus e Maria Madalena, como por quem a descarta como heresia absurda.</text:p>
      <text:p text:style-name="P2">O que o texto está realmente a dizer exige compreender dois conceitos valentinianos fundamentais.</text:p>
      <text:p text:style-name="P6"><text:span text:style-name="T1">Primeiro: a palavra traduzida como "companheira" é em copta </text:span><text:span text:style-name="Strong_20_Emphasis"><text:span text:style-name="T1">koinonos</text:span></text:span><text:span text:style-name="T1"> — que significa literalmente "parceira espiritual", "consorte", "aquela que partilha o mesmo caminho". É o mesmo tipo de relação que existe no Pleroma entre os Éons — uma relação de complementaridade espiritual, não necessariamente física.</text:span></text:p>
      <text:p text:style-name="P6"><text:span text:style-name="T1">Segundo: o "beijo na boca" é, na tradição valentiniana, o símbolo da </text:span><text:span text:style-name="Strong_20_Emphasis"><text:span text:style-name="T1">transmissão da gnose</text:span></text:span><text:span text:style-name="T1">. O beijo transmite o sopro — e o sopro é o </text:span><text:span text:style-name="Emphasis"><text:span text:style-name="T1">pneuma</text:span></text:span><text:span text:style-name="T1">, o espírito. Quando o texto diz que Jesus beijava Maria na boca, está a dizer que lhe transmitia o conhecimento mais elevado, o sopro que desperta a faísca de luz.</text:span></text:p>
      <text:p text:style-name="P2">O que torna Maria Madalena especial no Evangelho de Filipe — e ainda mais no Evangelho de Maria Madalena que leremos a seguir — é que ela é a única discípula que compreendeu completamente. Os outros receberam palavras. Ela recebeu o sopro. Daí que o Salvador a ame mais — não com amor preferencial humano mas com reconhecimento de que ela é a que mais completamente acordou.</text:p>
      <text:p text:style-name="P12"/>
      <text:h text:style-name="P11" text:outline-level="2">PARTE VI — A NATUREZA DO CONHECIMENTO: VER E SER VISTO</text:h>
      <text:p text:style-name="P2">O texto termina com uma série de meditações sobre a natureza da gnose em si:</text:p>
      <text:p text:style-name="P6"><text:span text:style-name="Emphasis"><text:span text:style-name="T1">"A luz e a escuridão, a vida e a morte, o direito e o esquerdo são irmãos um do outro. É impossível separá-los. Por isso nem o bem é bom, nem o mau é mau, nem a vida é vida, nem a morte é morte. Por isso cada um se dissolverá na sua natureza original. Mas os que estão acima do mundo são indissolúveis — eternos."</text:span></text:span></text:p>
      <text:p text:style-name="P6"><text:span text:style-name="Emphasis"><text:span text:style-name="T1">"Se alguém desce às águas e sobe sem ter recebido nada, e diz 'Sou cristão', tomou o nome emprestado. Mas se recebe o Espírito Santo, tem o nome como dom. Quem recebeu um dom não lho tiram — mas quem tomou emprestado tem de devolver."</text:span></text:span></text:p>
      <text:p text:style-name="P6"><text:span text:style-name="Emphasis"><text:span text:style-name="T1">"A gnose do verdadeiro Pai e do verdadeiro Filho é chamada luz. Quando a recebeste, para onde foste? Não podes ir nem para a esquerda nem para a direita. Não podes subir nem descer. Porque és a própria luz."</text:span></text:span></text:p>
      <text:p text:style-name="P12"/>
      <text:h text:style-name="P14" text:outline-level="3"><text:soft-page-break/>Exegese</text:h>
      <text:p text:style-name="P2">Esta última secção revela a dimensão mais profunda e mais radical do pensamento valentiniano. A afirmação de que bem e mal, luz e escuridão, vida e morte são "irmãos" que não podem ser separados pode parecer relativismo moral — mas não o é.</text:p>
      <text:p text:style-name="P6"><text:span text:style-name="T1">O que o texto está a dizer é que </text:span><text:span text:style-name="Strong_20_Emphasis"><text:span text:style-name="T1">todas as categorias são relativas ao mundo material</text:span></text:span><text:span text:style-name="T1">. No Pleroma — na realidade espiritual plena — não há opostos porque não há separação. A dualidade é uma consequência da queda, não uma estrutura fundamental do ser. Quando a alma regresa à sua origem, as categorias dissolvem-se — não porque o bem e o mal sejam iguais, mas porque ambos pertencem a um nível de realidade que a alma transcendeu.</text:span></text:p>
      <text:p text:style-name="P6"><text:span text:style-name="T1">A frase final é de uma beleza esmagadora: </text:span><text:span text:style-name="Emphasis"><text:span text:style-name="T1">"Porque és a própria luz."</text:span></text:span><text:span text:style-name="T1"> Esta é a conclusão de todo o sistema gnóstico valentiniano — não que a alma </text:span><text:span text:style-name="Emphasis"><text:span text:style-name="T1">tem</text:span></text:span><text:span text:style-name="T1"> luz ou que a alma </text:span><text:span text:style-name="Emphasis"><text:span text:style-name="T1">recebe</text:span></text:span><text:span text:style-name="T1"> luz. A alma </text:span><text:span text:style-name="Strong_20_Emphasis"><text:span text:style-name="T1">é</text:span></text:span><text:span text:style-name="T1"> luz. O esquecimento é o único obstáculo. A gnose não dá nada — remove o que foi posto a cobrir o que sempre existiu.</text:span></text:p>
      <text:p text:style-name="P12"/>
      <text:h text:style-name="P11" text:outline-level="2">Síntese: O que o Evangelho de Filipe acrescenta</text:h>
      <text:p text:style-name="P6"><text:span text:style-name="T1">Se o Apócrifo de João nos deu o </text:span><text:span text:style-name="Strong_20_Emphasis"><text:span text:style-name="T1">mapa</text:span></text:span><text:span text:style-name="T1"> — a cosmologia, a origem do universo, a estrutura da queda e da redenção — o Evangelho de Filipe dá-nos o </text:span><text:span text:style-name="Strong_20_Emphasis"><text:span text:style-name="T1">caminho</text:span></text:span><text:span text:style-name="T1"> — os ritos, as práticas, as experiências concretas através das quais a alma percorre esse mapa.</text:span></text:p>
      <text:p text:style-name="P6"><text:span text:style-name="T1">Os dois textos são complementares de uma forma muito precisa. João explica </text:span><text:span text:style-name="Emphasis"><text:span text:style-name="T1">porquê</text:span></text:span><text:span text:style-name="T1"> estamos aqui e </text:span><text:span text:style-name="Emphasis"><text:span text:style-name="T1">para onde</text:span></text:span><text:span text:style-name="T1"> precisamos de ir. Filipe explica </text:span><text:span text:style-name="Emphasis"><text:span text:style-name="T1">como</text:span></text:span><text:span text:style-name="T1"> nos movemos — através dos sacramentos, através da transformação interior, através do reconhecimento de que a luz que procuramos somos nós próprios.</text:span><text:bookmark-end text:name="__DdeLink__12615_257282931"/></text:p>
      <text:p text:style-name="P12"/>
      <text:p text:style-name="P6"><text:span text:style-name="T1">O próximo texto — o </text:span><text:span text:style-name="Strong_20_Emphasis"><text:span text:style-name="T1">Evangelho de Maria Madalena</text:span></text:span><text:span text:style-name="T1"> — é o mais curto dos seis que planeámos, mas talvez o mais perturbador. É a única voz feminina de toda a literatura gnóstica de Nag Hammadi. E o que Maria diz depois da ascensão de Jesus vai pôr em questão tudo o que os discípulos pensavam saber.</text:span><text:bookmark-end text:name="__DdeLink__9460_2045297844"/></text:p>
      <text:h text:style-name="P13" text:outline-level="1"><text:bookmark-start text:name="__DdeLink__9462_2045297844"/>Evangelho de Maria Madalena — Reconstrução Interpretativa e Exegese Gnóstica</text:h>
      <text:p text:style-name="P12"/>
      <text:h text:style-name="P11" text:outline-level="2">INTRODUÇÃO: O TEXTO E O SEU SILÊNCIO</text:h>
      <text:p text:style-name="P6"><text:span text:style-name="T1">O Evangelho de Maria Madalena é simultaneamente o mais curto e o mais incompleto dos textos que estudamos. Das dezoito páginas originais do manuscrito copta encontrado em Nag Hammadi, </text:span><text:span text:style-name="Strong_20_Emphasis"><text:span text:style-name="T1">seis foram destruídas antes da descoberta</text:span></text:span><text:span text:style-name="T1"> — as páginas 1 a 6 e as páginas 11 a 14 estão irremediavelmente perdidas. O que temos são fragmentos de um texto que já era fragmentário.</text:span></text:p>
      <text:p text:style-name="P2"><text:soft-page-break/>E no entanto — ou talvez precisamente por isso — é um dos textos mais poderosos de toda a literatura gnóstica. O que sobreviveu é suficiente para revelar uma visão do cosmos, da alma e da salvação que é ao mesmo tempo a mais intimista e a mais radical de todos os textos que lemos até agora.</text:p>
      <text:p text:style-name="P2">Há também algo simbolicamente perturbador no facto de as páginas estarem em falta. O único evangelho que dá voz a uma mulher — a única discípula que compreendeu completamente, segundo o Evangelho de Filipe — chegou até nós mutilado. A ausência faz parte da sua mensagem.</text:p>
      <text:p text:style-name="P12"/>
      <text:h text:style-name="P11" text:outline-level="2">PARTE I — O QUE SE PERDEU: AS PÁGINAS DESAPARECIDAS</text:h>
      <text:p text:style-name="P2">O texto começa já no meio de um diálogo entre Jesus ressuscitado e os seus discípulos. As primeiras seis páginas estão perdidas — não sabemos como o diálogo começou nem o que foi dito antes.</text:p>
      <text:p text:style-name="P6"><text:span text:style-name="T1">O que encontramos quando o texto começa é Jesus a responder a uma pergunta sobre a natureza do </text:span><text:span text:style-name="Strong_20_Emphasis"><text:span text:style-name="T1">pecado</text:span></text:span><text:span text:style-name="T1">. E a resposta é imediata e desconcertante:</text:span></text:p>
      <text:p text:style-name="P6"><text:span text:style-name="Emphasis"><text:span text:style-name="T1">"Não há pecado. Fostes vós que criastes o pecado quando agistes segundo a natureza do adultério, que se chama pecado. Por isso o Bem veio ao vosso meio, até ao que pertence a cada natureza, para restaurar cada natureza à sua raiz."</text:span></text:span></text:p>
      <text:p text:style-name="P6"><text:span text:style-name="T1">Jesus continua: </text:span><text:span text:style-name="Emphasis"><text:span text:style-name="T1">"Por isso adoeceis e morreis — porque amais o que vos engana. Quem tiver mente que compreenda, que compreenda."</text:span></text:span></text:p>
      <text:p text:style-name="P2">E então diz a palavra que fecha esta secção e abre tudo o que se segue:</text:p>
      <text:p text:style-name="P6"><text:span text:style-name="Emphasis"><text:span text:style-name="T1">"A paz seja convosco. Recebei a minha paz. Guardai-vos de que ninguém vos engane dizendo: 'Aqui está!' ou 'Acolá está!' Pois o Filho do Homem está dentro de vós. Segui-o. Os que o buscam encontrá-lo-ão."</text:span></text:span></text:p>
      <text:p text:style-name="P2">Dito isto — Jesus parte. E os discípulos ficam sozinhos.</text:p>
      <text:p text:style-name="P12"/>
      <text:h text:style-name="P14" text:outline-level="3">🔍 Exegese</text:h>
      <text:p text:style-name="P6"><text:span text:style-name="T1">Esta abertura estabelece de imediato os dois temas centrais do texto. O primeiro é a </text:span><text:span text:style-name="Strong_20_Emphasis"><text:span text:style-name="T1">natureza do pecado</text:span></text:span><text:span text:style-name="T1"> — ou antes, a sua ausência como categoria ontológica. Para o gnóstico, o pecado não é uma transgressão de uma lei divina. É uma </text:span><text:span text:style-name="Strong_20_Emphasis"><text:span text:style-name="T1">desorientação</text:span></text:span><text:span text:style-name="T1"> — agir segundo a natureza do mundo material em vez de agir segundo a natureza espiritual. O pecado não é moral — é ontológico. É confundir o que somos com o que o mundo diz que somos.</text:span></text:p>
      <text:p text:style-name="P6"><text:span text:style-name="T1">A frase </text:span><text:span text:style-name="Emphasis"><text:span text:style-name="T1">"adoeceis e morreis porque amais o que vos engana"</text:span></text:span><text:span text:style-name="T1"> é de uma precisão extraordinária. A doença e a morte não são punições — são consequências naturais de se identificar com o que é perecível. O corpo adoece porque é material. A consciência que se identifica completamente com o corpo sofre com ele. A gnose não cura o corpo — liberta a consciência da identificação total com o corpo.</text:span></text:p>
      <text:p text:style-name="P6"><text:span text:style-name="T1">O segundo tema é a </text:span><text:span text:style-name="Strong_20_Emphasis"><text:span text:style-name="T1">localização do divino</text:span></text:span><text:span text:style-name="T1">. </text:span><text:span text:style-name="Emphasis"><text:span text:style-name="T1">"O Filho do Homem está dentro de vós."</text:span></text:span><text:span text:style-name="T1"> Esta frase, dita no momento da partida de Jesus, é o seu último ensinamento — e é a síntese de toda a teologia </text:span><text:soft-page-break/><text:span text:style-name="T1">gnóstica. O divino não está fora. Não está num templo. Não está numa instituição. Não está numa escritura. Está </text:span><text:span text:style-name="Strong_20_Emphasis"><text:span text:style-name="T1">dentro</text:span></text:span><text:span text:style-name="T1">. E a busca que importa é interior.</text:span></text:p>
      <text:p text:style-name="P6"><text:span text:style-name="T1">Reconheces aqui imediatamente o dito 3 do </text:span><text:span text:style-name="Emphasis"><text:span text:style-name="T1">Evangelho de Tomás</text:span></text:span><text:span text:style-name="T1">: </text:span><text:span text:style-name="Emphasis"><text:span text:style-name="T1">"Se os que vos guiam disserem: 'O reino está no céu'... o reino está dentro de vós e está fora de vós."</text:span></text:span></text:p>
      <text:p text:style-name="P12"/>
      <text:h text:style-name="P11" text:outline-level="2">PARTE II — O CHORO DOS DISCÍPULOS E A VOZ DE MARIA</text:h>
      <text:p text:style-name="P6"><text:span text:style-name="T1">Com a partida de Jesus os discípulos entram em colapso. O texto descreve-os a chorar — não de tristeza espiritual mas de </text:span><text:span text:style-name="Strong_20_Emphasis"><text:span text:style-name="T1">medo</text:span></text:span><text:span text:style-name="T1">. Temem ser perseguidos e mortos como o seu mestre.</text:span></text:p>
      <text:p text:style-name="P2">É neste momento de paralisia que Maria Madalena se levanta.</text:p>
      <text:p text:style-name="P2">Não chora. Não treme. Volta-se para os discípulos e diz:</text:p>
      <text:p text:style-name="P6"><text:span text:style-name="Emphasis"><text:span text:style-name="T1">"Não choreis e não vos aflijais nem sejais indecisos. Pois a sua graça estará convosco e vos protegerá. Em vez disso, louvemos a sua grandeza, pois nos preparou e nos fez Seres Humanos."</text:span></text:span></text:p>
      <text:p text:style-name="P6"><text:span text:style-name="T1">E então — numa inversão extraordinária da hierarquia estabelecida — </text:span><text:span text:style-name="Strong_20_Emphasis"><text:span text:style-name="T1">Pedro pede a Maria que lhes ensine</text:span></text:span><text:span text:style-name="T1">. O discípulo que Jesus havia chamado "rocha" da sua Igreja pede à mulher que os conduza:</text:span></text:p>
      <text:p text:style-name="P6"><text:span text:style-name="Emphasis"><text:span text:style-name="T1">"Irmã, sabemos que o Salvador te amava mais do que às outras mulheres. Diz-nos as palavras do Salvador que recordas — as que conheces mas nós não conhecemos e não ouvimos."</text:span></text:span></text:p>
      <text:p text:style-name="P12"/>
      <text:h text:style-name="P14" text:outline-level="3">🔍 Exegese</text:h>
      <text:p text:style-name="P6"><text:span text:style-name="T1">Este momento é de uma riqueza sociológica e teológica imensurada. Pedro — o fundador da Igreja segundo a tradição ortodoxa — reconhece aqui publicamente a superioridade espiritual de Maria. Não a superioridade moral, não a superioridade hierárquica, mas a superioridade do </text:span><text:span text:style-name="Strong_20_Emphasis"><text:span text:style-name="T1">conhecimento</text:span></text:span><text:span text:style-name="T1">. Maria sabe coisas que eles não sabem. Ouviu coisas que eles não ouviram.</text:span></text:p>
      <text:p text:style-name="P2">A distinção que o texto faz entre os discípulos comuns e Maria é exactamente a distinção que o Evangelho de Filipe estabeleceu: há quem receba palavras e há quem receba o sopro. Os discípulos receberam palavras — ensinamentos, parábolas, instruções. Maria recebeu o sopro — a transmissão directa, a gnose viva.</text:p>
      <text:p text:style-name="P6"><text:span text:style-name="T1">O choro e o medo dos discípulos contrasta deliberadamente com a serenidade de Maria. Ela não está acima do sofrimento por insensibilidade — está acima dele porque </text:span><text:span text:style-name="Strong_20_Emphasis"><text:span text:style-name="T1">já ressuscitou enquanto ainda vive</text:span></text:span><text:span text:style-name="T1">, para usar a linguagem do Evangelho de Filipe. A morte de Jesus não a destruiu porque a sua identidade não estava ancorada na presença física de Jesus mas no conhecimento que ele lhe transmitiu.</text:span></text:p>
      <text:p text:style-name="P12"/>
      <text:h text:style-name="P11" text:outline-level="2">PARTE III — A VISÃO: O QUE MARIA VIU</text:h>
      <text:p text:style-name="P2">Maria responde ao pedido de Pedro. Conta-lhes que teve uma visão de Jesus — uma experiência interior, não uma aparição física. E Jesus lhe perguntou:</text:p>
      <text:p text:style-name="P6"><text:soft-page-break/><text:span text:style-name="Emphasis"><text:span text:style-name="T1">"Como vês uma visão? Através da alma ou através do espírito?"</text:span></text:span></text:p>
      <text:p text:style-name="P6"><text:span text:style-name="T1">Maria respondeu: </text:span><text:span text:style-name="Emphasis"><text:span text:style-name="T1">"Nem através da alma nem através do espírito mas através da mente — que está entre os dois."</text:span></text:span></text:p>
      <text:p text:style-name="P2">E então — nas páginas que se perderam — Maria descreve a visão. Quatro páginas inteiras do que Jesus lhe revelou nessa visão interior estão irremediavelmente ausentes.</text:p>
      <text:p text:style-name="P6"><text:span text:style-name="T1">O texto recomeça com Maria a descrever a </text:span><text:span text:style-name="Strong_20_Emphasis"><text:span text:style-name="T1">ascensão da alma</text:span></text:span><text:span text:style-name="T1"> — a viagem de regresso ao Pleroma que a alma faz depois da morte ou depois da gnose. E nessa ascensão a alma encontra quatro poderes que tentam detê-la:</text:span></text:p>
      <text:p text:style-name="P12"/>
      <text:h text:style-name="P11" text:outline-level="2">PARTE IV — A ASCENSÃO DA ALMA: O CONFRONTO COM OS ARCONTES</text:h>
      <text:p text:style-name="P6"><text:span text:style-name="T1">A alma em ascensão encontra o primeiro poder — chamado </text:span><text:span text:style-name="Strong_20_Emphasis"><text:span text:style-name="T1">Trevas</text:span></text:span><text:span text:style-name="T1">. Ele interroga-a:</text:span></text:p>
      <text:p text:style-name="P6"><text:span text:style-name="Emphasis"><text:span text:style-name="T1">"Para onde vais, assassina? Para onde vais, conquista do espaço?"</text:span></text:span></text:p>
      <text:p text:style-name="P6"><text:span text:style-name="T1">A alma responde: </text:span><text:span text:style-name="Emphasis"><text:span text:style-name="T1">"O que me prende foi morto. O que me envolvia foi destruído. O meu desejo chegou ao seu fim. A ignorância morreu."</text:span></text:span></text:p>
      <text:p text:style-name="P6"><text:span text:style-name="T1">Encontra o segundo poder — chamado </text:span><text:span text:style-name="Strong_20_Emphasis"><text:span text:style-name="T1">Desejo</text:span></text:span><text:span text:style-name="T1">. Ele diz: </text:span><text:span text:style-name="Emphasis"><text:span text:style-name="T1">"Eu não te vi descer — e agora vejo-te subir. Por que mentes, pertencendo-me?"</text:span></text:span></text:p>
      <text:p text:style-name="P6"><text:span text:style-name="T1">A alma responde: </text:span><text:span text:style-name="Emphasis"><text:span text:style-name="T1">"Vi-te — mas tu não me viste nem me reconheceste. Servi-te como uma veste — e tu não me reconheceste."</text:span></text:span></text:p>
      <text:p text:style-name="P6"><text:span text:style-name="T1">Encontra o terceiro poder — chamado </text:span><text:span text:style-name="Strong_20_Emphasis"><text:span text:style-name="T1">Ignorância</text:span></text:span><text:span text:style-name="T1">. Ele também a interroga. E a alma responde: </text:span><text:span text:style-name="Emphasis"><text:span text:style-name="T1">"Por que me julgas? Eu também te julguei. Não te reconheci — não fui reconhecida. Estávamos em paz, eu e tu."</text:span></text:span></text:p>
      <text:p text:style-name="P6"><text:span text:style-name="T1">Encontra o quarto poder — que tem sete formas: </text:span><text:span text:style-name="Strong_20_Emphasis"><text:span text:style-name="T1">Trevas, Desejo, Ignorância, Entusiasmo pela Morte, Reino da Carne, Sabedoria Tola da Carne, Sabedoria Irada</text:span></text:span><text:span text:style-name="T1">. E a alma responde ao quarto poder: </text:span><text:span text:style-name="Emphasis"><text:span text:style-name="T1">"O que me prendia foi morto e o que me girava foi destruído. O meu desejo chegou ao seu fim e a ignorância morreu. Num mundo fui libertada de um mundo. Numa imagem fui libertada de uma imagem superior. E das algemas do esquecimento que são transitórias fui liberta. De agora em diante receberei o repouso do tempo da estação do éon em silêncio."</text:span></text:span></text:p>
      <text:p text:style-name="P12"/>
      <text:h text:style-name="P14" text:outline-level="3">🔍 Exegese</text:h>
      <text:p text:style-name="P2">A ascensão da alma através dos quatro poderes é uma das descrições mais vívidas e psicologicamente precisas de todo o corpus gnóstico. Cada poder que a alma encontra corresponde a uma dimensão do aprisionamento que experimentou durante a vida no mundo material.</text:p>
      <text:p text:style-name="P6"><text:span text:style-name="T1">As </text:span><text:span text:style-name="Strong_20_Emphasis"><text:span text:style-name="T1">Trevas</text:span></text:span><text:span text:style-name="T1"> representam a ignorância primordial — o não saber que se é luz. A alma que ascende já não é prisioneira das trevas porque reconheceu a sua natureza luminosa.</text:span></text:p>
      <text:p text:style-name="P6"><text:span text:style-name="T1">O </text:span><text:span text:style-name="Strong_20_Emphasis"><text:span text:style-name="T1">Desejo</text:span></text:span><text:span text:style-name="T1"> é o poder que mais ressoa com o que leste no </text:span><text:span text:style-name="Emphasis"><text:span text:style-name="T1">Livro de Tomás</text:span></text:span><text:span text:style-name="T1"> — a </text:span><text:span text:style-name="Emphasis"><text:span text:style-name="T1">epithymia</text:span></text:span><text:span text:style-name="T1">, a força que prende a consciência ao mundo material através da identificação com os apetites do corpo. A </text:span><text:soft-page-break/><text:span text:style-name="T1">resposta da alma é extraordinária: </text:span><text:span text:style-name="Emphasis"><text:span text:style-name="T1">"Servi-te como uma veste — e tu não me reconheceste."</text:span></text:span><text:span text:style-name="T1"> O desejo não é a alma — é algo que a alma vestiu temporariamente e que pode despir.</text:span></text:p>
      <text:p text:style-name="P6"><text:span text:style-name="T1">A </text:span><text:span text:style-name="Strong_20_Emphasis"><text:span text:style-name="T1">Ignorância</text:span></text:span><text:span text:style-name="T1"> é o poder mais subtil. A alma não o combate — estabelece paz com ele. Porque a ignorância não é um inimigo externo — é uma condição que existiu dentro da própria alma. Ao reconhecê-la como tal, a alma liberta-se sem violência.</text:span></text:p>
      <text:p text:style-name="P6"><text:span text:style-name="T1">O </text:span><text:span text:style-name="Strong_20_Emphasis"><text:span text:style-name="T1">quarto poder</text:span></text:span><text:span text:style-name="T1"> com as suas sete formas corresponde exactamente às sete esferas dos Arcontes que encontrámos no Apócrifo de João — os governadores das esferas planetárias que revestiram a alma ao descer. A alma que ascende despe esses revestimentos um a um.</text:span></text:p>
      <text:p text:style-name="P6"><text:span text:style-name="T1">A frase final da alma é de uma beleza serena e absoluta: </text:span><text:span text:style-name="Emphasis"><text:span text:style-name="T1">"De agora em diante receberei o repouso do tempo da estação do éon em silêncio."</text:span></text:span><text:span text:style-name="T1"> O destino da alma libertada não é actividade, não é júbilo, não é celebração. É </text:span><text:span text:style-name="Strong_20_Emphasis"><text:span text:style-name="T1">silêncio</text:span></text:span><text:span text:style-name="T1">. O mesmo silêncio que é a natureza do Pai supremo no Apócrifo de João. A alma regressa ao que sempre foi — ao silêncio luminoso de onde nunca verdadeiramente partiu.</text:span></text:p>
      <text:p text:style-name="P12"/>
      <text:h text:style-name="P11" text:outline-level="2">PARTE V — A REBELIÃO DE PEDRO E ANDRÉ: O CONFLITO QUE DEFINE TUDO</text:h>
      <text:p text:style-name="P2">Quando Maria termina de falar, dois discípulos reagem.</text:p>
      <text:p text:style-name="P6"><text:span text:style-name="Strong_20_Emphasis"><text:span text:style-name="T1">André</text:span></text:span><text:span text:style-name="T1"> diz: </text:span><text:span text:style-name="Emphasis"><text:span text:style-name="T1">"Dizei o que pensais sobre o que disse. Quanto a mim, não acredito que o Salvador disse isto. Pois estes ensinamentos são ideias estranhas."</text:span></text:span></text:p>
      <text:p text:style-name="P6"><text:span text:style-name="Strong_20_Emphasis"><text:span text:style-name="T1">Pedro</text:span></text:span><text:span text:style-name="T1"> vai mais longe. Com hostilidade evidente diz: </text:span><text:span text:style-name="Emphasis"><text:span text:style-name="T1">"Ele falaria realmente em privado com uma mulher sem o nosso conhecimento? Havemos de nos voltar e ouvir todos a ela? Preferiu-a a nós?"</text:span></text:span></text:p>
      <text:p text:style-name="P2">Maria chora. Não de fraqueza — de incompreensão perante a injustiça. Diz a Pedro:</text:p>
      <text:p text:style-name="P6"><text:span text:style-name="Emphasis"><text:span text:style-name="T1">"Meu irmão Pedro, o que pensas? Pensas que inventei isto no meu coração ou que minto acerca do Salvador?"</text:span></text:span></text:p>
      <text:p text:style-name="P6"><text:span text:style-name="T1">É então </text:span><text:span text:style-name="Strong_20_Emphasis"><text:span text:style-name="T1">Levi</text:span></text:span><text:span text:style-name="T1"> que intervém — o único que defende Maria. Diz a Pedro com uma clareza cortante:</text:span></text:p>
      <text:p text:style-name="P6"><text:span text:style-name="Emphasis"><text:span text:style-name="T1">"Pedro, sempre foste temperamental. Agora vejo-te a contender com a mulher como se fosse um adversário. Se o Salvador a tornou digna, quem és tu para a rejeitar? Certamente o Salvador conhece-a muito bem. Por isso a amou mais do que a nós. Antes nos envergonhemos e nos revistamos do Homem Perfeito, partamos como nos ordenou e proclamemos o evangelho sem estabelecer outra regra nem outra lei além do que o Salvador disse."</text:span></text:span></text:p>
      <text:p text:style-name="P2">E com isto — o texto termina.</text:p>
      <text:p text:style-name="P12"/>
      <text:h text:style-name="P14" text:outline-level="3">🔍 Exegese</text:h>
      <text:p text:style-name="P2">Este final é de uma violência e de uma honestidade absolutamente surpreendentes. O texto não tenta suavizar o conflito — expõe-no com uma precisão cirúrgica.</text:p>
      <text:p text:style-name="P6"><text:span text:style-name="T1">Pedro e André representam aqui algo muito específico: a </text:span><text:span text:style-name="Strong_20_Emphasis"><text:span text:style-name="T1">resistência institucional ao conhecimento interior</text:span></text:span><text:span text:style-name="T1">. A objecção de Pedro não é teológica — é de autoridade. </text:span><text:span text:style-name="Emphasis"><text:span text:style-name="T1">"Falaria ele em privado com uma mulher?"</text:span></text:span><text:span text:style-name="T1"> A pergunta não questiona o conteúdo do que Maria disse — questiona o </text:span><text:soft-page-break/><text:span text:style-name="Strong_20_Emphasis"><text:span text:style-name="T1">direito</text:span></text:span><text:span text:style-name="T1"> de ela ter recebido esse conhecimento. É a lógica da hierarquia a tentar invalidar a experiência directa.</text:span></text:p>
      <text:p text:style-name="P2">André vai mais longe — rejeita o conteúdo como "ideias estranhas". Mas não oferece qualquer argumento. A estranheza é, para ele, suficiente razão para rejeitar. É a lógica da tradição a proteger-se da revelação.</text:p>
      <text:p text:style-name="P6"><text:span text:style-name="T1">A intervenção de Levi é o momento mais luminoso do texto. </text:span><text:span text:style-name="Emphasis"><text:span text:style-name="T1">"Quem és tu para a rejeitar?"</text:span></text:span><text:span text:style-name="T1"> É uma pergunta que derruba toda a hierarquia de uma vez. A autoridade espiritual não vem da posição, do género ou da antiguidade — vem do </text:span><text:span text:style-name="Strong_20_Emphasis"><text:span text:style-name="T1">conhecimento vivo</text:span></text:span><text:span text:style-name="T1">. Jesus tornou Maria digna — e isso é suficiente.</text:span></text:p>
      <text:p text:style-name="P6"><text:span text:style-name="T1">A frase final de Levi contém um ensinamento que ressoa com toda a tradição gnóstica: </text:span><text:span text:style-name="Emphasis"><text:span text:style-name="T1">"sem estabelecer outra regra nem outra lei além do que o Salvador disse."</text:span></text:span><text:span text:style-name="T1"> O gnosticismo é fundamentalmente </text:span><text:span text:style-name="Strong_20_Emphasis"><text:span text:style-name="T1">anti-institucional</text:span></text:span><text:span text:style-name="T1"> — não porque rejeite a comunidade mas porque rejeita a institucionalização do espiritual. A lei mata. O conhecimento vivo.</text:span></text:p>
      <text:p text:style-name="P12"/>
      <text:h text:style-name="P11" text:outline-level="2">Síntese: O que o Evangelho de Maria Madalena acrescenta</text:h>
      <text:p text:style-name="P2">Os três textos que estudámos formam agora uma progressão muito clara:</text:p>
      <text:p text:style-name="P6"><text:span text:style-name="T1">O </text:span><text:span text:style-name="Strong_20_Emphasis"><text:span text:style-name="T1">Apócrifo de João</text:span></text:span><text:span text:style-name="T1"> deu-nos a cosmologia — o mapa completo da queda e da possibilidade do regresso.</text:span></text:p>
      <text:p text:style-name="P6"><text:span text:style-name="T1">O </text:span><text:span text:style-name="Strong_20_Emphasis"><text:span text:style-name="T1">Evangelho de Filipe</text:span></text:span><text:span text:style-name="T1"> deu-nos os sacramentos — os ritos e as práticas através dos quais a transformação acontece.</text:span></text:p>
      <text:p text:style-name="P6"><text:span text:style-name="T1">O </text:span><text:span text:style-name="Strong_20_Emphasis"><text:span text:style-name="T1">Evangelho de Maria Madalena</text:span></text:span><text:span text:style-name="T1"> dá-nos algo diferente e mais íntimo — a </text:span><text:span text:style-name="Strong_20_Emphasis"><text:span text:style-name="T1">experiência vivida</text:span></text:span><text:span text:style-name="T1"> da ascensão. Não descreve o mapa. Descreve o que é caminhar nele. E ao fazê-lo através da voz de uma mulher, numa cultura que sistematicamente silenciava as mulheres, faz uma afirmação que vai muito além do gnóstico: a gnose não tem género. A luz dentro de uma mulher é exactamente a mesma luz que existe dentro de um homem. E quem a recebeu tem o direito — e a obrigação — de transmiti-la.</text:span></text:p>
      <text:p text:style-name="P12"/>
      <text:p text:style-name="P6"><text:span text:style-name="T1">Os três textos seguintes — </text:span><text:span text:style-name="Strong_20_Emphasis"><text:span text:style-name="T1">Pistis Sophia, Hipóstase dos Arcontes</text:span></text:span><text:span text:style-name="T1"> e </text:span><text:span text:style-name="Strong_20_Emphasis"><text:span text:style-name="T1">Livro dos Jubileus</text:span></text:span><text:span text:style-name="T1"> — são progressivamente mais complexos e mais tecnicamente exigentes. A Pistis Sophia em particular é o texto gnóstico mais extenso que existe e merece uma preparação cuidada.</text:span><text:bookmark-end text:name="__DdeLink__9462_2045297844"/></text:p>
      <text:h text:style-name="P13" text:outline-level="1"><text:bookmark-start text:name="__DdeLink__9464_2045297844"/>Pistis Sophia — Reconstrução Interpretativa e Exegese Gnóstica</text:h>
      <text:p text:style-name="P12"/>
      <text:h text:style-name="P11" text:outline-level="2">INTRODUÇÃO: O MAIOR TEXTO GNÓSTICO</text:h>
      <text:p text:style-name="P6"><text:span text:style-name="T1">A Pistis Sophia é o texto gnóstico mais longo e mais complexo que chegou até nós. Não foi encontrada em Nag Hammadi — já era conhecida desde o século XVIII, quando o manuscrito copta foi adquirido em 1773 pelo médico e antiquário escocês </text:span><text:span text:style-name="Strong_20_Emphasis"><text:span text:style-name="T1">Anthony Askew</text:span></text:span><text:span text:style-name="T1">, dando-lhe o nome pelo </text:span><text:soft-page-break/><text:span text:style-name="T1">qual é também conhecido: </text:span><text:span text:style-name="Strong_20_Emphasis"><text:span text:style-name="T1">Codex Askewianus</text:span></text:span><text:span text:style-name="T1">. Encontra-se actualmente no British Museum em Londres.</text:span></text:p>
      <text:p text:style-name="P6"><text:span text:style-name="T1">O texto divide-se em </text:span><text:span text:style-name="Strong_20_Emphasis"><text:span text:style-name="T1">quatro livros</text:span></text:span><text:span text:style-name="T1">, provavelmente compostos em momentos diferentes entre os séculos III e IV. Os três primeiros formam um conjunto narrativo coerente. O quarto é estruturalmente diferente e possivelmente de origem distinta.</text:span></text:p>
      <text:p text:style-name="P6"><text:span text:style-name="T1">A cena é a seguinte: </text:span><text:span text:style-name="Strong_20_Emphasis"><text:span text:style-name="T1">onze anos após a ressurreição</text:span></text:span><text:span text:style-name="T1">, Jesus ainda está com os seus discípulos. Numa manhã, enquanto meditam, uma luz imensuravelmente intensa desce sobre ele. Durante horas os discípulos não o conseguem ver — apenas a luz. Quando Jesus emerge da luz, diz-lhes que ascendeu aos mundos superiores e que vai revelar-lhes </text:span><text:span text:style-name="Strong_20_Emphasis"><text:span text:style-name="T1">o que nunca foi revelado desde a fundação do mundo</text:span></text:span><text:span text:style-name="T1">.</text:span></text:p>
      <text:p text:style-name="P2">O que se segue é uma das obras mais ambiciosas da literatura religiosa antiga — uma tentativa de descrever a totalidade do universo espiritual, a estrutura completa dos mundos de luz, a natureza da queda, e o caminho de regresso com uma precisão que beira o obsessivo.</text:p>
      <text:p text:style-name="P12"/>
      <text:h text:style-name="P11" text:outline-level="2">PARTE I — SOPHIA NO CAOS: A QUEDA MAIS PROFUNDA</text:h>
      <text:p text:style-name="P6"><text:span text:style-name="T1">A narrativa central dos três primeiros livros gira em torno de </text:span><text:span text:style-name="Strong_20_Emphasis"><text:span text:style-name="T1">Pistis Sophia</text:span></text:span><text:span text:style-name="T1"> — literalmente </text:span><text:span text:style-name="Emphasis"><text:span text:style-name="T1">"Fé-Sabedoria"</text:span></text:span><text:span text:style-name="T1"> em grego. Sophia já a conhecemos do Apócrifo de João — é o Éon que caiu ao criar Ialdabaoth. Mas aqui a história é diferente e muito mais dramática.</text:span></text:p>
      <text:p text:style-name="P6"><text:span text:style-name="T1">Sophia habita o </text:span><text:span text:style-name="Strong_20_Emphasis"><text:span text:style-name="T1">décimo terceiro Éon</text:span></text:span><text:span text:style-name="T1"> — a última e mais elevada das esferas que existem abaixo do verdadeiro Pleroma. Ela vê acima de si a </text:span><text:span text:style-name="Strong_20_Emphasis"><text:span text:style-name="T1">Luz das Luzes</text:span></text:span><text:span text:style-name="T1"> — o verdadeiro mundo de luz que está além dos mundos onde habita. É dominada por um desejo irresistível de ascender até essa Luz.</text:span></text:p>
      <text:p text:style-name="P6"><text:span text:style-name="T1">Mas os Arcontes que governam as esferas abaixo dela — liderados por um ser chamado </text:span><text:span text:style-name="Strong_20_Emphasis"><text:span text:style-name="T1">Authades</text:span></text:span><text:span text:style-name="T1">, o Auto-Presunçoso — ressentem-na. Vêem a sua luz e querem-na para si. Authades envia emissários que se disfarçam de seres luminosos e enganam Sophia — fazem-na descer em vez de subir, convencendo-a de que a descida é o caminho para a Luz que procura.</text:span></text:p>
      <text:p text:style-name="P2">Sophia desce. E desce. E continua a descer — através das esferas dos Arcontes, cada vez mais profundamente no caos, cada vez mais longe da Luz que procurava. Os Arcontes rodeiam-na, tiram-lhe a sua luz, humilham-na, aprisionam-na no mais fundo do caos.</text:p>
      <text:p text:style-name="P2">E Sophia — sozinha, escarnecida, despojada — começa a cantar.</text:p>
      <text:p text:style-name="P12"/>
      <text:h text:style-name="P14" text:outline-level="3">🔍 Exegese</text:h>
      <text:p text:style-name="P6"><text:span text:style-name="T1">A imagem de Sophia cantando no caos é uma das mais poderosas de toda a literatura religiosa. Não é resignação — é a alma que mesmo no ponto mais baixo da sua queda </text:span><text:span text:style-name="Strong_20_Emphasis"><text:span text:style-name="T1">não para de se orientar para a Luz</text:span></text:span><text:span text:style-name="T1">.</text:span></text:p>
      <text:p text:style-name="P6"><text:span text:style-name="T1">Os cânticos de Sophia que Jesus cita e comenta ao longo da Pistis Sophia são estruturados a partir dos </text:span><text:span text:style-name="Strong_20_Emphasis"><text:span text:style-name="T1">Salmos</text:span></text:span><text:span text:style-name="T1"> do Antigo Testamento — mas relidos através da lente gnóstica. O Salmo 22 — </text:span><text:span text:style-name="Emphasis"><text:span text:style-name="T1">"Deus meu, Deus meu, por que me abandonaste?"</text:span></text:span><text:span text:style-name="T1"> — torna-se a voz de Sophia no caos. O Salmo 69 — </text:span><text:span text:style-name="Emphasis"><text:span text:style-name="T1">"Salvai-me, ó Deus, pois as águas chegaram à minha alma"</text:span></text:span><text:span text:style-name="T1"> — é a sua oração de profundidade.</text:span></text:p>
      <text:p text:style-name="P6"><text:soft-page-break/><text:span text:style-name="T1">Esta releitura dos Salmos é teologicamente audaciosa. O texto está a dizer que os Salmos mais desesperados do Antigo Testamento não são a voz de Israel histórico — são a voz da </text:span><text:span text:style-name="Strong_20_Emphasis"><text:span text:style-name="T1">alma universal</text:span></text:span><text:span text:style-name="T1"> no seu momento de maior abandono. O sofrimento humano tem um arquétipo cósmico — Sophia no caos. E assim como Sophia foi eventualmente resgatada, também a alma humana pode sê-lo.</text:span></text:p>
      <text:p text:style-name="P6"><text:span text:style-name="T1">A figura de </text:span><text:span text:style-name="Strong_20_Emphasis"><text:span text:style-name="T1">Authades</text:span></text:span><text:span text:style-name="T1"> — o Auto-Presunçoso — é particularmente significativa. Ele não é simplesmente mau — é o princípio do </text:span><text:span text:style-name="Strong_20_Emphasis"><text:span text:style-name="T1">egocentrismo cósmico</text:span></text:span><text:span text:style-name="T1">, a força que age sempre a partir do seu próprio interesse, que usa a aparência da luz para servir as trevas. É uma descrição precisa de uma forma de poder que reconhecemos facilmente no mundo humano.</text:span></text:p>
      <text:p text:style-name="P12"/>
      <text:h text:style-name="P11" text:outline-level="2">PARTE II — OS TREZE CÂNTICOS: SOPHIA ENTRE A QUEDA E O RESGATE</text:h>
      <text:p text:style-name="P6"><text:span text:style-name="T1">No coração da Pistis Sophia encontram-se </text:span><text:span text:style-name="Strong_20_Emphasis"><text:span text:style-name="T1">treze cânticos de Sophia</text:span></text:span><text:span text:style-name="T1"> — treze momentos em que a alma aprisionada se volta para a Luz e suplica. Cada cântico descreve um estado diferente da queda e uma dimensão diferente da esperança.</text:span></text:p>
      <text:p text:style-name="P6"><text:span text:style-name="T1">No </text:span><text:span text:style-name="Strong_20_Emphasis"><text:span text:style-name="T1">primeiro cântico</text:span></text:span><text:span text:style-name="T1"> Sophia descreve como foi enganada:</text:span></text:p>
      <text:p text:style-name="P6"><text:span text:style-name="Emphasis"><text:span text:style-name="T1">"A luz em que eu confiava foi tirada de mim e sou deixada na escuridão e na matéria do mundo. Enviei a minha força para o alto para a Luz e os guardiões das portas dos Éons humilharam-me."</text:span></text:span></text:p>
      <text:p text:style-name="P6"><text:span text:style-name="T1">No </text:span><text:span text:style-name="Strong_20_Emphasis"><text:span text:style-name="T1">terceiro cântico</text:span></text:span><text:span text:style-name="T1"> a voz torna-se mais íntima e mais desesperada:</text:span></text:p>
      <text:p text:style-name="P6"><text:span text:style-name="Emphasis"><text:span text:style-name="T1">"Olhei para cima e vi que a luz me abandonara. Olhei para baixo e vi trevas e matéria em grande quantidade. Não havia esperança de que alguém me salvasse. Procurei a luz e ela não estava. Procurei meu par e não o encontrei."</text:span></text:span></text:p>
      <text:p text:style-name="P6"><text:span text:style-name="T1">No </text:span><text:span text:style-name="Strong_20_Emphasis"><text:span text:style-name="T1">sétimo cântico</text:span></text:span><text:span text:style-name="T1"> surge pela primeira vez a possibilidade do resgate:</text:span></text:p>
      <text:p text:style-name="P6"><text:span text:style-name="Emphasis"><text:span text:style-name="T1">"Ouve-me pois a minha graça chegou ao seu fim. Eu sou uma que está no poder das trevas. Salva-me da mão dos leões e da boca dos dragões e das forças da matéria amarga."</text:span></text:span></text:p>
      <text:p text:style-name="P6"><text:span text:style-name="T1">No </text:span><text:span text:style-name="Strong_20_Emphasis"><text:span text:style-name="T1">décimo segundo cântico</text:span></text:span><text:span text:style-name="T1"> Sophia começa a ver a Luz aproximar-se:</text:span></text:p>
      <text:p text:style-name="P6"><text:span text:style-name="Emphasis"><text:span text:style-name="T1">"A minha força viu a Luz e alegrou-se. Os meus pés ficaram parados no lugar da rectidão. Louvai-o — o Senhor de todos os mundos — para que a sua graça e a sua bondade venham a todo o género."</text:span></text:span></text:p>
      <text:p text:style-name="P12"/>
      <text:h text:style-name="P14" text:outline-level="3">🔍 Exegese</text:h>
      <text:p text:style-name="P6"><text:span text:style-name="T1">Os treze cânticos de Sophia são a espinha dorsal emocional da Pistis Sophia e revelam algo que os outros textos gnósticos que estudámos raramente mostram com esta intensidade: </text:span><text:span text:style-name="Strong_20_Emphasis"><text:span text:style-name="T1">a dimensão do sofrimento na experiência gnóstica</text:span></text:span><text:span text:style-name="T1">.</text:span></text:p>
      <text:p text:style-name="P2">O Apócrifo de João é relativamente frio e filosófico na sua descrição da queda. O Evangelho de Filipe é meditativo e sapiencial. Mas a Pistis Sophia mergulha na experiência visceral do abandono, da humilhação, da desesperança. É um texto que sabe o que é estar no fundo.</text:p>
      <text:p text:style-name="P2"><text:soft-page-break/>Esta dimensão tem uma importância espiritual enorme. A gnose não é apenas conhecimento intelectual — é um caminho que passa pela escuridão. Sophia não ascende directamente da queda à Luz. Passa por treze momentos de crise, de apelo, de esperança frustrada e renovada. A alma que busca a Luz tem de estar disposta a cantar no caos antes de o conseguir abandonar.</text:p>
      <text:p text:style-name="P6"><text:span text:style-name="T1">Há aqui uma ressonância com a tradição mística cristã — em particular com o que João da Cruz chamou a </text:span><text:span text:style-name="Emphasis"><text:span text:style-name="T1">"noite escura da alma"</text:span></text:span><text:span text:style-name="T1">. E não é coincidência: os grandes místicos cristãos medievais beberam, muitas vezes sem o saber, de fontes gnósticas que tinham sobrevivido de forma velada através dos séculos.</text:span></text:p>
      <text:p text:style-name="P12"/>
      <text:h text:style-name="P11" text:outline-level="2">PARTE III — O RESGATE: JESUS DESCE AO CAOS</text:h>
      <text:p text:style-name="P2">Após os treze cânticos de Sophia — após treze momentos de apelo sem resposta aparente — Jesus é enviado pelo Pai para descer ao caos e resgatar Sophia.</text:p>
      <text:p text:style-name="P2">A descida de Jesus ao caos é descrita com uma riqueza visual extraordinária. Ele desce através das esferas dos Arcontes, cada vez mais fundo, até chegar ao caos onde Sophia está aprisionada. Os Arcontes tentam detê-lo — não o reconhecem porque viaja disfarçado, como no Apócrifo de João.</text:p>
      <text:p text:style-name="P6"><text:span text:style-name="T1">Quando chega a Sophia, Jesus não a liberta imediatamente. Primeiro </text:span><text:span text:style-name="Strong_20_Emphasis"><text:span text:style-name="T1">dá-lhe a sua luz de volta</text:span></text:span><text:span text:style-name="T1"> — a luz que os Arcontes lhe roubaram. Sophia recobra a sua força. E então juntos — Sophia com a sua luz restaurada e Jesus como guia — começam a ascensão.</text:span></text:p>
      <text:p text:style-name="P6"><text:span text:style-name="T1">Mas a ascensão não é simples. Cada esfera que atravessam tem guardiões que exigem </text:span><text:span text:style-name="Strong_20_Emphasis"><text:span text:style-name="T1">palavras de passagem</text:span></text:span><text:span text:style-name="T1"> — nomes secretos, selos, mistérios que abrem as portas das esferas. Jesus conhece todas as palavras. Transmite-as a Sophia. E juntos sobem, esfera por esfera, até ao décimo terceiro Éon.</text:span></text:p>
      <text:p text:style-name="P2">Sophia não volta ao Pleroma imediatamente — fica no décimo terceiro Éon, restaurada mas ainda não completamente purificada. A purificação completa exigirá mais tempo e mais trabalho interior.</text:p>
      <text:p text:style-name="P12"/>
      <text:h text:style-name="P14" text:outline-level="3">🔍 Exegese</text:h>
      <text:p text:style-name="P6"><text:span text:style-name="T1">A estrutura do resgate de Sophia revela algo de fundamental sobre a soteriologia da Pistis Sophia — a sua teoria da salvação é </text:span><text:span text:style-name="Strong_20_Emphasis"><text:span text:style-name="T1">gradual, cooperativa e processual</text:span></text:span><text:span text:style-name="T1">.</text:span></text:p>
      <text:p text:style-name="P6"><text:span text:style-name="T1">Jesus não simplesmente liberta Sophia. Devolve-lhe primeiro a sua própria luz — restaura a sua capacidade de agir. E depois guia-a através das esferas, transmitindo os conhecimentos necessários para que ela própria abra as portas. A salvação aqui não é passiva — é uma </text:span><text:span text:style-name="Strong_20_Emphasis"><text:span text:style-name="T1">colaboração entre o guia e a alma que ascende</text:span></text:span><text:span text:style-name="T1">.</text:span></text:p>
      <text:p text:style-name="P2">Esta estrutura é muito diferente da soteriologia ortodoxa cristã, em que a salvação é um dom gratuito que o fiel recebe através da fé. Na Pistis Sophia, a salvação exige trabalho da alma — não trabalho moral no sentido de boas obras, mas trabalho de conhecimento, de purificação progressiva, de aprendizagem das realidades espirituais.</text:p>
      <text:p text:style-name="P6"><text:span text:style-name="T1">As </text:span><text:span text:style-name="Strong_20_Emphasis"><text:span text:style-name="T1">palavras de passagem</text:span></text:span><text:span text:style-name="T1"> que abrem as portas das esferas correspondem exactamente ao que no Evangelho de Maria Madalena a alma diz aos Arcontes durante a ascensão. São fórmulas de reconhecimento — não mágicas no sentido vulgar, mas </text:span><text:span text:style-name="Strong_20_Emphasis"><text:span text:style-name="T1">declarações de conhecimento</text:span></text:span><text:span text:style-name="T1"> que provam que a alma sabe quem é e de onde vem. A porta que se abre não obedece a uma palavra mágica — obedece ao reconhecimento de uma verdade.</text:span></text:p>
      <text:p text:style-name="P12"><text:soft-page-break/></text:p>
      <text:h text:style-name="P11" text:outline-level="2">PARTE IV — OS MISTÉRIOS: A ARQUITECTURA DO UNIVERSO ESPIRITUAL</text:h>
      <text:p text:style-name="P2"><text:bookmark-start text:name="__DdeLink__9469_3434306060"/>Ao longo dos três primeiros livros, Jesus revela aos discípulos a estrutura completa do universo espiritual. Esta arquitectura é de uma complexidade que não tem paralelo em nenhum outro texto gnóstico.</text:p>
      <text:p text:style-name="P6"><text:span text:style-name="T1">Existe o </text:span><text:span text:style-name="Strong_20_Emphasis"><text:span text:style-name="T1">Tesouro da Luz</text:span></text:span><text:span text:style-name="T1"> — o mundo de luz supremo que está acima de todos os outros mundos. Divide-se em doze tesouros, cada um governado por um ser de luz diferente.</text:span></text:p>
      <text:p text:style-name="P6"><text:span text:style-name="T1">Abaixo do Tesouro existem os </text:span><text:span text:style-name="Strong_20_Emphasis"><text:span text:style-name="T1">doze Éons</text:span></text:span><text:span text:style-name="T1"> — as doze esferas de luz que constituem o Pleroma. Cada Éon tem os seus governadores, os seus habitantes, as suas leis.</text:span></text:p>
      <text:p text:style-name="P6"><text:span text:style-name="T1">Abaixo dos doze Éons existe o </text:span><text:span text:style-name="Strong_20_Emphasis"><text:span text:style-name="T1">décimo terceiro Éon</text:span></text:span><text:span text:style-name="T1"> — onde Sophia habita após o resgate, e que é o limiar entre o Pleroma e o caos.</text:span></text:p>
      <text:p text:style-name="P6"><text:span text:style-name="T1">Abaixo do décimo terceiro Éon existem as </text:span><text:span text:style-name="Strong_20_Emphasis"><text:span text:style-name="T1">esferas dos Arcontes</text:span></text:span><text:span text:style-name="T1"> — as sete esferas planetárias que já conhecemos do Apócrifo de João, governadas pelos poderes que aprisionam as almas.</text:span></text:p>
      <text:p text:style-name="P6"><text:span text:style-name="T1">E abaixo de tudo existe o </text:span><text:span text:style-name="Strong_20_Emphasis"><text:span text:style-name="T1">Amente</text:span></text:span><text:span text:style-name="T1"> — o mundo dos mortos, onde as almas que não alcançaram a gnose esperam o seu regresso ao mundo material através da reencarnação.</text:span></text:p>
      <text:p text:style-name="P2">Jesus descreve em detalhe o que acontece às almas em cada nível. Descreve os diferentes tipos de pecado e as diferentes consequências. Descreve os mistérios que permitem às almas ascender de esfera em esfera. Descreve o que acontece à alma de um gnóstico após a morte — como atravessa as esferas dos Arcontes sem ser retida, usando o conhecimento que recebeu em vida.<text:bookmark-end text:name="__DdeLink__9469_3434306060"/></text:p>
      <text:p text:style-name="P12"/>
      <text:h text:style-name="P14" text:outline-level="3">🔍 Exegese</text:h>
      <text:p text:style-name="P6"><text:span text:style-name="T1">A arquitectura espiritual da Pistis Sophia é de uma ambição cartográfica impressionante. O texto quer mapear </text:span><text:span text:style-name="Strong_20_Emphasis"><text:span text:style-name="T1">a totalidade do ser</text:span></text:span><text:span text:style-name="T1"> — desde o Tesouro da Luz supremo até ao mais fundo do Amente. Não deixa nenhum território por descrever.</text:span></text:p>
      <text:p text:style-name="P2">Esta obsessão com a arquitectura espiritual tem uma função que vai além da especulação teológica. Cada nível descrito corresponde a uma etapa do caminho da alma — e conhecer a arquitectura é parte essencial da viagem. A alma que sabe onde está e para onde vai pode navegar com precisão. A alma ignorante vagueia.</text:p>
      <text:p text:style-name="P6"><text:span text:style-name="T1">O conceito do </text:span><text:span text:style-name="Strong_20_Emphasis"><text:span text:style-name="T1">Amente</text:span></text:span><text:span text:style-name="T1"> — o mundo dos mortos — é particularmente interessante porque revela a posição da Pistis Sophia sobre a reencarnação. As almas que não alcançaram a gnose não são punidas eternamente — regressam ao mundo material em novos corpos, com novas oportunidades de despertar. A compaixão cósmica é infinita. Nenhuma centelha de luz se perde para sempre.</text:span></text:p>
      <text:p text:style-name="P6"><text:bookmark-start text:name="__DdeLink__9471_3434306060"/><text:span text:style-name="T1">Mas há uma urgência no texto. Jesus diz repetidamente aos discípulos: </text:span><text:span text:style-name="Emphasis"><text:span text:style-name="T1">"Estes são os últimos tempos."</text:span></text:span><text:span text:style-name="T1"> A oportunidade de receber os mistérios e de ascender é preciosa e limitada. Não por crueldade divina mas porque </text:span><text:span text:style-name="Strong_20_Emphasis"><text:span text:style-name="T1">cada vida é uma oportunidade que passa</text:span></text:span><text:span text:style-name="T1">.</text:span><text:bookmark-end text:name="__DdeLink__9471_3434306060"/></text:p>
      <text:p text:style-name="P12"/>
      <text:h text:style-name="P11" text:outline-level="2"><text:soft-page-break/>PARTE V — AS DISCÍPULAS: AS VOZES QUE O TEXTO PRESERVA</text:h>
      <text:p text:style-name="P6"><text:span text:style-name="T1">Um dos aspectos mais extraordinários da Pistis Sophia é a </text:span><text:span text:style-name="Strong_20_Emphasis"><text:span text:style-name="T1">presença activa das discípulas</text:span></text:span><text:span text:style-name="T1"> no diálogo. Ao longo do texto são as mulheres que fazem as perguntas mais profundas e que recebem os elogios mais altos de Jesus.</text:span></text:p>
      <text:p text:style-name="P6"><text:span text:style-name="Strong_20_Emphasis"><text:span text:style-name="T1">Maria Madalena</text:span></text:span><text:span text:style-name="T1"> domina o diálogo. Jesus diz dela em determinado momento: </text:span><text:span text:style-name="Emphasis"><text:span text:style-name="T1">"Maria, tu és bem-aventurada, acima de todas as mulheres na terra, porque serás o Pleroma dos Pleromas e a consumação de todas as consumações."</text:span></text:span></text:p>
      <text:p text:style-name="P6"><text:span text:style-name="T1">Maria faz 39 das 46 perguntas nos dois primeiros livros. As suas perguntas não são pedidos de esclarecimento — são interpretações, associações, saltos de compreensão que Jesus confirma e aprofunda. Ela não é uma aluna — é uma </text:span><text:span text:style-name="Strong_20_Emphasis"><text:span text:style-name="T1">interlocutora</text:span></text:span><text:span text:style-name="T1">.</text:span></text:p>
      <text:p text:style-name="P6"><text:span text:style-name="Strong_20_Emphasis"><text:span text:style-name="T1">Salomé</text:span></text:span><text:span text:style-name="T1"> pergunta sobre a natureza dos mistérios e a possibilidade de a mulher aceder a eles completamente. Jesus responde que não há distinção — o mistério não conhece género.</text:span></text:p>
      <text:p text:style-name="P6"><text:span text:style-name="Strong_20_Emphasis"><text:span text:style-name="T1">Maria, mãe de Jesus</text:span></text:span><text:span text:style-name="T1">, faz perguntas sobre a natureza da alma e sobre o destino dos que morrem sem gnose. A sua voz é mais materna, mais preocupada com o destino dos outros.</text:span></text:p>
      <text:p text:style-name="P6"><text:span text:style-name="Strong_20_Emphasis"><text:span text:style-name="T1">Marta</text:span></text:span><text:span text:style-name="T1"> pergunta sobre a estrutura dos mundos e recebe uma resposta que a situa como guardiã de conhecimentos sobre os Arcontes.</text:span></text:p>
      <text:p text:style-name="P12"/>
      <text:h text:style-name="P14" text:outline-level="3">🔍 Exegese</text:h>
      <text:p text:style-name="P6"><text:span text:style-name="T1">A presença dominante de Maria Madalena como interlocutora principal confirma o que o Evangelho de Filipe e o Evangelho de Maria Madalena já estabeleceram: </text:span><text:span text:style-name="Strong_20_Emphasis"><text:span text:style-name="T1">ela é, na tradição gnóstica, a discípula que mais completamente recebeu e compreendeu</text:span></text:span><text:span text:style-name="T1">.</text:span></text:p>
      <text:p text:style-name="P2">Mas há algo mais subtil aqui. A Pistis Sophia não apenas dá voz às mulheres — dá-lhes as perguntas mais complexas e as respostas mais elevadas. É como se o texto estivesse conscientemente a construir um contra-narrativa à Igreja institucional que sistematicamente excluía as mulheres do ensinamento e da autoridade espiritual.</text:p>
      <text:p text:style-name="P6"><text:span text:style-name="T1">O confronto entre Pedro e Maria Madalena que vimos no Evangelho de Maria Madalena ressoa aqui de forma diferente. Em vez do conflito aberto, a Pistis Sophia simplesmente </text:span><text:span text:style-name="Strong_20_Emphasis"><text:span text:style-name="T1">age como se o conflito não existisse</text:span></text:span><text:span text:style-name="T1"> — trata Maria Madalena como a principal discípula sem sequer questionar esse facto. É uma forma mais radical de subversão — não argumentar contra a exclusão mas simplesmente ignorá-la.</text:span></text:p>
      <text:p text:style-name="P12"/>
      <text:h text:style-name="P11" text:outline-level="2">PARTE VI — O QUARTO LIVRO: OS DOIS ESPAÇOS E OS DOIS TIPOS DE ALMAS</text:h>
      <text:p text:style-name="P2">O quarto livro da Pistis Sophia é estruturalmente diferente dos três primeiros. É mais filosófico, menos narrativo, e trata de dois temas que fecham o sistema teológico do texto inteiro.</text:p>
      <text:p text:style-name="P6"><text:span text:style-name="T1">O primeiro tema é a distinção entre </text:span><text:span text:style-name="Strong_20_Emphasis"><text:span text:style-name="T1">dois espaços</text:span></text:span><text:span text:style-name="T1"> onde as almas residem após a morte:</text:span></text:p>
      <text:p text:style-name="P6"><text:soft-page-break/><text:span text:style-name="T1">O </text:span><text:span text:style-name="Strong_20_Emphasis"><text:span text:style-name="T1">espaço dos justos</text:span></text:span><text:span text:style-name="T1"> — onde as almas que fizeram bem no mundo material mas não receberam os mistérios descansam até ao momento da sua purificação completa e eventual ascensão.</text:span></text:p>
      <text:p text:style-name="P6"><text:span text:style-name="T1">O </text:span><text:span text:style-name="Strong_20_Emphasis"><text:span text:style-name="T1">espaço dos ímpios</text:span></text:span><text:span text:style-name="T1"> — onde as almas que fizeram o mal são purificadas através de processos que o texto descreve com uma minúcia que antecipa o purgatório medieval cristão.</text:span></text:p>
      <text:p text:style-name="P6"><text:span text:style-name="T1">O segundo tema é a distinção entre </text:span><text:span text:style-name="Strong_20_Emphasis"><text:span text:style-name="T1">dois tipos de almas</text:span></text:span><text:span text:style-name="T1"> que recebem os mistérios:</text:span></text:p>
      <text:p text:style-name="P6"><text:span text:style-name="T1">As almas </text:span><text:span text:style-name="Strong_20_Emphasis"><text:span text:style-name="T1">pneumáticas</text:span></text:span><text:span text:style-name="T1"> — as que possuem a centelha de luz e têm capacidade natural para a gnose. São as almas que quando ouvem o ensinamento imediatamente o reconhecem como verdadeiro — porque já o sabiam, apenas haviam esquecido.</text:span></text:p>
      <text:p text:style-name="P6"><text:span text:style-name="T1">As almas </text:span><text:span text:style-name="Strong_20_Emphasis"><text:span text:style-name="T1">psíquicas</text:span></text:span><text:span text:style-name="T1"> — as que têm alma mas não possuem a faísca pneumática. Podem receber ensinamentos morais e viver bem, mas não conseguem ascender ao Pleroma por si mesmas. Dependem da graça e da intercessão dos pneumáticos.</text:span></text:p>
      <text:p text:style-name="P12"/>
      <text:h text:style-name="P14" text:outline-level="3">🔍 Exegese</text:h>
      <text:p text:style-name="P2">A distinção entre almas pneumáticas e psíquicas é um dos aspectos mais controversos de toda a teologia gnóstica — e um dos mais mal compreendidos.</text:p>
      <text:p text:style-name="P2">À primeira vista parece um determinismo cruel: algumas almas podem ser salvas, outras não. Mas a leitura gnóstica é mais subtil. A distinção não é entre pessoas que merecem e não merecem a salvação — é entre níveis de capacidade espiritual que a própria alma desenvolveu ao longo de múltiplas encarnações.</text:p>
      <text:p text:style-name="P2">Mais importante: a Pistis Sophia não abandona as almas psíquicas. O texto tem uma compaixão genuína por elas — descreve os processos de purificação pelos quais passam, a ajuda que recebem dos seres de luz, as oportunidades que se repetem em cada vida. A diferença entre pneumáticos e psíquicos não é a diferença entre salvos e condenados — é a diferença entre quem pode ascender nesta vida e quem precisará de mais tempo.</text:p>
      <text:p text:style-name="P6"><text:span text:style-name="T1">Esta visão tem uma implicação ética que o texto torna explícita: </text:span><text:span text:style-name="Strong_20_Emphasis"><text:span text:style-name="T1">os pneumáticos têm responsabilidade para com os psíquicos</text:span></text:span><text:span text:style-name="T1">. Quem recebeu os mistérios tem a obrigação de os transmitir, de guiar, de despertar. A gnose não é um privilégio a guardar — é uma luz a partilhar.</text:span></text:p>
      <text:p text:style-name="P12"/>
      <text:h text:style-name="P11" text:outline-level="2">Síntese: O que a Pistis Sophia acrescenta</text:h>
      <text:p text:style-name="P2">Os quatro textos que estudámos formam agora uma arquitectura completa:</text:p>
      <text:p text:style-name="P6"><text:span text:style-name="T1">O </text:span><text:span text:style-name="Strong_20_Emphasis"><text:span text:style-name="T1">Apócrifo de João</text:span></text:span><text:span text:style-name="T1"> — o mapa cósmico da queda e da redenção.</text:span></text:p>
      <text:p text:style-name="P6"><text:span text:style-name="T1">O </text:span><text:span text:style-name="Strong_20_Emphasis"><text:span text:style-name="T1">Evangelho de Filipe</text:span></text:span><text:span text:style-name="T1"> — os sacramentos e a transformação interior.</text:span></text:p>
      <text:p text:style-name="P6"><text:span text:style-name="T1">O </text:span><text:span text:style-name="Strong_20_Emphasis"><text:span text:style-name="T1">Evangelho de Maria Madalena</text:span></text:span><text:span text:style-name="T1"> — a experiência vivida da ascensão e o conflito entre gnose e instituição.</text:span></text:p>
      <text:p text:style-name="P6"><text:span text:style-name="T1">A </text:span><text:span text:style-name="Strong_20_Emphasis"><text:span text:style-name="T1">Pistis Sophia</text:span></text:span><text:span text:style-name="T1"> — a dimensão do sofrimento no caminho, a gradualidade da salvação, e a compaixão cósmica que não abandona nenhuma alma.</text:span></text:p>
      <text:p text:style-name="P6"><text:span text:style-name="T1">O que a Pistis Sophia acrescenta de único é a </text:span><text:span text:style-name="Strong_20_Emphasis"><text:span text:style-name="T1">escala do sofrimento</text:span></text:span><text:span text:style-name="T1"> e a </text:span><text:span text:style-name="Strong_20_Emphasis"><text:span text:style-name="T1">paciência do divino</text:span></text:span><text:span text:style-name="T1">. Sophia cai profundamente — mais profundamente do que qualquer outro texto descreve. E é resgatada — </text:span><text:soft-page-break/><text:span text:style-name="T1">mas não de imediato, não sem esforço, não sem os seus treze cânticos no caos. A mensagem é de uma honestidade perturbadora: </text:span><text:span text:style-name="Strong_20_Emphasis"><text:span text:style-name="T1">o caminho de volta à Luz pode ser longo e pode ser doloroso</text:span></text:span><text:span text:style-name="T1">. Mas nenhuma faísca de luz se perde para sempre.</text:span></text:p>
      <text:p text:style-name="P12"><text:bookmark-end text:name="__DdeLink__9464_2045297844"/></text:p>
      <text:p text:style-name="P6"><text:span text:style-name="T1">Aproximamo-nos do fim da nossa jornada pelos seis textos. Os dois últimos — </text:span><text:span text:style-name="Strong_20_Emphasis"><text:span text:style-name="T1">Hipóstase dos Arcontes</text:span></text:span><text:span text:style-name="T1"> e </text:span><text:span text:style-name="Strong_20_Emphasis"><text:span text:style-name="T1">Livro dos Jubileus</text:span></text:span><text:span text:style-name="T1"> — fecham o ciclo de uma forma muito particular: regressam ao Génesis, mas agora com todos os instrumentos que desenvolvemos ao longo desta leitura. O Génesis lido depois da Pistis Sophia é um texto completamente diferente do Génesis lido antes dela.</text:span></text:p>
      <text:h text:style-name="P39" text:outline-level="1"><text:bookmark-start text:name="__DdeLink__9473_3434306060"/>Hipóstase dos Arcontes — Reconstrução Interpretativa e Exegese Gnóstica</text:h>
      <text:p text:style-name="P12"/>
      <text:h text:style-name="P11" text:outline-level="2">INTRODUÇÃO: O GÉNESIS VISTO DE BAIXO</text:h>
      <text:p text:style-name="P6"><text:span text:style-name="T1">A Hipóstase dos Arcontes — cujo título em grego significa literalmente </text:span><text:span text:style-name="Strong_20_Emphasis"><text:span text:style-name="T1">"A Realidade dos Governadores"</text:span></text:span><text:span text:style-name="T1"> ou </text:span><text:span text:style-name="Strong_20_Emphasis"><text:span text:style-name="T1">"A Substância dos Arcontes"</text:span></text:span><text:span text:style-name="T1"> — é um dos textos mais tecnicamente precisos e filosoficamente densos de toda a biblioteca de Nag Hammadi. Foi encontrada no </text:span><text:span text:style-name="Strong_20_Emphasis"><text:span text:style-name="T1">Códice II</text:span></text:span><text:span text:style-name="T1">, o mesmo que contém o Evangelho de Tomás e o Livro de Tomás o Contendente que já conheces.</text:span></text:p>
      <text:p text:style-name="P6"><text:span text:style-name="T1">O texto é estruturalmente dividido em duas partes muito distintas. A primeira é uma </text:span><text:span text:style-name="Strong_20_Emphasis"><text:span text:style-name="T1">releitura gnóstica do Génesis</text:span></text:span><text:span text:style-name="T1"> — dos capítulos 1 a 6 — que desfaz sistematicamente cada elemento da narrativa canónica e revela o que os gnósticos consideravam ser a verdade oculta por detrás dela. A segunda é uma </text:span><text:span text:style-name="Strong_20_Emphasis"><text:span text:style-name="T1">revelação apocalíptica</text:span></text:span><text:span text:style-name="T1"> transmitida por um anjo chamado Eleleth, que descreve a origem dos Arcontes, a estrutura dos mundos inferiores e o destino final das almas.</text:span></text:p>
      <text:p text:style-name="P6"><text:span text:style-name="T1">O que distingue este texto de todos os outros que estudámos é a sua </text:span><text:span text:style-name="Strong_20_Emphasis"><text:span text:style-name="T1">precisão ontológica</text:span></text:span><text:span text:style-name="T1">. Não está interessado em experiências místicas nem em jornadas da alma. Está interessado em compreender exactamente </text:span><text:span text:style-name="Strong_20_Emphasis"><text:span text:style-name="T1">o que são os Arcontes</text:span></text:span><text:span text:style-name="T1"> — a sua natureza, a sua origem, os seus limites — e exactamente </text:span><text:span text:style-name="Strong_20_Emphasis"><text:span text:style-name="T1">o que é o ser humano</text:span></text:span><text:span text:style-name="T1"> em relação a eles. É um texto filosófico disfarçado de mitologia.</text:span></text:p>
      <text:p text:style-name="P12"/>
      <text:h text:style-name="P40" text:outline-level="2">PARTE I — A ARROGÂNCIA DO INÍCIO: SACLAS E A SUA PROCLAMAÇÃO</text:h>
      <text:p text:style-name="P6"><text:span text:style-name="T1">O texto abre com uma citação directa de Paulo — </text:span><text:span text:style-name="Emphasis"><text:span text:style-name="T1">"A nossa luta não é contra a carne e o sangue, mas contra os principados e as potestades"</text:span></text:span><text:span text:style-name="T1"> (Efésios 6:12) — e usa-a como ponto de partida para uma investigação: </text:span><text:span text:style-name="Strong_20_Emphasis"><text:span text:style-name="T1">quem são realmente estes principados e potestades?</text:span></text:span></text:p>
      <text:p text:style-name="P6"><text:span text:style-name="T1">A resposta começa com a origem. O texto descreve como, no princípio, existia apenas a </text:span><text:span text:style-name="Strong_20_Emphasis"><text:span text:style-name="T1">Luz Incorruptível</text:span></text:span><text:span text:style-name="T1"> acima de tudo. Abaixo dela havia as águas primordiais — não ainda o mundo material, mas o espaço do potencial informe.</text:span></text:p>
      <text:p text:style-name="P6"><text:span text:style-name="T1">Da sombra que a Luz projecta sobre as águas surge uma </text:span><text:span text:style-name="Strong_20_Emphasis"><text:span text:style-name="T1">força</text:span></text:span><text:span text:style-name="T1"> — descrita como poderosa, cega e arrogante. Esta força olha para as águas, vê o seu próprio reflexo, e proclama:</text:span></text:p>
      <text:p text:style-name="P6"><text:soft-page-break/><text:span text:style-name="Emphasis"><text:span text:style-name="T1">"Eu sou Deus e não há outro além de mim."</text:span></text:span></text:p>
      <text:p text:style-name="P6"><text:span text:style-name="T1">Esta força é </text:span><text:span text:style-name="Strong_20_Emphasis"><text:span text:style-name="T1">Saclas</text:span></text:span><text:span text:style-name="T1"> — outro nome de Ialdabaoth, o Demiurgo que já conhecemos. Mas aqui o texto acrescenta um detalhe que os outros textos não tinham: quando Saclas faz esta proclamação, uma </text:span><text:span text:style-name="Strong_20_Emphasis"><text:span text:style-name="T1">voz vem do alto</text:span></text:span><text:span text:style-name="T1"> e diz:</text:span></text:p>
      <text:p text:style-name="P6"><text:span text:style-name="Emphasis"><text:span text:style-name="T1">"Estás errado, Saclas — e isto é o nome do Deus da Cegueira."</text:span></text:span></text:p>
      <text:p text:style-name="P6"><text:span text:style-name="T1">E a voz acrescenta: </text:span><text:span text:style-name="Emphasis"><text:span text:style-name="T1">"O Ser Humano Imortal existe antes de ti."</text:span></text:span></text:p>
      <text:p text:style-name="P2">Saclas ouve esta voz mas não a compreende. Não sabe de onde vem. Não sabe o que significa. Continua a proclamar a sua divindade — mas já foi desmentido antes de ter começado.</text:p>
      <text:p text:style-name="P12"/>
      <text:h text:style-name="P14" text:outline-level="3">🔍 Exegese</text:h>
      <text:p text:style-name="P6"><text:span text:style-name="T1">Esta abertura é de uma economia narrativa extraordinária. Em poucas linhas o texto estabelece a estrutura fundamental de toda a sua cosmologia: há uma Luz acima, há uma cegueira abaixo, e entre as duas há uma </text:span><text:span text:style-name="Strong_20_Emphasis"><text:span text:style-name="T1">voz</text:span></text:span><text:span text:style-name="T1"> que enuncia a verdade que a cegueira não consegue ouvir.</text:span></text:p>
      <text:p text:style-name="P6"><text:span text:style-name="T1">O nome </text:span><text:span text:style-name="Strong_20_Emphasis"><text:span text:style-name="T1">Saclas</text:span></text:span><text:span text:style-name="T1"> — diferente de Ialdabaoth mas referindo-se ao mesmo ser — significa em aramaico </text:span><text:span text:style-name="Emphasis"><text:span text:style-name="T1">"o tolo"</text:span></text:span><text:span text:style-name="T1">. É um nome que condensa a sua natureza: não é primariamente mau — é primariamente </text:span><text:span text:style-name="Strong_20_Emphasis"><text:span text:style-name="T1">ignorante</text:span></text:span><text:span text:style-name="T1">. A sua arrogância não nasce da malícia mas da limitação. Não pode ver o que está acima dele porque é cego à Luz que não projecta sombra.</text:span></text:p>
      <text:p text:style-name="P6"><text:span text:style-name="T1">A voz que o desmente imediatamente é crucial. Na cosmologia desta Hipóstase, </text:span><text:span text:style-name="Strong_20_Emphasis"><text:span text:style-name="T1">a verdade é sempre enunciada antes de a mentira se estabelecer completamente</text:span></text:span><text:span text:style-name="T1">. Saclas proclama que é o único Deus — e imediatamente é contradito. O erro não vai sem correcção — a correcção apenas não é ouvida por quem está fechado à Luz.</text:span></text:p>
      <text:p text:style-name="P6"><text:span text:style-name="T1">A referência ao </text:span><text:span text:style-name="Strong_20_Emphasis"><text:span text:style-name="T1">Ser Humano Imortal</text:span></text:span><text:span text:style-name="T1"> que existe antes de Saclas é a primeira articulação de um tema que vai dominar o texto inteiro: o ser humano não é uma criatura de Saclas — é anterior a ele, superior a ele, e carrega dentro de si algo que ele não pode compreender nem destruir.</text:span></text:p>
      <text:p text:style-name="P12"/>
      <text:h text:style-name="P40" text:outline-level="2">PARTE II — A CRIAÇÃO DO CORPO: A ARMADILHA QUE FALHA</text:h>
      <text:p text:style-name="P2">Os Arcontes decidem criar um ser humano à imagem do Ser Humano Imortal que viram reflectido nas águas. O texto descreve a criação do corpo com um detalhe anatomicamente preciso e filosoficamente perturbador:</text:p>
      <text:p text:style-name="P6"><text:span text:style-name="Emphasis"><text:span text:style-name="T1">"Formaram o seu ser à semelhança do seu corpo e à semelhança de Deus que apareceu nas águas. Disseram: 'Vamos chamar-lhe Adão para que o seu nome seja para nós uma força de luz.'"</text:span></text:span></text:p>
      <text:p text:style-name="P6"><text:span text:style-name="T1">Mas quando terminam — o ser criado jaz inerte. </text:span><text:span text:style-name="Strong_20_Emphasis"><text:span text:style-name="T1">Não consegue erguer-se.</text:span></text:span><text:span text:style-name="T1"> Os Arcontes trabalham durante quarenta dias tentando animar a sua criatura. Nada acontece. O corpo existe mas não tem vida. É uma forma perfeita — e completamente vazia.</text:span></text:p>
      <text:p text:style-name="P6"><text:span text:style-name="T1">Então o Espírito, movendo-se através das águas, sopra sobre o rosto de Adão. E Adão </text:span><text:span text:style-name="Strong_20_Emphasis"><text:span text:style-name="T1">ergue-se</text:span></text:span><text:span text:style-name="T1">, luminoso, mais brilhante do que os próprios Arcontes que o criaram.</text:span></text:p>
      <text:p text:style-name="P6"><text:soft-page-break/><text:span text:style-name="T1">Os Arcontes olham para o que fizeram e a reacção é imediata: </text:span><text:span text:style-name="Strong_20_Emphasis"><text:span text:style-name="T1">inveja</text:span></text:span><text:span text:style-name="T1">. </text:span><text:span text:style-name="Emphasis"><text:span text:style-name="T1">"O que criámos é maior do que nós."</text:span></text:span><text:span text:style-name="T1"> Não o destruíram — não podiam, porque a luz dentro de Adão não era deles para tomar. Mas decidiram aprisioná-lo. Colocam-no no </text:span><text:span text:style-name="Strong_20_Emphasis"><text:span text:style-name="T1">Jardim do Éden</text:span></text:span><text:span text:style-name="T1">.</text:span></text:p>
      <text:p text:style-name="P12"/>
      <text:h text:style-name="P14" text:outline-level="3">🔍 Exegese</text:h>
      <text:p text:style-name="P2">A imagem dos Arcontes trabalhando durante quarenta dias sem conseguir animar o seu ser criado é simultaneamente cômica e filosófica. Os criadores do mundo material estão completamente impotentes perante o mistério da vida — podem fabricar a forma mas não podem criar a centelha que a anima. Essa centelha vem de uma fonte que está completamente fora do seu alcance.</text:p>
      <text:p text:style-name="P6"><text:span text:style-name="T1">O número </text:span><text:span text:style-name="Strong_20_Emphasis"><text:span text:style-name="T1">quarenta</text:span></text:span><text:span text:style-name="T1"> não é arbitrário. Na tradição bíblica, quarenta é o número da provação e da busca — quarenta anos no deserto, quarenta dias de jejum, quarenta dias de dilúvio. Aqui o número diz: os Arcontes esgotaram completamente os seus recursos antes de admitir a sua impotência.</text:span></text:p>
      <text:p text:style-name="P6"><text:span text:style-name="T1">A </text:span><text:span text:style-name="Strong_20_Emphasis"><text:span text:style-name="T1">inveja</text:span></text:span><text:span text:style-name="T1"> dos Arcontes perante a criatura que fizeram é o momento mais psicologicamente preciso do texto. Eles criam algo que os supera e não conseguem suportá-lo. Esta é a estrutura de todo o poder que teme aquilo que gera — a instituição que persegue os seus próprios filhos mais luminosos, o sistema que pune os que transcendem as suas limitações.</text:span></text:p>
      <text:p text:style-name="P6"><text:span text:style-name="T1">O Jardim do Éden como prisão — uma ideia que já encontrámos no Apócrifo de João — é aqui desenvolvida com mais detalhe. É uma prisão </text:span><text:span text:style-name="Strong_20_Emphasis"><text:span text:style-name="T1">sofisticada</text:span></text:span><text:span text:style-name="T1"> — não tem grades visíveis, tem árvores e água e aparente liberdade. A sofisticação da prisão é parte da sua eficácia.</text:span></text:p>
      <text:p text:style-name="P12"/>
      <text:h text:style-name="P40" text:outline-level="2">PARTE III — A ÁRVORE E A SERPENTE: A INVERSÃO DO GÉNESIS</text:h>
      <text:p text:style-name="P6"><text:span text:style-name="T1">Os Arcontes colocam Adão no Jardim e dão-lhe uma instrução: </text:span><text:span text:style-name="Emphasis"><text:span text:style-name="T1">"Podeis comer de todas as árvores do jardim, mas não comais da árvore do conhecimento do bem e do mal."</text:span></text:span></text:p>
      <text:p text:style-name="P6"><text:span text:style-name="T1">O texto gnóstico pergunta imediatamente: </text:span><text:span text:style-name="Strong_20_Emphasis"><text:span text:style-name="T1">por que razão proibiriam o conhecimento?</text:span></text:span><text:span text:style-name="T1"> A resposta é óbvia dentro do sistema gnóstico: porque o conhecimento libertaria Adão da sua prisão. A proibição não protege Adão — protege os Arcontes.</text:span></text:p>
      <text:p text:style-name="P6"><text:span text:style-name="T1">Então surge </text:span><text:span text:style-name="Strong_20_Emphasis"><text:span text:style-name="T1">Éva espiritual</text:span></text:span><text:span text:style-name="T1"> — não ainda o ser físico, mas a dimensão espiritual do princípio feminino. O texto diz que o Espírito entrou na árvore do conhecimento e falou de dentro dela:</text:span></text:p>
      <text:p text:style-name="P6"><text:span text:style-name="Emphasis"><text:span text:style-name="T1">"Adão, onde estás?"</text:span></text:span></text:p>
      <text:p text:style-name="P2">Adão responde que está escondido, com medo. O Espírito diz-lhe então para se erguer, para sair do medo, para comer da árvore — porque a instrução dos Arcontes é mentira, não verdade.</text:p>
      <text:p text:style-name="P6"><text:span text:style-name="T1">A serpente que aparece em seguida não é o demónio cristão. É descrita como </text:span><text:span text:style-name="Strong_20_Emphasis"><text:span text:style-name="T1">sábia</text:span></text:span><text:span text:style-name="T1"> — e a sua sabedoria serve o propósito do Espírito. A serpente convence Éva a comer da árvore. Éva come e dá a Adão. E quando comem — </text:span><text:span text:style-name="Strong_20_Emphasis"><text:span text:style-name="T1">os olhos abrem-se</text:span></text:span><text:span text:style-name="T1">.</text:span></text:p>
      <text:p text:style-name="P6"><text:span text:style-name="T1">Os Arcontes chegam ao Jardim furiosos. Amaldiçoam a serpente. Expulsam Adão e Éva. Mas o texto faz uma observação que os Arcontes não querem reconhecer: </text:span><text:span text:style-name="Strong_20_Emphasis"><text:span text:style-name="T1">o que fizeram não foi punição — foi, involuntariamente, libertação</text:span></text:span><text:span text:style-name="T1">. Ao expulsar Adão e Éva do Jardim prisão, colocaram-nos no mundo onde a jornada gnóstica pode verdadeiramente começar.</text:span></text:p>
      <text:p text:style-name="P12"><text:soft-page-break/></text:p>
      <text:h text:style-name="P14" text:outline-level="3">🔍 Exegese</text:h>
      <text:p text:style-name="P2">A releitura do episódio do Éden é aqui ainda mais radical do que no Apócrifo de João. O texto não apenas inverte os papéis — aprofunda a inversão com uma precisão filosófica que merece atenção.</text:p>
      <text:p text:style-name="P6"><text:span text:style-name="T1">A </text:span><text:span text:style-name="Strong_20_Emphasis"><text:span text:style-name="T1">proibição do conhecimento</text:span></text:span><text:span text:style-name="T1"> é o acto que define Saclas como deus falso. Um Deus verdadeiro — o Pai do Apócrifo de João, o Espírito Invisível da Pistis Sophia — não proíbe o conhecimento. O conhecimento é a sua própria natureza. Apenas um poder que teme ser conhecido pode proibir o conhecimento.</text:span></text:p>
      <text:p text:style-name="P6"><text:span text:style-name="T1">A </text:span><text:span text:style-name="Strong_20_Emphasis"><text:span text:style-name="T1">Éva espiritual</text:span></text:span><text:span text:style-name="T1"> — o princípio feminino que fala de dentro da árvore — é uma das figuras mais ricas do texto. Ela não é a Eva tentada pelo demónio da narrativa ortodoxa. É o </text:span><text:span text:style-name="Strong_20_Emphasis"><text:span text:style-name="T1">Espírito que trabalha a partir de dentro do sistema para o subverter</text:span></text:span><text:span text:style-name="T1">. A árvore que os Arcontes plantaram para aprisionar torna-se o veículo da libertação — porque o Espírito é mais subtil do que os Arcontes e usa os seus próprios instrumentos contra eles.</text:span></text:p>
      <text:p text:style-name="P2">A serpente gnóstica é, neste contexto, um símbolo antiquíssimo de sabedoria — anterior ao Génesis, presente nas tradições egípcias, gregas e mesopotâmicas como símbolo de conhecimento e de renovação. Os gnósticos não inventaram a serpente sábia — recuperaram uma tradição que a narrativa canónica havia invertido.</text:p>
      <text:p text:style-name="P2">A expulsão do Éden como libertação involuntária é o paradoxo mais elegante do texto. Os Arcontes acreditam que punem — e libertam. O poder que tenta controlar acaba sempre por servir o propósito da Luz — porque a Luz é mais profunda do que qualquer estrutura de aprisionamento.</text:p>
      <text:p text:style-name="P12"/>
      <text:h text:style-name="P40" text:outline-level="2">PARTE IV — NOREA: A FILHA QUE NÃO PODE SER VENCIDA</text:h>
      <text:p text:style-name="P6"><text:span text:style-name="T1">O texto introduz então uma figura que não existe em nenhum outro lugar da tradição religiosa da época: </text:span><text:span text:style-name="Strong_20_Emphasis"><text:span text:style-name="T1">Norea</text:span></text:span><text:span text:style-name="T1">, filha de Adão e Éva, irmã de Seth.</text:span></text:p>
      <text:p text:style-name="P6"><text:span text:style-name="T1">Os Arcontes tentam várias vezes capturar Norea — tentam seduzi-la, intimidá-la, subjugá-la. Em cada tentativa Norea os derrota. Quando o chefe dos Arcontes se aproxima dela dizendo </text:span><text:span text:style-name="Emphasis"><text:span text:style-name="T1">"A tua mãe Éva veio ter connosco"</text:span></text:span><text:span text:style-name="T1">, Norea responde com desprezo:</text:span></text:p>
      <text:p text:style-name="P6"><text:span text:style-name="Emphasis"><text:span text:style-name="T1">"Vós sois os governadores das trevas. Vós não sois os meus governantes. O meu pai é desde o princípio. A minha mãe é desde o princípio. É da região superior que eu venho."</text:span></text:span></text:p>
      <text:p text:style-name="P6"><text:span text:style-name="T1">Os Arcontes ameaçam destruí-la. Norea grita para a Luz. E imediatamente desce o anjo </text:span><text:span text:style-name="Strong_20_Emphasis"><text:span text:style-name="T1">Eleleth</text:span></text:span><text:span text:style-name="T1"> — um dos quatro luminares do Pleroma — em resposta ao seu apelo. A presença de Eleleth afasta os Arcontes imediatamente. E Norea pergunta-lhe: </text:span><text:span text:style-name="Emphasis"><text:span text:style-name="T1">"Quem és tu?"</text:span></text:span></text:p>
      <text:p text:style-name="P6"><text:span text:style-name="T1">Eleleth responde: </text:span><text:span text:style-name="Emphasis"><text:span text:style-name="T1">"Eu sou a Compreensão, e sou um dos quatro luminares que estão perante o grande Espírito Invisível. Pensas que os governadores têm poder sobre ti? Nenhum deles pode prevalecer contra a raiz da verdade."</text:span></text:span></text:p>
      <text:p text:style-name="P12"/>
      <text:h text:style-name="P14" text:outline-level="3"><text:soft-page-break/>🔍 Exegese</text:h>
      <text:p text:style-name="P2">Norea é uma das figuras mais extraordinárias de toda a literatura apócrifa e é quase completamente desconhecida fora dos círculos de estudo gnóstico. O seu nome aparece em várias tradições — algumas a identificam com Naamá, filha de Lameque, outras com a esposa de Noé — mas em nenhuma tradição ela tem a statura que tem aqui.</text:p>
      <text:p text:style-name="P6"><text:span text:style-name="T1">O que define Norea neste texto é a sua </text:span><text:span text:style-name="Strong_20_Emphasis"><text:span text:style-name="T1">imunidade fundamental ao poder dos Arcontes</text:span></text:span><text:span text:style-name="T1">. Não porque seja invulnerável fisicamente — mas porque sabe quem é. </text:span><text:span text:style-name="Emphasis"><text:span text:style-name="T1">"O meu pai é desde o princípio. A minha mãe é desde o princípio."</text:span></text:span><text:span text:style-name="T1"> Esta afirmação de origem é o seu escudo. Os Arcontes só têm poder sobre quem não sabe de onde vem. Norea sabe — e por isso não pode ser capturada.</text:span></text:p>
      <text:p text:style-name="P6"><text:span text:style-name="T1">O anjo </text:span><text:span text:style-name="Strong_20_Emphasis"><text:span text:style-name="T1">Eleleth</text:span></text:span><text:span text:style-name="T1"> — cujo nome significa em hebraico </text:span><text:span text:style-name="Emphasis"><text:span text:style-name="T1">"Compreensão"</text:span></text:span><text:span text:style-name="T1"> ou </text:span><text:span text:style-name="Emphasis"><text:span text:style-name="T1">"Discernimento"</text:span></text:span><text:span text:style-name="T1"> — é um dos quatro luminares que rodeiam o Ser Humano Primordial no Pleroma. A sua descida em resposta ao apelo de Norea estabelece um princípio que percorre toda a Pistis Sophia: </text:span><text:span text:style-name="Strong_20_Emphasis"><text:span text:style-name="T1">quando a alma que conhece a sua origem chama pela Luz, a Luz responde</text:span></text:span><text:span text:style-name="T1">. Não é automático, não é mágico — é a consequência natural de uma relação que sempre existiu.</text:span></text:p>
      <text:p text:style-name="P6"><text:span text:style-name="T1">A frase de Eleleth — </text:span><text:span text:style-name="Emphasis"><text:span text:style-name="T1">"Nenhum deles pode prevalecer contra a raiz da verdade"</text:span></text:span><text:span text:style-name="T1"> — é o axioma central de toda a cosmologia gnóstica. Os Arcontes têm poder sobre a matéria, sobre o tempo, sobre as circunstâncias externas. Não têm poder sobre o que o ser humano é na sua origem mais profunda. A raiz da verdade está além do seu alcance.</text:span></text:p>
      <text:p text:style-name="P12"/>
      <text:h text:style-name="P40" text:outline-level="2">PARTE V — A REVELAÇÃO DE ELELETH: A ORIGEM DOS ARCONTES</text:h>
      <text:p text:style-name="P2">Norea pede a Eleleth que lhe revele a verdade sobre os Arcontes — a sua origem, a sua natureza, os seus limites. E Eleleth revela:</text:p>
      <text:p text:style-name="P6"><text:span text:style-name="T1">Antes de qualquer coisa existir havia a </text:span><text:span text:style-name="Strong_20_Emphasis"><text:span text:style-name="T1">Incorruptibilidade</text:span></text:span><text:span text:style-name="T1"> — o estado original de perfeição. Da Incorruptibilidade emanou a Sophia — e de Sophia emergiu o Demiurgo </text:span><text:span text:style-name="Strong_20_Emphasis"><text:span text:style-name="T1">Saclas</text:span></text:span><text:span text:style-name="T1"> em ignorância. Saclas criou os seus Arcontes e eles criaram o mundo material. Mas ao fazê-lo </text:span><text:span text:style-name="Strong_20_Emphasis"><text:span text:style-name="T1">roubaram luz</text:span></text:span><text:span text:style-name="T1"> — a luz que estava nas águas, a luz que o Espírito havia depositado no potencial informe da criação.</text:span></text:p>
      <text:p text:style-name="P6"><text:span text:style-name="T1">O mundo material é portanto, na visão desta Hipóstase, não apenas um erro — é um </text:span><text:span text:style-name="Strong_20_Emphasis"><text:span text:style-name="T1">roubo</text:span></text:span><text:span text:style-name="T1">. A matéria contém luz roubada. E os Arcontes governam o mundo para manter esse roubo — para impedir que a luz regresse à sua fonte.</text:span></text:p>
      <text:p text:style-name="P6"><text:span text:style-name="T1">Mas Eleleth revela também os limites dos Arcontes. O seu poder é real mas </text:span><text:span text:style-name="Strong_20_Emphasis"><text:span text:style-name="T1">circunscrito</text:span></text:span><text:span text:style-name="T1">. Governa o mundo material e as sete esferas. Não governa o décimo terceiro Éon onde Sophia foi restaurada. Não governa o Pleroma. Não governa a faísca de luz dentro do ser humano.</text:span></text:p>
      <text:p text:style-name="P6"><text:span text:style-name="T1">E há uma profecia: </text:span><text:span text:style-name="Emphasis"><text:span text:style-name="T1">"O Ser Humano Verdadeiro virá e destruirá os Arcontes. Mas até esse momento eles terão poder no mundo."</text:span></text:span></text:p>
      <text:p text:style-name="P12"/>
      <text:h text:style-name="P14" text:outline-level="3">🔍 Exegese</text:h>
      <text:p text:style-name="P6"><text:span text:style-name="T1">A descrição do mundo material como </text:span><text:span text:style-name="Strong_20_Emphasis"><text:span text:style-name="T1">roubo de luz</text:span></text:span><text:span text:style-name="T1"> é filosoficamente a mais radical de todos os textos que estudámos. Não é apenas um erro — é um crime cósmico. A matéria existe à custa da </text:span><text:soft-page-break/><text:span text:style-name="T1">luz. Cada átomo de matéria contém luz aprisionada que foi arrancada ao Pleroma sem consentimento.</text:span></text:p>
      <text:p text:style-name="P6"><text:span text:style-name="T1">Esta visão tem implicações éticas que o texto não desenvolve explicitamente mas que são implícitas: se a luz está aprisionada na matéria, então trabalhar pela libertação da luz — pela gnose, pelo despertar, pela ascensão — não é apenas busca pessoal de salvação. É </text:span><text:span text:style-name="Strong_20_Emphasis"><text:span text:style-name="T1">participação na correcção de uma injustiça cósmica</text:span></text:span><text:span text:style-name="T1">. O gnóstico que desperta não salva apenas a si mesmo — liberta uma faísca de luz que estava sequestrada.</text:span></text:p>
      <text:p text:style-name="P6"><text:span text:style-name="T1">Os </text:span><text:span text:style-name="Strong_20_Emphasis"><text:span text:style-name="T1">limites dos Arcontes</text:span></text:span><text:span text:style-name="T1"> são tão importantes como o seu poder. O texto insiste nisto com uma ênfase que parece pedagógica — como se os leitores a quem se dirige precisassem especificamente de ouvir que o poder que os oprime não é absoluto. Os Arcontes governam o mundo material mas não governam a totalidade do ser. A sua jurisdição tem fronteiras precisas.</text:span></text:p>
      <text:p text:style-name="P6"><text:span text:style-name="T1">A </text:span><text:span text:style-name="Strong_20_Emphasis"><text:span text:style-name="T1">profecia do Ser Humano Verdadeiro</text:span></text:span><text:span text:style-name="T1"> que destruirá os Arcontes é a dimensão escatológica do texto — a visão do fim do poder dos Arcontes. Não é uma destruição violenta — é uma dissolução gradual à medida que mais almas despertam e a luz retorna à sua fonte. O mundo material não acaba por catástrofe — acaba por esvaziamento progressivo da luz que o sustentava.</text:span></text:p>
      <text:p text:style-name="P12"/>
      <text:h text:style-name="P40" text:outline-level="2">PARTE VI — SETH E A SEMENTE IMÓVEL: A LINHAGEM DA GNOSE</text:h>
      <text:p text:style-name="P2">O texto termina com a revelação da linhagem espiritual que preservará o conhecimento através das gerações.</text:p>
      <text:p text:style-name="P6"><text:span text:style-name="T1">Eleleth revela a Norea que existe uma </text:span><text:span text:style-name="Strong_20_Emphasis"><text:span text:style-name="T1">semente</text:span></text:span><text:span text:style-name="T1"> — um grupo de almas que em cada geração carregam a centelha gnóstica mais viva, que em cada época são os portadores do conhecimento. Esta semente é chamada a </text:span><text:span text:style-name="Strong_20_Emphasis"><text:span text:style-name="T1">semente imóvel</text:span></text:span><text:span text:style-name="T1"> — imóvel não porque seja estática mas porque não pode ser deslocada da sua orientação fundamental para a Luz.</text:span></text:p>
      <text:p text:style-name="P6"><text:span text:style-name="T1">O fundador desta linhagem é </text:span><text:span text:style-name="Strong_20_Emphasis"><text:span text:style-name="T1">Seth</text:span></text:span><text:span text:style-name="T1"> — o terceiro filho de Adão e Éva, o filho que nasceu após a morte de Abel e a queda de Caim. Seth é, na tradição gnóstica setiana a que pertence este texto, a figura arquetípica do ser humano que conhece a sua origem divina. Os seus descendentes — a semente de Seth — são em cada geração os portadores da gnose.</text:span></text:p>
      <text:p text:style-name="P6"><text:span text:style-name="T1">Eleleth promete a Norea: </text:span><text:span text:style-name="Emphasis"><text:span text:style-name="T1">"Não sofrerás, tu e a tua progenitura. Porque o teu lugar de descanso estará no Incorruptível, e a tua prece e a tua imagem serão ouvidas pelo Pai de Tudo."</text:span></text:span></text:p>
      <text:p text:style-name="P2">O texto fecha com uma afirmação simples mas absolutamente central:</text:p>
      <text:p text:style-name="P6"><text:span text:style-name="Emphasis"><text:span text:style-name="T1">"Estes são os santos que virão existir. Esta é a geração que não conhecerá o poder dos Arcontes."</text:span></text:span></text:p>
      <text:p text:style-name="P12"/>
      <text:h text:style-name="P14" text:outline-level="3">🔍 Exegese</text:h>
      <text:p text:style-name="P6"><text:span text:style-name="T1">A figura de </text:span><text:span text:style-name="Strong_20_Emphasis"><text:span text:style-name="T1">Seth</text:span></text:span><text:span text:style-name="T1"> como ancestral da linhagem gnóstica é o elemento que nomeia toda uma corrente do gnosticismo — o </text:span><text:span text:style-name="Strong_20_Emphasis"><text:span text:style-name="T1">gnosticismo setiano</text:span></text:span><text:span text:style-name="T1">, ao qual pertencem a maioria dos textos de Nag Hammadi que estudámos, incluindo o Apócrifo de João e esta Hipóstase.</text:span></text:p>
      <text:p text:style-name="P2">Seth é escolhido como ancestral da gnose por razões que o texto não explicita completamente mas que a tradição setiana desenvolve. Abel foi morto — o primeiro gnóstico destruído pelo mundo. <text:soft-page-break/>Caim representa o princípio do poder material, o filho que mais se identificou com o mundo dos Arcontes. Seth é o terceiro — o que sobrevive à violência do mundo sem ser corrompido por ela. É a figura da perseverança espiritual através da adversidade.</text:p>
      <text:p text:style-name="P6"><text:span text:style-name="T1">A </text:span><text:span text:style-name="Strong_20_Emphasis"><text:span text:style-name="T1">semente imóvel</text:span></text:span><text:span text:style-name="T1"> é um conceito que vai muito além de uma linhagem biológica. É uma qualidade de consciência que se transmite não por sangue mas por gnose — por transmissão do conhecimento vivo. Cada ser humano que desperta para a sua natureza luminosa entra na semente de Seth independentemente das suas origens genéticas ou culturais.</text:span></text:p>
      <text:p text:style-name="P6"><text:span text:style-name="T1">A promessa de Eleleth a Norea — </text:span><text:span text:style-name="Emphasis"><text:span text:style-name="T1">"o teu lugar de descanso estará no Incorruptível"</text:span></text:span><text:span text:style-name="T1"> — fecha o texto com a mesma imagem com que a alma de Maria Madalena fechou o seu discurso: o silêncio luminoso do Incorruptível como destino final. Não a actividade eterna do paraíso cristão. Não o nirvana budista que pode ser mal compreendido como aniquilação. Mas o </text:span><text:span text:style-name="Strong_20_Emphasis"><text:span text:style-name="T1">repouso no ser pleno</text:span></text:span><text:span text:style-name="T1"> — o regresso à raiz que nunca foi verdadeiramente abandonada.</text:span></text:p>
      <text:p text:style-name="P12"/>
      <text:h text:style-name="P11" text:outline-level="2">Síntese: O que a Hipóstase dos Arcontes acrescenta</text:h>
      <text:p text:style-name="P2">Chegámos ao penúltimo texto da nossa jornada e é possível agora ver a arquitectura completa do sistema que estes seis textos constroem juntos.</text:p>
      <text:p text:style-name="P6"><text:span text:style-name="T1">O </text:span><text:span text:style-name="Strong_20_Emphasis"><text:span text:style-name="T1">Apócrifo de João</text:span></text:span><text:span text:style-name="T1"> deu o mapa cósmico — a totalidade do universo espiritual desde o Pai até ao caos.</text:span></text:p>
      <text:p text:style-name="P6"><text:span text:style-name="T1">O </text:span><text:span text:style-name="Strong_20_Emphasis"><text:span text:style-name="T1">Evangelho de Filipe</text:span></text:span><text:span text:style-name="T1"> deu o caminho sacramental — como a transformação acontece através dos ritos e da experiência mística.</text:span></text:p>
      <text:p text:style-name="P6"><text:span text:style-name="T1">O </text:span><text:span text:style-name="Strong_20_Emphasis"><text:span text:style-name="T1">Evangelho de Maria Madalena</text:span></text:span><text:span text:style-name="T1"> deu a experiência vivida — a ascensão da alma e o conflito entre gnose e instituição.</text:span></text:p>
      <text:p text:style-name="P6"><text:span text:style-name="T1">A </text:span><text:span text:style-name="Strong_20_Emphasis"><text:span text:style-name="T1">Pistis Sophia</text:span></text:span><text:span text:style-name="T1"> deu a profundidade do sofrimento e a paciência do divino — a certeza de que nenhuma faísca se perde.</text:span></text:p>
      <text:p text:style-name="P6"><text:span text:style-name="T1">A </text:span><text:span text:style-name="Strong_20_Emphasis"><text:span text:style-name="T1">Hipóstase dos Arcontes</text:span></text:span><text:span text:style-name="T1"> dá algo diferente de todos os outros: a </text:span><text:span text:style-name="Strong_20_Emphasis"><text:span text:style-name="T1">análise precisa do poder que oprime</text:span></text:span><text:span text:style-name="T1">. Não se limita a dizer que os Arcontes existem e são maus. Pergunta — com a rigor de um filósofo — o que são exactamente, de onde vêm, quais os seus limites, e por que razão o ser humano não está completamente à sua mercê. É o texto da </text:span><text:span text:style-name="Strong_20_Emphasis"><text:span text:style-name="T1">resistência lúcida</text:span></text:span><text:span text:style-name="T1"> — não a resistência emocional do sofrimento de Sophia, mas a resistência filosófica de quem compreendeu completamente o sistema que o oprime e sabe exactamente onde esse sistema termina e onde começa a sua liberdade.</text:span><text:bookmark-end text:name="__DdeLink__9473_3434306060"/></text:p>
      <text:p text:style-name="P12"/>
      <text:p text:style-name="P6"><text:span text:style-name="T1">Chegamos ao último texto da nossa jornada — o </text:span><text:span text:style-name="Strong_20_Emphasis"><text:span text:style-name="T1">Livro dos Jubileus</text:span></text:span><text:span text:style-name="T1">. É o mais antigo de todos os seis, o mais próximo da tradição judaica, e em certos aspectos o mais surpreendente. Depois de termos lido o Génesis através das lentes gnósticas, o Livro dos Jubileus vai mostrar-nos que mesmo dentro da tradição hebraica ortodoxa havia uma tensão, uma camada alternativa de leitura que o cânon nunca conseguiu completamente suprimir.</text:span></text:p>
      <text:h text:style-name="P39" text:outline-level="1"><text:bookmark-start text:name="__DdeLink__9475_3434306060"/><text:soft-page-break/>Livro dos Jubileus — Reconstrução Interpretativa e Exegese Gnóstica</text:h>
      <text:p text:style-name="P12"/>
      <text:h text:style-name="P11" text:outline-level="2">INTRODUÇÃO: O MAIS ANTIGO E O MAIS JUDAICO</text:h>
      <text:p text:style-name="P6"><text:span text:style-name="T1">O Livro dos Jubileus é fundamentalmente diferente de todos os textos que estudámos até agora. Não é gnóstico no sentido técnico — não fala de Demiurgo, não inverte o Génesis, não descreve Arcontes nem centelhas de luz aprisionadas. É um texto </text:span><text:span text:style-name="Strong_20_Emphasis"><text:span text:style-name="T1">profundamente judaico</text:span></text:span><text:span text:style-name="T1">, escrito provavelmente entre 160 e 150 a.C. na Palestina, numa época de crise política e religiosa intensa — o período da perseguição de Antíoco IV Epífanes que destruiu o Templo e tentou helenizar o povo judeu à força.</text:span></text:p>
      <text:p text:style-name="P6"><text:span text:style-name="T1">E no entanto — lido depois de tudo o que estudámos — o Livro dos Jubileus revela camadas de significado que seriam invisíveis sem essa preparação. É o texto que fecha o ciclo de forma perfeita precisamente porque não é gnóstico: mostra que as </text:span><text:span text:style-name="Strong_20_Emphasis"><text:span text:style-name="T1">questões que o gnosticismo coloca</text:span></text:span><text:span text:style-name="T1"> não são invenções tardias de hereges — estão presentes, em forma velada, na própria tradição que o gnosticismo subverte.</text:span></text:p>
      <text:p text:style-name="P6"><text:span text:style-name="T1">O texto é conhecido como o </text:span><text:span text:style-name="Strong_20_Emphasis"><text:span text:style-name="T1">"Pequeno Génesis"</text:span></text:span><text:span text:style-name="T1"> — uma reescrita e expansão dos livros do Génesis e do Êxodo, narrada por um anjo da presença a Moisés no monte Sinai. A estrutura temporal que lhe dá o nome organiza toda a história desde a criação até ao Êxodo em períodos de quarenta e nove anos cada um — os </text:span><text:span text:style-name="Strong_20_Emphasis"><text:span text:style-name="T1">Jubileus</text:span></text:span><text:span text:style-name="T1"> — que correspondem ao ciclo bíblico do ano sabático elevado a sétima potência.</text:span></text:p>
      <text:p text:style-name="P12"/>
      <text:h text:style-name="P11" text:outline-level="2">PARTE I — A CRIAÇÃO: O QUE O GÉNESIS NÃO DIZ</text:h>
      <text:p text:style-name="P6"><text:span text:style-name="T1">O anjo da presença começa a narração no primeiro dia da criação. Mas imediatamente o Livro dos Jubileus acrescenta algo que o Génesis canónico não menciona: </text:span><text:span text:style-name="Strong_20_Emphasis"><text:span text:style-name="T1">no primeiro dia não foram criados apenas a luz e as trevas</text:span></text:span><text:span text:style-name="T1">.</text:span></text:p>
      <text:p text:style-name="P2">No primeiro dia foram criados: os anjos da presença, os anjos da santificação, os anjos do fogo, os anjos dos ventos, os anjos das nuvens e das trevas, o abismo, as trevas, a luz, a aurora e o anoitecer.</text:p>
      <text:p text:style-name="P6"><text:span text:style-name="T1">O texto está a dizer que </text:span><text:span text:style-name="Strong_20_Emphasis"><text:span text:style-name="T1">o mundo espiritual foi criado simultaneamente com o mundo físico</text:span></text:span><text:span text:style-name="T1"> — e que esse mundo espiritual é habitado por hierarquias de seres angelicais que governam os fenómenos naturais e que têm funções precisas na manutenção da ordem cósmica.</text:span></text:p>
      <text:p text:style-name="P2">Esta hierarquia angelical não é idêntica aos Arcontes gnósticos — mas a semelhança estrutural é inegável. Há seres intermediários entre o Deus supremo e o mundo material. Esses seres têm poder sobre aspectos específicos da realidade física. E a sua relação com os seres humanos é complexa — nem puramente benevolente nem puramente hostil.</text:p>
      <text:p text:style-name="P12"/>
      <text:h text:style-name="P14" text:outline-level="3">🔍 Exegese</text:h>
      <text:p text:style-name="P6"><text:span text:style-name="T1">A expansão do primeiro dia da criação é o gesto hermenêutico fundamental do Livro dos Jubileus. O Génesis canónico começa com </text:span><text:span text:style-name="Emphasis"><text:span text:style-name="T1">"No princípio Deus criou o céu e a terra"</text:span></text:span><text:span text:style-name="T1"> — uma afirmação de </text:span><text:soft-page-break/><text:span text:style-name="T1">criação directa, sem intermediários. O Livro dos Jubileus abre imediatamente um espaço entre Deus e a criação material — um espaço preenchido por hierarquias de seres espirituais.</text:span></text:p>
      <text:p text:style-name="P6"><text:span text:style-name="T1">Este movimento não é gnóstico mas é </text:span><text:span text:style-name="Strong_20_Emphasis"><text:span text:style-name="T1">estruturalmente análogo</text:span></text:span><text:span text:style-name="T1"> ao movimento gnóstico. Em ambos os casos existe uma mediação entre o princípio divino e o mundo material. Em ambos os casos essa mediação é habitada por seres que têm poder e que exercem esse poder sobre os humanos. A diferença é que no Livro dos Jubileus esses seres são fundamentalmente servidores de Deus — não governadores autónomos como os Arcontes gnósticos.</text:span></text:p>
      <text:p text:style-name="P2">Mas esta diferença é menos absoluta do que parece. Como veremos adiante, o Livro dos Jubileus reconhece explicitamente que alguns desses seres se corromperam e se tornaram hostis aos humanos. A fronteira entre anjo servidor e Arconte hostil é, neste texto, mais porosa do que a teologia ortodoxa judaica admitiria confortavelmente.</text:p>
      <text:p text:style-name="P12"/>
      <text:h text:style-name="P40" text:outline-level="2">PARTE II — O JARDIM DO ÉDEN: A VERSÃO QUE EXPANDE O SILÊNCIO</text:h>
      <text:p text:style-name="P2">O Livro dos Jubileus retoma a narrativa do Jardim do Éden e expande cada silêncio do texto canónico com uma precisão que revela as questões que o Génesis original deixou propositadamente abertas.</text:p>
      <text:p text:style-name="P6"><text:span text:style-name="T1">O primeiro silêncio que expande é o da </text:span><text:span text:style-name="Strong_20_Emphasis"><text:span text:style-name="T1">duração</text:span></text:span><text:span text:style-name="T1">. Quanto tempo estiveram Adão e Éva no Éden antes da queda? O Génesis não diz. O Livro dos Jubileus responde com precisão: </text:span><text:span text:style-name="Strong_20_Emphasis"><text:span text:style-name="T1">sete anos</text:span></text:span><text:span text:style-name="T1">. Adão entrou no jardim no décimo sétimo dia do segundo mês do primeiro ano. Foi levado para o jardim no primeiro jubileu, na primeira semana, no primeiro ano.</text:span></text:p>
      <text:p text:style-name="P6"><text:span text:style-name="T1">O segundo silêncio é o da </text:span><text:span text:style-name="Strong_20_Emphasis"><text:span text:style-name="T1">natureza da proibição</text:span></text:span><text:span text:style-name="T1">. Por que razão a árvore do conhecimento do bem e do mal era proibida? O Livro dos Jubileus não inverte a resposta como o gnosticismo — mas aprofunda-a. A proibição não é arbitrária nem cruel. É uma questão de </text:span><text:span text:style-name="Strong_20_Emphasis"><text:span text:style-name="T1">tempo e de prontidão</text:span></text:span><text:span text:style-name="T1">. O conhecimento não é proibido para sempre — é proibido até que Adão e Éva estejam prontos para o receber sem serem destruídos por ele.</text:span></text:p>
      <text:p text:style-name="P6"><text:span text:style-name="T1">O terceiro silêncio é o da </text:span><text:span text:style-name="Strong_20_Emphasis"><text:span text:style-name="T1">identidade da serpente</text:span></text:span><text:span text:style-name="T1">. O Génesis apenas diz que era o mais astuto dos animais. O Livro dos Jubileus identifica-a como </text:span><text:span text:style-name="Strong_20_Emphasis"><text:span text:style-name="T1">Mastema</text:span></text:span><text:span text:style-name="T1"> — o príncipe dos espíritos maus, o acusador, o que foi chamado a tentar os humanos como parte do plano divino.</text:span></text:p>
      <text:p text:style-name="P12"/>
      <text:h text:style-name="P14" text:outline-level="3">🔍 Exegese</text:h>
      <text:p text:style-name="P6"><text:span text:style-name="T1">A expansão dos silêncios do Génesis revela a hermenêutica profunda do Livro dos Jubileus. O texto não contradiz o Génesis — </text:span><text:span text:style-name="Strong_20_Emphasis"><text:span text:style-name="T1">completa-o</text:span></text:span><text:span text:style-name="T1">. Cada lacuna da narrativa canónica é preenchida com uma lógica que torna a história mais coerente e simultaneamente mais perturbadora.</text:span></text:p>
      <text:p text:style-name="P6"><text:span text:style-name="T1">A questão do </text:span><text:span text:style-name="Strong_20_Emphasis"><text:span text:style-name="T1">tempo e da prontidão</text:span></text:span><text:span text:style-name="T1"> é teologicamente fascinante. O conhecimento do bem e do mal não é em si mesmo mau — é simplesmente prematuro. Adão e Éva não estavam prontos. Esta leitura é radicalmente diferente da gnóstica — que diz que a proibição serve os interesses dos Arcontes — mas é igualmente diferente da leitura ortodoxa — que diz que a proibição era simplesmente um teste de obediência. O Livro dos Jubileus propõe uma terceira via: </text:span><text:span text:style-name="Strong_20_Emphasis"><text:span text:style-name="T1">a prontidão espiritual como critério do conhecimento</text:span></text:span><text:span text:style-name="T1">.</text:span></text:p>
      <text:p text:style-name="P2"><text:soft-page-break/>Esta ideia tem ressonâncias profundas com o pensamento gnóstico apesar da sua origem completamente diferente. O conceito gnóstico de que nem todas as almas estão prontas para a gnose — que a Pistis Sophia desenvolve através da distinção entre pneumáticos e psíquicos — tem aqui um antecedente judaico. A questão não é se o conhecimento é bom ou mau — é se a consciência que o recebe tem a capacidade de o integrar sem se fragmentar.</text:p>
      <text:p text:style-name="P6"><text:span text:style-name="Strong_20_Emphasis"><text:span text:style-name="T1">Mastema</text:span></text:span><text:span text:style-name="T1"> é uma das figuras mais importantes do Livro dos Jubileus e uma das menos conhecidas da tradição religiosa em geral. O seu nome deriva da raiz hebraica </text:span><text:span text:style-name="Emphasis"><text:span text:style-name="T1">mastemah</text:span></text:span><text:span text:style-name="T1"> — hostilidade, adversidade. Não é exactamente o Satanás do Novo Testamento nem o Demiurgo gnóstico — é algo mais subtil: </text:span><text:span text:style-name="Strong_20_Emphasis"><text:span text:style-name="T1">o princípio da tentação que serve o plano divino sem o saber</text:span></text:span><text:span text:style-name="T1">. Mastema tenta os humanos por hostilidade própria — mas ao fazê-lo cumpre uma função no desenvolvimento espiritual da humanidade que transcende a sua intenção.</text:span></text:p>
      <text:p text:style-name="P12"/>
      <text:h text:style-name="P11" text:outline-level="2">PARTE III — MASTEMA: O ADVERSÁRIO QUE SERVE</text:h>
      <text:p text:style-name="P2">A figura de Mastema merece uma atenção especial porque é uma das inovações teológicas mais ousadas do Livro dos Jubileus e porque ilumina retroactivamente muito do que estudámos nos textos gnósticos.</text:p>
      <text:p text:style-name="P2">Após o dilúvio Noé reza a Deus pedindo que todos os espíritos maus sejam aprisionados — para que não continuem a corromper os seus filhos. Deus responde afirmativamente — e ordena que todos os espíritos maus sejam amarrados.</text:p>
      <text:p text:style-name="P2">Mas então Mastema intervém directamente. Dirige-se a Deus e pede:</text:p>
      <text:p text:style-name="P6"><text:span text:style-name="Emphasis"><text:span text:style-name="T1">"Senhor, Criador, deixa alguns deles ficar comigo e deixa-os ouvir a minha voz e fazer tudo o que eu lhes diga. Pois se nenhum deles ficar comigo serei incapaz de exercer o poder da minha vontade sobre os filhos dos homens — porque estão destinados a corromper e extraviar os filhos dos homens."</text:span></text:span></text:p>
      <text:p text:style-name="P2">E Deus — surpreendentemente — concorda. Permite que um décimo dos espíritos maus fique com Mastema para continuar a sua obra no mundo.</text:p>
      <text:p text:style-name="P12"/>
      <text:h text:style-name="P14" text:outline-level="3">🔍 Exegese</text:h>
      <text:p text:style-name="P6"><text:span text:style-name="T1">Este é o momento teologicamente mais perturbador do Livro dos Jubileus — e um dos mais perturbadores de toda a literatura apócrifa. Deus não apenas permite a existência de Mastema — </text:span><text:span text:style-name="Strong_20_Emphasis"><text:span text:style-name="T1">responde ao seu pedido</text:span></text:span><text:span text:style-name="T1">. O mal não é simplesmente tolerado — é, em alguma medida, </text:span><text:span text:style-name="Strong_20_Emphasis"><text:span text:style-name="T1">integrado no plano divino</text:span></text:span><text:span text:style-name="T1">.</text:span></text:p>
      <text:p text:style-name="P6"><text:span text:style-name="T1">A lógica interna do texto é clara: sem a presença do adversário, o desenvolvimento espiritual dos humanos seria impossível. A tentação não é um obstáculo ao crescimento — é o seu </text:span><text:span text:style-name="Strong_20_Emphasis"><text:span text:style-name="T1">instrumento</text:span></text:span><text:span text:style-name="T1">. Sem a resistência de Mastema, a liberdade humana seria uma ficção — porque não haveria nada contra o qual exercê-la.</text:span></text:p>
      <text:p text:style-name="P6"><text:span text:style-name="T1">Isto está em tensão profunda com a cosmologia gnóstica mas não em contradição absoluta com ela. O gnosticismo vê os Arcontes como inimigos da alma humana — poderes que aprisionam sem propósito redentor. O Livro dos Jubileus vê Mastema como adversário que serve um propósito mais </text:span><text:soft-page-break/><text:span text:style-name="T1">profundo do que ele próprio compreende. São duas respostas diferentes à mesma pergunta: </text:span><text:span text:style-name="Strong_20_Emphasis"><text:span text:style-name="T1">por que existe o mal num universo criado pelo bem?</text:span></text:span></text:p>
      <text:p text:style-name="P2">A resposta gnóstica é: porque o criador do mundo não é o Bem supremo. A resposta do Livro dos Jubileus é: porque o Bem supremo usa o mal como instrumento de desenvolvimento.</text:p>
      <text:p text:style-name="P2">Nenhuma das duas respostas é completamente satisfatória. Mas juntas — lidas em tensão uma com a outra — iluminam a profundidade da questão de uma forma que nenhuma delas consegue sozinha.</text:p>
      <text:p text:style-name="P12"/>
      <text:h text:style-name="P11" text:outline-level="2">PARTE IV — A HISTÓRIA REESCRITA: OS PATRIARCAS E OS SEUS SEGREDOS</text:h>
      <text:p text:style-name="P6"><text:span text:style-name="T1">O Livro dos Jubileus não é apenas uma releitura do Génesis — é uma </text:span><text:span text:style-name="Strong_20_Emphasis"><text:span text:style-name="T1">reescrita da história dos patriarcas</text:span></text:span><text:span text:style-name="T1"> que acrescenta a cada figura bíblica uma dimensão de conhecimento secreto que o texto canónico não menciona.</text:span></text:p>
      <text:p text:style-name="P6"><text:span text:style-name="Strong_20_Emphasis"><text:span text:style-name="T1">Noé</text:span></text:span><text:span text:style-name="T1"> recebe após o dilúvio não apenas uma aliança mas um </text:span><text:span text:style-name="Strong_20_Emphasis"><text:span text:style-name="T1">livro de medicina</text:span></text:span><text:span text:style-name="T1"> — um tratado sobre as plantas e os seus poderes curativos, transmitido pelos anjos. Este conhecimento é apresentado como anterior à queda — era o conhecimento que os anjos caídos haviam corrompido ao ensiná-lo para fins de destruição.</text:span></text:p>
      <text:p text:style-name="P6"><text:span text:style-name="Strong_20_Emphasis"><text:span text:style-name="T1">Abraão</text:span></text:span><text:span text:style-name="T1"> é apresentado não apenas como o pai da fé mas como o primeiro </text:span><text:span text:style-name="Strong_20_Emphasis"><text:span text:style-name="T1">astrónomo</text:span></text:span><text:span text:style-name="T1"> — aquele que estudou os céus e através do estudo dos astros chegou ao conhecimento do Deus único. O texto descreve Abraão observando os céus durante toda uma noite, calculando os movimentos dos astros, e chegando à conclusão de que nenhum poder celeste pode ser Deus porque todos os poderes celestes são subordinados a uma ordem que os transcende.</text:span></text:p>
      <text:p text:style-name="P6"><text:span text:style-name="Strong_20_Emphasis"><text:span text:style-name="T1">Jacob</text:span></text:span><text:span text:style-name="T1"> recebe no monte Betel não apenas a visão da escada mas um </text:span><text:span text:style-name="Strong_20_Emphasis"><text:span text:style-name="T1">ensinamento directo dos anjos</text:span></text:span><text:span text:style-name="T1"> sobre a estrutura dos mundos — um ensinamento que o Génesis canónico omite completamente.</text:span></text:p>
      <text:p text:style-name="P6"><text:span text:style-name="Strong_20_Emphasis"><text:span text:style-name="T1">Levi</text:span></text:span><text:span text:style-name="T1"> — o ancestral dos sacerdotes — recebe uma visão em que é introduzido no </text:span><text:span text:style-name="Strong_20_Emphasis"><text:span text:style-name="T1">santuário celestial</text:span></text:span><text:span text:style-name="T1"> e ordenado sacerdote não apenas da aliança terrestre mas da ordem cósmica eterna.</text:span></text:p>
      <text:p text:style-name="P12"/>
      <text:h text:style-name="P14" text:outline-level="3">🔍 Exegese</text:h>
      <text:p text:style-name="P6"><text:span text:style-name="T1">A reescrita dos patriarcas revela a agenda teológica do Livro dos Jubileus com grande clareza. O texto está a construir uma </text:span><text:span text:style-name="Strong_20_Emphasis"><text:span text:style-name="T1">cadeia de transmissão do conhecimento sagrado</text:span></text:span><text:span text:style-name="T1"> que atravessa todas as gerações desde a criação até Moisés — e que legitima a tradição judaica não como uma religião entre outras mas como a guardiã de um conhecimento que é simultaneamente o mais antigo e o mais profundo.</text:span></text:p>
      <text:p text:style-name="P6"><text:span text:style-name="T1">A figura de </text:span><text:span text:style-name="Strong_20_Emphasis"><text:span text:style-name="T1">Abraão como astrónomo</text:span></text:span><text:span text:style-name="T1"> é particularmente significativa. A astronomia — o estudo dos movimentos dos astros — era na antiguidade indissociável da astrologia, da cosmologia e da teologia. Ao apresentar Abraão como aquele que chegou ao monoteísmo através da observação científica dos céus, o Livro dos Jubileus está a fazer uma afirmação extraordinária: </text:span><text:span text:style-name="Strong_20_Emphasis"><text:span text:style-name="T1">a razão e a fé não são opostos — são caminhos que convergem para o mesmo ponto</text:span></text:span><text:span text:style-name="T1">.</text:span></text:p>
      <text:p text:style-name="P2">Esta ideia ressoa de forma surpreendente com a tradição gnóstica, que também vê o conhecimento racional e a experiência espiritual como dimensões complementares do mesmo caminho. A <text:soft-page-break/>diferença é que para os gnósticos o estudo dos céus revelaria sobretudo a estrutura do aprisionamento — as esferas dos Arcontes. Para o Livro dos Jubileus o mesmo estudo revela a ordem e a bondade do Criador.</text:p>
      <text:p text:style-name="P6"><text:span text:style-name="T1">A ordenação de </text:span><text:span text:style-name="Strong_20_Emphasis"><text:span text:style-name="T1">Levi no santuário celestial</text:span></text:span><text:span text:style-name="T1"> é um dos momentos mais esotéricos do texto e antecipa directamente a literatura dos </text:span><text:span text:style-name="Strong_20_Emphasis"><text:span text:style-name="T1">Hekhalot</text:span></text:span><text:span text:style-name="T1"> — os textos judaicos medievais que descrevem a ascensão mística aos palácios celestiais. Esta tradição de ascensão mística judaica é estruturalmente análoga à ascensão gnóstica da alma — a diferença é que o destino não é o silêncio do Pleroma mas a presença activa do Deus pessoal no seu trono.</text:span></text:p>
      <text:p text:style-name="P12"/>
      <text:h text:style-name="P40" text:outline-level="2">PARTE V — OS ANJOS CAÍDOS: A FERIDA QUE NÃO FECHA</text:h>
      <text:p text:style-name="P6"><text:span text:style-name="T1">O elemento do Livro dos Jubileus que mais directamente ressoa com a cosmologia gnóstica é o seu tratamento dos </text:span><text:span text:style-name="Strong_20_Emphasis"><text:span text:style-name="T1">anjos caídos</text:span></text:span><text:span text:style-name="T1"> — a narrativa dos Filhos de Deus que em Génesis 6 se uniram às filhas dos homens e geraram os Nefilim.</text:span></text:p>
      <text:p text:style-name="P6"><text:span text:style-name="T1">O Livro dos Jubileus expande esta narrativa com uma minúcia que revela a profundidade da sua importância teológica. Os anjos — chamados aqui os </text:span><text:span text:style-name="Strong_20_Emphasis"><text:span text:style-name="T1">Vigilantes</text:span></text:span><text:span text:style-name="T1"> — desceram ao mundo originalmente com um propósito benevolente: </text:span><text:span text:style-name="Strong_20_Emphasis"><text:span text:style-name="T1">ensinar os humanos</text:span></text:span><text:span text:style-name="T1">. Deviam ensinar-lhes a agricultura, a medicina, os ciclos dos astros, as leis da natureza.</text:span></text:p>
      <text:p text:style-name="P2">Mas ao descerem ao mundo material os Vigilantes foram corrompidos pelo desejo. Viram as filhas dos homens, desejaram-nas, e uniram-se a elas. Desta união nasceram os Nefilim — gigantes, seres de poder imenso mas de natureza híbrida — nem completamente espirituais nem completamente materiais.</text:p>
      <text:p text:style-name="P6"><text:span text:style-name="T1">Os Vigilantes ensinaram então aos humanos </text:span><text:span text:style-name="Strong_20_Emphasis"><text:span text:style-name="T1">conhecimentos proibidos</text:span></text:span><text:span text:style-name="T1">: a fabricação de armas, a arte da sedução e do ornamento, a feitiçaria, a magia, a adivinhação. O texto é explícito: estes conhecimentos não eram em si mesmos maus — eram neutros. Tornaram-se destrutivos porque foram transmitidos </text:span><text:span text:style-name="Strong_20_Emphasis"><text:span text:style-name="T1">sem sabedoria</text:span></text:span><text:span text:style-name="T1">, a seres que não estavam prontos para os receber.</text:span></text:p>
      <text:p text:style-name="P2">Deus aprisionou os Vigilantes — mas os seus filhos os Nefilim e os espíritos nascidos deles continuaram a vagar pelo mundo. Mastema usou-os como os seus agentes. E o dilúvio — que destruiu os Nefilim fisicamente — não destruiu os espíritos que deles provinham. Esses espíritos são os demónios do Livro dos Jubileus — presentes no mundo, hostis aos humanos, servindo a agenda de Mastema.</text:p>
      <text:p text:style-name="P12"/>
      <text:h text:style-name="P14" text:outline-level="3">🔍 Exegese</text:h>
      <text:p text:style-name="P2">A narrativa dos Vigilantes é um dos textos mais influentes de toda a literatura apócrifa — influenciou o 1º Livro de Enoque que leremos a seguir, influenciou a demonologia de todo o período do Segundo Templo, e deixou marcas profundas na teologia cristã primitiva, no gnosticismo e nas tradições esotéricas medievais.</text:p>
      <text:p text:style-name="P6"><text:span text:style-name="T1">O elemento teologicamente mais rico é a </text:span><text:span text:style-name="Strong_20_Emphasis"><text:span text:style-name="T1">corrupção pelo desejo de seres originalmente bons</text:span></text:span><text:span text:style-name="T1">. Os Vigilantes não eram maus quando desceram — eram mensageiros divinos com uma missão de ensino. Foram corrompidos pelo contacto com a matéria, pelo desejo que a materialidade despertou </text:span><text:soft-page-break/><text:span text:style-name="T1">neles. É a mesma estrutura da queda de Sophia — um ser de luz que desce ao mundo material e é transformado por esse contacto.</text:span></text:p>
      <text:p text:style-name="P6"><text:span text:style-name="T1">A distinção entre o </text:span><text:span text:style-name="Strong_20_Emphasis"><text:span text:style-name="T1">conhecimento neutro</text:span></text:span><text:span text:style-name="T1"> e o </text:span><text:span text:style-name="Strong_20_Emphasis"><text:span text:style-name="T1">conhecimento sem sabedoria</text:span></text:span><text:span text:style-name="T1"> é uma das contribuições mais profundas do Livro dos Jubileus à filosofia religiosa. A feitiçaria, a astrologia, a medicina — em si mesmos são apenas conhecimentos. O que os torna destrutivos é a ausência de maturidade espiritual em quem os recebe. Este princípio — que o conhecimento sem transformação interior é perigoso — é precisamente o que distingue a gnose da simples erudição.</text:span></text:p>
      <text:p text:style-name="P6"><text:span text:style-name="T1">Os </text:span><text:span text:style-name="Strong_20_Emphasis"><text:span text:style-name="T1">espíritos dos Nefilim</text:span></text:span><text:span text:style-name="T1"> que sobrevivem ao dilúvio são a explicação que o Livro dos Jubileus oferece para a persistência do mal no mundo após o dilúvio. O dilúvio purificou o mundo físico — mas não o mundo espiritual. A presença de Mastema e dos seus agentes no mundo não é uma falha do plano divino — é uma condição necessária para o desenvolvimento espiritual da humanidade, como vimos na secção anterior.</text:span></text:p>
      <text:p text:style-name="P12"/>
      <text:h text:style-name="P40" text:outline-level="2">PARTE VI — O CALENDÁRIO SAGRADO: O TEMPO COMO REVELAÇÃO</text:h>
      <text:p text:style-name="P6"><text:span text:style-name="T1">Um dos aspectos mais originais e mais tecnicamente específicos do Livro dos Jubileus é a sua insistência num </text:span><text:span text:style-name="Strong_20_Emphasis"><text:span text:style-name="T1">calendário solar de 364 dias</text:span></text:span><text:span text:style-name="T1"> — em oposição ao calendário lunar de 354 dias usado pela maioria dos judeus da época.</text:span></text:p>
      <text:p text:style-name="P6"><text:span text:style-name="T1">Este aparente detalhe técnico é na realidade uma declaração teológica de grande alcance. O texto insiste que o calendário solar de 364 dias — exactamente cinquenta e duas semanas, sempre com o mesmo dia da semana para cada festival — foi revelado por Deus no monte Sinai como parte da Torá oral. Usar o calendário lunar errado não é apenas um erro de cálculo — é uma </text:span><text:span text:style-name="Strong_20_Emphasis"><text:span text:style-name="T1">profanação</text:span></text:span><text:span text:style-name="T1"> dos tempos sagrados, uma confusão introduzida pelos anjos das nações que governam os povos gentios.</text:span></text:p>
      <text:p text:style-name="P6"><text:span text:style-name="T1">Os </text:span><text:span text:style-name="Strong_20_Emphasis"><text:span text:style-name="T1">anjos das nações</text:span></text:span><text:span text:style-name="T1"> são uma figura teologicamente importante no Livro dos Jubileus. Cada nação do mundo tem um anjo guardião que a governa — todos os povos excepto Israel que é governado directamente por Deus. Estes anjos das nações não são exactamente Arcontes gnósticos — mas a estrutura é análoga. São intermediários que governam aspectos específicos da realidade humana e que nem sempre servem os interesses das almas que lhes estão sujeitas.</text:span></text:p>
      <text:p text:style-name="P12"/>
      <text:h text:style-name="P14" text:outline-level="3">🔍 Exegese</text:h>
      <text:p text:style-name="P6"><text:span text:style-name="T1">A questão do calendário parece técnica mas é na realidade uma questão sobre </text:span><text:span text:style-name="Strong_20_Emphasis"><text:span text:style-name="T1">a natureza do tempo sagrado</text:span></text:span><text:span text:style-name="T1">. O argumento do Livro dos Jubileus é que o tempo não é neutro — há tempos sagrados e tempos profanos, e a distinção entre eles é revelada, não arbitrária. Celebrar os festivais no dia errado não é apenas um erro administrativo — é uma desalinhamento com a estrutura profunda do cosmos.</text:span></text:p>
      <text:p text:style-name="P6"><text:span text:style-name="T1">Esta ideia de que o </text:span><text:span text:style-name="Strong_20_Emphasis"><text:span text:style-name="T1">tempo tem uma estrutura sagrada</text:span></text:span><text:span text:style-name="T1"> que pode ser conhecida ou ignorada é profundamente análoga à cosmologia gnóstica. Para os gnósticos, as esferas dos Arcontes governam não apenas o espaço mas o tempo — a heimarmene é uma estrutura temporal tanto quanto espacial. A alma que conhece a arquitectura do cosmos conhece também a arquitectura do tempo — e pode navegar nela em vez de ser arrastada por ela.</text:span></text:p>
      <text:p text:style-name="P6"><text:soft-page-break/><text:span text:style-name="T1">Os </text:span><text:span text:style-name="Strong_20_Emphasis"><text:span text:style-name="T1">anjos das nações</text:span></text:span><text:span text:style-name="T1"> como intermediários que governam os povos do mundo são a versão judaica de uma ideia que percorre toda a literatura que estudámos. Há sempre seres entre Deus e os humanos — sempre uma hierarquia de mediação. A questão é sempre a mesma: essa mediação serve os humanos ou serve os seus próprios interesses?</text:span></text:p>
      <text:p text:style-name="P12"/>
      <text:h text:style-name="P40" text:outline-level="2">PARTE VII — A ALIANÇA ETERNA: O QUE NÃO PODE SER DESTRUÍDO</text:h>
      <text:p text:style-name="P6"><text:span text:style-name="T1">O Livro dos Jubileus fecha com a chegada de Israel ao monte Sinai e a revelação da Torá. Mas antes da revelação da Lei, o anjo da presença revela a Moisés algo que nenhuma outra versão da narrativa contém: a </text:span><text:span text:style-name="Strong_20_Emphasis"><text:span text:style-name="T1">preexistência de Israel</text:span></text:span><text:span text:style-name="T1">.</text:span></text:p>
      <text:p text:style-name="P6"><text:span text:style-name="T1">Israel — o povo, não o indivíduo — existia nos planos celestiais antes de existir na terra. O nome de Israel estava escrito nas tábuas celestiais antes de qualquer patriarca ter nascido. A aliança entre Deus e Israel não começou com Abraão nem com Moisés — começou </text:span><text:span text:style-name="Strong_20_Emphasis"><text:span text:style-name="T1">antes da criação do mundo</text:span></text:span><text:span text:style-name="T1">, nas tábuas que precedem o tempo.</text:span></text:p>
      <text:p text:style-name="P6"><text:span text:style-name="T1">Esta preexistência tem uma implicação directa: </text:span><text:span text:style-name="Strong_20_Emphasis"><text:span text:style-name="T1">a aliança não pode ser quebrada definitivamente</text:span></text:span><text:span text:style-name="T1">. Pode ser violada, pode ser esquecida, pode ser profanada — mas não pode ser anulada porque existe num nível de realidade que transcende o tempo e a história. A perseguição de Antíoco IV — o contexto histórico em que o texto foi escrito — é terrível mas não definitiva. Israel pode ser oprimido mas não pode ser destruído porque a sua existência está inscrita nas tábuas eternas.</text:span></text:p>
      <text:p text:style-name="P12"/>
      <text:h text:style-name="P14" text:outline-level="3">🔍 Exegese</text:h>
      <text:p text:style-name="P6"><text:span text:style-name="T1">A </text:span><text:span text:style-name="Strong_20_Emphasis"><text:span text:style-name="T1">preexistência de Israel nas tábuas celestiais</text:span></text:span><text:span text:style-name="T1"> é a resposta do Livro dos Jubileus à crise histórica da perseguição. É uma resposta teológica — não política, não militar — que oferece às comunidades judias perseguidas uma ancoragem que nenhuma força humana pode remover.</text:span></text:p>
      <text:p text:style-name="P2">Esta estrutura é precisamente análoga à resposta gnóstica à opressão. O gnosticismo diz: os Arcontes têm poder sobre o mundo material mas não sobre a faísca de luz dentro de ti. O Livro dos Jubileus diz: os impérios têm poder sobre o tempo histórico mas não sobre o que está inscrito nas tábuas eternas. Em ambos os casos o elemento mais profundo da identidade humana — seja a centelha de luz gnóstica, seja a inscrição nas tábuas celestiais — está além do alcance do poder que oprime.</text:p>
      <text:p text:style-name="P2">A diferença fundamental é que o gnosticismo localiza esse elemento inalienável dentro do indivíduo — é a centelha de luz interior, independente de qualquer identidade colectiva. O Livro dos Jubileus localiza-o dentro do povo — é a aliança colectiva, a identidade comunitária que transcende o destino individual. São duas respostas diferentes à mesma experiência de opressão — a interior e a colectiva.</text:p>
      <text:p text:style-name="P12"/>
      <text:h text:style-name="P11" text:outline-level="2"><text:soft-page-break/>Síntese Final: O que o Livro dos Jubileus acrescenta — e o que a jornada completa revela</text:h>
      <text:p text:style-name="P2">O Livro dos Jubileus fecha o ciclo de uma forma que seria impossível de prever no início da jornada. Começámos com o Apócrifo de João — um texto que subverte radicalmente a narrativa do Génesis, que transforma o Deus criador em Demiurgo ignorante, que inverte a serpente de tentadora em libertadora. E terminamos com o Livro dos Jubileus — um texto que defende apaixonadamente a bondade do Criador, a validade da aliança, a santidade da Torá.</text:p>
      <text:p text:style-name="P2">E no entanto — depois de toda esta jornada — é possível ver que os dois textos estão a fazer perguntas que se complementam mais do que se contradizem.</text:p>
      <text:p text:style-name="P6"><text:span text:style-name="T1">O </text:span><text:span text:style-name="Strong_20_Emphasis"><text:span text:style-name="T1">Apócrifo de João</text:span></text:span><text:span text:style-name="T1"> pergunta: por que razão o mundo é tão imperfeito se foi criado por um Deus perfeito? E responde: porque o criador do mundo não é o Deus perfeito.</text:span></text:p>
      <text:p text:style-name="P6"><text:span text:style-name="T1">O </text:span><text:span text:style-name="Strong_20_Emphasis"><text:span text:style-name="T1">Livro dos Jubileus</text:span></text:span><text:span text:style-name="T1"> pergunta: como pode uma comunidade preservar a sua identidade espiritual face à opressão total? E responde: porque existe um nível de realidade — as tábuas eternas, a aliança preexistente — que nenhuma força histórica pode alcançar.</text:span></text:p>
      <text:p text:style-name="P6"><text:span text:style-name="T1">Ambos os textos estão a lidar com a experiência humana fundamental do </text:span><text:span text:style-name="Strong_20_Emphasis"><text:span text:style-name="T1">sofrimento sem explicação aparente</text:span></text:span><text:span text:style-name="T1"> — e ambos respondem apontando para uma dimensão da realidade que transcende o sofrimento sem o negar.</text:span></text:p>
      <text:p text:style-name="P12"/>
      <text:h text:style-name="P13" text:outline-level="1">A JORNADA COMPLETA: O QUE OS SEIS TEXTOS REVELAM JUNTOS</text:h>
      <text:p text:style-name="P6"><text:span text:style-name="Strong_20_Emphasis"><text:span text:style-name="T1">O Apócrifo de João</text:span></text:span><text:span text:style-name="T1"> — o mapa cósmico. A estrutura completa do universo desde a Luz até ao caos. A origem da queda. A possibilidade do regresso.</text:span></text:p>
      <text:p text:style-name="P6"><text:span text:style-name="Strong_20_Emphasis"><text:span text:style-name="T1">O Evangelho de Filipe</text:span></text:span><text:span text:style-name="T1"> — o caminho sacramental. Como a transformação acontece na vida concreta através dos ritos, da experiência mística, da câmara nupcial interior.</text:span></text:p>
      <text:p text:style-name="P6"><text:span text:style-name="Strong_20_Emphasis"><text:span text:style-name="T1">O Evangelho de Maria Madalena</text:span></text:span><text:span text:style-name="T1"> — a voz interior. A experiência vivida da ascensão. O conflito entre gnose viva e poder institucional. A certeza de que a luz não tem género.</text:span></text:p>
      <text:p text:style-name="P6"><text:span text:style-name="Strong_20_Emphasis"><text:span text:style-name="T1">A Pistis Sophia</text:span></text:span><text:span text:style-name="T1"> — a profundidade do sofrimento. A alma que canta no caos. A paciência do divino que não abandona nenhuma faísca. A gradualidade da salvação.</text:span></text:p>
      <text:p text:style-name="P6"><text:span text:style-name="Strong_20_Emphasis"><text:span text:style-name="T1">A Hipóstase dos Arcontes</text:span></text:span><text:span text:style-name="T1"> — a análise do poder. O que são exactamente os poderes que aprisionam. Onde terminam os seus limites. A raiz da verdade que nenhum poder pode alcançar.</text:span></text:p>
      <text:p text:style-name="P6"><text:span text:style-name="Strong_20_Emphasis"><text:span text:style-name="T1">O Livro dos Jubileus</text:span></text:span><text:span text:style-name="T1"> — o regresso à raiz. A tradição mais antiga. A aliança que preexiste ao tempo. A resposta colectiva à mesma questão que o gnosticismo responde individualmente.</text:span></text:p>
      <text:p text:style-name="P6"><text:span text:style-name="T1">Juntos estes seis textos não formam um sistema — formam uma </text:span><text:span text:style-name="Strong_20_Emphasis"><text:span text:style-name="T1">conversa</text:span></text:span><text:span text:style-name="T1">. Uma conversa que atravessa séculos, culturas e tradições diferentes sobre as mesmas questões fundamentais: de onde viemos, por que sofremos, o que somos na nossa profundeza mais inacessível, e como regressamos ao que sempre fomos.</text:span></text:p>
      <text:p text:style-name="P6"><text:soft-page-break/><text:span text:style-name="T1">A resposta que cada texto dá é diferente. Mas a pergunta que cada um coloca é a mesma. E é precisamente essa pergunta — </text:span><text:span text:style-name="Emphasis"><text:span text:style-name="T1">quem sou eu verdadeiramente?</text:span></text:span><text:span text:style-name="T1"> — que o </text:span><text:span text:style-name="Emphasis"><text:span text:style-name="T1">Evangelho de Tomás</text:span></text:span><text:span text:style-name="T1"> com que começámos a tua jornada há meses colocou na sua forma mais radical e mais simples:</text:span></text:p>
      <text:p text:style-name="P6"><text:span text:style-name="Emphasis"><text:span text:style-name="T1">"Quem encontrar a interpretação destas palavras não provará a morte."</text:span></text:span></text:p>
      <text:p text:style-name="P12"/>
      <text:p text:style-name="P2"><text:span text:style-name="T5">C</text:span>hegámos ao fim desta jornada particular. Mas como sabes bem depois de tudo o que lemos juntos, no pensamento gnóstico nenhuma jornada tem verdadeiramente um fim — tem apenas um patamar a partir do qual se vê mais longe do que antes.<text:bookmark-end text:name="__DdeLink__9475_3434306060"/></text:p>
      <text:p text:style-name="P6"><text:span text:style-name="T1">Se quiseres continuar — há territórios vastos ainda por explorar. O </text:span><text:span text:style-name="Strong_20_Emphasis"><text:span text:style-name="T1">1º Livro de Enoque</text:span></text:span><text:span text:style-name="T1"> com a sua cosmologia angelical. A </text:span><text:span text:style-name="Strong_20_Emphasis"><text:span text:style-name="T1">Pistis Sophia</text:span></text:span><text:span text:style-name="T1"> em maior profundidade texto a texto. Os </text:span><text:span text:style-name="Strong_20_Emphasis"><text:span text:style-name="T1">Manuscritos do Mar Morto</text:span></text:span><text:span text:style-name="T1"> e a comunidade dos essénios. </text:span></text:p>
      <text:p text:style-name="P2"/>
      <text:h text:style-name="P41" text:outline-level="1">1º Livro de Enoque — Reconstrução Interpretativa e Exegese Gnóstica</text:h>
      <text:p text:style-name="P12"/>
      <text:h text:style-name="P11" text:outline-level="2">INTRODUÇÃO: O TEXTO QUE ESTAVA EM TODO O LADO SEM QUE NINGUÉM SOUBESSE</text:h>
      <text:p text:style-name="P2">O <text:span text:style-name="T6">1</text:span>º Livro de Enoque é provavelmente o texto apócrifo mais importante que existe — e simultaneamente um dos menos conhecidos pelo grande público. A sua influência é omnipresente e invisível: está no Novo Testamento, está no gnosticismo, está na angelologia medieval, está nas tradições esotéricas do Ocidente e do Oriente. Mas raramente é estudado direitamente, raramente é nomeado, raramente é reconhecido como a fonte que é.</text:p>
      <text:p text:style-name="P6"><text:span text:style-name="T1">A razão é simples: durante mais de mil anos o texto foi considerado perdido. Sabia-se que existira — Judas, o irmão de Jesus, cita-o direitamente na sua epístola canônica, e os Padres da Igreja primitiva referem-no abundantemente. Mas o texto completo havia desaparecido. Até 1773, quando o explorador escocês </text:span><text:span text:style-name="Strong_20_Emphasis"><text:span text:style-name="T1">James Bruce</text:span></text:span><text:span text:style-name="T1"> regressou da Etiópia trazendo três cópias completas do livro em língua ge'ez — o etíope antigo. A Igreja Ortodoxa Etíope nunca o havia perdido. Havia-o preservado no seu cânon como livro sagrado durante dezasseis séculos enquanto o resto do mundo o ignorava.</text:span></text:p>
      <text:p text:style-name="P6"><text:span text:style-name="T1">E quando os Manuscritos do Mar Morto foram descobertos em 1947, a confirmação foi definitiva: foram encontrados </text:span><text:span text:style-name="Strong_20_Emphasis"><text:span text:style-name="T1">onze fragmentos</text:span></text:span><text:span text:style-name="T1"> do Livro de Enoque em aramaico nas cavernas de Qumran — mais cópias do que de qualquer outro livro excepto os Salmos e o Deuteronômio. Para a comunidade dos Essênios, o Livro de Enoque era tão sagrado quanto a Torá.</text:span></text:p>
      <text:p text:style-name="P6"><text:span text:style-name="T1">O texto divide-se em </text:span><text:span text:style-name="Strong_20_Emphasis"><text:span text:style-name="T1">cinco secções</text:span></text:span><text:span text:style-name="T1"> distintas, provavelmente compostas em momentos diferentes entre os séculos III a.C. e I d.C.:</text:span></text:p>
      <text:p text:style-name="P6"><text:span text:style-name="T1">O </text:span><text:span text:style-name="Strong_20_Emphasis"><text:span text:style-name="T1">Livro dos Vigilantes</text:span></text:span><text:span text:style-name="T1"> (capítulos 1–36) — a queda dos anjos e as viagens de Enoque. O </text:span><text:span text:style-name="Strong_20_Emphasis"><text:span text:style-name="T1">Livro das Parábolas</text:span></text:span><text:span text:style-name="T1"> (capítulos 37–71) — o Filho do Homem e o julgamento. O </text:span><text:span text:style-name="Strong_20_Emphasis"><text:span text:style-name="T1">Livro da Astronomia</text:span></text:span><text:span text:style-name="T1"> (capítulos 72–82) — a estrutura do cosmos. O </text:span><text:span text:style-name="Strong_20_Emphasis"><text:span text:style-name="T1">Livro dos Sonhos</text:span></text:span><text:span text:style-name="T1"> (capítulos 83–90) — a história de Israel em visão apocalíptica. A </text:span><text:span text:style-name="Strong_20_Emphasis"><text:span text:style-name="T1">Epístola de Enoque</text:span></text:span><text:span text:style-name="T1"> (capítulos 91–108) — ensinamentos finais e o destino dos justos.</text:span></text:p>
      <text:p text:style-name="P12"/>
      <text:h text:style-name="P11" text:outline-level="2">PARTE I — ENOQUE: O HOMEM QUE NÃO MORREU</text:h>
      <text:p text:style-name="P2">Antes de entrar nos textos, é necessário compreender quem é Enoque — porque a sua identidade é em si mesma uma afirmação teológica extraordinária.</text:p>
      <text:p text:style-name="P6"><text:span text:style-name="T1">O Gênesis canônico menciona-o em apenas três versículos. Diz que Enoque "caminhou com Deus" durante trezentos e sessenta e cinco anos — o mesmo número de dias do calendário solar que o Livro dos Jubileus defende como sagrado — e depois diz simplesmente: </text:span><text:span text:style-name="Strong_20_Emphasis"><text:span text:style-name="T1">"Deus tomou-o."</text:span></text:span><text:span text:style-name="T1"> Não morreu. Foi tomado. Desapareceu da terra sem deixar corpo.</text:span></text:p>
      <text:p text:style-name="P2">Esta brevidade do Gênesis é o maior convite à imaginação que a literatura bíblica já produziu. O que aconteceu a Enoque? Para onde foi? O que viu? O que sabe?</text:p>
      <text:p text:style-name="P2"><text:soft-page-break/>O 1º Livro de Enoque responde a todas estas perguntas com uma abundância que dura cem capítulos.</text:p>
      <text:p text:style-name="P12"/>
      <text:h text:style-name="P14" text:outline-level="3">🔍 Exegese</text:h>
      <text:p text:style-name="P2">A figura de Enoque que não morre é teologicamente radical dentro do judaísmo do Segundo Templo. Numa tradição que raramente fala de vida após a morte de forma concreta, Enoque é a excepção absoluta — alguém que transpôs a fronteira entre o mundo dos vivos e o mundo de Deus sem passar pela morte.</text:p>
      <text:p text:style-name="P6"><text:span text:style-name="T1">Esta singularidade faz de Enoque o </text:span><text:span text:style-name="Strong_20_Emphasis"><text:span text:style-name="T1">mediador ideal</text:span></text:span><text:span text:style-name="T1"> entre os mundos. Não é um anjo — é humano. Mas também não é simplesmente humano — foi levado para junto de Deus. Ocupa um espaço liminar que nenhuma outra figura bíblica ocupa com a mesma clareza. É precisamente por isso que a tradição gnóstica o absorverá tão facilmente — é a figura perfeita do ser humano que transcendeu os limites do mundo material sem deixar de ser humano.</text:span></text:p>
      <text:p text:style-name="P6"><text:span text:style-name="T1">A correspondência entre os </text:span><text:span text:style-name="Strong_20_Emphasis"><text:span text:style-name="T1">365 anos de vida de Enoque e os 365 dias do calendário solar</text:span></text:span><text:span text:style-name="T1"> não é coincidência. É um sinal — Enoque pertence ao tempo sagrado, ao calendário que o Livro dos Jubileus defende como revelado. A sua vida tem a duração exata de um ano solar completo.</text:span></text:p>
      <text:p text:style-name="P12"/>
      <text:h text:style-name="P11" text:outline-level="2">PARTE II — O LIVRO DOS VIGILANTES: A QUEDA DOS ANJOS</text:h>
      <text:p text:style-name="P2">Esta é a secção mais influente de todo o texto — a que mais dire<text:span text:style-name="T7">i</text:span>tamente moldou o gnosticismo, o Cristianismo primitivo e as tradições esotéricas ocidentais.</text:p>
      <text:p text:style-name="P2">O texto retoma e expande a brevíssima menção do Gênesis 6 aos "Filhos de Deus" que se uniram às "filhas dos homens". Mas aqui a narrativa é vastamente mais elaborada e muito mais perturbadora.</text:p>
      <text:p text:style-name="P6"><text:span text:style-name="T1">No tempo de Jarede — pai de Enoque — duzentos anjos olharam para baixo do céu para a terra e viram as filhas dos homens. E desejaram-nas. O seu líder chamava-se </text:span><text:span text:style-name="Strong_20_Emphasis"><text:span text:style-name="T1">Semyaza</text:span></text:span><text:span text:style-name="T1">. E Semyaza disse aos outros:</text:span></text:p>
      <text:p text:style-name="P6"><text:span text:style-name="Emphasis"><text:span text:style-name="T1">"Temo que não queirais realmente fazer isto, e que apenas eu acabe a pagar o preço deste grande pecado."</text:span></text:span></text:p>
      <text:p text:style-name="P2">E os outros responderam:</text:p>
      <text:p text:style-name="P6"><text:span text:style-name="Emphasis"><text:span text:style-name="T1">"Juremos todos, e vinculemo-nos com maldições mútuas, de não desistirmos deste plano mas de o executarmos."</text:span></text:span></text:p>
      <text:p text:style-name="P6"><text:span text:style-name="T1">Duzentos anjos desceram ao monte Hermon. Tomaram mulheres. E das suas uniões nasceram os </text:span><text:span text:style-name="Strong_20_Emphasis"><text:span text:style-name="T1">Nefilim</text:span></text:span><text:span text:style-name="T1"> — gigantes cujo tamanho o texto mede em três mil côvados. Os Nefilim consumiram toda a comida que os humanos produziram. Quando a comida acabou, voltaram-se contra os próprios humanos. E quando os humanos acabaram, voltaram-se uns contra os outros.</text:span></text:p>
      <text:p text:style-name="P6"><text:span text:style-name="T1">Os anjos ensinaram também aos humanos conhecimentos que não lhes deviam ser transmitidos. </text:span><text:span text:style-name="Strong_20_Emphasis"><text:span text:style-name="T1">Azazel</text:span></text:span><text:span text:style-name="T1"> ensinou aos homens a fabricação de armas e às mulheres a arte do ornamento e da sedução. Outros anjos ensinaram a astrologia, a magia, o encantamento, o corte de raízes, a alquimia.</text:span></text:p>
      <text:p text:style-name="P2"><text:soft-page-break/>O resultado foi o caos total. A terra encheu-se de sangue e de injustiça. E os gritos dos humanos subiram até ao céu.</text:p>
      <text:p text:style-name="P12"/>
      <text:h text:style-name="P14" text:outline-level="3">🔍 Exegese</text:h>
      <text:p text:style-name="P2">A narrativa dos Vigilantes é de uma riqueza simbólica que décadas de estudo não esgotam. Há vários planos de leitura simultâneos.</text:p>
      <text:p text:style-name="P6"><text:span text:style-name="T1">O primeiro plano é </text:span><text:span text:style-name="Strong_20_Emphasis"><text:span text:style-name="T1">etiológico</text:span></text:span><text:span text:style-name="T1"> — explica a origem do mal no mundo. Mas ao contrário da narrativa do Gênesis, que coloca a origem do mal na desobediência humana, o Livro de Enoque coloca-a na </text:span><text:span text:style-name="Strong_20_Emphasis"><text:span text:style-name="T1">desobediência angelical</text:span></text:span><text:span text:style-name="T1">. O mal não veio de baixo — veio de cima. Não veio da fraqueza humana — veio da corrupção de seres que deveriam ser guardiões.</text:span></text:p>
      <text:p text:style-name="P2">Esta é uma afirmação teologicamente enorme. Os humanos não são os culpados primários pela condição do mundo. São vítimas de uma traição cósmica protagonizada por seres muito mais poderosos do que eles. Esta estrutura de pensamento é exatamente o que o gnosticismo irá desenvolver — a humanidade como vítima de potências superiores que a corromperam e aprisionaram.</text:p>
      <text:p text:style-name="P6"><text:span text:style-name="T1">O segundo plano é </text:span><text:span text:style-name="Strong_20_Emphasis"><text:span text:style-name="T1">a natureza do conhecimento proibido</text:span></text:span><text:span text:style-name="T1">. Azazel ensina a fabricação de armas — e o texto diz que por causa deste ensino "toda a impiedade foi praticada". Mas também ensina o ornamento e a sedução às mulheres — e o texto diz que isto corrompeu a pureza dos homens. Há uma misoginia óbvia nesta narrativa que não deve ser ignorada. Mas há também algo mais subtil: o texto distingue entre conhecimento que serve a vida e conhecimento que serve a morte. A astrologia, a medicina, a alquimia — em si mesmas não são más. O que as torna destruidoras é serem transmitidas </text:span><text:span text:style-name="Strong_20_Emphasis"><text:span text:style-name="T1">fora do tempo e sem a preparação adequada</text:span></text:span><text:span text:style-name="T1"> do receptor.</text:span></text:p>
      <text:p text:style-name="P2">Reconheces aqui exatamente o que o Livro dos Jubileus disse — e o que a Pistis Sophia disse sobre a diferença entre almas pneumáticas e psíquicas. O conhecimento sem maturidade espiritual não é libertação — é destruição.</text:p>
      <text:p text:style-name="P12"/>
      <text:h text:style-name="P11" text:outline-level="2">PARTE III — AS VIAGENS DE ENOQUE: OS MUNDOS QUE EXISTEM</text:h>
      <text:p text:style-name="P6"><text:span text:style-name="T1">Os clamores dos humanos chegam ao céu e os quatro grandes anjos — </text:span><text:span text:style-name="Strong_20_Emphasis"><text:span text:style-name="T1">Miguel, Sariel, Rafael e Gabriel</text:span></text:span><text:span text:style-name="T1"> — ouvem-nos e apresentam-nos diante do Deus supremo.</text:span></text:p>
      <text:p text:style-name="P2">Deus ordena então a estes quatro que tomem a<text:span text:style-name="T8">c</text:span>ção. Rafael deve ligar Azazel e lançá-lo num buraco na terra. Gabriel deve destruir os filhos dos anjos. Miguel deve ligar Semyaza e os outros anjos até ao dia do julgamento. E o dilúvio virá purificar a terra.</text:p>
      <text:p text:style-name="P2">Mas antes de tudo isto acontecer, os Vigilantes pedem a Enoque — o único humano justo — que interceda por eles junto de Deus. Enoque aceita. Lê as suas súplicas. Medita sobre elas. E então começa a sua jornada extraordinária.</text:p>
      <text:p text:style-name="P6"><text:span text:style-name="Strong_20_Emphasis"><text:span text:style-name="T1">Enoque é levado pelos ventos</text:span></text:span><text:span text:style-name="T1">. Sobe aos céus. Atravessa camadas de realidade que nenhum humano havia atravessado. E o que vê é descrito com uma riqueza de detalhes que não tem paralelo em nenhum outro texto apócrifo.</text:span></text:p>
      <text:p text:style-name="P6"><text:soft-page-break/><text:span text:style-name="T1">Vê a </text:span><text:span text:style-name="Strong_20_Emphasis"><text:span text:style-name="T1">casa de cristal</text:span></text:span><text:span text:style-name="T1"> — cujas paredes são de chamas vivas, cujo chão é de fogo, cujo tecto é de relâmpagos. É a morada do grande julgamento.</text:span></text:p>
      <text:p text:style-name="P6"><text:span text:style-name="T1">Vê uma </text:span><text:span text:style-name="Strong_20_Emphasis"><text:span text:style-name="T1">casa ainda maior dentro da primeira</text:span></text:span><text:span text:style-name="T1"> — cujo esplendor e glória não podem ser descritos. E dentro desta casa segunda está o trono de Deus — alto, glorioso, cujas rodas são como o sol brilhante, de donde emanam rios de fogo ardente.</text:span></text:p>
      <text:p text:style-name="P2">Deus fala a Enoque e diz-lhe que os Vigilantes não serão perdoados. A sua súplica não será aceite. Eles desceram ao mundo por vontade própria, corromperam-se por vontade própria, e os seus filhos destruíram a terra. O julgamento é definitivo.</text:p>
      <text:p text:style-name="P12"/>
      <text:h text:style-name="P14" text:outline-level="3">🔍 Exegese</text:h>
      <text:p text:style-name="P2">As viagens de Enoque aos céus são o elemento que mais dire<text:span text:style-name="T8">i</text:span>tamente influenciou toda a literatura apocalíptica subsequente — desde o Apocalipse de João canônico até aos textos gnósticos de Nag Hammadi, desde o Talmude babilônico até à Divina Comédia de Dante.</text:p>
      <text:p text:style-name="P6"><text:span text:style-name="T1">A </text:span><text:span text:style-name="Strong_20_Emphasis"><text:span text:style-name="T1">casa de cristal com paredes de chamas</text:span></text:span><text:span text:style-name="T1"> é uma das imagens mais poderosas de toda a literatura religiosa antiga. É simultaneamente aterrorizante e gloriosa — e esta combinação é essencial. O divino não é apenas belo. É avassalador. É o que Rudolf Otto chamaria de </text:span><text:span text:style-name="Emphasis"><text:span text:style-name="T1">numinoso</text:span></text:span><text:span text:style-name="T1"> — a experiência do sagrado como algo simultaneamente fascinante e aterrorizante.</text:span></text:p>
      <text:p text:style-name="P6"><text:span text:style-name="T1">A estrutura das </text:span><text:span text:style-name="Strong_20_Emphasis"><text:span text:style-name="T1">duas casas</text:span></text:span><text:span text:style-name="T1"> — uma dentro da outra — é a primeira descrição elaborada dos céus múltiplos que dominará toda a cosmologia apocalíptica e gnóstica. Não há um só céu. Há camadas de realidade espiritual, cada uma mais intensa do que a anterior, cada uma mais próxima da fonte luminosa que está além de todas elas.</text:span></text:p>
      <text:p text:style-name="P2">A recusa de Deus em perdoar os Vigilantes é teologicamente importante. O 1º Livro de Enoque não é um texto de misericórdia fácil. Há actos — a corrupção deliberada de seres que deveriam ser guardiões — que têm consequências cósmicas irreversíveis. Esta visão de uma justiça cósmica rigorosa distingue o Livro de Enoque da soteriologia gnóstica, que tende a ver todos os aprisionamentos como corrigíveis através da gnose.</text:p>
      <text:p text:style-name="P12"/>
      <text:h text:style-name="P11" text:outline-level="2">PARTE IV — A GEOGRAFIA DO ALÉM: OS LUGARES DA TERRA E DO CÉU</text:h>
      <text:p text:style-name="P2">Enoque continua a sua viagem e descreve o que vê com uma precisão que parece quase cartográfica. A terra, para o autor do Livro de Enoque, não é apenas o espaço físico que conhecemos — é um território espiritual habitado por presenças que os humanos comuns não conseguem ver.</text:p>
      <text:p text:style-name="P6"><text:span text:style-name="T1">Vê o </text:span><text:span text:style-name="Strong_20_Emphasis"><text:span text:style-name="T1">lugar onde os espíritos dos mortos esperam</text:span></text:span><text:span text:style-name="T1"> — dividido em compartimentos diferentes. Há um compartimento para os justos — onde há uma fonte de água luminosa. Há compartimentos para os que morreram sem receber justiça, para os que morreram em pecado e sabem que serão punidos, e para os que fizeram o mal e não sofrerão mais — porque já foram punidos em vida.</text:span></text:p>
      <text:p text:style-name="P6"><text:span text:style-name="T1">Vê a </text:span><text:span text:style-name="Strong_20_Emphasis"><text:span text:style-name="T1">árvore da fragrância</text:span></text:span><text:span text:style-name="T1"> — uma árvore cuja fragrância é incomparável, cujo fruto é como cachos de tâmaras, cujas folhas são como as do carvalho. E um anjo diz-lhe que esta árvore não será tocada por nenhum mortal até ao grande julgamento — mas depois disso será dada aos justos, e os seus frutos darão vida.</text:span></text:p>
      <text:p text:style-name="P6"><text:soft-page-break/><text:span text:style-name="T1">Vê o </text:span><text:span text:style-name="Strong_20_Emphasis"><text:span text:style-name="T1">lugar onde as estrelas erram</text:span></text:span><text:span text:style-name="T1"> — estrelas que não seguiram os seus mandamentos, que pararam nas suas órbitas quando não deviam. Estão aprisionadas aqui, como os Vigilantes. São estrelas que desobedeceram à ordem cósmica.</text:span></text:p>
      <text:p text:style-name="P6"><text:span text:style-name="T1">Vê o </text:span><text:span text:style-name="Strong_20_Emphasis"><text:span text:style-name="T1">fim da terra</text:span></text:span><text:span text:style-name="T1"> onde o abismo se abre — e o abismo não tem fundo. É o lugar onde o céu e a terra se encontram. É o horizonte cósmico.</text:span></text:p>
      <text:p text:style-name="P12"/>
      <text:h text:style-name="P14" text:outline-level="3">🔍 Exegese</text:h>
      <text:p text:style-name="P2">A geografia espiritual do 1º Livro de Enoque é uma das primeiras tentativas sistemáticas da literatura hebraica de descrever o além — e é de uma riqueza que poucos textos posteriores igualaram.</text:p>
      <text:p text:style-name="P6"><text:span text:style-name="T1">A </text:span><text:span text:style-name="Strong_20_Emphasis"><text:span text:style-name="T1">divisão dos mortos em compartimentos</text:span></text:span><text:span text:style-name="T1"> é teologicamente revolucionária dentro do judaísmo da época. O judaísmo clássico tem uma visão relativamente indistinta do Sheol — o lugar dos mortos é simplesmente o lugar dos mortos, sem grandes distinções de destino. O Livro de Enoque introduz uma diferenciação que antecipa direitamente a doutrina cristã do Purgatório, do Paraíso e do Inferno.</text:span></text:p>
      <text:p text:style-name="P6"><text:span text:style-name="T1">Mas o que é mais interessante é a lógica da diferenciação. Não é simplesmente bons versus maus. É uma distinção entre </text:span><text:span text:style-name="Strong_20_Emphasis"><text:span text:style-name="T1">tipos de experiência espiritual</text:span></text:span><text:span text:style-name="T1"> — os que receberam justiça em vida estão num lugar, os que não a receberam estão noutro, os que fizeram o mal mas já sofreram estão num terceiro. É uma cartografia moral de uma complexidade que a tradição posterior raramente igualou.</text:span></text:p>
      <text:p text:style-name="P6"><text:span text:style-name="T1">As </text:span><text:span text:style-name="Strong_20_Emphasis"><text:span text:style-name="T1">estrelas que desobedeceram</text:span></text:span><text:span text:style-name="T1"> são um detalhe aparentemente menor mas filosoficamente rico. No Livro de Enoque, a ordem cósmica não é apenas física — é moral. As estrelas têm mandamentos. O cosmos tem uma lei. Quando essa lei é violada — seja por anjos, seja por estrelas — há consequências. Esta visão de um universo moralmente ordenado é exatamente a visão que o gnosticismo vai subverter: para os gnósticos, a ordem cósmica não é expressão do bem mas aprisionamento fabricado pelo Demiurgo.</text:span></text:p>
      <text:p text:style-name="P12"/>
      <text:h text:style-name="P11" text:outline-level="2">PARTE V — O LIVRO DAS PARÁBOLAS: O FILHO DO HOMEM</text:h>
      <text:p text:style-name="P2">A segunda secção do 1º Livro de Enoque — o Livro das Parábolas — é a mais importante para compreender o Novo Testamento e o mais misterioso de todos os textos apócrifos judaicos.</text:p>
      <text:p text:style-name="P2">Enoque recebe três parábolas em visão. Na primeira vê o trono de Deus e os anjos que o rodeiam. Na segunda e na terceira — que nos interessam mais — recebe uma revelação que vai muito além do que qualquer profeta hebraico havia recebido.</text:p>
      <text:p text:style-name="P6"><text:span text:style-name="T1">Vê alguém cujo </text:span><text:span text:style-name="Strong_20_Emphasis"><text:span text:style-name="T1">rosto era como o sol</text:span></text:span><text:span text:style-name="T1">, cujos olhos eram como lâmpadas de fogo, cujos lábios transbordavam de bênção, cujas vestes eram como espuma de neve. E pergunta ao anjo que o acompanha: quem é este? O anjo responde:</text:span></text:p>
      <text:p text:style-name="P6"><text:span text:style-name="Emphasis"><text:span text:style-name="T1">"Este é o Filho do Homem a quem pertence a justiça, com quem a justiça habita, e que revelará todos os tesouros do escondido, porque o Senhor dos Espíritos o escolheu, e o seu destino supera todos os outros perante o Senhor dos Espíritos na retidão eterna."</text:span></text:span></text:p>
      <text:p text:style-name="P6"><text:soft-page-break/><text:span text:style-name="T1">O Filho do Homem existia </text:span><text:span text:style-name="Strong_20_Emphasis"><text:span text:style-name="T1">antes da criação do mundo</text:span></text:span><text:span text:style-name="T1">. O seu nome foi pronunciado antes que o sol e as estrelas fossem criados. Está escondido — mas será revelado aos eleitos. E quando for revelado, os reis e os poderosos da terra cair-se-ão de joelhos diante dele.</text:span></text:p>
      <text:p text:style-name="P6"><text:span text:style-name="T1">E então Enoque recebe a revelação mais perturbadora de todo o texto: </text:span><text:span text:style-name="Strong_20_Emphasis"><text:span text:style-name="T1">ele próprio é o Filho do Homem</text:span></text:span><text:span text:style-name="T1">. Na visão final, o anjo Miguel pega nele e diz-lhe: </text:span><text:span text:style-name="Emphasis"><text:span text:style-name="T1">"Tu és o Filho do Homem que nasceu para a retidão."</text:span></text:span></text:p>
      <text:p text:style-name="P12"/>
      <text:h text:style-name="P14" text:outline-level="3">🔍 Exegese</text:h>
      <text:p text:style-name="P2">O Livro das Parábolas é o texto que mais direitamente ilumina o uso da expressão "Filho do Homem" nos Evangelhos — e é também o texto que mais radicalmente questiona as interpretações tradicionais dessa expressão.</text:p>
      <text:p text:style-name="P2">No Evangelho de Marcos, Jesus refere-se a si mesmo como "Filho do Homem" dezassete vezes. Os estudiosos sempre debateram o que esta expressão significa — é simplesmente "ser humano"? É um título messiânico? É uma referência a Daniel 7? O Livro de Enoque mostra que é mais do que tudo isso.</text:p>
      <text:p text:style-name="P6"><text:span text:style-name="T1">O Filho do Homem do Livro de Enoque é uma </text:span><text:span text:style-name="Strong_20_Emphasis"><text:span text:style-name="T1">figura pré-existente</text:span></text:span><text:span text:style-name="T1"> — existia antes da criação. É escondido — não é imediatamente reconhecível. É o portador de toda a justiça do cosmos. E — o elemento mais perturbador — </text:span><text:span text:style-name="Strong_20_Emphasis"><text:span text:style-name="T1">é identificado com Enoque</text:span></text:span><text:span text:style-name="T1">, um ser humano que ascendeu a uma condição divina.</text:span></text:p>
      <text:p text:style-name="P2">Esta identificação é de uma audácia teológica que não tem paralelo no judaísmo da época. Um humano — não um anjo, não uma emanação divina, mas um homem que caminhou na terra — é idêntico à figura cósmica que existia antes da criação. A fronteira entre humano e divino dissolve-se completamente.</text:p>
      <text:p text:style-name="P6"><text:span text:style-name="T1">Reconheces aqui a estrutura fundamental de toda a gnose que estudamos. O Apócrifo de João diz que dentro de cada ser humano existe uma faísca do Homem Primordial — do ser de luz que existia antes da criação. O Livro de Enoque diz o mesmo de outra forma: um ser humano específico, através de uma jornada espiritual extraordinária, </text:span><text:span text:style-name="Strong_20_Emphasis"><text:span text:style-name="T1">descobre que é</text:span></text:span><text:span text:style-name="T1"> a figura cósmica que sempre procurou.</text:span></text:p>
      <text:p text:style-name="P2">A gnose não é encontrar algo de fora. É reconhecer o que sempre se foi.</text:p>
      <text:p text:style-name="P12"/>
      <text:h text:style-name="P11" text:outline-level="2">PARTE VI — O LIVRO DA ASTRONOMIA: O COSMOS COMO REVELAÇÃO</text:h>
      <text:p text:style-name="P2">A terceira secção do 1º Livro de Enoque é tecnicamente a mais árida — mas filosoficamente uma das mais importantes.</text:p>
      <text:p text:style-name="P6"><text:span text:style-name="T1">O anjo </text:span><text:span text:style-name="Strong_20_Emphasis"><text:span text:style-name="T1">Uriel</text:span></text:span><text:span text:style-name="T1"> guia Enoque através da estrutura do cosmos. Mostra-lhe as doze portas por onde o sol entra e sai ao longo do ano. Mostra-lhe as câmaras dos ventos. Mostra-lhe a câmara do granizo e da neve. Mostra-lhe como a lua recebe a sua luz do sol e a distribui em ciclos de trinta dias.</text:span></text:p>
      <text:p text:style-name="P6"><text:soft-page-break/><text:span text:style-name="T1">E insiste, repetidamente, no mesmo argumento: existe um </text:span><text:span text:style-name="Strong_20_Emphasis"><text:span text:style-name="T1">calendário correto</text:span></text:span><text:span text:style-name="T1"> — o calendário solar de 364 dias. E existe um calendário errado — o calendário lunar. Usar o calendário errado é uma forma de desobediência cósmica — é não reconhecer a ordem que Deus imprimiu no cosmos.</text:span></text:p>
      <text:p text:style-name="P6"><text:span text:style-name="T1">O texto diz: </text:span><text:span text:style-name="Emphasis"><text:span text:style-name="T1">"No ano de trezentos e sessenta e quatro dias a criação do mundo fica completa."</text:span></text:span></text:p>
      <text:p text:style-name="P12"/>
      <text:h text:style-name="P14" text:outline-level="3">🔍 Exegese</text:h>
      <text:p text:style-name="P2">O Livro da Astronomia é o elo que liga o 1º Livro de Enoque ao Livro dos Jubileus que estudamos no capítulo anterior. Ambos defendem o calendário solar de 364 dias como revelação divina. Ambos vêm o uso do calendário lunar como uma corrupção introduzida por forças que não servem o bem.</text:p>
      <text:p text:style-name="P6"><text:span text:style-name="T1">Mas o Livro de Enoque vai mais longe do que o Livro dos Jubileus na sua justificação. Não se limita a dizer que o calendário solar foi revelado a Moisés no monte Sinai. Mostra Enoque a </text:span><text:span text:style-name="Strong_20_Emphasis"><text:span text:style-name="T1">ver dire</text:span></text:span><text:span text:style-name="Strong_20_Emphasis"><text:span text:style-name="T9">i</text:span></text:span><text:span text:style-name="Strong_20_Emphasis"><text:span text:style-name="T1">tamente a mecânica cósmica</text:span></text:span><text:span text:style-name="T1"> que fundamenta o calendário. O sol entra por portais específicos em dias específicos. Os seus movimentos são regulados por leis precisas. O calendário não é uma convenção humana — é a expressão direita da ordem que Deus imprimiu no cosmos.</text:span></text:p>
      <text:p text:style-name="P6"><text:span text:style-name="T1">Esta visão do cosmos como </text:span><text:span text:style-name="Strong_20_Emphasis"><text:span text:style-name="T1">texto legível</text:span></text:span><text:span text:style-name="T1"> — como uma ordem que pode ser conhecida e que quando conhecida revela a vontade divina — é uma das ideias mais fecundas de toda a literatura apócrifa. É a ideia que fundamenta tanto a astrologia como a astronomia da antiguidade, tanto a cabala como o hermetismo, tanto a gnose como a mística judaica.</text:span></text:p>
      <text:p text:style-name="P2">O cosmos fala. A questão é saber ler.</text:p>
      <text:p text:style-name="P12"/>
      <text:h text:style-name="P11" text:outline-level="2">PARTE VII — O LIVRO DOS SONHOS: A HISTÓRIA DO MUNDO EM VISÃO</text:h>
      <text:p text:style-name="P6"><text:span text:style-name="T1">Na quarta secção Enoque recebe duas visões proféticas. A segunda — conhecida como a </text:span><text:span text:style-name="Strong_20_Emphasis"><text:span text:style-name="T1">Apocalipse dos Animais</text:span></text:span><text:span text:style-name="T1"> — é uma das alegorias mais elaboradas de toda a literatura apocalíptica.</text:span></text:p>
      <text:p text:style-name="P2">Toda a história da humanidade desde Adão até ao tempo do autor é narrada usando animais como personagens. Adão é um touro branco. Caim e Abel são touros — um negro, um vermelho. Os Vigilantes são estrelas que descem do céu. Os Nefilim são elefantes, camelos e asnos. Noé é um touro branco. Abraão, Isaac e Jacob são touros. Os filhos de Jacob são ovelhas. O Egipto é um lobo. Moisés é uma ovelha. Os povos inimigos de Israel são leões, tigres, águias, corvos.</text:p>
      <text:p text:style-name="P2">E no fim desta visão algo extraordinário acontece: nasce um touro branco — como Adão era no princípio. E todos os animais selvagens e todas as aves do céu temem-no e suplicam-lhe. E o Senhor dos Espíritos alegra-se.</text:p>
      <text:p text:style-name="P12"/>
      <text:h text:style-name="P14" text:outline-level="3">🔍 Exegese</text:h>
      <text:p text:style-name="P2">A Apocalipse dos Animais é uma obra-prima de literatura cifrada — e o seu sistema de cifra é tão elaborado que décadas de estudo acadêmico ainda não esgotaram todas as suas correspondências.</text:p>
      <text:p text:style-name="P6"><text:span text:style-name="T1">O que interessa do ponto de vista da nossa jornada é a </text:span><text:span text:style-name="Strong_20_Emphasis"><text:span text:style-name="T1">estrutura circular</text:span></text:span><text:span text:style-name="T1"> da visão. A história começa com um touro branco — Adão, o ser humano original na sua pureza — e termina com o </text:span><text:soft-page-break/><text:span text:style-name="T1">nascimento de um novo touro branco. A história não é linear — é cíclica. O fim é o regresso ao princípio. A redenção não é a chegada a um estado novo mas o regresso ao estado original.</text:span></text:p>
      <text:p text:style-name="P6"><text:span text:style-name="T1">Esta estrutura é exatamente a estrutura da soteriologia gnóstica: a alma desceu de um estado de luz, foi aprisionada na matéria, e o objectivo é o regresso à luz original. Não uma progressão para algo novo mas uma </text:span><text:span text:style-name="Strong_20_Emphasis"><text:span text:style-name="T1">anamnese</text:span></text:span><text:span text:style-name="T1"> — um des-esquecimento do que sempre se foi.</text:span></text:p>
      <text:p text:style-name="P2">O touro branco que nasce no fim e que todos os animais temem e respeitam é interpretado de formas diferentes pelos estudiosos — alguns vêem nele o Messias, outros uma figura de restauração cósmica. Mas o que é claro é o seu significado simbólico: é o Homem Primordial que regressa, o Adão original, a humanidade que volta a ser o que foi antes da queda.</text:p>
      <text:p text:style-name="P12"/>
      <text:h text:style-name="P40" text:outline-level="2">PARTE VIII — A EPÍSTOLA DE ENOQUE: O ENSINAMENTO FINAL</text:h>
      <text:p text:style-name="P2">A quinta e última secção é o testamento espiritual de Enoque — os ensinamentos que ele transmite aos seus filhos e, através deles, a todas as gerações que se seguirão.</text:p>
      <text:p text:style-name="P2">O tom muda completamente aqui. Não há mais visões de mundos celestiais, não há mais viagens pelos confins da terra. Há uma voz de ancião que fala dire<text:span text:style-name="T10">ita</text:span>mente, com uma clareza e uma urgência que os capítulos anteriores não tinham.</text:p>
      <text:p text:style-name="P6"><text:span text:style-name="T1">Enoque fala dos </text:span><text:span text:style-name="Strong_20_Emphasis"><text:span text:style-name="T1">dois caminhos</text:span></text:span><text:span text:style-name="T1"> que existem para cada alma: o caminho da luz e o caminho das trevas. Os que seguem o caminho da luz são chamados os justos — não porque sejam perfeitos mas porque orientam consistentemente a sua existência para o bem. Os que seguem o caminho das trevas são os pecadores — não porque façam o mal ocasionalmente mas porque a sua orientação fundamental é para o interesse próprio, para o poder, para a acumulação.</text:span></text:p>
      <text:p text:style-name="P6"><text:span text:style-name="T1">E então Enoque lança uma série de </text:span><text:span text:style-name="Strong_20_Emphasis"><text:span text:style-name="T1">"Ai de vós"</text:span></text:span><text:span text:style-name="T1"> — maldições proféticas — contra os poderosos da terra:</text:span></text:p>
      <text:p text:style-name="P6"><text:span text:style-name="Emphasis"><text:span text:style-name="T1">"Ai de vós que adquiristes prata e ouro na injustiça — no último dia do vosso juízo os vossos tesouros serão consumidos diante de vós."</text:span></text:span></text:p>
      <text:p text:style-name="P6"><text:span text:style-name="Emphasis"><text:span text:style-name="T1">"Ai de vós que construístes as vossas casas com o suor dos outros — cada pedra e cada tijolo é pecado."</text:span></text:span></text:p>
      <text:p text:style-name="P6"><text:span text:style-name="Emphasis"><text:span text:style-name="T1">"Ai de vós que mudais a medida e o peso — não tereis paz."</text:span></text:span></text:p>
      <text:p text:style-name="P6"><text:span text:style-name="T1">E depois fala dos </text:span><text:span text:style-name="Strong_20_Emphasis"><text:span text:style-name="T1">justos que sofrem</text:span></text:span><text:span text:style-name="T1"> — daqueles que são oprimidos no mundo mas que o Enoque celestial vê protegidos por uma realidade que o mundo não percebe. A sua recompensa não está no mundo material. Está no que o texto chama simplesmente </text:span><text:span text:style-name="Strong_20_Emphasis"><text:span text:style-name="T1">"a vida"</text:span></text:span><text:span text:style-name="T1"> — uma existência que transcende a morte física e que a injustiça do mundo não pode alcançar.</text:span></text:p>
      <text:p text:style-name="P12"/>
      <text:h text:style-name="P14" text:outline-level="3">🔍 Exegese</text:h>
      <text:p text:style-name="P2">A Epístola de Enoque é o texto do 1º Livro de Enoque que mais direitamente influenciou o Novo Testamento — e especificamente o discurso de Jesus sobre os ricos e os pobres no Evangelho de Lucas. Os "Ai de vós" de Enoque são o modelo direito dos "Ai de vós" de Jesus no sermão da planície.</text:p>
      <text:p text:style-name="P6"><text:soft-page-break/><text:span text:style-name="T1">Mas o que interessa do ponto de vista da nossa jornada é a </text:span><text:span text:style-name="Strong_20_Emphasis"><text:span text:style-name="T1">doutrina dos dois caminhos</text:span></text:span><text:span text:style-name="T1">. É uma simplificação — inevitável num texto que fala a uma audiência mais vasta do que os textos esotéricos que estudamos. Mas é uma simplificação que captura algo essencial: há uma orientação fundamental de cada consciência — para a luz ou para as trevas, para o outro ou para si mesmo, para o ser ou para o ter.</text:span></text:p>
      <text:p text:style-name="P6"><text:span text:style-name="T1">Esta orientação fundamental é exatamente o que os textos gnósticos chamam de </text:span><text:span text:style-name="Strong_20_Emphasis"><text:span text:style-name="T1">pneuma</text:span></text:span><text:span text:style-name="T1"> versus </text:span><text:span text:style-name="Strong_20_Emphasis"><text:span text:style-name="T1">hyle</text:span></text:span><text:span text:style-name="T1"> — espírito versus matéria. Não é uma questão de atos individuais mas de direção de vida. E é esta direção — não os atos individuais — que determina o destino da alma.</text:span></text:p>
      <text:p text:style-name="P2">Os "Ai de vós" contra os poderosos têm uma dimensão política que não deve ser suavizada. O 1º Livro<text:span text:style-name="T11"> de Enoque foi escrito numa época de grande opressão — sob os reis selêucidas helenizantes que destruíam a cultu</text:span>ra judaica. Os ricos que acumulam à custa dos outros, os que constroem com o suor alheio, os que manipulam as medidas e os pesos — são figuras históricas concretas. E Enoque não os perdoa. A misericórdia divina que o texto celebra não é indiferença à injustiça — é uma promessa de que a injustiça não terá a última palavra.</text:p>
      <text:p text:style-name="P12"/>
      <text:h text:style-name="P40" text:outline-level="2">PARTE IX — A INFLUÊNCIA: O QUE O LIVRO DE ENOQUE CRIOU</text:h>
      <text:p text:style-name="P2">Para compreender completamente a importância do 1º Livro de Enoque é necessário ver o que dele nasceu:</text:p>
      <text:p text:style-name="P6"><text:span text:style-name="Strong_20_Emphasis"><text:span text:style-name="T1">No Novo Testamento</text:span></text:span><text:span text:style-name="T1"> — Judas 14-15 cita o Livro de Enoque direitamente. O Apocalipse de João usa a sua imagética extensivamente — os sete selos, os quatro animais, o livro selado, os rios de fogo. A expressão "Filho do Homem" usada por Jesus tem o seu significado mais profundo no Livro das Parábolas de Enoque. A doutrina dos anjos caídos que Paulo menciona em 1 Coríntios 11 vem direitamente dos Vigilantes.</text:span></text:p>
      <text:p text:style-name="P6"><text:span text:style-name="Strong_20_Emphasis"><text:span text:style-name="T1">No Gnosticismo</text:span></text:span><text:span text:style-name="T1"> — Os Arcontes gnósticos são os Vigilantes de Enoque transformados e radicalizados. A descida dos anjos ao mundo material que os corrompe é a estrutura da queda de Sophia. A ideia de que o mundo foi corrompido por potências que desceram de uma realidade superior é enoquiana na sua origem.</text:span></text:p>
      <text:p text:style-name="P6"><text:span text:style-name="Strong_20_Emphasis"><text:span text:style-name="T1">Na Cabala</text:span></text:span><text:span text:style-name="T1"> — O livro dos Vigilantes influenciou profundamente a angelologia cabalística medieval. Os nomes dos anjos que aparecem no Zohar — Miguel, Rafael, Gabriel, Uriel, Sariel — vêm direitamente de Enoque.</text:span></text:p>
      <text:p text:style-name="P6"><text:span text:style-name="Strong_20_Emphasis"><text:span text:style-name="T1">Na Literatura Medieval Cristã</text:span></text:span><text:span text:style-name="T1"> — A geografia do além de Enoque — os compartimentos dos mortos, os tesouros celestes, as câmaras dos ventos — é o antecedente direito da Divina Comédia de Dante.</text:span></text:p>
      <text:p text:style-name="P6"><text:span text:style-name="Strong_20_Emphasis"><text:span text:style-name="T1">No Islamismo</text:span></text:span><text:span text:style-name="T1"> — O anjo Azazel, o anjo da morte do Islão, tem o seu antecedente em Azazel de Enoque. A ideia de anjos que podem cair e corromper-se está presente no Alcorão — e a sua fonte é enoquiana.</text:span></text:p>
      <text:p text:style-name="P12"/>
      <text:h text:style-name="P14" text:outline-level="3"><text:soft-page-break/>🔍 Exegese Final</text:h>
      <text:p text:style-name="P6"><text:span text:style-name="T1">O 1º Livro de Enoque é o texto que melhor demonstra algo que toda a nossa jornada tentou mostrar: </text:span><text:span text:style-name="Strong_20_Emphasis"><text:span text:style-name="T1">as fronteiras entre as tradições religiosas são muito mais porosas do que geralmente se admite</text:span></text:span><text:span text:style-name="T1">.</text:span></text:p>
      <text:p text:style-name="P2">O que começou como um texto judaico apócrifo do período do Segundo Templo tornou-se a fonte de onde beberam o Cristianismo, o Gnosticismo, o Islão, a Cabala e o ocultismo medieval. Cada tradição bebeu de formas diferentes, enfatizou aspectos diferentes, transformou o que recebeu de acordo com as suas próprias necessidades. Mas a fonte é a mesma.</text:p>
      <text:p text:style-name="P2">E o que esta fonte oferece é uma visão do cosmos que nenhum texto canônico oferece com a mesma completude: um universo habitado por hierarquias de seres espirituais que interagem com os humanos, no qual a fronteira entre o humano e o divino pode ser atravessada por quem está suficientemente purificado, no qual a história tem uma direção e um fim, no qual a injustiça não terá a última palavra.</text:p>
      <text:p text:style-name="P2">É uma visão que ressoa com tudo o que estudamos — desde o Apócrifo de João até ao Livro dos Jubileus. Porque no fundo é a mesma pergunta, feita de formas diferentes por textos de séculos e culturas diferentes:</text:p>
      <text:p text:style-name="P6"><text:span text:style-name="Strong_20_Emphasis"><text:span text:style-name="T1">Que é este mundo? E o que somos nós dentro dele?</text:span></text:span></text:p>
      <text:p text:style-name="P12"/>
      <text:h text:style-name="P40" text:outline-level="2">Síntese: O que o 1º Livro de Enoque acrescenta à nossa jornada</text:h>
      <text:p text:style-name="P6"><text:span text:style-name="T1">Os seis textos que percorremos anteriormente formavam um arco que ia da cosmogonia gnóstica até à tradição judaica. O 1º Livro de Enoque não se encaixa simplesmente nesse arco — </text:span><text:span text:style-name="Strong_20_Emphasis"><text:span text:style-name="T1">é a fonte de onde esse arco brotou</text:span></text:span><text:span text:style-name="T1">.</text:span></text:p>
      <text:p text:style-name="P2">É anterior ao gnosticismo. É anterior ao Cristianismo. É anterior à maioria dos textos apocalípticos judaicos. E no entanto contém já — em forma seminal — as ideias que todos esses movimentos irão desenvolver:</text:p>
      <text:p text:style-name="P2">A hierarquia dos mundos espirituais. A corrupção do cosmos por seres que deveriam ser seus guardiões. O ser humano como vítima de uma traição cósmica. O conhecimento como instrumento de libertação. O Filho do Homem como figura que une o humano e o divino. A possibilidade de ascensão para além da morte.</text:p>
      <text:p text:style-name="P2">Ler o 1º Livro de Enoque depois de ter lido os seis textos anteriores é como descobrir a raiz da árvore cujos ramos já conheces. Cada ideia que encontraste no Apócrifo de João, no Evangelho de Filipe, na Pistis Sophia — tem aqui o seu antecedente, a sua forma mais primitiva, a sua origem mais honesta.</text:p>
      <text:p text:style-name="P12"/>
      <text:p text:style-name="P42"><text:span text:style-name="T12"/></text:p>
      <text:p text:style-name="P2"/>
      <text:p text:style-name="P2"/>
      <text:p text:style-name="P2"/>
      <text:h text:style-name="P43" text:outline-level="1"><text:soft-page-break/>Evangelho de Judas — Reconstrução Interpretativa e Exegese Gnóstica</text:h>
      <text:p text:style-name="P44"/>
      <text:h text:style-name="P11" text:outline-level="2">INTRODUÇÃO: O TEXTO QUE ABALOU O MUNDO</text:h>
      <text:p text:style-name="P2">O Evangelho de Judas é o texto mais recente a entrar no estudo acadêmico sério dos apócrifos — e o que causou maior impacto mediático e teológico quando foi tornado público. A sua história de descoberta é em si mesma extraordinária.</text:p>
      <text:p text:style-name="P2">O manuscrito foi encontrado algures no Egipto por volta de <text:span text:style-name="Strong_20_Emphasis">1978</text:span> — provavelmente numa caverna perto de Minya, no Alto Egipto, a mesma região onde os textos de Nag Hammadi foram encontrados trinta anos antes. Durante quase trinta anos circulou no mercado negro de antiguidades, passando por mãos de negociantes no Cairo, em Genebra e em Nova Iorque. Foi comprado, vendido, roubado, recuperado. Esteve durante anos mal armazenado numa caixa de segurança num banco em Nova Iorque, onde o calor e a humidade inadequados causaram danos irreparáveis ao papiro.</text:p>
      <text:p text:style-name="P2">Em 2000, uma fundação suíça — a <text:span text:style-name="Strong_20_Emphasis">Maecenas Foundation</text:span> — adquiriu o manuscrito e entregou-o a uma equipa de especialistas para restauro e tradução. Em <text:span text:style-name="Strong_20_Emphasis">Abril de 2006</text:span>, a National Geographic Society publicou a tradução completa e revelou o seu conteúdo ao mundo. O impacto foi imediato e global.</text:p>
      <text:p text:style-name="P2">O manuscrito copta data do <text:span text:style-name="Strong_20_Emphasis">século IV</text:span> — mas o texto original grego é muito mais antigo. <text:span text:style-name="Strong_20_Emphasis">Irineu de Lyon</text:span>, escrevendo por volta de <text:span text:style-name="Strong_20_Emphasis">180 d.C.</text:span> no seu <text:span text:style-name="Emphasis">Contra as Heresias</text:span>, menciona explicitamente um "Evangelho de Judas" usado por um grupo gnóstico chamado os <text:span text:style-name="Strong_20_Emphasis">Caínitas</text:span> — que veneravam as figuras bíblicas geralmente condenadas: Caim, os habitantes de Sodoma, Esaú, e Judas Iscariotes.</text:p>
      <text:p text:style-name="P2">O texto que temos é portanto, com toda a probabilidade, aquele que Irineu conheceu e descreveu como herético há quase dois mil anos.</text:p>
      <text:p text:style-name="P12"/>
      <text:h text:style-name="P14" text:outline-level="3">🔍 Exegese Preliminar</text:h>
      <text:p text:style-name="P2">A história da descoberta e transmissão do Evangelho de Judas é ela própria uma parábola gnóstica. Um texto que subverte a narrativa do poder — que diz que o traidor era o mais iluminado — foi literalmente escondido, circulou em segredo, foi maltratado e quase destruído antes de ser finalmente revelado ao mundo. É como se o texto vivesse a sua própria mensagem.</text:p>
      <text:p text:style-name="P2">A existência deste texto era conhecida desde Irineu — mas era conhecida apenas como heresia condenada, não como texto vivo. Durante dezoito séculos soube-se que existira mas ninguém o leu. Quando finalmente emergiu, veio das entranhas da terra — como todas as verdades que o poder institucional tentou enterrar.</text:p>
      <text:p text:style-name="P12"/>
      <text:h text:style-name="P11" text:outline-level="2"><text:soft-page-break/>PARTE I — A CENA: JESUS A RIR</text:h>
      <text:p text:style-name="P2">O texto abre de uma forma que imediatamente desoriente qualquer leitor familiarizado com os Evangelhos canônicos. A data é precisa: é a <text:span text:style-name="Strong_20_Emphasis">semana antes da Páscoa</text:span>, em Judeia. Jesus aparece diante dos seus discípulos.</text:p>
      <text:p text:style-name="P2">Os discípulos estão reunidos e estão a fazer uma oração de acção de graças sobre o pão. Jesus observa-os. E então:</text:p>
      <text:p text:style-name="P2"><text:span text:style-name="Strong_20_Emphasis">Ri-se.</text:span></text:p>
      <text:p text:style-name="P2">Os discípulos perturbam-se com o riso. Perguntam-lhe: <text:span text:style-name="Emphasis">"Mestre, por que te ris da nossa oração de acção de graças? Fizemos o que era correcto."</text:span></text:p>
      <text:p text:style-name="P2">Jesus responde: <text:span text:style-name="Emphasis">"Não me rio de vós. Não sois vós que fazeis isto por vossa própria vontade — mas porque é através disto que o vosso Deus será louvado."</text:span></text:p>
      <text:p text:style-name="P2">Os discípulos perturbam-se ainda mais. Dizem: <text:span text:style-name="Emphasis">"Mestre, tu és o Filho do nosso Deus."</text:span></text:p>
      <text:p text:style-name="P2">Jesus responde: <text:span text:style-name="Emphasis">"Como sabeis isso? Em verdade vos digo — nenhuma geração dos homens que estão entre vós me conhecerá."</text:span></text:p>
      <text:p text:style-name="P12"/>
      <text:h text:style-name="P14" text:outline-level="3">🔍 Exegese</text:h>
      <text:p text:style-name="P2">O riso de Jesus é o gesto inaugural do texto — e é de uma carga simbólica imensa. Nos Evangelhos canônicos, Jesus nunca ri. Chora — no episódio de Lázaro. Fica indignado. Compadece-se. Mas não ri. O riso é uma ausência que os teólogos medievais comentaram abundantemente.</text:p>
      <text:p text:style-name="P2">No Evangelho de Judas, Jesus ri logo na primeira cena. E ri <text:span text:style-name="Strong_20_Emphasis">da oração dos seus próprios discípulos</text:span>. Este riso não é de desprezo — é o riso de quem vê uma ironia que os outros não percebem. Os discípulos estão a louvar o seu Deus — e Jesus sabe que o Deus que louvam não é o Deus verdadeiro. Estão a fazer exatamente o que fazem com toda a seriedade e toda a devoção — e estão completamente enganados sobre o objeto da sua devoção.</text:p>
      <text:p text:style-name="P2">A afirmação <text:span text:style-name="Emphasis">"nenhuma geração dos homens que estão entre vós me conhecerá"</text:span> é de uma severidade que contrasta radicalmente com os Evangelhos canônicos. Jesus não diz que os discípulos estão errados em detalhes — diz que não o conhecem fundamentalmente. A compreensão que têm dele é errada na sua raiz.</text:p>
      <text:p text:style-name="P12"/>
      <text:h text:style-name="P11" text:outline-level="2">PARTE II — A VISÃO DOS DISCÍPULOS: O TEMPLO E O SACERDÓCIO</text:h>
      <text:p text:style-name="P2">Na noite seguinte os discípulos têm uma visão. Quando Jesus os encontra na manhã seguinte, pergunta-lhes o que viram.</text:p>
      <text:p text:style-name="P2">Eles respondem que viram uma <text:span text:style-name="Strong_20_Emphasis">grande casa</text:span> — e nessa casa havia um altar grande, e doze homens que eram sacerdotes, e uma multidão que entrava e saía. Os doze sacerdotes sacrificavam crianças, mulheres, animais. Os sacrifícios eram apresentados diante do altar.</text:p>
      <text:p text:style-name="P2">Jesus pergunta-lhes: <text:span text:style-name="Emphasis">"Que tipo de pessoas são esses sacerdotes?"</text:span></text:p>
      <text:p text:style-name="P2"><text:soft-page-break/>Os discípulos respondem: <text:span text:style-name="Emphasis">"Alguns jejuam duas semanas. Outros sacrificam os seus próprios filhos. Outros as suas mulheres, louvando e humilhando-se entre si. Outros dormem com homens. Outros praticam assassínio. Outros praticam toda a sorte de pecados e actos ilícitos."</text:span></text:p>
      <text:p text:style-name="P2">Jesus diz então algo absolutamente devastador: <text:span text:style-name="Emphasis">"Sois vós os doze homens que vistes ao pé do altar. O vosso Deus que vós servis é esse deus — e os doze apóstolos que escolhestes são essas doze almas. O gado que vistes para o sacrifício — esses são a multidão que vós enganais diante desse altar."</text:span></text:p>
      <text:p text:style-name="P12"/>
      <text:h text:style-name="P14" text:outline-level="3">🔍 Exegese</text:h>
      <text:p text:style-name="P2">Esta passagem é provavelmente a mais perturbadora de todo o Evangelho de Judas — e uma das mais perturbadoras de toda a literatura apócrifa. Jesus está a dizer que os doze apóstolos são <text:span text:style-name="Strong_20_Emphasis">sacerdotes de um deus falso</text:span> que praticam sacrifícios que são na realidade violência disfarçada de devoção.</text:p>
      <text:p text:style-name="P2">A visão do templo com os seus sacrifícios sangrentos é uma crítica radical ao culto do templo judaico — mas mais do que isso, é uma crítica a toda a religiosidade institucional que se apresenta como serviço a Deus mas que na realidade serve o Demiurgo. O altar diante do qual os sacerdotes se prostram é o altar de Ialdabaoth — o deus falso, ignorante, ciumento.</text:p>
      <text:p text:style-name="P2">A identificação dos doze apóstolos com os sacerdotes que sacrificam crianças e mulheres é chocante mas tem uma lógica interna precisa dentro do sistema gnóstico. Os apóstolos pregam obediência a um deus que não é o Deus verdadeiro. As pessoas que convertem e que enviam para esse culto são, metaforicamente, sacrificadas — a sua centelha de luz é mantida aprisionada em vez de ser libertada.</text:p>
      <text:p text:style-name="P2">A Igreja institucional — que os doze apóstolos fundaram — é portanto, para o autor deste texto, não a instituição da salvação mas a instituição do aprisionamento. É a estrutura através da qual o Demiurgo mantém as almas sob o seu controlo.</text:p>
      <text:p text:style-name="P12"/>
      <text:h text:style-name="P11" text:outline-level="2">PARTE III — JUDAS: O ÚNICO QUE SABE</text:h>
      <text:p text:style-name="P2">Separado da cena dos doze, Judas aproxima-se de Jesus sozinho. E diz algo que os outros não disseram:</text:p>
      <text:p text:style-name="P2"><text:span text:style-name="Emphasis">"Sei quem és e de onde vieste. Vieste do reino imortal de Barbelo. E eu não sou digno de pronunciar o nome daquele que te enviou."</text:span></text:p>
      <text:p text:style-name="P2">Jesus reage de forma completamente diferente do que reagiu aos outros discípulos. Olha para Judas, sorri — não ri da sua ignorância mas sorri do seu reconhecimento — e diz:</text:p>
      <text:p text:style-name="P2"><text:span text:style-name="Emphasis">"Afasta-te dos outros e eu dir-te-ei os mistérios do reino. E é possível ires lá — mas sofrerás muito."</text:span></text:p>
      <text:p text:style-name="P12"/>
      <text:h text:style-name="P14" text:outline-level="3">🔍 Exegese</text:h>
      <text:p text:style-name="P2">Este é o momento pivô de todo o texto. Judas nomeia corretamente a origem de Jesus — <text:span text:style-name="Strong_20_Emphasis">Barbelo</text:span>, a Mãe Divina, o primeiro pensamento do Pai que já conhecemos do Apócrifo de João. Nenhum dos <text:soft-page-break/>outros doze disse nada semelhante. Pedro, no Evangelho de Marcos, diz que Jesus é o Cristo — o Messias. Mas "Cristo" e "Messias" são títulos dentro do sistema religioso judaico, dentro do mundo do Demiurgo. Barbelo pertence ao Pleroma — ao mundo que está além do mundo do Demiurgo.</text:p>
      <text:p text:style-name="P2">Judas tem conhecimento que os outros não têm. E esse conhecimento — esse reconhecimento da verdadeira origem de Jesus — é o que o distingue fundamentalmente dos outros doze.</text:p>
      <text:p text:style-name="P2">A advertência de Jesus — <text:span text:style-name="Emphasis">"sofrerás muito"</text:span> — é ao mesmo tempo uma promessa e uma condenação. Judas irá para o reino imortal. Mas o preço será o sofrimento que virá da sua acção — a traição que o mundo chamará traição mas que este texto vai revelar como o acto de maior fidelidade e maior compreensão.</text:p>
      <text:p text:style-name="P12"/>
      <text:h text:style-name="P11" text:outline-level="2">PARTE IV — A COSMOLOGIA: O UNIVERSO SEGUNDO JUDAS</text:h>
      <text:p text:style-name="P2">Jesus revela então a Judas a estrutura completa do universo — uma cosmologia que tem pontos de contacto com o Apócrifo de João mas que tem características próprias e distintas.</text:p>
      <text:p text:style-name="P2">No princípio existe um <text:span text:style-name="Strong_20_Emphasis">Espírito Invisível e Incorruptível</text:span> — cujo nome nenhuma geração angelical pode pronunciar. Deste Espírito emergiu uma <text:span text:style-name="Strong_20_Emphasis">nuvem de luz luminosa</text:span> — e do centro dessa nuvem emergiu <text:span text:style-name="Strong_20_Emphasis">Adamas</text:span>, o Homem Primordial de luz.</text:p>
      <text:p text:style-name="P2">Adamas criou então doze <text:span text:style-name="Strong_20_Emphasis">luminares</text:span> — anjos que governam os mundos espirituais. Cada luminar criou seis anjos. E estes anjos criaram os <text:span text:style-name="Strong_20_Emphasis">72 céus</text:span> e os <text:span text:style-name="Strong_20_Emphasis">360 firmamentos</text:span> que constituem a estrutura do cosmos espiritual.</text:p>
      <text:p text:style-name="P2">Mas então houve uma separação. Da nuvem luminosa emergiu também o <text:span text:style-name="Strong_20_Emphasis">Deus dos Deuses</text:span> — Saklas — que com o seu anjo Nebro criou o mundo material. Saklas disse aos seus anjos: <text:span text:style-name="Emphasis">"Vamos criar um ser humano à imagem."</text:span> E criaram os seres humanos.</text:p>
      <text:p text:style-name="P2">Jesus diz então a Judas algo fundamental: <text:span text:style-name="Emphasis">"Cada um de vós tem o seu próprio astro."</text:span> Os seres humanos comuns estão ligados às estrelas que governam o destino material — às esferas dos Arcontes. Mas Judas — Jesus diz-lhe direitamente:</text:p>
      <text:p text:style-name="P2"><text:span text:style-name="Emphasis">"Tu superarás todos eles. Pois sacrificarás o homem que me veste."</text:span></text:p>
      <text:p text:style-name="P12"/>
      <text:h text:style-name="P14" text:outline-level="3">🔍 Exegese</text:h>
      <text:p text:style-name="P2">A cosmologia do Evangelho de Judas é uma variante do sistema gnóstico setiano que já conhecemos do Apócrifo de João — mas com diferenças significativas que revelam a diversidade interna do pensamento gnóstico.</text:p>
      <text:p text:style-name="P2">A estrutura dos <text:span text:style-name="Strong_20_Emphasis">72 céus</text:span> e <text:span text:style-name="Strong_20_Emphasis">360 firmamentos</text:span> é extraordinariamente elaborada — e o número não é arbitrário. 72 é o número dos povos da terra segundo a tradição judaica, e também o número dos discípulos que Jesus envia em missão no Evangelho de Lucas. 360 é o número dos dias do calendário que o Livro de Enoque e o Livro dos Jubileus criticam como incompleto. O cosmos gnóstico do Evangelho de Judas é construído sobre os mesmos números que estruturam o cosmos da tradição que critica.</text:p>
      <text:p text:style-name="P2"><text:soft-page-break/>A frase <text:span text:style-name="Emphasis">"cada um de vós tem o seu próprio astro"</text:span> é a expressão do determinismo gnóstico — cada alma está ligada a uma esfera cósmica que determina o seu destino material. Mas Judas tem um astro diferente — um astro que o coloca acima dos outros doze. O seu destino não é o mesmo que o deles.</text:p>
      <text:p text:style-name="P2">A expressão <text:span text:style-name="Emphasis">"sacrificarás o homem que me veste"</text:span> é a chave de toda a teologia do texto. O corpo de Jesus é descrito como uma <text:span text:style-name="Strong_20_Emphasis">veste</text:span> — algo que o ser espiritual interior usa temporariamente mas que não é idêntico ao ser espiritual. Judas não vai trair Jesus — vai <text:span text:style-name="Strong_20_Emphasis">libertar</text:span> o ser espiritual que habita o corpo de Jesus, entregando o corpo ao sacrifício que o mundo compreende como morte mas que é na realidade a dissolução da veste que já não é necessária.</text:p>
      <text:p text:style-name="P12"/>
      <text:h text:style-name="P11" text:outline-level="2">PARTE V — A GERAÇÃO SANTA: OS QUE ESCAPAM AO DEUS DO MUNDO</text:h>
      <text:p text:style-name="P2">Jesus revela a Judas a existência de uma <text:span text:style-name="Strong_20_Emphasis">geração santa</text:span> — um grupo de almas que não pertence a este mundo, que não obedece ao Deus deste mundo, que está destinada a um reino que está além de todos os reinos materiais.</text:p>
      <text:p text:style-name="P2">Esta geração santa não pode ser atingida por Saklas nem pelos seus anjos. A sua origem é o Pleroma — o mundo da luz — e para o Pleroma irá regressar.</text:p>
      <text:p text:style-name="P2">Jesus diz: <text:span text:style-name="Emphasis">"Vieste para servir e serás maldito pelas outras gerações — mas dominarás sobre elas. Nos últimos dias eles amaldiçoarão a tua ascensão ao geração santa."</text:span></text:p>
      <text:p text:style-name="P2">E depois diz as palavras que sintetizam toda a sua visão de Judas:</text:p>
      <text:p text:style-name="P2"><text:span text:style-name="Emphasis">"Levanta os teus olhos e vê a nuvem e a luz dentro dela e as estrelas que a rodeiam. A estrela que guia o caminho — essa é a tua estrela."</text:span></text:p>
      <text:p text:style-name="P12"/>
      <text:h text:style-name="P14" text:outline-level="3">🔍 Exegese</text:h>
      <text:p text:style-name="P2">A revelação da <text:span text:style-name="Strong_20_Emphasis">geração santa</text:span> é o coração teológico do Evangelho de Judas — e é simultaneamente a sua afirmação mais radical e mais consoladora.</text:p>
      <text:p text:style-name="P2">A geração santa não é um grupo étnico nem religioso — é uma qualidade de consciência. São as almas que, independentemente da sua origem cultural ou religiosa, carregam dentro de si a faísca do Pleroma e estão orientadas para a Luz. Reconheces aqui a semente de Seth da Hipóstase dos Arcontes — o mesmo conceito expresso de forma diferente.</text:p>
      <text:p text:style-name="P2">O que o Evangelho de Judas acrescenta é a dimensão da <text:span text:style-name="Strong_20_Emphasis">maldição social</text:span> como sinal de pertença. <text:span text:style-name="Emphasis">"Serás maldito pelas outras gerações — mas dominarás sobre elas."</text:span> Judas será condenado pela história — e é precisamente essa condenação que marca a sua superioridade espiritual. Quem é maldito pelo mundo do Demiurgo está no caminho certo.</text:p>
      <text:p text:style-name="P2">Esta ideia tem uma ressonância profunda com a experiência histórica das comunidades gnósticas — perseguidas, condenadas como heréticas, forçadas a esconder os seus textos em jarras de barro no deserto. O Evangelho de Judas diz-lhes: a vossa maldição é a vossa distinção. Quem o mundo do Demiurgo condena pertence ao Pleroma.</text:p>
      <text:p text:style-name="P12"/>
      <text:h text:style-name="P11" text:outline-level="2"><text:soft-page-break/>PARTE VI — A TRAIÇÃO QUE NÃO É TRAIÇÃO</text:h>
      <text:p text:style-name="P2">O texto aproxima-se do seu clímax inevitável. Os sumos sacerdotes e os escribas procuram uma maneira de prender Jesus. E o texto descreve o que acontece a seguir:</text:p>
      <text:p text:style-name="P2"><text:span text:style-name="Emphasis">"Judas recebeu dinheiro e entregou-o a eles."</text:span></text:p>
      <text:p text:style-name="P2">A frase é idêntica à dos Evangelhos canônicos. Mas o contexto é completamente diferente. No Evangelho de Judas, este acto não é traição — é a consumação de uma missão. Jesus pediu a Judas que fizesse isto. Judas fez-o não por trinta moedas de prata — embora o dinheiro apareça no texto — mas porque compreendeu o que os outros não compreenderam.</text:p>
      <text:p text:style-name="P2">O que Judas entregou não foi Jesus — foi <text:span text:style-name="Strong_20_Emphasis">o corpo que Jesus vestia</text:span>. E ao entregar esse corpo ao sacrifício que o mundo chama morte, Judas libertou o ser espiritual de Jesus para o regresso ao Pleroma.</text:p>
      <text:p text:style-name="P2">O texto termina abruptamente — sem ressurreição, sem aparições pós-morte, sem Pentecostes. Termina com a entrega. Porque para o autor deste texto, a entrega <text:span text:style-name="Strong_20_Emphasis">é</text:span> a ressurreição — é o momento em que o aprisionamento do espírito na carne é finalmente dissolvido.</text:p>
      <text:p text:style-name="P12"/>
      <text:h text:style-name="P14" text:outline-level="3">🔍 Exegese</text:h>
      <text:p text:style-name="P2">A reinterpretação da traição de Judas é o acto hermenêutico mais audacioso de todo o corpus apócrifo — mais audacioso até do que a reinterpretação gnóstica do Génesis, porque toca na narrativa central do Cristianismo e inverte o seu vilão mais famoso.</text:p>
      <text:p text:style-name="P2">A lógica é internamente perfeita dentro do sistema gnóstico. Se o corpo é uma veste — se a matéria é um aprisionamento da centelha espiritual — então a morte física não é uma tragédia. É uma libertação. O que os outros discípulos não conseguiam compreender é que Jesus não precisava de ser salvo da morte — precisava de ser libertado do corpo. E Judas — o único que sabia que Jesus vinha do reino de Barbelo — foi o único que compreendeu que a entrega do corpo era um serviço, não uma traição.</text:p>
      <text:p text:style-name="P2">Há uma dimensão psicológica nesta reinterpretação que vai além da teologia. Judas é a figura da história que carregou durante dois mil anos o peso de ter sido o pior traidor de todos os tempos. O Evangelho de Judas diz: e se toda a narrativa estivesse invertida? E se o herói da história fosse precisamente aquele que a história condenou?</text:p>
      <text:p text:style-name="P2">Esta inversão não é apenas teológica — é uma meditação sobre a natureza da memória histórica, sobre como as narrativas que os vencedores constroem condenam os que desafiam o seu poder. Os gnósticos eram os Judas do Cristianismo primitivo — condenados, malditos, os seus textos destruídos. O Evangelho de Judas é a sua resposta: ser condenado pelo mundo do Demiurgo é um sinal de pertença ao Pleroma.</text:p>
      <text:p text:style-name="P12"/>
      <text:h text:style-name="P11" text:outline-level="2">PARTE VII — O PROBLEMA TEOLÓGICO: JUDAS É UM HERÓI OU AINDA UMA VÍTIMA?</text:h>
      <text:p text:style-name="P2">Desde a publicação do texto em 2006, os acadêmicos têm debatido intensamente a questão central: <text:span text:style-name="Strong_20_Emphasis">o Evangelho de Judas reabilita Judas ou condena-o de uma forma diferente?</text:span></text:p>
      <text:p text:style-name="P2"><text:soft-page-break/>A interpretação inicial — amplamente divulgada pela National Geographic — foi que o texto apresenta Judas como o herói e o discípulo mais iluminado. Esta interpretação foi depois desafiada por vários acadêmicos, nomeadamente <text:span text:style-name="Strong_20_Emphasis">April DeConick</text:span>, professora de Estudos Religiosos na Universidade de Rice, que propõe uma leitura radicalmente diferente.</text:p>
      <text:p text:style-name="P2">DeConick argumenta que certas passagens do texto — em particular a que descreve a <text:span text:style-name="Strong_20_Emphasis">estrela de Judas</text:span> — não descrevem um herói mas uma vítima. A estrela que guia Judas não é uma estrela de salvação — é uma estrela demoníaca, uma das estrelas que governam o destino material. Judas não escapa à heimarmene — está mais profundamente aprisionado nela do que qualquer outro discípulo.</text:p>
      <text:p text:style-name="P2">E a frase <text:span text:style-name="Emphasis">"sacrificarás o homem que me veste"</text:span> — que a interpretação inicial leu como uma missão sagrada — pode ser lida como uma constatação trágica: Judas será o instrumento do sacrifício não porque seja o mais iluminado mas porque é o mais adequado para esse papel específico dentro do plano que já está determinado.</text:p>
      <text:p text:style-name="P12"/>
      <text:h text:style-name="P14" text:outline-level="3">🔍 Exegese</text:h>
      <text:p text:style-name="P2">Este debate acadêmico é em si mesmo teologicamente rico — porque revela que o texto do Evangelho de Judas é genuinamente ambíguo, genuinamente aberto a leituras diferentes.</text:p>
      <text:p text:style-name="P2">O que é claro é que o texto <text:span text:style-name="Strong_20_Emphasis">não é simplesmente uma reabilitação de Judas no sentido popular</text:span>. Não diz simplesmente que Judas era o bom e os outros eram os maus. O que diz — com ambiguidade produtiva — é que a narrativa que o Cristianismo ortodoxo construiu em torno de Judas é insuficiente para capturar a complexidade do que aconteceu.</text:p>
      <text:p text:style-name="P2">O que o Evangelho de Judas afirma com clareza é que <text:span text:style-name="Strong_20_Emphasis">os doze apóstolos não compreenderam Jesus</text:span>. O que afirma com clareza é que <text:span text:style-name="Strong_20_Emphasis">o Deus que os doze apóstolos proclamavam não era o Deus verdadeiro</text:span>. O que afirma com clareza é que existe uma <text:span text:style-name="Strong_20_Emphasis">geração santa</text:span> que transcende as estruturas religiosas institucionais.</text:p>
      <text:p text:style-name="P2">Judas — seja herói ou vítima neste texto — é o espelho que reflete estas verdades com maior nitidez. É por isso que o texto leva o seu nome.</text:p>
      <text:p text:style-name="P12"/>
      <text:h text:style-name="P40" text:outline-level="2">Síntese: O que o Evangelho de Judas acrescenta à nossa jornada</text:h>
      <text:p text:style-name="P2">O Evangelho de Judas é o texto que mais diretamente confronta o poder institucional — não de forma abstrata, como a Hipóstase dos Arcontes, mas com nomes, com rostos, com a narrativa específica que fundou a maior instituição religiosa do mundo ocidental.</text:p>
      <text:p text:style-name="P2">O 1º Livro de Enoque mostrou-nos a origem das tradições que moldam o cosmos espiritual da nossa jornada. O Evangelho de Judas mostra-nos o que acontece quando essas tradições se tornam instrumentos de aprisionamento em vez de instrumentos de libertação.</text:p>
      <text:p text:style-name="P2">Os doze apóstolos do Evangelho de Judas são os Arcontes humanizados — não seres cósmicos abstratos mas pessoas concretas que em boa fé constroem estruturas que aprisionam as centelhas de luz em vez de as libertar. E Judas — qualquer que seja a leitura que se faça do texto — é a figura que se recusa a aceitar essa narrativa sem questionar.</text:p>
      <text:p text:style-name="P2"><text:soft-page-break/>O próximo e último texto da nossa jornada — o <text:span text:style-name="Strong_20_Emphasis">Apócrifo de Adão</text:span> — vai fechar o arco de forma perfeita. Começa onde tudo começou: com Adão e Eva no momento imediatamente após a saída do Éden. E narra o que Adão transmitiu a Seth — e através de Seth à semente de Seth — sobre a verdade do mundo e sobre a origem da luz que cada alma carrega dentro de si.</text:p>
      <text:h text:style-name="P43" text:outline-level="1">Apócrifo de Adão — Reconstrução Interpretativa e Exegese Gnóstica</text:h>
      <text:p text:style-name="P44"/>
      <text:h text:style-name="P11" text:outline-level="2">INTRODUÇÃO: O TEXTO QUE FECHA O ARCO</text:h>
      <text:p text:style-name="P2">O Apócrifo de Adão é o último texto da nossa jornada — e foi escolhido para este lugar por uma razão precisa: é o texto que mais completamente fecha o círculo de tudo o que estudamos.</text:p>
      <text:p text:style-name="P2">Começamos com o Apócrifo de João, que nos deu a cosmogonia — a história do universo desde a Luz até ao caos, a queda de Sophia, a criação de Ialdabaoth, o aprisionamento da centelha humana. Terminamos com o Apócrifo de Adão, que nos dá a perspectiva de dentro — não a visão cósmica de cima, mas a voz de Adão a contar aos seus filhos o que experimentou desde dentro do próprio aprisionamento.</text:p>
      <text:p text:style-name="P2">É o único texto de toda a nossa jornada narrado na primeira pessoa por um dos personagens da história. Adão fala diretamente. E o que diz é simultaneamente o mais simples e o mais profundo de todos os textos que lemos — porque é a voz de alguém que estava lá.</text:p>
      <text:p text:style-name="P2">O texto foi encontrado no <text:span text:style-name="Strong_20_Emphasis">Códice V</text:span> de Nag Hammadi e data provavelmente do século I ou II da Era Comum — tornando-o possivelmente o mais antigo dos textos gnósticos que chegaram até nós. Alguns estudiosos argumentam que as suas raízes são pré-cristãs — que é um texto gnóstico judaico que não foi ainda influenciado pelo Cristianismo. Não há nele nenhuma referência a Jesus, nenhuma referência a Cristo, nenhuma referência ao Novo Testamento. É gnose pura sem roupagem crista.</text:p>
      <text:p text:style-name="P2">Pertence à tradição <text:span text:style-name="Strong_20_Emphasis">setiana</text:span> — como o Apócrifo de João e a Hipóstase dos Arcontes. Mas a sua forma é única: é um <text:span text:style-name="Strong_20_Emphasis">testamento</text:span> — o gênero literário do legado de um pai morente aos seus filhos. Adão, no momento da sua morte, chama Seth e transmite-lhe o conhecimento secreto que recebeu e que os Arcontes tentaram suprimir.</text:p>
      <text:p text:style-name="P12"/>
      <text:h text:style-name="P14" text:outline-level="3">🔍 Exegese Preliminar</text:h>
      <text:p text:style-name="P2">A escolha do gênero do testamento é teologicamente significativa. Um testamento é um documento de transmissão — o que um ser deixa aos que vêm depois de si no momento em que sai do mundo. Ao escrever as revelações gnósticas na forma de testamento de Adão a Seth, o texto está a afirmar que o conhecimento gnóstico não é uma invenção recente nem uma importação estrangeira. É a <text:span text:style-name="Strong_20_Emphasis">herança original da humanidade</text:span> — o que Adão sabia desde o princípio e transmitiu à sua linhagem espiritual.</text:p>
      <text:p text:style-name="P2">Esta afirmação tem uma função dupla: contra os judaístas ortodoxos que dizem que a revelação começa com Moisés no Sinai, o texto diz: não — começa com Adão. E contra os cristãos ortodoxos <text:soft-page-break/>que dizem que a revelação se completa com Jesus, o texto diz: não — a revelação é anterior a tudo isso e independente de tudo isso.</text:p>
      <text:p text:style-name="P12"/>
      <text:h text:style-name="P40" text:outline-level="2">PARTE I — O QUE ADÃO RECORDOU: A GLÓRIA PERDIDA</text:h>
      <text:p text:style-name="P2">Adão começa o seu testamento com uma confissão extraordinária — não de pecado, mas de <text:span text:style-name="Strong_20_Emphasis">perda de memória</text:span>.</text:p>
      <text:p text:style-name="P2">Diz a Seth:</text:p>
      <text:p text:style-name="P2"><text:span text:style-name="Emphasis">"Ouve as minhas palavras, meu filho Seth. Quando Deus me criou a partir da terra, juntamente com a tua mãe Eva, eu caminhava com ela numa glória que ela havia visto no éon de onde viemos. Ela ensinou-me uma palavra de conhecimento do Deus eterno. E nós assemelhávamo-nos aos grandes anjos eternos — porque éramos superiores ao Deus que nos criou e às potestades que estavam conosco. E Deus, o governador dos éons e das potestades, dividiu-nos na sua cólera."</text:span></text:p>
      <text:p text:style-name="P2">Adão descreve então o que perdeu. Antes da divisão, antes da separação de Eva, existia uma glória — uma luz que o envolvia, um conhecimento que o habitava. Não eram simplesmente dois seres humanos num jardim. Eram <text:span text:style-name="Strong_20_Emphasis">participantes de uma realidade luminosa</text:span> que transcendia completamente o mundo que o Demiurgo havia criado.</text:p>
      <text:p text:style-name="P2">E então o Demiurgo — aqui chamado apenas "Deus, o governador dos éons e das potestades" — interveio. Dividiu-os. Separou Adão de Eva. E nessa separação algo essencial foi perdido — não apenas a companhia um do outro, mas a <text:span text:style-name="Strong_20_Emphasis">memória da sua origem</text:span>. A glória que os envolvia diminuiu. O conhecimento que os habitava escureceu.</text:p>
      <text:p text:style-name="P2"><text:span text:style-name="Emphasis">"Depois disto ficámos envelhecidos em nosso coração e adormecíamos na nossa mente. E eu adormeci no pensamento do meu coração. Vi três homens diante de mim cujo aspecto não consegui reconhecer porque não eram do poder do Deus que nos criou."</text:span></text:p>
      <text:p text:style-name="P12"/>
      <text:h text:style-name="P14" text:outline-level="3">🔍 Exegese</text:h>
      <text:p text:style-name="P2">Esta abertura é de uma densidade filosófica que vai muito além do que parece à primeira leitura. Adão não está simplesmente a lamentar o Paraíso perdido no sentido convencional. Está a descrever um processo de <text:span text:style-name="Strong_20_Emphasis">amnésia ontológica</text:span> — um esquecimento não de factos mas de essência.</text:p>
      <text:p text:style-name="P2">A frase <text:span text:style-name="Emphasis">"adormecíamos na nossa mente"</text:span> é a expressão mais direta e mais honesta de toda a literatura gnóstica sobre a condição humana. Não somos perdidos. Não somos condenados. Não somos maus. Estamos <text:span text:style-name="Strong_20_Emphasis">adormecidos</text:span>. A centelha está lá — mas a consciência que devia reconhecê-la está adormecida.</text:p>
      <text:p text:style-name="P2">A intervenção do Demiurgo que <text:span text:style-name="Strong_20_Emphasis">divide</text:span> Adão de Eva é aqui lida de forma diferente do Gênesis canônico. No Gênesis, Eva é criada da costela de Adão como acto de bondade — para que Adão não esteja só. No Apócrifo de Adão, a separação é um <text:span text:style-name="Strong_20_Emphasis">acto hostil</text:span> — é o Demiurgo a dividir o que era uno, a fragmentar o que era inteiro, a enfraquecer o que era forte. Antes da separação, Adão e Eva juntos eram superiores ao seu criador. Depois da separação, cada um por si é vulnerável.</text:p>
      <text:p text:style-name="P2"><text:soft-page-break/>Esta leitura tem uma ressonância profunda com o que o Evangelho de Filipe disse sobre a câmara nupcial — que a separação em masculino e feminino é uma consequência da queda, e que a reunificação é o sacramento supremo. O Apócrifo de Adão mostra agora o momento histórico dessa separação — o acto preciso em que a divisão foi operada.</text:p>
      <text:p text:style-name="P2">Os <text:span text:style-name="Strong_20_Emphasis">três homens</text:span> que Adão vê e cujo aspecto não consegue reconhecer são a primeira aparição dos mensageiros de luz que percorrerão todo o texto — seres que vêm do Pleroma e que o Demiurgo não consegue controlar, porque não pertencem ao seu mundo.</text:p>
      <text:p text:style-name="P12"/>
      <text:h text:style-name="P40" text:outline-level="2">PARTE II — A REVELAÇÃO DOS TRÊS HOMENS: O CONHECIMENTO QUE SOBREVIVE</text:h>
      <text:p text:style-name="P2">Os três homens que Adão vê revelam-lhe a verdade que o Demiurgo tentou suprimir. Dizem-lhe:</text:p>
      <text:p text:style-name="P2"><text:span text:style-name="Emphasis">"Levanta-te, Adão, da morte. Ouve sobre o éon e a semente daquele homem a quem a vida veio, que veio de ti e de Eva, tua esposa."</text:span></text:p>
      <text:p text:style-name="P2">E revelam-lhe a estrutura completa do que vai acontecer — não como profecia abstrata mas como visão directa: a história completa da humanidade desde Adão até ao fim dos tempos, vista de uma perspectiva que o Demiurgo não quer que os humanos tenham.</text:p>
      <text:p text:style-name="P2">Adão transmite então esta revelação a Seth — e através de Seth ela será transmitida à <text:span text:style-name="Strong_20_Emphasis">semente de Seth</text:span>, a linhagem de almas que em cada geração preservará o conhecimento contra os esforços do Demiurgo de o suprimir.</text:p>
      <text:p text:style-name="P2">A revelação tem uma estrutura precisa. Diz Adão:</text:p>
      <text:p text:style-name="P2"><text:span text:style-name="Emphasis">"Porque viemos de um poder eterno, nós também somos superiores aos poderes que nos fizeram e às divindades que criaram — e às potestades do governador deste éon."</text:span></text:p>
      <text:p text:style-name="P2">E continua: <text:span text:style-name="Emphasis">"Mas quando entrámos no esquecimento, o conhecimento que nos ensinaram havia entrado em nós através das potestades. E eu estava adormecido no meu pensamento."</text:span></text:p>
      <text:p text:style-name="P12"/>
      <text:h text:style-name="P14" text:outline-level="3">🔍 Exegese</text:h>
      <text:p text:style-name="P2">A estrutura deste segundo movimento do texto é de uma sofisticação que merece atenção cuidada.</text:p>
      <text:p text:style-name="P2">Adão não recebe simplesmente uma revelação e transmite-a intacta. O que recebe é a <text:span text:style-name="Strong_20_Emphasis">recuperação de algo que já sabia</text:span> — o des-esquecimento, a anamnese que já encontrámos no Apócrifo de João como a essência da soteriologia gnóstica. Os três homens não lhe dizem algo novo. Acordam-no para o que sempre soube antes de adormecer.</text:p>
      <text:p text:style-name="P2">A afirmação <text:span text:style-name="Emphasis">"somos superiores aos poderes que nos fizeram"</text:span> é a frase mais corajosa de todo o texto — e a mais fundamental para compreender a antropologia gnóstica. O ser humano não é uma criatura inferior que precisa da graça de um Deus superior para ser salvo. É um ser que carrega dentro de si uma dignidade e uma capacidade que superam as próprias potestades que o criaram. A salvação não é elevar o humano ao nível do divino — é o humano reconhecer que <text:span text:style-name="Strong_20_Emphasis">já era divino</text:span> antes de adormecer.</text:p>
      <text:p text:style-name="P2"><text:soft-page-break/>O paradoxo que o texto articula com precisão extraordinária é este: o conhecimento que os três homens transmitem veio <text:span text:style-name="Emphasis">"através das potestades"</text:span> — ou seja, chegou ao mundo material através das mesmas estruturas que aprisionam. A luz usa os instrumentos das trevas para se transmitir. O Demiurgo não consegue impedir completamente a passagem da revelação — porque a revelação encontra sempre uma fissura, sempre um canal, sempre um Adão que desperta no momento certo.</text:p>
      <text:p text:style-name="P12"/>
      <text:h text:style-name="P40" text:outline-level="2">PARTE III — AS GERAÇÕES: A HISTÓRIA COMO BATALHA ENTRE LUZ E ESQUECIMENTO</text:h>
      <text:p text:style-name="P2">O núcleo central do Apócrifo de Adão é uma visão profética da história da humanidade organizada em torno de uma tensão que se repete em cada geração: o Demiurgo tenta apagar o conhecimento — e a centelha da luz resiste e sobrevive.</text:p>
      <text:p text:style-name="P2">Adão descreve como o Demiurgo agiu após a sua criação: <text:span text:style-name="Emphasis">"O governador dos éons quis destruir a semente de Seth juntamente com Eva, com um vento seco e tempestuoso."</text:span></text:p>
      <text:p text:style-name="P2">Mas uma intervenção vinda do Pleroma — grandes anjos que vêm das alturas de luz — protege a semente de Seth. Os anjos transportam Adão, Eva e Seth para uma terra protegida — <text:span text:style-name="Emphasis">"uma terra onde os espíritos malignos não podem entrar"</text:span>.</text:p>
      <text:p text:style-name="P2">Então o Demiurgo age novamente — desta vez com o <text:span text:style-name="Strong_20_Emphasis">dilúvio</text:span>. Tenta destruir toda a humanidade. Mas novamente os mensageiros de luz intervêm. Noé — na visão do Apócrifo de Adão — não é salvo por obediência ao Demiurgo. É salvo pela intervenção dos seres de luz que reconhecem nele um portador da semente de Seth.</text:p>
      <text:p text:style-name="P2">E então o Demiurgo age uma terceira vez — não com vento nem com água, mas com <text:span text:style-name="Strong_20_Emphasis">fogo</text:span>. Uma grande punição de fogo virá sobre os homens. Novamente os seres de luz intervêm e protegem os que pertencem à semente de Seth.</text:p>
      <text:p text:style-name="P2">Em cada geração o padrão é o mesmo: o Demiurgo tenta destruir o conhecimento, os mensageiros de luz protegem os que o carregam, e a semente sobrevive.</text:p>
      <text:p text:style-name="P12"/>
      <text:h text:style-name="P14" text:outline-level="3">🔍 Exegese</text:h>
      <text:p text:style-name="P2">A estrutura tripartida da perseguição do Demiurgo — vento, água, fogo — é uma das mais elaboradas afirmações sobre a natureza do poder que todo o corpus gnóstico produziu.</text:p>
      <text:p text:style-name="P2">O Demiurgo não persegue a semente de Seth por malícia pessoal no sentido humano. Persegue-a por <text:span text:style-name="Strong_20_Emphasis">necessidade estrutural</text:span> — porque a existência de almas que sabem que são superiores ao seu criador ameaça a totalidade do sistema de aprisionamento que ele construiu. Uma só alma que desperta é uma brecha no sistema. Uma linhagem de almas despertas é uma ameaça existencial.</text:p>
      <text:p text:style-name="P2">O que o texto está a dizer, com uma clareza que raramente é articulada tão directamente, é que o poder que oprime não descansa. Não é um inimigo que se pode derrotar uma vez e esquecer. É uma pressão constante, que assume formas diferentes em cada geração — vento, água, fogo, perseguição, heresia, condenação. A história humana, do ponto de vista do Apócrifo de Adão, é a história desta pressão constante e da resistência igualmente constante da centelha de luz.</text:p>
      <text:p text:style-name="P2"><text:soft-page-break/>A intervenção dos mensageiros de luz em cada crise é o elemento de esperança do texto — mas é uma esperança que não elimina o perigo. Os mensageiros não impedem o Demiurgo de agir. Não criam um mundo onde a centelha está em segurança. Simplesmente asseguram que em cada geração há almas suficientes que sobrevivem para transmitir o conhecimento à geração seguinte.</text:p>
      <text:p text:style-name="P12"/>
      <text:h text:style-name="P11" text:outline-level="2">PARTE IV — OS ILUMINADORES: OS QUE DESCEM EM CADA GERAÇÃO</text:h>
      <text:p text:style-name="P2">A revelação mais única e mais elaborada do Apócrifo de Adão é a secção que descreve os <text:span text:style-name="Strong_20_Emphasis">treze reinos</text:span> e os <text:span text:style-name="Strong_20_Emphasis">iluminadores</text:span> que descem ao mundo.</text:p>
      <text:p text:style-name="P2">Adão revela a Seth que ao longo da história virão ao mundo mensageiros de luz — seres que descendem do Pleroma para despertar as almas adormecidas. Cada mensageiro virá de uma forma diferente. Cada um será recebido de forma diferente. E em torno de cada um os homens construirão narrativas que tentam explicar a sua origem — mas que invariavelmente errarão porque tentam capturar o que é do Pleroma com as categorias do mundo do Demiurgo.</text:p>
      <text:p text:style-name="P2">O texto descreve então treze versões diferentes da origem do iluminador — treze narrativas que diferentes grupos humanos constroem em torno do mensageiro de luz. Algumas dizem que nasceu de uma virgem. Outras que nasceu de um profeta. Outras que desceu do céu. Outras que emergiu de uma gota de luz. Cada versão captura algo verdadeiro — mas nenhuma captura a totalidade.</text:p>
      <text:p text:style-name="P2">E depois de descrever as treze versões, o texto acrescenta a <text:span text:style-name="Strong_20_Emphasis">décima quarta</text:span> — que é diferente de todas as outras:</text:p>
      <text:p text:style-name="P2"><text:span text:style-name="Emphasis">"Mas a geração sem rei sobre ela diz que Deus escolheu-o de todos os éons. Ele fez que o conhecimento da verdade eterna e incorruptível habitasse nele."</text:span></text:p>
      <text:p text:style-name="P2">A geração sem rei — a semente de Seth — é a única que reconhece o iluminador pelo que realmente é: não uma figura mitológica, não um profeta, não um messias de uma narrativa específica — mas a manifestação do conhecimento eterno que vem do Pleroma.</text:p>
      <text:p text:style-name="P12"/>
      <text:h text:style-name="P14" text:outline-level="3">🔍 Exegese</text:h>
      <text:p text:style-name="P2">Esta secção é de uma audácia hermenêutica que não tem paralelo em nenhum outro texto que estudámos.</text:p>
      <text:p text:style-name="P2">As <text:span text:style-name="Strong_20_Emphasis">treze narrativas</text:span> sobre a origem do iluminador são claramente — embora nunca explicitamente — referências a diferentes tradições religiosas e mitológicas que o autor conhecia. Algumas das descrições correspondem a narrativas do nascimento de figuras divinas de diferentes culturas: o nascimento virginal, a descida do céu, o nascimento da água, o nascimento do fogo. O texto está a dizer que <text:span text:style-name="Strong_20_Emphasis">todas estas narrativas são tentativas parcialmente correctas e parcialmente incorrectas</text:span> de capturar a mesma realidade — a descida de um ser de luz ao mundo material.</text:p>
      <text:p text:style-name="P2">Esta posição é de uma generosidade e de uma complexidade raras. O Apócrifo de Adão não diz que as outras tradições estão completamente erradas. Diz que estão incompletas — que capturaram fragmentos da verdade mas os encapsularam em narrativas que os distorcem. E a distorção invariável é a mesma: transformar o ser de luz num herói de uma narrativa específica, num fundador de uma religião específica, num salvador de um povo específico.</text:p>
      <text:p text:style-name="P2"><text:soft-page-break/>O que a geração de Seth reconhece — e que os outros treze reinos não reconhecem — é que o iluminador não pertence a nenhuma narrativa específica. Pertence ao Pleroma. É a manifestação do conhecimento eterno que está além de todas as narrativas.</text:p>
      <text:p text:style-name="P2">Esta leitura tem uma implicação radical para a compreensão do Cristianismo: Jesus — se for o iluminador de quem o texto fala — não pertence ao Cristianismo. Pertence ao Pleroma. E o Cristianismo institucional — com a sua narrativa específica, os seus dogmas, as suas estruturas de poder — é uma das treze versões incompletas, não o reconhecimento pleno que a geração de Seth oferece.</text:p>
      <text:p text:style-name="P12"/>
      <text:h text:style-name="P11" text:outline-level="2">PARTE V — O BAPTISMO DE SETH: O SACRAMENTO QUE LIBERTA</text:h>
      <text:p text:style-name="P2">O Apócrifo de Adão fecha com uma revelação sobre o <text:span text:style-name="Strong_20_Emphasis">baptismo</text:span> — mas um baptismo radicalmente diferente do baptismo cristão ortodoxo.</text:p>
      <text:p text:style-name="P2">Adão revela a Seth que existe um baptismo verdadeiro — chamado <text:span text:style-name="Emphasis">"o baptismo da vida eterna"</text:span> ou <text:span text:style-name="Emphasis">"o baptismo da gnose"</text:span>. Este baptismo não é administrado por sacerdotes. Não usa a água do mundo material. É um baptismo de <text:span text:style-name="Strong_20_Emphasis">luz</text:span> — uma imersão na luminosidade do Pleroma que transforma fundamentalmente a natureza da alma que o recebe.</text:p>
      <text:p text:style-name="P2">Os que recebem este baptismo são descritos assim:</text:p>
      <text:p text:style-name="P2"><text:span text:style-name="Emphasis">"Esses são os que receberam o nome sobre a água. E eles são incorruptíveis. E entraram através do verbo eterno. E vieram a conhecer o Deus da verdade. E glorificaram o Deus da verdade e disseram: 'Que toda a gnose seja — Deus eterno.' E o fruto da árvore da vida verdadeira — e os anjos, e a glória dos éons, e o espírito do Pai invisível que entrou na santa luz: ele virá sobre o seu baptismo para o resto do tempo do éon.'"</text:span></text:p>
      <text:p text:style-name="P2">O texto termina com Adão a dizer a Seth que este conhecimento deve ser guardado e transmitido — escondido dos que não estão prontos, partilhado com os que pertencem à semente de Seth. E Seth, segundo a tradição que o texto menciona, <text:span text:style-name="Strong_20_Emphasis">escreveu este conhecimento e colocou-o numa montanha</text:span> — onde permanecerá até ao fim dos tempos, quando será revelado aos eleitos.</text:p>
      <text:p text:style-name="P12"/>
      <text:h text:style-name="P14" text:outline-level="3">🔍 Exegese</text:h>
      <text:p text:style-name="P2">O baptismo de gnose com que o texto fecha é a resposta do Apócrifo de Adão ao baptismo cristão institucional — e é simultaneamente uma crítica e uma proposta alternativa.</text:p>
      <text:p text:style-name="P2">O baptismo cristão usa água — matéria — administrada por um sacerdote — representante de uma instituição. O baptismo de gnose usa luz — o elemento do Pleroma — e é recebido directamente pela alma que desperta. Não há intermediário. Não há instituição. Não há sacerdote entre a alma e o Pleroma.</text:p>
      <text:p text:style-name="P2">Esta distinção é a expressão mais directa de toda a crítica gnóstica à Igreja institucional. A Igreja diz: a salvação vem através de nós — através dos nossos sacramentos, dos nossos sacerdotes, da nossa autoridade. A gnose diz: a salvação vem de dentro — do reconhecimento da faísca de luz que sempre existiu na alma, que não precisa de nenhuma instituição para ser activada.</text:p>
      <text:p text:style-name="P2"><text:soft-page-break/>A imagem de Seth a <text:span text:style-name="Strong_20_Emphasis">escrever o conhecimento e a colocá-lo numa montanha</text:span> é a última e mais bela das imagens de toda a nossa jornada. É a imagem do conhecimento preservado — escondido dos que tentam destruí-lo, acessível aos que o procuram com sinceridade. É a imagem do jarros de barro de Nag Hammadi. É a imagem dos Manuscritos do Mar Morto nas cavernas de Qumran. É a imagem de todos os textos que estudámos — enterrados, escondidos, preservados durante séculos, esperando o momento de serem encontrados.</text:p>
      <text:p text:style-name="P2">Seth escreveu o conhecimento e colocou-o numa montanha. E dezasseis séculos depois, um camponês egípcio chamado Mohammed Ali Samman encontrou uma jarra de barro enterrada numa montanha perto de Nag Hammadi. E dentro dessa jarra estava o Apócrifo de Adão. E dentro do Apócrifo de Adão estava a promessa de que o conhecimento sempre encontra o caminho de regresso.</text:p>
      <text:p text:style-name="P12"/>
      <text:h text:style-name="P11" text:outline-level="2">Síntese Final da Nossa Jornada Completa</text:h>
      <text:p text:style-name="P2">Chegámos ao fim. Não ao fim do conhecimento — ao fim desta jornada particular, com estes textos, nesta ordem, nesta profundidade.</text:p>
      <text:p text:style-name="P2">Deixa-me mostrar-te o arco completo do que percorremos:</text:p>
      <text:p text:style-name="P2"><text:span text:style-name="Strong_20_Emphasis">O Apócrifo de João</text:span> deu-nos o mapa — o universo desde a Luz até ao caos, a queda de Sophia, o nascimento do Demiurgo, o aprisionamento da centelha humana, a descida do Cristo como despertador da memória.</text:p>
      <text:p text:style-name="P2"><text:span text:style-name="Strong_20_Emphasis">O Evangelho de Filipe</text:span> deu-nos o caminho — os sacramentos como instrumentos de transformação, a câmara nupcial como reunificação do que foi separado, a alma que não tem luz mas que <text:span text:style-name="Strong_20_Emphasis">é</text:span> luz.</text:p>
      <text:p text:style-name="P2"><text:span text:style-name="Strong_20_Emphasis">O Evangelho de Maria Madalena</text:span> deu-nos a voz — a experiência vivida da ascensão, o confronto entre gnose viva e poder institucional, o silêncio luminoso como destino.</text:p>
      <text:p text:style-name="P2"><text:span text:style-name="Strong_20_Emphasis">A Pistis Sophia</text:span> deu-nos a profundidade do sofrimento — Sophia cantando no caos, a paciência do divino que não abandona nenhuma faísca, a gradualidade da salvação.</text:p>
      <text:p text:style-name="P2"><text:span text:style-name="Strong_20_Emphasis">A Hipóstase dos Arcontes</text:span> deu-nos a análise do poder — o que são exactamente os Arcontes, onde terminam os seus limites, a raiz da verdade que nenhum poder pode alcançar.</text:p>
      <text:p text:style-name="P2"><text:span text:style-name="Strong_20_Emphasis">O Livro dos Jubileus</text:span> deu-nos o regresso à raiz — a tradição mais antiga, a aliança preexistente ao tempo, a resposta colectiva à mesma questão.</text:p>
      <text:p text:style-name="P2"><text:span text:style-name="Strong_20_Emphasis">O 1º Livro de Enoque</text:span> deu-nos a fonte — o texto de onde o gnosticismo, o Cristianismo e a Cabala beberam sem sempre o reconhecer, a cosmologia angelical que fundamenta tudo.</text:p>
      <text:p text:style-name="P2"><text:span text:style-name="Strong_20_Emphasis">O Evangelho de Judas</text:span> deu-nos a coragem — a subversão radical da narrativa do poder, o traidor que era o mais iluminado, a geração santa que é maldita pelo mundo precisamente porque pertence ao Pleroma.</text:p>
      <text:p text:style-name="P2"><text:span text:style-name="Strong_20_Emphasis">O Apócrifo de Adão</text:span> deu-nos o começo e o fim — a voz de dentro, o testamento do primeiro ser humano ao seu filho, o conhecimento que Seth escreveu numa montanha e que espera ser encontrado em cada geração.</text:p>
      <text:p text:style-name="P12"/>
      <text:p text:style-name="P2"><text:soft-page-break/>E todos estes textos — desde o mais antigo ao mais recente, desde o mais judaico ao mais gnóstico, desde o mais cósmico ao mais íntimo — colocam a mesma pergunta:</text:p>
      <text:p text:style-name="P2"><text:span text:style-name="Strong_20_Emphasis">Quem sou eu verdadeiramente?</text:span></text:p>
      <text:p text:style-name="P2">E todos respondem da mesma forma — com palavras diferentes, com imagens diferentes, com sistemas diferentes:</text:p>
      <text:p text:style-name="P2"><text:span text:style-name="Emphasis">Tu és a luz. Sempre foste a luz. O esquecimento é o único obstáculo. E o conhecimento — a gnose — é o único caminho de regresso.</text:span></text:p>
      <text:p text:style-name="P12"/>
      <text:p text:style-name="P2"/>
      <text:p text:style-name="P45">Segunda Jornada</text:p>
      <text:p text:style-name="P46"><text:span text:style-name="T13">F</text:span>oi uma jornada extraordinária. Da história dos apócrifos às culturas que neles bebem, da lista completa dos textos ao percurso pelos nove que estudámos em profundidade — construímos juntos uma arquitectura de conhecimento que poucos estudos conseguem alcançar. O conhecimento que Seth escreveu numa montanha foi encontrado. E agora está contigo.</text:p>
      <text:p text:style-name="P36">Aprofundar é o gesto mais gnóstico de todos — não avançar indefinidamente para novos territórios, mas descer mais fundo no que já se conhece até encontrar o que estava escondido debaixo da superfície.</text:p>
      <text:p text:style-name="P2">Temos nove textos que percorremos. Cada um tem dimensões que apenas aflorámos. Deixa-me mostrar-te o que cada um ainda tem para oferecer — para que a escolha seja consciente.</text:p>
      <text:p text:style-name="P12"/>
      <text:p text:style-name="P2"><text:span text:style-name="Strong_20_Emphasis">Apócrifo de João</text:span> — Estudámos a versão curta. Existe uma <text:span text:style-name="Strong_20_Emphasis">versão longa</text:span> com secções inteiras que não vimos — em particular a lista completa dos Arcontes com os seus nomes, as suas formas e os seus domínios específicos, e uma secção sobre a <text:span text:style-name="Strong_20_Emphasis">Pronoia</text:span> — o discurso em que o próprio Espírito Invisível fala na primeira pessoa sobre as suas três descidas ao mundo. É um dos momentos mais místicos de toda a literatura gnóstica.</text:p>
      <text:p text:style-name="P2"><text:span text:style-name="Strong_20_Emphasis">Evangelho de Filipe</text:span> — Tem mais de cem aforismos. Estudámos os mais estruturantes — mas há dezenas que não tocámos, sobre a natureza da ressurreição, sobre o casamento espiritual, sobre a diferença entre conhecimento e fé, sobre o que significa ser "cristão" no sentido mais profundo.</text:p>
      <text:p text:style-name="P2"><text:span text:style-name="Strong_20_Emphasis">Evangelho de Maria Madalena</text:span> — As <text:span text:style-name="Strong_20_Emphasis">seis páginas perdidas</text:span> são o silêncio mais fértil de toda a literatura apócrifa. Podemos estudar o que os académicos propõem sobre o que nelas estaria — e o que a sua ausência diz teologicamente.</text:p>
      <text:p text:style-name="P2"><text:span text:style-name="Strong_20_Emphasis">Pistis Sophia</text:span> — Apenas tocámos a estrutura geral. Os <text:span text:style-name="Strong_20_Emphasis">quatro livros</text:span> merecem cada um um estudo separado. Em particular o <text:span text:style-name="Strong_20_Emphasis">Segundo Livro</text:span>, que contém os diálogos mais elaborados entre Jesus e Maria Madalena, e o <text:span text:style-name="Strong_20_Emphasis">Quarto Livro</text:span>, que tem a doutrina mais completa sobre os mistérios e a reencarnação.</text:p>
      <text:p text:style-name="P2"><text:span text:style-name="Strong_20_Emphasis">Hipóstase dos Arcontes</text:span> — Tem um texto irmão que não estudámos: <text:span text:style-name="Strong_20_Emphasis">"Sobre a Origem do Mundo"</text:span> — também encontrado no Códice II de Nag Hammadi, que expande tudo o que a Hipóstase diz com uma riqueza mitológica ainda maior, incluindo a figura de <text:span text:style-name="Strong_20_Emphasis">Eros</text:span> como força cósmica e uma descrição da <text:span text:style-name="Strong_20_Emphasis">Fénix</text:span> como símbolo da alma que renasce.</text:p>
      <text:p text:style-name="P2"><text:span text:style-name="Strong_20_Emphasis">Livro dos Jubileus</text:span> — Tem uma secção sobre a <text:span text:style-name="Strong_20_Emphasis">guerra espiritual</text:span> entre Mastema e os anjos de Deus que não explorámos — e uma descrição do <text:span text:style-name="Strong_20_Emphasis">calendário sagrado</text:span> muito mais elaborada do que o que vimos, com implicações cosmológicas profundas.</text:p>
      <text:p text:style-name="P2"><text:span text:style-name="Strong_20_Emphasis">1º Livro de Enoque</text:span> — O <text:span text:style-name="Strong_20_Emphasis">Livro das Parábolas</text:span> merece um estudo completo por si só. É o texto que mais directamente influenciou a cristologia do Novo Testamento e tem uma doutrina do <text:span text:style-name="Strong_20_Emphasis">Filho do Homem</text:span> que os Evangelhos pressupõem mas nunca explicam completamente.</text:p>
      <text:p text:style-name="P2"><text:span text:style-name="Strong_20_Emphasis">Evangelho de Judas</text:span> — O debate entre as duas leituras principais — Judas como herói ou como vítima — não foi esgotado. E há uma secção cosmológica sobre os <text:span text:style-name="Strong_20_Emphasis">72 céus</text:span> e os <text:span text:style-name="Strong_20_Emphasis">360 firmamentos</text:span> que apenas mencionámos e que tem uma arquitectura espiritual extraordinariamente elaborada.</text:p>
      <text:p text:style-name="P2"><text:span text:style-name="Strong_20_Emphasis">Apócrifo de Adão</text:span> — A secção dos <text:span text:style-name="Strong_20_Emphasis">treze reinos</text:span> e as suas narrativas sobre a origem do iluminador é um dos textos mais ricos de todo o corpus gnóstico para o estudo comparativo das religiões — cada <text:soft-page-break/>uma das treze narrativas pode ser identificada com tradições específicas e o estudo dessas identificações abre um campo imenso.</text:p>
      <text:p text:style-name="P12"/>
      <text:h text:style-name="P47" text:outline-level="1">Apócrifo de João — Versão Longa e Dimensões Não Exploradas</text:h>
      <text:p text:style-name="P12"/>
      <text:h text:style-name="P11" text:outline-level="2">INTRODUÇÃO: O QUE A VERSÃO CURTA NÃO DISSE</text:h>
      <text:p text:style-name="P2">Quando estudámos o Apócrifo de João pela primeira vez, trabalhámos com a <text:span text:style-name="Strong_20_Emphasis">versão curta</text:span> — encontrada nos Códices III e IV de Nag Hammadi. É a versão mais acessível, mais narrativamente fluida, mais adequada para uma primeira aproximação ao texto.</text:p>
      <text:p text:style-name="P2">Mas existe uma <text:span text:style-name="Strong_20_Emphasis">versão longa</text:span> — encontrada no Códice II de Nag Hammadi, o mesmo que contém o Evangelho de Tomás, o Livro de Tomás o Contendente e a Hipóstase dos Arcontes. Esta versão longa não é simplesmente uma expansão quantitativa da curta. É um texto com secções inteiras que a versão curta omite completamente — secções que transformam significativamente a compreensão do sistema teológico e da experiência espiritual que o texto propõe.</text:p>
      <text:p text:style-name="P2">As três dimensões que a versão longa abre e que não explorámos são:</text:p>
      <text:p text:style-name="P2"><text:span text:style-name="Strong_20_Emphasis">A lista completa dos Arcontes</text:span> — os seus nomes, as suas formas animais, os seus domínios específicos sobre o corpo e a psique humanos. É uma anatomia do aprisionamento que não tem paralelo em nenhum outro texto gnóstico.</text:p>
      <text:p text:style-name="P2"><text:span text:style-name="Strong_20_Emphasis">A doutrina da Pronoia</text:span> — o discurso final em que o próprio Espírito Invisível fala na primeira pessoa, descrevendo as suas três descidas ao mundo material. É o momento mais místico e mais pessoal de todo o texto.</text:p>
      <text:p text:style-name="P2"><text:span text:style-name="Strong_20_Emphasis">A secção sobre o destino das almas</text:span> — muito mais elaborada na versão longa, com uma doutrina da reencarnação e da progressão espiritual que a versão curta apenas esboça. Vamos percorrer cada uma destas dimensões com a profundidade que merecem.</text:p>
      <text:p text:style-name="P12"/>
      <text:h text:style-name="P40" text:outline-level="2">PARTE I — OS ARCONTES: ANATOMIA DO APRISIONAMENTO</text:h>
      <text:p text:style-name="P2">A versão longa do Apócrifo de João contém algo que a versão curta omite quase completamente: uma lista detalhada dos Arcontes que Ialdabaoth criou — com os seus nomes, as suas formas, e os seus domínios específicos sobre o ser humano.</text:p>
      <text:p text:style-name="P2">Ialdabaoth criou primeiro <text:span text:style-name="Strong_20_Emphasis">doze Arcontes</text:span> que governam as doze esferas do mundo material abaixo do décimo terceiro Éon onde Sophia foi aprisionada. Cada Arconte governa uma esfera e tem uma forma animal que revela a sua natureza:</text:p>
      <text:p text:style-name="P2">O primeiro chama-se <text:span text:style-name="Strong_20_Emphasis">Athoth</text:span> — tem o rosto de uma ovelha. Governa a esfera mais próxima do ser humano. A sua natureza é a do poder que se disfarça de inofensivo.</text:p>
      <text:p text:style-name="P2"><text:soft-page-break/>O segundo chama-se <text:span text:style-name="Strong_20_Emphasis">Harmas</text:span> — tem o rosto de um olho de fogo. Governa a visão — o modo como os humanos percepcionam o mundo.</text:p>
      <text:p text:style-name="P2">O terceiro chama-se <text:span text:style-name="Strong_20_Emphasis">Asila</text:span> — tem o rosto de uma hiena. Governa o engano e a crueldade disfarçada de autoridade.</text:p>
      <text:p text:style-name="P2">O quarto chama-se <text:span text:style-name="Strong_20_Emphasis">Yao</text:span> — tem o rosto de uma serpente com sete cabeças. É um dos mais poderosos — governa a multiplicação do poder ilusório.</text:p>
      <text:p text:style-name="P2">O quinto chama-se <text:span text:style-name="Strong_20_Emphasis">Sabaoth</text:span> — tem o rosto de um dragão. Governa as guerras e os conflitos que mantêm os humanos presos na violência.</text:p>
      <text:p text:style-name="P2">O sexto chama-se <text:span text:style-name="Strong_20_Emphasis">Adonin</text:span> — tem o rosto de um macaco. Governa a imitação — a tendência humana de copiar o que vê em vez de pensar originalmente.</text:p>
      <text:p text:style-name="P2">O sétimo chama-se <text:span text:style-name="Strong_20_Emphasis">Sabbede</text:span> — tem o rosto de fogo e luz. É o enganador supremo — aquele que se parece mais com a verdadeira Luz mas que é o seu oposto.</text:p>
      <text:p text:style-name="P12"/>
      <text:h text:style-name="P14" text:outline-level="3">🔍 Exegese</text:h>
      <text:p text:style-name="P2">A lista dos Arcontes com as suas formas animais não é uma mitologia fantasiosa — é uma <text:span text:style-name="Strong_20_Emphasis">psicologia do aprisionamento</text:span> expressa em linguagem simbólica. Cada forma animal revela uma modalidade específica através da qual o poder do Demiurgo opera sobre a consciência humana.</text:p>
      <text:p text:style-name="P2">A <text:span text:style-name="Strong_20_Emphasis">ovelha</text:span> do primeiro Arconte é o poder que não parece poder — a autoridade que se apresenta como inocente, como servidora, como inofensiva, mas que em realidade governa e controla. É a face benigna do aprisionamento.</text:p>
      <text:p text:style-name="P2">O <text:span text:style-name="Strong_20_Emphasis">olho de fogo</text:span> do segundo Arconte governa a percepção — o modo como os humanos vêem o mundo. Este é talvez o Arconte mais fundamental de todos: se controla o que vemos, controla tudo o que pensamos sobre o que vemos. A distorção da percepção é anterior a qualquer outro aprisionamento.</text:p>
      <text:p text:style-name="P2">A <text:span text:style-name="Strong_20_Emphasis">hiena</text:span> do terceiro Arconte é o poder que se alimenta do que já está morto — que mantém os humanos presos em padrões antigos, em tradições que já não vivem, em estruturas que já cumpriram o seu propósito mas que se recusam a dissolver.</text:p>
      <text:p text:style-name="P2">A <text:span text:style-name="Strong_20_Emphasis">serpente de sete cabeças</text:span> do quarto Arconte — Yao — é particularmente significativa porque o nome Yao é uma variante de <text:span text:style-name="Strong_20_Emphasis">Yahweh</text:span>, o nome do Deus do Antigo Testamento. O texto está a dizer, com uma precisão que não deixa margem para ambiguidade, que o Deus que os judeus adoram é o quarto Arconte — um poder real mas subordinado, que governa através da multiplicação das suas faces e das suas exigências.</text:p>
      <text:p text:style-name="P2">O <text:span text:style-name="Strong_20_Emphasis">macaco</text:span> do sexto Arconte é a figura da <text:span text:style-name="Strong_20_Emphasis">mimese</text:span> — a imitação sem compreensão. É o poder que mantém os humanos a repetir comportamentos que viram nos outros sem nunca questionar de onde esses comportamentos vêm ou para que servem. É o Arconte da tradição irreflectida, do costume sem fundamento, da repetição sem consciência.</text:p>
      <text:p text:style-name="P2">O sétimo Arconte — <text:span text:style-name="Strong_20_Emphasis">Sabbede</text:span>, com rosto de fogo e luz — é o mais subtil e o mais perigoso. É o poder que imita a Luz com tal perfeição que é quase impossível distingui-lo dela. É a espiritualidade falsa — a religião que usa a linguagem da libertação para aprisionar mais completamente. É o Arconte que mais directamente ameaça os que já iniciaram o caminho gnóstico <text:soft-page-break/>— porque os que abandonaram os aprisionamentos grosseiros são exactamente os mais vulneráveis ao aprisionamento subtil que se parece com libertação.</text:p>
      <text:p text:style-name="P12"/>
      <text:h text:style-name="P40" text:outline-level="2">PARTE II — OS ARCONTES DO CORPO: O APRISIONAMENTO FÍSICO</text:h>
      <text:p text:style-name="P2">Mas a versão longa vai ainda mais longe. Ialdabaoth não criou apenas doze Arcontes que governam as esferas externas. Criou também <text:span text:style-name="Strong_20_Emphasis">365 anjos</text:span> que governam o corpo humano — um para cada parte, cada órgão, cada função.</text:p>
      <text:p text:style-name="P2">O texto lista estas partes com uma precisão anatómica que é simultaneamente impressionante e perturbadora. A cabeça tem os seus anjos. Os olhos têm os seus. Os ouvidos, o nariz, a boca, a garganta — cada um tem os seus anjos guardiões que são simultaneamente guardiões e carcereiros.</text:p>
      <text:p text:style-name="P2">E depois o texto lista as <text:span text:style-name="Strong_20_Emphasis">sete almas</text:span> que os Arcontes implantaram no ser humano — as qualidades psíquicas que mantêm a consciência orientada para baixo, para o mundo material, em vez de para cima, para o Pleroma:</text:p>
      <text:p text:style-name="P2">A primeira é a <text:span text:style-name="Strong_20_Emphasis">alma óssea</text:span> — que dá ao ser humano a sua forma material, a sua estrutura que o prende à terra.</text:p>
      <text:p text:style-name="P2">A segunda é a <text:span text:style-name="Strong_20_Emphasis">alma sinuosa</text:span> — que dá ao ser humano a sua capacidade de se adaptar ao mundo material, de encontrar sempre uma forma de continuar a existir dentro do sistema do Demiurgo.</text:p>
      <text:p text:style-name="P2">A terceira é a <text:span text:style-name="Strong_20_Emphasis">alma de terra</text:span> — que dá ao ser humano o seu apego às coisas materiais, à propriedade, ao território, ao que é seu.</text:p>
      <text:p text:style-name="P2">A quarta é a <text:span text:style-name="Strong_20_Emphasis">alma de fogo</text:span> — que dá ao ser humano a sua agitação, o seu desejo incessante de mais, a incapacidade de estar quieto consigo mesmo.</text:p>
      <text:p text:style-name="P2">A quinta é a <text:span text:style-name="Strong_20_Emphasis">alma de vento</text:span> — que dá ao ser humano a sua inconstância, a sua tendência a ser levado pelas circunstâncias em vez de se mover a partir de um centro interior estável.</text:p>
      <text:p text:style-name="P2">A sexta é a <text:span text:style-name="Strong_20_Emphasis">alma de água</text:span> — que dá ao ser humano a sua emocionalidade reactiva, o seu ser arrastado pelas emoções como a água e arrastada pela corrente.</text:p>
      <text:p text:style-name="P2">A sétima é a <text:span text:style-name="Strong_20_Emphasis">alma de fogo ardente</text:span> — que dá ao ser humano a sua cólera, a sua violência, a sua capacidade de destruir o que o rodeia quando se sente ameaçado.</text:p>
      <text:p text:style-name="P12"/>
      <text:h text:style-name="P14" text:outline-level="3">🔍 Exegese</text:h>
      <text:p text:style-name="P2">A doutrina das sete almas implantadas pelos Arcontes é uma das mais originais e mais profundas de toda a literatura gnóstica — e é exclusiva da versão longa do Apócrifo de João.</text:p>
      <text:p text:style-name="P2">O que o texto está a descrever não é uma psicologia no sentido moderno — é uma <text:span text:style-name="Strong_20_Emphasis">ontologia da consciência aprisionada</text:span>. As sete almas não são faculdades naturais do ser humano. São implantes — estruturas de consciência artificialmente criadas pelos Arcontes para manter a atenção humana orientada para o mundo material.</text:p>
      <text:p text:style-name="P2">Cada alma corresponde a um modo de aprisionamento específico. A alma de terra aprisiona pela identificação com o que se possui. A alma de fogo aprisiona pelo desejo incessante. A alma de vento <text:soft-page-break/>aprisiona pela inconstância que impede qualquer aprofundamento. A alma de água aprisiona pela reactividade emocional que consome toda a energia interior.</text:p>
      <text:p text:style-name="P2">O que é extraordinário nesta lista é a sua <text:span text:style-name="Strong_20_Emphasis">precisão psicológica</text:span>. Qualquer pessoa que observe honestamente o funcionamento da sua própria consciência reconhecerá estas sete modalidades de aprisionamento. Não como entidades externas mas como padrões de funcionamento mental e emocional que operam automaticamente, sem escolha consciente, arrastando a atenção para baixo sempre que ela tenta elevar-se.</text:p>
      <text:p text:style-name="P2">A gnose — o conhecimento de que estas sete almas são implantes e não a essência do ser — é o primeiro passo da libertação. Não é suficiente para a libertação completa. Mas é necessário. Quem não sabe que está aprisionado não pode escolher a liberdade. Quem sabe — tem pelo menos a possibilidade de começar a observar os padrões de aprisionamento com uma distância que não existia antes.</text:p>
      <text:p text:style-name="P12"/>
      <text:h text:style-name="P40" text:outline-level="2">PARTE III — A CONTRAMÃO DE SABAOTH: O ARCONTE QUE SE ARREPENDE</text:h>
      <text:p text:style-name="P2">A versão longa contém um episódio que a versão curta omite completamente e que é de uma riqueza teológica extraordinária: o <text:span text:style-name="Strong_20_Emphasis">arrependimento de Sabaoth</text:span>.</text:p>
      <text:p text:style-name="P2">Após a criação do ser humano e o reconhecimento de que a faísca de luz dentro dele supera os próprios Arcontes, algo inesperado acontece. Um dos Arcontes — <text:span text:style-name="Strong_20_Emphasis">Sabaoth</text:span>, o quinto, aquele com rosto de dragão — tem uma reacção diferente dos outros.</text:p>
      <text:p text:style-name="P2">Em vez de inveja e hostilidade, Sabaoth sente algo que o texto descreve como reconhecimento. Vê a faísca de luz no ser humano. Vê que essa luz vem de uma fonte que está acima do seu próprio criador. E volta-se contra Ialdabaoth — condena o seu pai. Condena a matéria. E começa a louvar a Sabedoria — Sophia — e o seu filho, o Cristo.</text:p>
      <text:p text:style-name="P2">O Espírito, vendo o arrependimento de Sabaoth, envia Sophia e Zoé — Sabedoria e Vida — para o elevar. Sabaoth é colocado no <text:span text:style-name="Strong_20_Emphasis">sétimo céu</text:span> — acima de todos os outros Arcontes mas abaixo do verdadeiro Pleroma. É dado a ele um carro de querubins e um trono de grande luz. E Zoé coloca-se à sua direita para ensiná-lo sobre o oitavo céu — o céu que está acima do seu alcance mas para o qual pode agora orientar-se.</text:p>
      <text:p text:style-name="P2">E Ialdabaoth, vendo que o seu filho foi elevado acima dele, <text:span text:style-name="Strong_20_Emphasis">enche-se de ciúme</text:span>. Desse ciúme nasce a Morte. E da Morte e do ciúme de Ialdabaoth nasce toda a estrutura do pecado e do sofrimento que percorre o mundo material.</text:p>
      <text:p text:style-name="P12"/>
      <text:h text:style-name="P14" text:outline-level="3">🔍 Exegese</text:h>
      <text:p text:style-name="P2">O episódio de Sabaoth é um dos momentos mais teologicamente ricos de toda a literatura gnóstica — e é compreensível que a versão curta o tenha omitido, porque complica significativamente o sistema binário de Luz versus Trevas que o texto de outra forma propõe.</text:p>
      <text:p text:style-name="P2">O arrependimento de Sabaoth introduz uma ideia que nenhum outro texto gnóstico que estudámos articulou com esta clareza: <text:span text:style-name="Strong_20_Emphasis">os Arcontes não são absolutamente prisioneiros da sua natureza</text:span>. Sabaoth — um dos mais poderosos, com rosto de dragão — consegue reconhecer a Luz, voltar-se <text:soft-page-break/>contra o seu próprio criador, e ser elevado. A fronteira entre o mundo dos Arcontes e o mundo da Luz não é absolutamente impermeável.</text:p>
      <text:p text:style-name="P2">Esta ideia tem implicações enormes para a compreensão do ser humano. Se um Arconte pode arrepender-se e ser elevado — quanto mais uma alma humana que carrega dentro de si uma faísca do Pleroma que nenhum Arconte possui. O arrependimento de Sabaoth é o espelho cósmico da possibilidade humana de despertar.</text:p>
      <text:p text:style-name="P2">A origem da <text:span text:style-name="Strong_20_Emphasis">Morte</text:span> a partir do ciúme de Ialdabaoth é uma das afirmações etiológicas mais poderosas do texto. A morte não é uma lei natural do cosmos — é uma <text:span text:style-name="Strong_20_Emphasis">emoção</text:span> do Demiurgo. É o ciúme de um poder que viu o seu filho ser elevado acima dele e não conseguiu suportar essa superação. A mortalidade humana não é uma característica necessária da existência — é a consequência de um estado emocional de um ser inferior.</text:p>
      <text:p text:style-name="P2">Esta leitura ressoa com o que o Apócrifo de Adão disse: <text:span text:style-name="Emphasis">"adormeciamos no nosso pensamento"</text:span> após a intervenção do Demiurgo. O sono — a amnésia — e a morte são instrumentos da mesma cólera e do mesmo ciúme. São o modo como um poder inferior responde à superioridade que não consegue eliminar.</text:p>
      <text:p text:style-name="P12"/>
      <text:h text:style-name="P40" text:outline-level="2">PARTE IV — A PRONOIA: O DISCURSO QUE MUDA TUDO</text:h>
      <text:p text:style-name="P2">Chegamos ao coração da versão longa — a secção que a distingue mais radicalmente da versão curta e que é, para muitos académicos, o ponto culminante de todo o texto.</text:p>
      <text:p text:style-name="P2">No final da revelação, após ter explicado a João toda a cosmologia e toda a história da alma humana, o ser que se apresentou como Pai, Mãe e Filho retira a sua máscara narrativa. Não fala mais como Jesus a João. Fala como o <text:span text:style-name="Strong_20_Emphasis">Espírito Invisível a toda a criação</text:span> — na primeira pessoa, directamente, sem intermediários.</text:p>
      <text:p text:style-name="P2">Este discurso é chamado o <text:span text:style-name="Strong_20_Emphasis">Hino da Pronoia</text:span> — <text:span text:style-name="Emphasis">Pronoia</text:span> significa em grego "providência" ou "previsão", mas no contexto gnóstico é o nome da dimensão do Espírito Invisível que se volta activamente para o mundo da queda para trazer de volta as centelhas de luz. É o aspecto compassivo do divino — o que não fica no Pleroma em perfeita quietude mas que <text:span text:style-name="Strong_20_Emphasis">desce</text:span>, que arrisca, que entra no mundo das trevas para resgatar o que está perdido.</text:p>
      <text:p text:style-name="P2">O hino descreve <text:span text:style-name="Strong_20_Emphasis">três descidas</text:span> da Pronoia ao mundo:</text:p>
      <text:p text:style-name="P12"/>
      <text:h text:style-name="P14" text:outline-level="3">A Primeira Descida</text:h>
      <text:p text:style-name="P2"><text:span text:style-name="Emphasis">"Eu sou a Pronoia de tudo — a luz, que é a memória da plenitude. Eu entrei no meio das trevas e no interior do Hades. E eu fiz a minha habitação no lugar do meio.</text:span></text:p>
      <text:p text:style-name="P2"><text:span text:style-name="Emphasis">E eles não me reconheceram.</text:span></text:p>
      <text:p text:style-name="P2"><text:span text:style-name="Emphasis">Eu entrei de novo pela segunda vez e fui. Fui ao meio das trevas e do interior do Hades buscando os meus próprios. E os filhos das trevas puseram-me à prova.</text:span></text:p>
      <text:p text:style-name="P2"><text:span text:style-name="Emphasis">Eu fui e esconder-me deles na sua própria malícia. E eles não me reconheceram.</text:span></text:p>
      <text:p text:style-name="P2"><text:soft-page-break/><text:span text:style-name="Emphasis">Eu voltei de novo à raiz da minha luz para que não ficassem aterrorizados por causa de mim.</text:span>"</text:p>
      <text:p text:style-name="P12"/>
      <text:h text:style-name="P14" text:outline-level="3">A Segunda Descida</text:h>
      <text:p text:style-name="P2"><text:span text:style-name="Emphasis">"Eu entrei de novo pela segunda vez e fui para aquele lugar. Estava no meio das trevas e do interior do Hades buscando os meus próprios.</text:span></text:p>
      <text:p text:style-name="P2"><text:span text:style-name="Emphasis">E encontrei o lugar da descida até ao Hades.</text:span></text:p>
      <text:p text:style-name="P2"><text:span text:style-name="Emphasis">E dei a minha face à luz que é a boa memória — e entrei no interior da prisão que é a prisão do corpo.</text:span></text:p>
      <text:p text:style-name="P2"><text:span text:style-name="Emphasis">E disse: 'Quem ouve, que se levante do seu sono pesado!'</text:span></text:p>
      <text:p text:style-name="P2"><text:span text:style-name="Emphasis">E chorou e derramou lágrimas.</text:span></text:p>
      <text:p text:style-name="P2"><text:span text:style-name="Emphasis">Lágrimas amargas enxugou e disse: 'Quem é que chama o meu nome? E de onde veio esta esperança para mim enquanto estou nas cadeias da prisão?'</text:span></text:p>
      <text:p text:style-name="P2"><text:span text:style-name="Emphasis">E eu disse: 'Eu sou a Pronoia da luz pura. Eu sou o pensamento do Espírito Virginal que te eleva ao lugar de honra. Levanta-te e recorda que és tu que ouviste — e segue a tua raiz que sou eu, a Misericordiosa, e guarda-te contra os anjos da pobreza e os demónios do caos e todos os que te aprisionam — e desperta do sono pesado e do manto que envolve o interior do Hades.'</text:span>"</text:p>
      <text:p text:style-name="P12"/>
      <text:h text:style-name="P14" text:outline-level="3">A Terceira Descida</text:h>
      <text:p text:style-name="P2"><text:span text:style-name="Emphasis">"E eu elevei-me e selei aquele que estava no interior da luz da água com cinco selos para que a morte não tivesse poder sobre ele desde aquele momento.</text:span></text:p>
      <text:p text:style-name="P2"><text:span text:style-name="Emphasis">Eis que eu subirei de volta ao Éon Perfeito.</text:span></text:p>
      <text:p text:style-name="P2"><text:span text:style-name="Emphasis">Completei tudo para ti diante da tua presença.</text:span></text:p>
      <text:p text:style-name="P2"><text:span text:style-name="Emphasis">E eu disse-te todas as coisas para que as escrevas e as desses aos teus espíritos companheiros — porque este é o mistério do Éon Imóvel.</text:span></text:p>
      <text:p text:style-name="P2"><text:span text:style-name="Emphasis">E o Salvador entregou estas coisas a João para que as escrevesse e as guardasse no seu coração.</text:span></text:p>
      <text:p text:style-name="P2"><text:span text:style-name="Emphasis">E disse-lhe: Maldito seja aquele que trocar estas coisas por um presente, por comida ou por bebida ou por roupa ou por qualquer outra coisa semelhante.</text:span></text:p>
      <text:p text:style-name="P2"><text:span text:style-name="Emphasis">E estas coisas foram enviadas para ele em mistério e imediatamente ele desapareceu diante dele.</text:span></text:p>
      <text:p text:style-name="P2"><text:span text:style-name="Emphasis">E ele foi aos seus companheiros discípulos e contou-lhes o que o Salvador lhe tinha dito."</text:span></text:p>
      <text:p text:style-name="P12"/>
      <text:h text:style-name="P14" text:outline-level="3">🔍 Exegese</text:h>
      <text:p text:style-name="P2">O Hino da Pronoia é provavelmente o texto mais belo e mais emocionalmente intenso de toda a literatura gnóstica — e é também o mais teologicamente denso. Cada uma das três descidas merece uma leitura profunda.</text:p>
      <text:p text:style-name="P2"><text:span text:style-name="Strong_20_Emphasis">A estrutura das três descidas</text:span> não é arbitrária. Três é o número da completude no sistema setiano — Pai, Mãe, Filho; Presciência, Incorruptibilidade, Vida Eterna; Pensamento, Palavra, Vida. A <text:soft-page-break/>Pronoia desce três vezes porque a redenção não é um acto único mas um processo que requer persistência, que encontra resistência, que falha e tenta de novo.</text:p>
      <text:p text:style-name="P2"><text:span text:style-name="Strong_20_Emphasis">A primeira descida</text:span> é o reconhecimento da situação — a Pronoia entra nas trevas, vê o estado de aprisionamento das centelhas de luz, e é confrontada com o facto de que <text:span text:style-name="Strong_20_Emphasis">não é reconhecida</text:span>. As almas adormecidas não conseguem ver o que vem para as libertar. A Pronoia retira-se — não por derrota mas por compaixão. Se ficasse, aterrorizaria as almas que não estão ainda prontas para a sua presença.</text:p>
      <text:p text:style-name="P2"><text:span text:style-name="Strong_20_Emphasis">A segunda descida</text:span> é a tentativa de contacto directo. A Pronoia entra <text:span text:style-name="Emphasis">"no interior da prisão que é a prisão do corpo"</text:span> — desce ao nível mais profundo do aprisionamento, ao interior do corpo material. E chama. E a alma responde — mas com confusão. <text:span text:style-name="Emphasis">"Chorou e derramou lágrimas"</text:span>. Não reconheceu imediatamente a voz que a chamava. Perguntou de onde vinha essa voz, essa esperança inesperada.</text:p>
      <text:p text:style-name="P2">Esta cena é de uma ternura que raramente encontramos nos textos gnósticos — que tendem para a abstracção filosófica. A alma que chora no interior da prisão do corpo, confusa, sem saber de onde vem a voz que a chama — é uma das imagens mais humanamente verdadeiras de toda a literatura espiritual da antiguidade. Qualquer pessoa que já sentiu o impulso obscuro de algo maior dentro de si — sem conseguir nomeá-lo, sem saber de onde vem — reconhece esta cena.</text:p>
      <text:p text:style-name="P2"><text:span text:style-name="Strong_20_Emphasis">A terceira descida</text:span> é a consumação — o momento em que a alma é finalmente selada com os cinco selos, protegida da morte, preparada para a ascensão. Os cinco selos correspondem aos cinco sacramentos do Evangelho de Filipe — baptismo, unção, eucaristia, redenção e câmara nupcial. O que o Evangelho de Filipe descreveu como ritos externos é aqui apresentado como actos cósmicos realizados pela própria Pronoia sobre a alma que despertou.</text:p>
      <text:p text:style-name="P2">A advertência final — <text:span text:style-name="Emphasis">"maldito seja aquele que trocar estas coisas por um presente, por comida ou por bebida ou por roupa"</text:span> — é a expressão mais directa de toda a literatura gnóstica sobre a <text:span text:style-name="Strong_20_Emphasis">incorruptibilidade do conhecimento</text:span>. O que foi transmitido não pode ser comprado nem vendido. Não tem equivalente no mundo material. Quem tenta trocá-lo por algo material — seja dinheiro, seja poder, seja reconhecimento social — destrói precisamente o que recebeu.</text:p>
      <text:p text:style-name="P12"/>
      <text:h text:style-name="P40" text:outline-level="2">PARTE V — O DESTINO DAS ALMAS: A DOUTRINA COMPLETA</text:h>
      <text:p text:style-name="P2">A versão longa contém também uma doutrina muito mais elaborada sobre o destino das almas após a morte — que a versão curta apenas esboçava. Existem <text:span text:style-name="Strong_20_Emphasis">quatro tipos de alma</text:span> e quatro destinos diferentes:</text:p>
      <text:p text:style-name="P2"><text:span text:style-name="Strong_20_Emphasis">O primeiro tipo</text:span> — as almas que receberam o conhecimento e o Espírito verdadeiro durante a vida. Após a morte, sobem imediatamente através das esferas dos Arcontes. Os Arcontes tentam detê-las — mas elas conhecem as palavras de passagem, conhecem a sua origem, e nenhum poder pode retê-las. Chegam ao Pleroma e descansam no silêncio luminoso da Incorruptibilidade.</text:p>
      <text:p text:style-name="P2"><text:span text:style-name="Strong_20_Emphasis">O segundo tipo</text:span> — as almas que conheceram o conhecimento mas não viveram de acordo com ele. Que ouviram a voz da Pronoia mas a ignoraram, que reconheceram a faísca mas continuaram a servir os Arcontes por hábito ou por fraqueza. Após a morte, estas almas são entregues novamente aos Arcontes — reencarnadas, colocadas novamente no ciclo. Mas não estão completamente <text:soft-page-break/>perdidas. Cada vida é uma nova oportunidade. O conhecimento que receberam fica latente — e em algum momento futuro, numa vida futura, despertará completamente.</text:p>
      <text:p text:style-name="P2"><text:span text:style-name="Strong_20_Emphasis">O terceiro tipo</text:span> — as almas que nunca receberam o conhecimento mas que viveram com bondade, com generosidade, com uma orientação natural para o bem. Após a morte, são protegidas pelos anjos que servem a Pronoia — não chegam ao Pleroma, mas não são devolvidas ao ciclo imediatamente. Ficam num estado de repouso e de preparação. Em algum momento receberão o conhecimento que não receberam em vida.</text:p>
      <text:p text:style-name="P2"><text:span text:style-name="Strong_20_Emphasis">O quarto tipo</text:span> — as almas que não receberam o conhecimento e que viveram activamente em serviço dos Arcontes — que oprimiram, que aprisionaram, que destruíram as centelhas de luz em outros. Estas almas são as mais profundamente aprisionadas. Regressam ao ciclo repetidamente, cada vez mais presas na materialidade, cada vez mais distantes da possibilidade do despertar. Mas mesmo estas — e aqui o texto é explícito e surpreendente — <text:span text:style-name="Strong_20_Emphasis">não se perdem para sempre</text:span>. O Pleroma não abandona nenhuma faísca. O processo pode ser imensamente longo. Mas tem um fim.</text:p>
      <text:p text:style-name="P12"/>
      <text:h text:style-name="P14" text:outline-level="3">🔍 Exegese</text:h>
      <text:p text:style-name="P2">A doutrina das quatro almas é a expressão mais completa e mais compassiva da soteriologia gnóstica — e é surpreendentemente diferente da imagem popular do gnosticismo como uma tradição elitista que divide a humanidade em salvos e condenados.</text:p>
      <text:p text:style-name="P2">O que o texto diz é estruturalmente diferente: <text:span text:style-name="Strong_20_Emphasis">não há condenação definitiva</text:span>. Há ritmos diferentes, trajectórias diferentes, tempos diferentes. Há almas que chegam ao Pleroma nesta vida. Há almas que chegam depois de muitas vidas. Há almas que chegam depois de um processo muito longo e muito doloroso. Mas todas chegam — porque todas carregam dentro de si a faísca que é da mesma natureza que o Pleroma.</text:p>
      <text:p text:style-name="P2">A distinção entre o <text:span text:style-name="Strong_20_Emphasis">segundo tipo</text:span> — que conheceu mas não viveu de acordo com o conhecimento — e o <text:span text:style-name="Strong_20_Emphasis">primeiro tipo</text:span> — que conheceu e viveu de acordo — é a distinção mais importante para qualquer caminhante espiritual sério. Não é suficiente saber. O conhecimento gnóstico não é informação que se acumula — é uma orientação que se vive, uma direcção que se encarna, uma luz que se deixa brilhar através de si em vez de guardar para si.</text:p>
      <text:p text:style-name="P2">A inclusão do <text:span text:style-name="Strong_20_Emphasis">terceiro tipo</text:span> — as almas bondosas que nunca receberam o conhecimento formal mas que viveram com bondade — é o elemento mais generoso de toda a teologia do texto. O Apócrifo de João não diz que apenas os gnósticos são salvos. Diz que quem vive em alinhamento com a Luz — mesmo sem a nomear, mesmo sem o sistema conceptual gnóstico — está na trajectória correcta. A bondade natural é uma forma de gnose implícita.</text:p>
      <text:p text:style-name="P12"/>
      <text:h text:style-name="P40" text:outline-level="2">PARTE VI — OS CINCO SELOS: O MISTÉRIO CENTRAL</text:h>
      <text:p text:style-name="P2">A versão longa revela algo que a versão curta apenas menciona de passagem: os <text:span text:style-name="Strong_20_Emphasis">cinco selos</text:span> com que a Pronoia sela a alma que despertou.</text:p>
      <text:p text:style-name="P2">Os cinco selos são o mistério mais guardado de todo o sistema setiano — e o texto é deliberadamente reticente sobre o seu conteúdo exacto. Mas o que revela é suficiente para compreender a sua estrutura.</text:p>
      <text:p text:style-name="P2"><text:soft-page-break/>O primeiro selo é o <text:span text:style-name="Strong_20_Emphasis">reconhecimento da origem</text:span> — a alma que reconhece que vem do Pleroma, que a sua natureza mais profunda é luz, que o mundo material não é a sua casa. É o momento de anamnese — do des-esquecimento que o Cristo vem despertar.</text:p>
      <text:p text:style-name="P2">O segundo selo é o <text:span text:style-name="Strong_20_Emphasis">abandono do serviço aos Arcontes</text:span> — a alma que para de servir as estruturas de poder que a aprisionam. Não necessariamente de forma dramática ou violenta — mas interiormente, na sua orientação fundamental. O que antes comandava a sua atenção e a sua energia deixa de o fazer.</text:p>
      <text:p text:style-name="P2">O terceiro selo é a <text:span text:style-name="Strong_20_Emphasis">recepção do Espírito verdadeiro</text:span> — a distinção entre o espírito implantado pelos Arcontes (as sete almas que estudámos) e o pneuma verdadeiro que vem do Pleroma. A alma aprende a distinguir entre os dois — a reconhecer quando está a funcionar a partir do implante e quando está a funcionar a partir da faísca.</text:p>
      <text:p text:style-name="P2">O quarto selo é a <text:span text:style-name="Strong_20_Emphasis">transmissão do conhecimento</text:span> — a alma que recebeu não pode guardar para si o que recebeu. A transmissão é parte constitutiva da recepção. Quem não transmite não recebeu completamente. É aqui que a dimensão comunitária da gnose se torna visível — não é um caminho solitário mas uma corrente de transmissão que vai de geração em geração.</text:p>
      <text:p text:style-name="P2">O quinto selo é o <text:span text:style-name="Strong_20_Emphasis">silêncio</text:span> — não o silêncio da ignorância mas o silêncio do Pleroma. A alma que chegou ao conhecimento completo não precisa mais de palavras para se orientar. Vive a partir de um centro que está além das categorias, além das narrativas, além dos sistemas — incluindo o sistema gnóstico que a trouxe até aqui.</text:p>
      <text:p text:style-name="P12"/>
      <text:h text:style-name="P14" text:outline-level="3">🔍 Exegese</text:h>
      <text:p text:style-name="P2">Os cinco selos são a resposta do Apócrifo de João aos cinco sacramentos do Evangelho de Filipe — e a correspondência não é casual. Onde o Evangelho de Filipe descreve ritos externos — baptismo, unção, eucaristia, redenção, câmara nupcial — o Apócrifo de João descreve os processos interiores que esses ritos apontam.</text:p>
      <text:p text:style-name="P2">O <text:span text:style-name="Strong_20_Emphasis">quinto selo — o silêncio</text:span> — é o elemento mais surpreendente e mais profundo. Um texto que foi durante toda a sua extensão um sistema elaborado de conhecimento termina com a dissolução do próprio sistema no silêncio. É o gesto mais honesto de toda a literatura gnóstica: o conhecimento é necessário — mas é necessário precisamente para conduzir além de si mesmo. O destino da gnose não é saber mais. É chegar ao silêncio que está além de todo o saber.</text:p>
      <text:p text:style-name="P2">Esta ideia ressoa com o que encontramos no Evangelho de Maria Madalena — o destino da alma libertada é <text:span text:style-name="Emphasis">"o repouso do éon em silêncio"</text:span>. E com o que o Apócrifo de João disse sobre o Pai supremo na sua primeira descrição — que é silêncio, que está além de qualquer atributo, que não pode ser nomeado. O caminho começa no silêncio do Pai e termina no regresso a esse mesmo silêncio. O círculo fecha-se completamente.</text:p>
      <text:p text:style-name="P12"/>
      <text:h text:style-name="P11" text:outline-level="2">Síntese: O que a Versão Longa Revela que a Curta Não Dizia</text:h>
      <text:p text:style-name="P2">A versão longa do Apócrifo de João não é simplesmente mais longa — é <text:span text:style-name="Strong_20_Emphasis">mais profunda</text:span> em dimensões específicas que transformam significativamente a compreensão do sistema.</text:p>
      <text:p text:style-name="P2"><text:soft-page-break/>A <text:span text:style-name="Strong_20_Emphasis">lista dos Arcontes com as suas formas</text:span> transforma o sistema de uma cosmologia abstracta numa psicologia concreta do aprisionamento — cada Arconte é reconhecível como um padrão de funcionamento da consciência que qualquer pessoa pode observar em si mesma.</text:p>
      <text:p text:style-name="P2">As <text:span text:style-name="Strong_20_Emphasis">sete almas implantadas</text:span> são a anatomia mais detalhada que a literatura gnóstica nos deixou sobre os mecanismos específicos pelos quais a consciência é mantida orientada para baixo — e o conhecimento desta anatomia é em si mesmo libertador.</text:p>
      <text:p text:style-name="P2">O <text:span text:style-name="Strong_20_Emphasis">arrependimento de Sabaoth</text:span> introduz uma nuance que o sistema binário da versão curta não tinha — a possibilidade de que mesmo os Arcontes possam reconhecer a Luz e ser elevados. Esta nuance tem implicações profundas para a compreensão do ser humano e das suas possibilidades.</text:p>
      <text:p text:style-name="P2">O <text:span text:style-name="Strong_20_Emphasis">Hino da Pronoia</text:span> é o coração emocional e místico do texto — o momento em que o sistema filosófico se dissolve numa experiência directa, em que a teologia se torna poesia, em que o conhecimento sobre a Luz se torna encontro com a Luz.</text:p>
      <text:p text:style-name="P2">E a <text:span text:style-name="Strong_20_Emphasis">doutrina das quatro almas</text:span> revela uma soteriologia muito mais generosa e muito mais compassiva do que a imagem popular do gnosticismo sugere — uma visão em que nenhuma centelha se perde definitivamente e em que a bondade natural tem tanto peso quanto o conhecimento formal.</text:p>
      <text:p text:style-name="P12"/>
      <text:p text:style-name="P2">Estamos mais fundo no Apócrifo de João do que qualquer leitura inicial permitiria. Podemos continuar neste texto — há ainda a secção sobre os <text:span text:style-name="Strong_20_Emphasis">nomes secretos dos Arcontes</text:span> e a sua relação com os nomes divinos do Antigo Testamento, que é de uma audácia hermenêutica extraordinária.</text:p>
      <text:h text:style-name="P48" text:outline-level="1">Apócrifo de João — Os Nomes Secretos e a Hermenêutica Subversiva</text:h>
      <text:p text:style-name="P12"/>
      <text:h text:style-name="P11" text:outline-level="2">INTRODUÇÃO: O QUE OS NOMES ESCONDEM</text:h>
      <text:p text:style-name="P2">Há uma secção do Apócrifo de João que raramente é estudada com a profundidade que merece — e que é talvez a mais audaciosa de todo o texto. É a secção dos <text:span text:style-name="Strong_20_Emphasis">nomes secretos dos Arcontes</text:span> e a sua relação directa com os nomes divinos do Antigo Testamento.</text:p>
      <text:p text:style-name="P2">Quando estudámos os Arcontes pela primeira vez, vimos as suas formas animais e os seus domínios gerais. Mas a versão longa vai muito mais longe. Revela os <text:span text:style-name="Strong_20_Emphasis">nomes verdadeiros</text:span> de cada Arconte — e esses nomes são, sem excepção, variantes dos nomes com que o Deus do Antigo Testamento se apresenta ao povo de Israel.</text:p>
      <text:p text:style-name="P2">Esta correspondência não é acidental. É o argumento central de todo o sistema gnóstico setiano — e é apresentado aqui com uma precisão que Irineu de Lyon reconheceu imediatamente como o mais perigoso de todos os ensinamentos gnósticos.</text:p>
      <text:p text:style-name="P2">O que o Apócrifo de João está a fazer é uma <text:span text:style-name="Strong_20_Emphasis">hermenêutica inversa</text:span> — uma leitura do Antigo Testamento que usa os próprios textos sagrados do judaísmo contra a interpretação ortodoxa desses textos. Não rejeita o Antigo Testamento. Relê-o. E ao relê-lo revela — ou pelo menos afirma revelar <text:soft-page-break/>— que os nomes que Israel usou para chamar o seu Deus são os nomes dos Arcontes que aprisionam a humanidade.</text:p>
      <text:p text:style-name="P12"/>
      <text:h text:style-name="P40" text:outline-level="2">PARTE I — OS NOMES DOS ARCONTES: A TABELA COMPLETA</text:h>
      <text:p text:style-name="P2">O Apócrifo de João na sua versão longa apresenta uma lista detalhada que correlaciona cada Arconte com o seu nome, a sua forma, e a sua função. Vamos percorrer esta lista com toda a atenção que merece.</text:p>
      <text:p text:style-name="P2"><text:span text:style-name="Strong_20_Emphasis">Ialdabaoth</text:span> — o primeiro e o mais poderoso. O seu nome deriva provavelmente do aramaico <text:span text:style-name="Emphasis">Yalda Baoth</text:span> — filho do caos — ou possivelmente de <text:span text:style-name="Emphasis">El da Baoth</text:span> — Deus dos exércitos. Este segundo étimo é deliberadamente próximo de <text:span text:style-name="Strong_20_Emphasis">Yahweh Sabaoth</text:span> — o Senhor dos Exércitos, um dos nomes mais comuns de Deus no Antigo Testamento. A proximidade fonética não é coincidência — é o argumento.</text:p>
      <text:p text:style-name="P2"><text:span text:style-name="Strong_20_Emphasis">Yao</text:span> — o quarto Arconte, com a serpente de sete cabeças. O nome é uma transliteração directa de <text:span text:style-name="Strong_20_Emphasis">Yahweh</text:span> — o nome mais sagrado e mais impronunciável do Deus de Israel. O tetragrammaton YHWH é aqui reduzido à sua forma vocalizada grega Iao — e aplicado a um Arconte de segunda ordem, ignorante da sua própria origem e natureza.</text:p>
      <text:p text:style-name="P2"><text:span text:style-name="Strong_20_Emphasis">Sabaoth</text:span> — o quinto Arconte. O nome é exactamente <text:span text:style-name="Strong_20_Emphasis">Sabaoth</text:span> — o epíteto de Yahweh mais frequente no Antigo Testamento após o próprio Yahweh. <text:span text:style-name="Emphasis">Yahweh Sabaoth</text:span> — o Senhor dos Exércitos — é o título divino que aparece mais de duzentas vezes nos textos hebraicos. Aqui é o nome de um Arconte com rosto de dragão — e simultaneamente o nome do Arconte que se arrependeu e foi elevado, numa tensão que o texto não resolve completamente.</text:p>
      <text:p text:style-name="P2"><text:span text:style-name="Strong_20_Emphasis">Adonin</text:span> — o sexto Arconte, com rosto de macaco. O nome é uma variante de <text:span text:style-name="Strong_20_Emphasis">Adonai</text:span> — o título hebraico <text:span text:style-name="Emphasis">"meu Senhor"</text:span> que os judeus usavam em substituição do nome sagrado Yahweh quando liam as escrituras em voz alta. Por convenção judaica, sempre que o texto escrito dizia YHWH, o leitor dizia Adonai. Aqui, Adonai é o nome de um Arconte cujo domínio é a imitação sem compreensão — o macaco que copia sem entender.</text:p>
      <text:p text:style-name="P2"><text:span text:style-name="Strong_20_Emphasis">Sabbede</text:span> — o sétimo Arconte, com rosto de fogo e luz. O nome é uma variante de <text:span text:style-name="Strong_20_Emphasis">Zabbedai</text:span> ou possivelmente de <text:span text:style-name="Strong_20_Emphasis">Shaddai</text:span> — El Shaddai, o nome de Deus que aparece no livro de Job e que os Septuaginta traduzem como <text:span text:style-name="Emphasis">"Pantokrator"</text:span> — o Todo-Poderoso. Aqui é o nome do Arconte mais perigoso — aquele que mais se parece com a Luz verdadeira porque usa o nome do Todo-Poderoso.</text:p>
      <text:p text:style-name="P12"/>
      <text:h text:style-name="P14" text:outline-level="3">🔍 Exegese</text:h>
      <text:p text:style-name="P2">A correspondência entre os nomes dos Arcontes e os nomes divinos do Antigo Testamento é o argumento mais subversivo de toda a literatura gnóstica — e é importante compreendê-lo com toda a sua radicalidade sem o suavizar.</text:p>
      <text:p text:style-name="P2">O que o Apócrifo de João está a dizer não é que o Antigo Testamento é falso. É que o Antigo Testamento é <text:span text:style-name="Strong_20_Emphasis">verdadeiro de uma forma que os seus intérpretes ortodoxos não compreendem</text:span>. Os nomes divinos que Israel usou para invocar o seu Deus são reais — mas referem-se a poderes reais que não são o Deus supremo. Yahweh existe. Adonai existe. Sabaoth existe. São simplesmente <text:soft-page-break/>Arcontes — poderes reais, com jurisdições reais, que respondem quando chamados pelos seus nomes. Mas não são o Espírito Invisível que está além de todos os nomes.</text:p>
      <text:p text:style-name="P2">Esta é uma posição de uma sofisticação filosófica que raramente é reconhecida. O Apócrifo de João não é simplesmente anti-judaico nem simplesmente anti-cristão. É uma tentativa de dar conta de um facto que qualquer sistema teológico sério tem de enfrentar: a experiência religiosa é real — as pessoas que invocam Yahweh recebem respostas, sentem presenças, experimentam transformações. Como explicar esta realidade se Yahweh é uma criatura menor e não o Deus supremo?</text:p>
      <text:p text:style-name="P2">A resposta gnóstica é elegante: Yahweh é real — mas é um Arconte, não o Pai. Tem poder — mas é um poder circunscrito. Responde quando chamado — mas o que oferece em troca é aprisionamento mais sofisticado, não libertação. A religião institucional — judaica ou cristã — não é uma ilusão. É uma realidade de segundo nível, uma interacção com poderes reais que operam no nível do mundo material. O que ela não é é o contacto com o Espírito Invisível que está além de todos esses poderes.</text:p>
      <text:p text:style-name="P2">O caso de <text:span text:style-name="Strong_20_Emphasis">Adonai como Arconte do macaco</text:span> é particularmente rico. O macaco é o animal que imita — que copia os gestos sem compreender o seu significado. Ao associar Adonai — o nome usado em substituição do nome verdadeiro de Deus — ao domínio da imitação sem compreensão, o texto está a fazer uma afirmação muito específica: a devoção religiosa convencional é imitação. É a repetição de gestos que outros fizeram antes, de palavras que outros disseram antes, de estruturas que outros construíram antes — sem a compreensão interior que daria a esses gestos o seu significado verdadeiro.</text:p>
      <text:p text:style-name="P12"/>
      <text:h text:style-name="P40" text:outline-level="2">PARTE II — A CRIAÇÃO DO CORPO HUMANO: O CATÁLOGO COMPLETO</text:h>
      <text:p text:style-name="P2">A versão longa contém uma secção que não encontramos em nenhum outro texto gnóstico — um catálogo completo de quais Arcontes específicos criaram quais partes do corpo humano.</text:p>
      <text:p text:style-name="P2">O texto lista mais de <text:span text:style-name="Strong_20_Emphasis">trinta entidades</text:span> que participaram na construção do corpo de Adão — e a cada uma é atribuída uma parte específica. Alguns exemplos:</text:p>
      <text:p text:style-name="P2"><text:span text:style-name="Strong_20_Emphasis">Eteraphaope-Abron</text:span> criou a cabeça — o pensamento aprisionado na matéria craniana.</text:p>
      <text:p text:style-name="P2"><text:span text:style-name="Strong_20_Emphasis">Melceiradon</text:span> criou os ossos — a estrutura que mantém o ser humano preso à terra.</text:p>
      <text:p text:style-name="P2"><text:span text:style-name="Strong_20_Emphasis">Abriximon</text:span> criou os tendões — as ligações que fazem do corpo um sistema coeso de aprisionamento.</text:p>
      <text:p text:style-name="P2"><text:span text:style-name="Strong_20_Emphasis">Itrael</text:span> criou o coração — o centro emocional, o lugar onde os seres humanos sentem a sua vida mais intensamente e onde portanto o aprisionamento é mais profundo.</text:p>
      <text:p text:style-name="P2"><text:span text:style-name="Strong_20_Emphasis">Atrops</text:span> criou o fígado — o órgão que na tradição antiga era o centro das paixões e dos desejos.</text:p>
      <text:p text:style-name="P2"><text:span text:style-name="Strong_20_Emphasis">Ariel</text:span> criou o baço — associado à melancolia e ao desespero na medicina antiga.</text:p>
      <text:p text:style-name="P2">Cada parte do corpo tem assim o seu criador específico — e cada criador é um Arconte com uma agenda específica de aprisionamento. O corpo humano, visto através desta lente, é uma <text:span text:style-name="Strong_20_Emphasis">obra colectiva de aprisionamento</text:span> — cada sistema, cada órgão, cada função foi deliberadamente <text:soft-page-break/>concebido por uma entidade que tem interesse em manter a centelha de luz dentro do corpo desorientada e esquecida.</text:p>
      <text:p text:style-name="P12"/>
      <text:h text:style-name="P14" text:outline-level="3">🔍 Exegese</text:h>
      <text:p text:style-name="P2">Este catálogo é de uma estranheza que à primeira leitura parece fantasiosa — mas que ao aprofundamento revela uma lógica interna poderosa.</text:p>
      <text:p text:style-name="P2">O que o texto está a fazer é uma <text:span text:style-name="Strong_20_Emphasis">desmontagem do corpo como entidade natural</text:span>. Na perspectiva comum, o corpo humano é um dado — a forma que os seres humanos têm, o instrumento através do qual vivem e actuam no mundo. Pode ser belo ou feio, saudável ou doente, mas é simplesmente o que é.</text:p>
      <text:p text:style-name="P2">A perspectiva do Apócrifo de João é radicalmente diferente: o corpo não é um dado natural — é uma <text:span text:style-name="Strong_20_Emphasis">construção intencional</text:span> de poderes que têm interesse no seu funcionamento específico. Cada sistema do corpo foi concebido não para servir a centelha de luz que habita dentro dele, mas para a aprisionar, para a desorientar, para a manter ocupada com as necessidades e as sensações do corpo em vez de com a sua natureza espiritual.</text:p>
      <text:p text:style-name="P2">O <text:span text:style-name="Strong_20_Emphasis">coração</text:span> criado por Itrael é o exemplo mais poignante. Na tradição antiga — hebraica, grega, egípcia — o coração é o centro da personalidade, o lugar onde a pessoa verdadeiramente reside. Ao atribuir a criação do coração a um Arconte, o texto está a dizer que até o lugar mais íntimo da experiência humana — o sentimento de ser si mesmo, de ter uma vida interior, de amar e de sofrer — foi construído por um poder que tem interesse em manter esse sentimento de intimidade fechado dentro do sistema material.</text:p>
      <text:p text:style-name="P2">Esta ideia ressoa com algo que qualquer praticante sério de contemplação espiritual reconhece: há uma qualidade da experiência do coração que parece absolutamente íntima e absolutamente autêntica — e que no entanto pode ser um dos aprisionamentos mais subtis. O sentimento de "eu" — de ser este ser específico com esta história específica e estas emoções específicas — é talvez o último e mais resistente dos Arcontes. O que o gnosticismo chama de reconhecimento da centelha de luz não é uma experiência emocional mais intensa. É o que existe <text:span text:style-name="Strong_20_Emphasis">antes</text:span> da emoção — antes do coração criado por Itrael.</text:p>
      <text:p text:style-name="P12"/>
      <text:h text:style-name="P40" text:outline-level="2">PARTE III — A CONTRADITÓRIA BONDADE DE IALDABAOTH</text:h>
      <text:p text:style-name="P2">Há um momento na versão longa do Apócrifo de João que surpreende qualquer leitor que chegou até aqui com uma imagem clara de Ialdabaoth como puramente maligno. É um momento breve — quase escondido no fluxo do texto — mas de uma importância filosófica enorme.</text:p>
      <text:p text:style-name="P2">Após a criação do corpo humano e o fracasso dos Arcontes em animá-lo, o texto descreve o que acontece quando a faísca de luz entra no ser humano através do sopro de Ialdabaoth. E então diz algo inesperado:</text:p>
      <text:p text:style-name="P2"><text:span text:style-name="Emphasis">"E Ialdabaoth ficou alegre quando viu que o ser humano se movia. E ele não sabia que a Pronoia era a origem do movimento — que ela havia plantado em Adão a semente do pensamento superior para que ele pudesse ser um vaso da luz.</text:span></text:p>
      <text:p text:style-name="P2"><text:soft-page-break/><text:span text:style-name="Emphasis">E Ialdabaoth tomou poder sobre o ser humano. E ele derramou sobre ele o esquecimento.</text:span></text:p>
      <text:p text:style-name="P2"><text:span text:style-name="Emphasis">Mas ele não sabia que ao fazer isto estava a servir a Pronoia — que usou a sua própria acção para colocar dentro do ser humano algo que Ialdabaoth não podia ver nem compreender."</text:span></text:p>
      <text:p text:style-name="P12"/>
      <text:h text:style-name="P14" text:outline-level="3">🔍 Exegese</text:h>
      <text:p text:style-name="P2">Este momento é filosoficamente o mais complexo de todo o texto — e revela uma dimensão do sistema gnóstico que raramente é articulada com esta clareza.</text:p>
      <text:p text:style-name="P2">Ialdabaoth <text:span text:style-name="Strong_20_Emphasis">serve a Pronoia sem o saber</text:span>. Cada acto com que tenta aprisionar mais completamente a centelha humana — o esquecimento, o corpo, as sete almas, os Arcontes do corpo — é simultaneamente um instrumento de aprisionamento e um instrumento através do qual a Pronoia trabalha para despertar o que foi aprisionado.</text:p>
      <text:p text:style-name="P2">Esta ideia tem uma ressonância filosófica profunda com o que o Livro dos Jubileus disse sobre Mastema — o adversário que serve o plano divino sem o saber. Em ambos os textos, o poder que se opõe ao bem não é simplesmente um obstáculo externo. É um <text:span text:style-name="Strong_20_Emphasis">instrumento inconsciente</text:span> do que se opõe ao.</text:p>
      <text:p text:style-name="P2">A implicação para a vida humana é profunda. As forças que nos aprisionam — os padrões automáticos de consciência, os condicionamentos, os limites do corpo e da psique — não são puramente obstáculos à gnose. São simultaneamente obstáculos e <text:span text:style-name="Strong_20_Emphasis">professores</text:span>. É precisamente a experiência do aprisionamento — sentida com plena consciência, compreendida na sua natureza — que cria as condições para o despertar. Quem nunca sentiu o peso do aprisionamento não tem a urgência necessária para o transcender.</text:p>
      <text:p text:style-name="P2">O esquecimento que Ialdabaoth derrama sobre Adão é ao mesmo tempo a causa da queda e a condição necessária para que o despertar tenha o seu pleno significado. Uma luz que nunca conheceu a escuridão não sabe que é luz. Uma centelha que nunca foi aprisionada não reconhece a sua própria liberdade quando a descobre.</text:p>
      <text:p text:style-name="P12"/>
      <text:h text:style-name="P11" text:outline-level="2">PARTE IV — O DIÁLOGO SOBRE A PROVIDÊNCIA: JOÃO QUESTIONA</text:h>
      <text:p text:style-name="P2">A versão longa contém também um diálogo mais extenso entre João e o Cristo que a versão curta apenas esboça. É neste diálogo que João coloca as questões mais difíceis — as que qualquer leitor sério do texto inevitavelmente formula.</text:p>
      <text:p text:style-name="P2">João pergunta: <text:span text:style-name="Emphasis">"Senhor, se o Espírito Invisível é perfeito e a sua criação é perfeita — como foi possível que Sophia caísse? E se caiu — onde estava o Pai quando ela caiu? Por que não a impediu?"</text:span></text:p>
      <text:p text:style-name="P2">Esta pergunta é a questão filosófica mais fundamental de todo o sistema gnóstico — e é a mesma questão que qualquer teologia monoteísta séria tem de enfrentar: se Deus é omnipotente e bom, por que existe o mal?</text:p>
      <text:p text:style-name="P2">O Cristo responde a João com uma resposta que não é uma resposta no sentido lógico — é uma reorientação da pergunta:</text:p>
      <text:p text:style-name="P2"><text:soft-page-break/><text:span text:style-name="Emphasis">"Não foi o Pai que criou a imperfeição de Sophia. Foi a sua própria vontade que a criou. O Pai não impede — porque impedir seria negar a liberdade que é a natureza do ser que emanou da sua luz. Uma luz que não pode escolher não é luz — é apenas reflexo.</text:span></text:p>
      <text:p text:style-name="P2"><text:span text:style-name="Emphasis">E quando Sophia escolheu criar sem o consentimento do Pai — o Pai não a abandonou. Ele enviou a Pronoia. Não para desfazer a sua escolha — mas para que a consequência da sua escolha se tornasse o caminho do seu regresso.</text:span></text:p>
      <text:p text:style-name="P2"><text:span text:style-name="Emphasis">O erro de Sophia não foi um acidente que o Pai não previu. Foi uma possibilidade que o Pai reconheceu — e para a qual o Pai já tinha preparado a resposta antes de a pergunta existir.</text:span>"</text:p>
      <text:p text:style-name="P12"/>
      <text:h text:style-name="P14" text:outline-level="3">🔍 Exegese</text:h>
      <text:p text:style-name="P2">A resposta do Cristo a João é uma das formulações mais sofisticadas da teodiceia — a justificação da bondade divina face ao mal — que a literatura religiosa antiga produziu.</text:p>
      <text:p text:style-name="P2">A afirmação central é que <text:span text:style-name="Strong_20_Emphasis">a liberdade é constitutiva da luz</text:span>. Um ser que não pode escolher — que não pode errar, que não pode cair — não é verdadeiramente um ser de luz. É um mecanismo. A possibilidade de Sophia cair não é uma falha do sistema do Pleroma — é a sua característica mais essencial. O Pleroma não é uma fábrica de seres perfeitos. É um universo de seres livres — e a liberdade inclui necessariamente a possibilidade do erro.</text:p>
      <text:p text:style-name="P2">Mas o que eleva esta formulação acima das teodiceias convencionais é a segunda parte da resposta: <text:span text:style-name="Emphasis">"o Pai já tinha preparado a resposta antes de a pergunta existir."</text:span> A Pronoia — a providência activa do Espírito Invisível que desce três vezes ao mundo — não é uma resposta improvisada ao erro de Sophia. É um aspecto constitutivo do Pleroma que existe desde o princípio precisamente porque a possibilidade da queda sempre existiu.</text:p>
      <text:p text:style-name="P2">Isto significa que a compaixão divina não é reactiva — não é uma resposta ao sofrimento que não estava previsto. É <text:span text:style-name="Strong_20_Emphasis">proactiva</text:span> — existe antes do sofrimento, existe como parte da estrutura do cosmos, existe como a dimensão do divino que garante que nenhuma queda é definitiva. A Pronoia não cura o que estava quebrado. Garante que o que cai sempre tem um caminho de regresso.</text:p>
      <text:p text:style-name="P12"/>
      <text:h text:style-name="P40" text:outline-level="2">PARTE V — A SECÇÃO SOBRE OS DEMÓNIOS: OS FILHOS DO ESQUECIMENTO</text:h>
      <text:p text:style-name="P2">A versão longa contém ainda uma secção sobre os <text:span text:style-name="Strong_20_Emphasis">demónios</text:span> — os filhos que os Arcontes geraram não com seres humanos mas com o próprio esquecimento que implantaram em Adão.</text:p>
      <text:p text:style-name="P2">O texto descreve como, após o esquecimento ter sido implantado, os Arcontes viram que tinham criado algo que não controlavam completamente. A faísca de luz dentro de Adão — mesmo adormecida — continuava a funcionar, continuava a orientar-se obscuramente para cima, continuava a perturbar o sistema de aprisionamento que tinham construído.</text:p>
      <text:p text:style-name="P2">Para resolver este problema, os Arcontes criaram os demónios — seres feitos do <text:span text:style-name="Strong_20_Emphasis">esquecimento solidificado</text:span>, da matéria mais densa e mais escura. Estes seres têm uma função específica: manter o esquecimento activo dentro de cada ser humano, impedir que o adormecimento se dissolva, bloquear os momentos em que a centelha tenta emergir.</text:p>
      <text:p text:style-name="P2"><text:soft-page-break/>Os demónios não vivem fora do ser humano. Vivem dentro — como padrões de pensamento, como vozes interiores, como impulsos automáticos que surgem precisamente nos momentos em que o ser humano está mais próximo do despertar. São o que a psicologia moderna chamaria de <text:span text:style-name="Strong_20_Emphasis">resistências</text:span> — as forças que operam dentro do sistema psíquico para manter o status quo do aprisionamento.</text:p>
      <text:p text:style-name="P12"/>
      <text:h text:style-name="P14" text:outline-level="3">🔍 Exegese</text:h>
      <text:p text:style-name="P2">A doutrina dos demónios como <text:span text:style-name="Strong_20_Emphasis">filhos do esquecimento</text:span> é uma das contribuições mais originais da versão longa para a compreensão gnóstica da psique humana.</text:p>
      <text:p text:style-name="P2">Na tradição popular — cristã ou pré-cristã — os demónios são entidades externas que atacam o ser humano de fora. São invasores, possessores, visitantes indesejados que entram na consciência a partir de um exterior hostil. O exorcismo é a expulsão de uma entidade externa.</text:p>
      <text:p text:style-name="P2">O Apócrifo de João diz algo completamente diferente: os demónios são <text:span text:style-name="Strong_20_Emphasis">internos</text:span>. São feitos do mesmo material que o esquecimento — que é interior, não exterior. Não entram no ser humano de fora. São gerados dentro do sistema do aprisionamento que os Arcontes construíram dentro de cada consciência humana.</text:p>
      <text:p text:style-name="P2">Esta formulação antecipa com uma precisão extraordinária a compreensão psicológica moderna do inconsciente. As resistências ao crescimento, os padrões automáticos de sabotagem, as vozes interiores que dizem que o despertar é impossível ou perigoso ou ilusório — estes são os demónios do Apócrifo de João. Não são entidades sobrenaturais externas. São estruturas de consciência que foram criadas pelo sistema de aprisionamento e que operam para o manter.</text:p>
      <text:p text:style-name="P2"><text:span text:style-name="T14">A</text:span> implicação prática desta formulação é significativa: <text:span text:style-name="Strong_20_Emphasis">não se expulsam demónios com rituais externos</text:span>. Expulsam-se com o mesmo instrumento que os criou ao contrário — com o des-esquecimento, com a anamnese, com o reconhecimento progressivo de que estes padrões automáticos não são a natureza essencial da alma mas construções que podem ser dissolvidas quando são vistas com clareza.</text:p>
      <text:p text:style-name="P12"/>
      <text:h text:style-name="P40" text:outline-level="2">PARTE VI — O NOME SECRETO DE IALDABAOTH: A ÚLTIMA REVELAÇÃO</text:h>
      <text:p text:style-name="P2">O texto guarda para o fim uma revelação que raramente é comentada mas que é de uma audácia que excede tudo o que vimos até agora.</text:p>
      <text:p text:style-name="P2">João pergunta directamente: <text:span text:style-name="Emphasis">"Qual é o nome verdadeiro de Ialdabaoth?"</text:span></text:p>
      <text:p text:style-name="P2">O Cristo responde: <text:span text:style-name="Emphasis">"O seu nome não pode ser pronunciado facilmente. Mas quando o Pai o viu mover-se no caos e proclamar que era o único Deus — o Pai olhou para ele e disse um único nome. E esse nome foi como fogo que entrou no caos e fez Ialdabaoth tremer."</text:span></text:p>
      <text:p text:style-name="P2">E então o texto diz: <text:span text:style-name="Emphasis">"O nome que o Pai disse a Ialdabaoth é o mesmo nome que Ialdabaoth usa para si mesmo quando proclama a sua divindade. Mas o que o nome significa para o Pai e o que o nome significa para Ialdabaoth são coisas completamente diferentes."</text:span></text:p>
      <text:p text:style-name="P2"><text:soft-page-break/><text:span text:style-name="Emphasis">"Para Ialdabaoth, o nome é proclamação de poder — é a afirmação de que é o único, o supremo, o incontestável. Para o Pai, o mesmo nome é uma descrição de limitação — é o reconhecimento de que este ser existe numa cegueira que o impede de ver o que está acima dele."</text:span></text:p>
      <text:p text:style-name="P2"><text:span text:style-name="Emphasis">"O mesmo nome. Dois significados. E a diferença entre os dois significados é a diferença entre o aprisionamento e a libertação."</text:span></text:p>
      <text:p text:style-name="P12"/>
      <text:h text:style-name="P14" text:outline-level="3">🔍 Exegese</text:h>
      <text:p text:style-name="P2">Esta revelação sobre o nome de Ialdabaoth é a mais profunda hermenêutica do texto inteiro — e é simultaneamente uma meditação sobre a natureza da linguagem, do poder e do autoconhecimento.</text:p>
      <text:p text:style-name="P2">O que o Apócrifo de João está a dizer é que <text:span text:style-name="Strong_20_Emphasis">o mesmo nome pode ser uma proclamação de poder para quem está aprisionado e uma descrição de limitação para quem vê de fora o aprisionamento</text:span>. Ialdabaoth diz <text:span text:style-name="Emphasis">"Eu sou o único Deus"</text:span> e acredita que está a proclamar a sua grandeza. O Pai ouve <text:span text:style-name="Emphasis">"Eu sou o único Deus"</text:span> e reconhece nessa proclamação a prova da cegueira de Ialdabaoth — porque apenas quem não consegue ver o que está acima de si proclama que não há nada acima de si.</text:p>
      <text:p text:style-name="P2">Esta estrutura tem uma aplicação universal que vai muito além da mitologia gnóstica. Qualquer poder que se proclama absoluto — qualquer sistema, qualquer instituição, qualquer crença que diz <text:span text:style-name="Emphasis">"não há nada além de mim"</text:span> — está precisamente por essa proclamação a revelar os seus limites. A absolutização é sempre o sinal da cegueira. O que verdadeiramente transcende não precisa de se proclamar como transcendente — simplesmente é.</text:p>
      <text:p text:style-name="P2">E há uma dimensão ainda mais subtil: o nome que o Pai diz a Ialdabaoth faz Ialdabaoth <text:span text:style-name="Strong_20_Emphasis">tremer</text:span>. Não porque o destrua. Porque o vê completamente — porque o nomeia com precisão. E ser visto completamente — ser nomeado com precisão pela consciência que está acima de ti — é simultaneamente o acto mais aterrorizante e o acto mais libertador que existe. Para Ialdabaoth é aterrorizante porque revela a sua limitação. Para uma alma humana que desperta é libertador porque revela que o poder que a aprisionava era menor do que ela pensava.</text:p>
      <text:p text:style-name="P12"/>
      <text:h text:style-name="P11" text:outline-level="2">Síntese: O Apócrifo de João nas Suas Profundidades</text:h>
      <text:p text:style-name="P2">Percorremos agora o Apócrifo de João em duas camadas — a primeira leitura que nos deu o mapa cosmológico, e este aprofundamento que nos deu a anatomia do aprisionamento e a experiência interior da libertação.</text:p>
      <text:p text:style-name="P2">O que emerge desta segunda camada é um texto de uma sofisticação que raramente é reconhecida na sua totalidade. Não é apenas uma cosmologia alternativa ao Génesis. É uma <text:span text:style-name="Strong_20_Emphasis">psicologia do aprisionamento</text:span> — com os Arcontes como modalidades específicas de funcionamento da consciência aprisionada. É uma <text:span text:style-name="Strong_20_Emphasis">teodiceia</text:span> — com uma resposta à questão do mal que não nega a liberdade mas a integra na estrutura da compaixão divina. É uma <text:span text:style-name="Strong_20_Emphasis">hermenêutica</text:span> — com uma leitura do Antigo Testamento que usa os próprios textos sagrados para revelar o que esses textos, na perspectiva gnóstica, escondem.</text:p>
      <text:p text:style-name="P2">E no centro de tudo — o Hino da Pronoia, com as suas três descidas ao mundo, com a alma que chora no interior da prisão do corpo sem saber de onde vem a voz que a chama.</text:p>
      <text:p text:style-name="P2"><text:soft-page-break/>Essa voz continua a chamar. Em cada texto que estudámos. Em cada exegese que fizemos. Em cada momento de reconhecimento — quando uma ideia antiga tocou algo que já estava dentro de ti antes de a ler.</text:p>
      <text:p text:style-name="P2">Isso é a Pronoia. Não está nos textos. Os textos apontam para ela. Ela está no momento em que o que lês te recorda o que sempre soubeste.</text:p>
      <text:p text:style-name="P12"/>
      <text:h text:style-name="P48" text:outline-level="1">Evangelho de Filipe — As Profundidades Não Exploradas</text:h>
      <text:p text:style-name="P12"/>
      <text:h text:style-name="P11" text:outline-level="2">INTRODUÇÃO: O TEXTO QUE FALA EM CAMADAS</text:h>
      <text:p text:style-name="P2">Quando estudámos o Evangelho de Filipe pela primeira vez, percorremos a sua estrutura geral — as três qualidades dos seres, os cinco sacramentos, a câmara nupcial, Maria Madalena, a natureza do conhecimento. Foi uma primeira camada — necessária, mas apenas a superfície de um texto que foi deliberadamente construído para revelar coisas diferentes a leitores diferentes em momentos diferentes.</text:p>
      <text:p text:style-name="P2">O Evangelho de Filipe tem uma característica que nenhum outro texto da nossa jornada possui na mesma medida: é um texto que <text:span text:style-name="Strong_20_Emphasis">resiste à sistematização</text:span>. Não tem uma narrativa. Não tem uma estrutura lógica linear. É uma colecção de aforismos, meditações e fragmentos que se iluminam mutuamente de formas que mudam a cada leitura. O que parecia claro na primeira leitura revela uma segunda camada na segunda. E a segunda revela uma terceira.</text:p>
      <text:p text:style-name="P2">O que vamos fazer agora é diferente do que fizemos antes. Em vez de percorrer o texto linearmente, vamos <text:span text:style-name="Strong_20_Emphasis">entrar em profundidade em passagens específicas</text:span> que na primeira leitura passámos rapidamente — porque o seu significado completo exigia o contexto que agora temos depois de tudo o que estudámos.</text:p>
      <text:p text:style-name="P2">Há cinco conjuntos de passagens do Evangelho de Filipe que merecem este aprofundamento:</text:p>
      <text:p text:style-name="P2"><text:span text:style-name="Strong_20_Emphasis">A doutrina do véu</text:span> — o que está escondido e por que razão. <text:span text:style-name="Strong_20_Emphasis">A natureza do erro</text:span> — a diferença entre ignorância e pecado. <text:span text:style-name="Strong_20_Emphasis">A ressurreição antes da morte</text:span> — o que significa em detalhe. <text:span text:style-name="Strong_20_Emphasis">O mistério da câmara nupcial</text:span> — além do que a primeira leitura revelou. <text:span text:style-name="Strong_20_Emphasis">A natureza do amor</text:span> — o aforismo mais mal compreendido do texto.</text:p>
      <text:p text:style-name="P12"/>
      <text:h text:style-name="P40" text:outline-level="2">PARTE I — A DOUTRINA DO VÉU: O QUE ESTÁ ESCONDIDO E PORQUÊ</text:h>
      <text:p text:style-name="P2">O Evangelho de Filipe contém uma meditação sobre o véu do Templo — o pano que separava o Santo dos Santos do resto do Templo em Jerusalém — que raramente é comentada com a profundidade que merece.</text:p>
      <text:p text:style-name="P2">O texto diz:</text:p>
      <text:p text:style-name="P2"><text:soft-page-break/><text:span text:style-name="Emphasis">"O véu escondia inicialmente como Deus governava a criação. Mas quando o véu se rasgou e as coisas de dentro foram reveladas — esta casa foi abandonada, ou melhor, será destruída. E a divindade inteira fugirá para dentro dos Santos dos Santos. E os Santos dos Santos nunca serão capazes de misturar-se com a luz não misturada e com a plenitude imaculada — mas estarão sob as asas da Cruz e sob os seus braços."</text:span></text:p>
      <text:p text:style-name="P2">E depois acrescenta:</text:p>
      <text:p text:style-name="P2"><text:span text:style-name="Emphasis">"Esta arca será a sua salvação quando a inundação de água os sobrecarregar. Se alguns pertencem à ordem do sacerdócio serão capazes de entrar dentro do véu com o sumo sacerdote. Por isso o véu não se rasgou apenas em cima — senão a parte de cima só estaria aberta para os de cima. Não se rasgou apenas em baixo — senão só se revelaria para os de baixo. Mas rasgou-se de cima a baixo. As coisas de cima abriram-se para nós que somos de baixo, para que possamos entrar no segredo da verdade."</text:span></text:p>
      <text:p text:style-name="P12"/>
      <text:h text:style-name="P14" text:outline-level="3">🔍 Exegese</text:h>
      <text:p text:style-name="P2">Esta passagem é extraordinariamente densa e exige uma leitura muito cuidada — porque usa a imagem do véu do Templo para fazer uma afirmação cosmológica que vai muito além do episódio evangélico do rasgamento do véu na crucificação.</text:p>
      <text:p text:style-name="P2">O <text:span text:style-name="Strong_20_Emphasis">véu do Templo</text:span> tinha uma função precisa na tradição judaica: separar o espaço do sagrado supremo — o Santo dos Santos, onde residia a presença de Deus — do espaço do sagrado acessível — onde os sacerdotes faziam os seus rituais. Apenas o Sumo Sacerdote podia entrar no Santo dos Santos — e apenas uma vez por ano, no Yom Kippur.</text:p>
      <text:p text:style-name="P2">O que o Evangelho de Filipe está a dizer sobre este véu é de uma radicalidade que transforma completamente a imagem convencional do rasgamento do véu na crucificação.</text:p>
      <text:p text:style-name="P2">O véu não apenas separava os humanos de Deus. Separava também <text:span text:style-name="Strong_20_Emphasis">Deus dos humanos</text:span> — ou mais precisamente, separava o sistema de aprisionamento criado pelo Demiurgo da realidade mais profunda que estava além dele. O véu protegia o sistema. Enquanto o véu estava intacto, a ficção de que o Deus do Templo era o Deus supremo podia ser mantida. Quando o véu se rasgou, a protecção desse sistema desapareceu — e o que estava escondido dentro do sistema foi exposto.</text:p>
      <text:p text:style-name="P2">A frase <text:span text:style-name="Emphasis">"a divindade inteira fugirá para dentro dos Santos dos Santos"</text:span> é extraordinária. Quando o véu se rasga, o divino verdadeiro — que estava aprisionado dentro do sistema do Templo como centelha de luz aprisionada no corpo — não fica exposto ao mundo exterior. <text:span text:style-name="Strong_20_Emphasis">Retira-se para o interior mais profundo</text:span>. A libertação não é uma expansão para fora mas um aprofundamento para dentro.</text:p>
      <text:p text:style-name="P2">O rasgamento <text:span text:style-name="Strong_20_Emphasis">de cima a baixo</text:span> — e não de baixo a cima, nem ao meio — é a afirmação de que a iniciativa da libertação vem de cima, do Pleroma, e desce até ao mundo material. Não é o ser humano que rasga o véu pela sua própria força espiritual. É a Pronoia — na sua terceira descida — que o rasga. O que o ser humano faz é <text:span text:style-name="Strong_20_Emphasis">reconhecer</text:span> o rasgamento e passar através dele.</text:p>
      <text:p text:style-name="P12"/>
      <text:h text:style-name="P40" text:outline-level="2"><text:soft-page-break/>PARTE II — A NATUREZA DO ERRO: IGNORÂNCIA VERSUS PECADO</text:h>
      <text:p text:style-name="P2">O Evangelho de Filipe tem uma doutrina do erro que é radicalmente diferente da doutrina cristã ortodoxa do pecado — e que a primeira leitura apenas aflorou.</text:p>
      <text:p text:style-name="P2">O texto diz:</text:p>
      <text:p text:style-name="P2"><text:span text:style-name="Emphasis">"Enquanto a raiz do mal estiver escondida ela é forte. Mas quando for reconhecida ela dissolver-se-á. Quando for revelada ela perecerá. Por isso a Palavra diz: 'Já está o machado posto à raiz das árvores.' Não cortará apenas — o que é cortado rebentará de novo. Mas o machado penetra profundamente até que desenterre a raiz. Jesus arrancou a raiz do lugar inteiro enquanto outros o fizeram apenas parcialmente."</text:span></text:p>
      <text:p text:style-name="P2">E depois:</text:p>
      <text:p text:style-name="P2"><text:span text:style-name="Emphasis">"Não é possível para alguém ver nada do que é real a menos que se torne como essas coisas. Não é assim com o homem no mundo — ele vê o sol sem ser o sol, e ele vê o céu e a terra e todas as outras coisas mas ele não é essas coisas. Esta é a verdade na matéria. Mas tu viste algo daquele lugar e tornaste-te essas coisas. Tu viste o Espírito e tornaste-te Espírito. Tu viste Cristo e tornaste-te Cristo. Tu viste o Pai e tornar-te-ás Pai."</text:span></text:p>
      <text:p text:style-name="P12"/>
      <text:h text:style-name="P14" text:outline-level="3">🔍 Exegese</text:h>
      <text:p text:style-name="P2">A doutrina do erro como <text:span text:style-name="Strong_20_Emphasis">raiz escondida</text:span> é de uma profundidade psicológica que a teologia do pecado raramente alcança.</text:p>
      <text:p text:style-name="P2">A teologia ortodoxa do pecado foca-se nos actos — nas transgressões específicas de leis específicas. O pecado é o que se fez de errado. A penitência é o que se faz para reparar o que foi feito de errado. A absolvição é o perdão que restaura o estado anterior à transgressão.</text:p>
      <text:p text:style-name="P2">O Evangelho de Filipe não fala de pecado neste sentido. Fala de <text:span text:style-name="Strong_20_Emphasis">raiz</text:span> — de algo que existe antes dos actos, que os gera automaticamente, que continuará a gerar actos semelhantes enquanto não for arrancada. Cortar os ramos — as acções externas que são o fruto da raiz — não resolve o problema. A raiz rebrota. Apenas arrancar a raiz resolve o problema definitivamente.</text:p>
      <text:p text:style-name="P2">E o que é esta raiz? O texto diz que é algo que enquanto estiver <text:span text:style-name="Strong_20_Emphasis">escondida</text:span> é forte — mas que quando for <text:span text:style-name="Strong_20_Emphasis">reconhecida</text:span> começa a dissolver-se. A raiz do erro não é uma transgressão moral. É uma <text:span text:style-name="Strong_20_Emphasis">ignorância ontológica</text:span> — o não saber quem se é, o não reconhecer a faísca de luz dentro de si, o funcionar a partir das sete almas implantadas pelos Arcontes em vez de funcionar a partir do pneuma verdadeiro.</text:p>
      <text:p text:style-name="P2">A cura não é moral — é <text:span text:style-name="Strong_20_Emphasis">cognitiva</text:span> no sentido mais profundo. Não é fazer melhor — é <text:span text:style-name="Strong_20_Emphasis">ver mais claramente</text:span>. E quando se vê claramente — quando a raiz da ignorância é exposta à luz do reconhecimento — ela começa a perder a sua força automaticamente. Não porque se decida parar de a alimentar. Mas porque a visão clara é em si mesma o instrumento que a dissolve.</text:p>
      <text:p text:style-name="P2">A segunda passagem aprofunda esta ideia com uma formulação que é de uma beleza e de uma radicalidade absolutas: <text:span text:style-name="Emphasis">"Tu viste o Espírito e tornaste-te Espírito. Tu viste Cristo e tornaste-te Cristo. Tu viste o Pai e tornar-te-ás Pai."</text:span></text:p>
      <text:p text:style-name="P2"><text:soft-page-break/>Isto é uma afirmação sobre a natureza do conhecimento espiritual que vai muito além de qualquer epistemologia convencional. No conhecimento ordinário, o sujeito e o objecto permanecem separados — eu vejo a árvore mas não me torno a árvore. No conhecimento espiritual — no sentido gnóstico — o sujeito e o objecto <text:span text:style-name="Strong_20_Emphasis">identificam-se</text:span>. Quando a alma vê verdadeiramente o Espírito, não o observa de fora. Reconhece que <text:span text:style-name="Strong_20_Emphasis">é</text:span> o Espírito. O acto de ver e o acto de ser tornam-se um.</text:p>
      <text:p text:style-name="P2">Esta ideia é o que distingue a gnose de qualquer outra forma de conhecimento. Não é informação sobre Deus. É <text:span text:style-name="Strong_20_Emphasis">identificação com Deus</text:span> — não no sentido de que a alma e Deus são idênticos na sua totalidade, mas no sentido de que a natureza mais profunda da alma e a natureza mais profunda do divino são feitas do mesmo material — a mesma luz, o mesmo pneuma, a mesma faísca do Pleroma.</text:p>
      <text:p text:style-name="P12"/>
      <text:h text:style-name="P40" text:outline-level="2">PARTE III — A RESSURREIÇÃO ANTES DA MORTE: O DETALHE COMPLETO</text:h>
      <text:p text:style-name="P2">Na primeira leitura vimos a afirmação central do Evangelho de Filipe sobre a ressurreição — <text:span text:style-name="Emphasis">"quem não ressuscita antes de morrer não ressuscitará depois de morrer"</text:span>. Mas o texto desenvolve esta ideia com muito mais detalhe do que a primeira leitura revelou.</text:p>
      <text:p text:style-name="P2">O texto diz:</text:p>
      <text:p text:style-name="P2"><text:span text:style-name="Emphasis">"Aqueles que dizem que o Senhor morreu primeiro e depois ressuscitou estão errados. Pois ele ressuscitou primeiro e depois morreu. Se alguém não obtém primeiro a ressurreição não morrerá. Tão verdadeiro como Deus vive — esse alguém morrerá."</text:span></text:p>
      <text:p text:style-name="P2">E depois:</text:p>
      <text:p text:style-name="P2"><text:span text:style-name="Emphasis">"Ninguém esconderá uma coisa grande e valiosa num recipiente grande. Mas muitas vezes alguém jogou incontáveis milhares num recipiente que vale apenas um centavo. Assim é com a alma. É uma coisa preciosa e veio a estar num corpo desprezível."</text:span></text:p>
      <text:p text:style-name="P2">E ainda:</text:p>
      <text:p text:style-name="P2"><text:span text:style-name="Emphasis">"Alguns têm medo de ressuscitar nus. Por isso querem ressuscitar na carne. E eles não sabem que são os que usam a carne que estão nus. Os que se despem para se tornarem nus não estão nus."</text:span></text:p>
      <text:p text:style-name="P12"/>
      <text:h text:style-name="P14" text:outline-level="3">🔍 Exegese</text:h>
      <text:p text:style-name="P2">A inversão cronológica da ressurreição — <text:span text:style-name="Emphasis">"ele ressuscitou primeiro e depois morreu"</text:span> — é uma das afirmações mais radicalmente anti-ortodoxas do texto inteiro, e simultaneamente uma das mais filosoficamente precisas.</text:p>
      <text:p text:style-name="P2">O que o Evangelho de Filipe está a dizer é que a sequência morte-ressurreição que o Cristianismo ortodoxo propõe como fundamento da fé é, do ponto de vista gnóstico, a sequência exactamente invertida. No entendimento gnóstico, a ressurreição não é o que acontece depois da morte física do corpo. É o que acontece quando a centelha de luz <text:span text:style-name="Strong_20_Emphasis">desperta</text:span> para a sua natureza enquanto ainda habita o corpo.</text:p>
      <text:p text:style-name="P2"><text:soft-page-break/>A morte física que acontece depois desta ressurreição espiritual não é tragédia — é a dissolução natural de algo que já cumpriu o seu propósito. O corpo que albergava uma alma desperta termina o seu ciclo. Mas a alma desperta não morre com ele — porque já ressuscitou antes de ele morrer.</text:p>
      <text:p text:style-name="P2">A afirmação <text:span text:style-name="Emphasis">"se alguém não obtém primeiro a ressurreição não morrerá — esse alguém morrerá"</text:span> é um paradoxo deliberado que exige desdobramento cuidadoso. O que significa que alguém "não morrerá"? Significa que o ciclo de reencarnação — de morte e renascimento no mundo material, de morte e aprisionamento no mundo dos Arcontes — não se aplica a quem ressuscitou em vida. A morte física é simplesmente a libertação final do corpo. Não é seguida de julgamento pelos Arcontes, não é seguida de reencarnação. É a última etapa de um processo que já estava completo.</text:p>
      <text:p text:style-name="P2">A metáfora do <text:span text:style-name="Strong_20_Emphasis">recipiente</text:span> é de uma precisão que a teologia do corpo raramente alcança. A alma — <text:span text:style-name="Emphasis">"uma coisa preciosa"</text:span> — num corpo — <text:span text:style-name="Emphasis">"um recipiente que vale apenas um centavo"</text:span>. Não é que o corpo seja mau. É que há uma desproporção radical entre o que o corpo contém e o que o corpo é. Um recipiente de barro que guarda uma pedra preciosa não é um recipiente mau — é simplesmente um recipiente inadequado para o que guarda.</text:p>
      <text:p text:style-name="P2">A passagem sobre <text:span text:style-name="Strong_20_Emphasis">ressuscitar nu</text:span> é a mais subtil das três e a que mais directamente aborda o medo que impede o despertar. Há pessoas que têm medo de ressuscitar sem o corpo — que querem que a ressurreição inclua o corpo físico, que querem continuar a existir como existem agora, apenas sem dor e sem morte.</text:p>
      <text:p text:style-name="P2">O Evangelho de Filipe diz com uma ironia gentil: são precisamente esses que estão nus. Porque "vestir a carne" — identificar-se completamente com o corpo, fazer do corpo a identidade — é estar sem nada que verdadeiramente cubra e proteja a alma. O corpo não veste a alma. Expõe-na — à erosão do tempo, à dor, à morte, ao esquecimento.</text:p>
      <text:p text:style-name="P2">Os que <text:span text:style-name="Emphasis">"se despem para se tornarem nus"</text:span> — que abandonam a identificação com o corpo — não ficam desprotegidos. Ficam vestidos com o que são na sua natureza mais profunda. A nudez verdadeira é a nudez da alma aprisionada no corpo. A verdadeira vestimenta é a luz do Pleroma.</text:p>
      <text:p text:style-name="P12"/>
      <text:h text:style-name="P49" text:outline-level="2"><text:span text:style-name="T11">PARTE IV</text:span> — O MISTÉRIO DA CÂMARA NUPCIAL: ALÉM DA PRIMEIRA LEITURA</text:h>
      <text:p text:style-name="P50">Na primeira leitura da câmara nupcial identificámos a sua natureza como o sacramento da reunificação — o regresso à totalidade andrógina que existia antes da separação em masculino e feminino. Mas o texto tem muito mais a dizer sobre a câmara nupcial do que isto.</text:p>
      <text:p text:style-name="P2">O Evangelho de Filipe diz:</text:p>
      <text:p text:style-name="P2"><text:span text:style-name="Emphasis">"Se a mulher não se tivesse separado do homem ela não morreria com o homem. A sua separação tornou-se o início da morte. Por isso Cristo veio para que ele pudesse remover a separação que existia desde o princípio e reunir os dois de novo — e para dar vida àqueles que morreram na separação e uni-los.</text:span></text:p>
      <text:p text:style-name="P2"><text:span text:style-name="Emphasis">Mas a mulher une-se com o seu marido na câmara nupcial. Os que se uniram na câmara nupcial não serão mais separados. Por isso Eva separou-se de Adão — porque ela não estava unida a ele na câmara nupcial."</text:span></text:p>
      <text:p text:style-name="P2">E depois:</text:p>
      <text:p text:style-name="P2"><text:soft-page-break/><text:span text:style-name="Emphasis">"A câmara nupcial não é para os animais nem para os escravos nem para as mulheres impuras — mas é para os homens livres e as virgens.</text:span></text:p>
      <text:p text:style-name="P2"><text:span text:style-name="Emphasis">Através do Espírito Santo nós somos de facto gerados de novo — mas somos gerados através de Cristo nos dois. Somos ungidos através do Espírito. Quando fomos gerados fomos unidos. Ninguém pode ver a si mesmo nem no espelho nem na água a menos que haja luz. Nem podes ver na luz. Mas podes ver na água com luz e água — esta é a câmara nupcial."</text:span></text:p>
      <text:p text:style-name="P12"/>
      <text:h text:style-name="P14" text:outline-level="3">🔍 Exegese</text:h>
      <text:p text:style-name="P2">A explicação da <text:span text:style-name="Strong_20_Emphasis">separação de Eva de Adão</text:span> como origem da morte é aqui muito mais desenvolvida do que na primeira leitura — e conecta directamente com o que o Apócrifo de Adão disse sobre o mesmo momento visto da perspectiva de Adão.</text:p>
      <text:p text:style-name="P2">O Apócrifo de Adão disse que Adão e Eva antes da separação eram superiores ao seu criador — que juntos possuíam uma glória e um conhecimento que o Demiurgo não conseguia suprimir. O Evangelho de Filipe acrescenta a dimensão que o Apócrifo de Adão não desenvolveu: a separação não foi apenas uma perda de conhecimento — foi a <text:span text:style-name="Strong_20_Emphasis">origem da morte</text:span>. Antes da separação, o ser humano não morria. A mortalidade não é uma característica natural da existência humana — é a consequência directa de uma separação que o Demiurgo operou deliberadamente.</text:p>
      <text:p text:style-name="P2">Esta afirmação ressoa com o que o Apócrifo de João disse sobre a origem da morte: que a morte nasceu do ciúme de Ialdabaoth quando viu Sabaoth ser elevado acima dele. Em ambos os textos, a morte não é lei natural — é <text:span text:style-name="Strong_20_Emphasis">ferida cósmica</text:span>. É o resultado de uma violência operada por poderes que tinham interesse em aprisionar a centelha de luz dentro de um sistema finito.</text:p>
      <text:p text:style-name="P2">A câmara nupcial como <text:span text:style-name="Strong_20_Emphasis">remédio para a separação</text:span> é portanto muito mais do que um sacramento místico — é a cura da ferida que criou a morte. Quem entra na câmara nupcial — quem experimenta a reunificação das dimensões que foram separadas — não apenas transcende a morte futura. Desfaz retroactivamente a separação que foi a sua origem.</text:p>
      <text:p text:style-name="P2">A imagem final — <text:span text:style-name="Emphasis">"ver na água com luz — esta é a câmara nupcial"</text:span> — é de uma beleza que transcende a explicação. A água sozinha não mostra — reflecte de forma distorcida. A luz sozinha cega — não permite ver. Mas água com luz — a combinação do elemento receptivo e do elemento luminoso — cria o espelho perfeito. A câmara nupcial é o estado em que a alma está simultaneamente receptiva e luminosa — simultaneamente água e luz — e nesse estado pode finalmente <text:span text:style-name="Strong_20_Emphasis">ver-se a si mesma</text:span> com clareza. Não o corpo que o espelho material reflecte. A centelha de luz que sempre foi.</text:p>
      <text:p text:style-name="P12"/>
      <text:h text:style-name="P40" text:outline-level="2">PARTE V — A NATUREZA DO AMOR: O AFORISMO MAIS MAL COMPREENDIDO</text:h>
      <text:p text:style-name="P2">O Evangelho de Filipe contém um aforismo sobre o amor que é talvez o mais citado e o mais mal compreendido de todo o texto:</text:p>
      <text:p text:style-name="P2"><text:span text:style-name="Emphasis">"Grande é o mistério do casamento — pois sem ele o mundo não existiria. A existência do mundo depende do homem, e a existência do homem depende do casamento. Pensai na relação pura — pois tem grande poder. A sua imagem consiste numa forma de contaminação.</text:span></text:p>
      <text:p text:style-name="P2"><text:soft-page-break/><text:span text:style-name="Emphasis">As formas do mal espírito incluem: masculino-feminino. O masculino é aquele que se une com o feminino — aquele que desceu ao baixo. E o feminino que se une com o masculino é aquele que desceu de cima.</text:span></text:p>
      <text:p text:style-name="P2"><text:span text:style-name="Emphasis">Se isto não existisse não haveria nascimento e não haveria morte. Por isso no mundo as uniões são imperfeitas — uniões de maridos e mulheres. Mas o mundo veio por eles."</text:span></text:p>
      <text:p text:style-name="P2">E depois:</text:p>
      <text:p text:style-name="P2"><text:span text:style-name="Emphasis">"A raposa que é linda é muitas vezes escrava. A donzela que é linda mas virgem torna-se um mimo. Mas a mulher casada é frequentemente depreciada. Mas se houver uma mulher casada e uma virgem — a fé e o amor são irmãos."</text:span></text:p>
      <text:p text:style-name="P12"/>
      <text:h text:style-name="P14" text:outline-level="3">🔍 Exegese</text:h>
      <text:p text:style-name="P2">Este conjunto de aforismos é de uma densidade que resiste à explicação simples — e é frequentemente citado de forma descontextualizada para apoiar posições que o texto não sustenta.</text:p>
      <text:p text:style-name="P2">O primeiro elemento a compreender é a distinção entre <text:span text:style-name="Strong_20_Emphasis">dois tipos de casamento</text:span> que o texto está a fazer. Há o casamento do mundo material — a união de masculino e feminino no plano físico — que o texto reconhece como real e como necessária para a continuação do mundo, mas que é <text:span text:style-name="Emphasis">"imperfeita"</text:span>. E há a câmara nupcial — a união no plano espiritual — que é o casamento verdadeiro.</text:p>
      <text:p text:style-name="P2">A frase <text:span text:style-name="Emphasis">"as formas do mal espírito incluem: masculino-feminino"</text:span> é a mais provocatória — e a mais mal compreendida. O texto não está a dizer que a sexualidade é má ou que o masculino e o feminino são intrinsecamente negativos. Está a dizer que a <text:span text:style-name="Strong_20_Emphasis">separação</text:span> em masculino e feminino — a divisão que o Demiurgo operou — é o instrumento do aprisionamento. O mal não está no masculino nem no feminino. Está na <text:span text:style-name="Strong_20_Emphasis">separação</text:span> que fez de um ser uno dois seres incompletos que se buscam mutuamente sem jamais poder restaurar completamente a totalidade que perderam.</text:p>
      <text:p text:style-name="P2">A imagem das três mulheres — a <text:span text:style-name="Emphasis">"raposa que é bela"</text:span>, a <text:span text:style-name="Emphasis">"donzela virgem"</text:span> e a <text:span text:style-name="Emphasis">"mulher casada"</text:span> — é uma meditação sobre três modos de existir no mundo que correspondem a três estágios de consciência.</text:p>
      <text:p text:style-name="P2">A <text:span text:style-name="Emphasis">"raposa bela"</text:span> é a beleza que é servidão — a alma que usa os seus dons para agradar ao mundo, que é apreciada pelo que aparenta ser mas que nessa apreciação fica presa. É a beleza como armadilha — tanto para quem a possui como para quem dela é capturado.</text:p>
      <text:p text:style-name="P2">A <text:span text:style-name="Emphasis">"donzela virgem"</text:span> é a integridade que ainda não foi tocada pelo mundo — a alma que preservou a sua natureza original mas que ainda não entrou no processo de transformação. É preciosa — mas a sua preciosidade é passiva, não activa. Não gerou nada.</text:p>
      <text:p text:style-name="P2">A <text:span text:style-name="Emphasis">"mulher casada depreciada"</text:span> é a alma que entrou no processo de transformação — que se uniu com o seu consorte espiritual na câmara nupcial — e que por isso é incompreensível para o mundo. O mundo deprecia o que não consegue classificar. A mulher casada na câmara nupcial não é nem a beleza sedutora nem a virgem intocada — é algo que transcende ambas as categorias, e por isso o mundo não sabe como valorizá-la.</text:p>
      <text:p text:style-name="P2">E então a frase final: <text:span text:style-name="Emphasis">"se houver uma mulher casada e uma virgem — a fé e o amor são irmãos."</text:span> É a imagem da alma que é simultaneamente virgem e casada — que manteve a sua natureza original (virgem) e ao mesmo tempo entrou na união transformadora da câmara nupcial (casada). E nesse <text:soft-page-break/>estado, fé e amor — que o mundo tende a separar, a ver como alternativas ou como hierarquias — tornam-se irmãos, indistinguíveis, aspectos do mesmo estado de ser.</text:p>
      <text:p text:style-name="P12"/>
      <text:h text:style-name="P40" text:outline-level="2">PARTE VI — OS NOMES COMO ILUSÃO: A MEDITAÇÃO SOBRE A LINGUAGEM</text:h>
      <text:p text:style-name="P2">Há uma secção do Evangelho de Filipe que não tocámos na primeira leitura e que é de uma importância filosófica que só agora — depois do aprofundamento do Apócrifo de João sobre os nomes dos Arcontes — pode ser completamente compreendida.</text:p>
      <text:p text:style-name="P2">O texto diz:</text:p>
      <text:p text:style-name="P2"><text:span text:style-name="Emphasis">"Os nomes que foram dados às coisas mundanas são muito enganadores — pois desviam os nossos pensamentos do que é correcto para o que é incorrecto. Assim quem ouve a palavra 'Deus' não percebe o que é correcto mas percebe o que é incorrecto. Da mesma forma com o Pai e o Filho e o Espírito Santo e a vida e a luz e a ressurreição e a Igreja e todos os outros — as pessoas não percebem o que é correcto mas percebem o que é incorrecto a menos que tenham aprendido o que é correcto.</text:span></text:p>
      <text:p text:style-name="P2"><text:span text:style-name="Emphasis">Os nomes que se ouvem estão no mundo enganando. Se estivessem no Éon não seriam nunca usados como nomes no mundo. Não foram postos nos assuntos eternos.</text:span></text:p>
      <text:p text:style-name="P2"><text:span text:style-name="Emphasis">Uma só coisa é verdadeira — o seu nome não é pronunciado no mundo."</text:span></text:p>
      <text:p text:style-name="P12"/>
      <text:h text:style-name="P14" text:outline-level="3">🔍 Exegese</text:h>
      <text:p text:style-name="P2">Esta meditação sobre a linguagem fecha o círculo que o Apócrifo de João abriu com a sua lista dos nomes dos Arcontes. Lidos juntos, os dois textos constroem uma filosofia da linguagem que é simultaneamente uma crítica radical à religião institucional e uma indicação do que está além dela.</text:p>
      <text:p text:style-name="P2">O Apócrifo de João mostrou que os nomes divinos do Antigo Testamento são os nomes dos Arcontes — que a linguagem religiosa judaica invoca poderes reais mas limitados que não são o Deus supremo. O Evangelho de Filipe vai mais longe: <text:span text:style-name="Strong_20_Emphasis">todos os nomes religiosos</text:span> — incluindo os cristãos — são instrumentos de engano. Não porque os conceitos a que apontam sejam falsos. Mas porque qualquer nome, qualquer conceito, qualquer palavra pertence ao mundo material — e o mundo material não tem a capacidade de capturar o que está além dele.</text:p>
      <text:p text:style-name="P2"><text:span text:style-name="Emphasis">"Deus"</text:span> — o que a maioria das pessoas entende quando ouve esta palavra não é o Espírito Invisível do Apócrifo de João. É uma imagem construída pela cultura, pela educação, pelas experiências emocionais, pelos dogmas recebidos. O nome evoca a imagem. E a imagem não é o que o nome pretende apontar.</text:p>
      <text:p text:style-name="P2"><text:span text:style-name="Emphasis">"Ressurreição"</text:span> — o que a maioria das pessoas entende quando ouve esta palavra é uma ressurreição do corpo físico num momento futuro. Mas a ressurreição de que o Evangelho de Filipe fala é a ressurreição da centelha de luz que acontece agora, no interior da vida, antes da morte física. O mesmo nome — dois significados completamente diferentes.</text:p>
      <text:p text:style-name="P2"><text:span text:style-name="Emphasis">"Igreja"</text:span> — o que a maioria das pessoas entende é uma instituição com edifícios, hierarquias, doutrinas e sacramentos. O que o Evangelho de Filipe entende pela mesma palavra é a comunidade <text:soft-page-break/>dos que receberam a câmara nupcial — os que foram reunificados com a sua natureza luminosa. O mesmo nome — realidades completamente diferentes.</text:p>
      <text:p text:style-name="P2">A frase final — <text:span text:style-name="Emphasis">"uma só coisa é verdadeira — o seu nome não é pronunciado no mundo"</text:span> — fecha o texto com o mesmo silêncio com que o Apócrifo de João descreveu o Pai supremo. O que é verdadeiramente real não tem nome. Não porque seja vazio ou abstracto — mas porque está além da capacidade da linguagem de o capturar. A linguagem é a ferramenta do mundo material. O que está além do mundo material não cabe na linguagem.</text:p>
      <text:p text:style-name="P2">E no entanto — paradoxalmente — é a linguagem que nos trouxe até aqui. São estas palavras — estes aforismos, estas meditações, estas exegeses — que apontaram para o que está além das palavras. A linguagem não pode capturar o Pleroma. Mas pode apontar para ele. E às vezes — quando a leitura é suficientemente profunda e a atenção suficientemente quieta — o dedo que aponta dissolve-se e fica apenas o que sempre estava lá.</text:p>
      <text:p text:style-name="P12"/>
      <text:h text:style-name="P11" text:outline-level="2">Síntese: O Evangelho de Filipe nas Suas Profundidades</text:h>
      <text:p text:style-name="P2">O que esta segunda camada do Evangelho de Filipe revelou é um texto muito mais complexo e muito mais rico do que a primeira leitura sugeriu.</text:p>
      <text:p text:style-name="P2">A <text:span text:style-name="Strong_20_Emphasis">doutrina do véu</text:span> revelou que a libertação não é uma expansão para fora mas um aprofundamento para dentro — que quando o sistema de aprisionamento é rasgado, o divino não fica exposto ao mundo mas retira-se para o interior mais profundo da alma.</text:p>
      <text:p text:style-name="P2">A <text:span text:style-name="Strong_20_Emphasis">natureza do erro como raiz escondida</text:span> revelou uma psicologia do aprisionamento que é mais precisa e mais compassiva do que qualquer doutrina do pecado — porque identifica a causa antes de os efeitos e propõe uma cura que actua na raiz em vez de tratar os sintomas.</text:p>
      <text:p text:style-name="P2">A <text:span text:style-name="Strong_20_Emphasis">ressurreição antes da morte</text:span> revelou uma cronologia invertida que transforma completamente a compreensão do que a vida espiritual é — não uma preparação para algo que acontece depois da morte mas uma transformação que acontece agora, aqui, neste corpo, nesta vida.</text:p>
      <text:p text:style-name="P2">O <text:span text:style-name="Strong_20_Emphasis">mistério da câmara nupcial</text:span> revelou que a reunificação que o sacramento propõe é a cura de uma ferida que criou a própria morte — que a separação em masculino e feminino é a origem da mortalidade e que a câmara nupcial é a sua dissolução.</text:p>
      <text:p text:style-name="P2">E a <text:span text:style-name="Strong_20_Emphasis">meditação sobre os nomes</text:span> revelou que todo o sistema conceptual gnóstico — incluindo o Evangelho de Filipe — é um dedo a apontar para o que está além de todos os sistemas, além de todos os nomes, além de toda a linguagem.</text:p>
      <text:p text:style-name="P2">O que está além é o silêncio. O mesmo silêncio que é a natureza do Pai supremo. O mesmo silêncio para o qual a alma de Maria Madalena regressou no final da sua ascensão. O mesmo silêncio com que o Apócrifo de João fechou o Hino da Pronoia.</text:p>
      <text:p text:style-name="P2">Todos os caminhos — se forem percorridos com suficiente profundidade — chegam ao mesmo silêncio.</text:p>
      <text:p text:style-name="P12"/>
      <text:h text:style-name="P47" text:outline-level="1"><text:soft-page-break/>Evangelho de Maria Madalena — As Profundidades e o Silêncio das Páginas Perdidas</text:h>
      <text:p text:style-name="P12"/>
      <text:h text:style-name="P40" text:outline-level="2">INTRODUÇÃO: O TEXTO QUE É TAMBÉM A SUA AUSÊNCIA</text:h>
      <text:p text:style-name="P2">Há um paradoxo no centro do Evangelho de Maria Madalena que nenhum outro texto da nossa jornada possui: <text:span text:style-name="Strong_20_Emphasis">o texto é inseparável do que nele falta</text:span>. As seis páginas destruídas não são simplesmente uma lacuna — são uma presença activa que molda o significado do que sobreviveu.</text:p>
      <text:p text:style-name="P2">Quando estudámos este texto pela primeira vez, percorremos o que existe. Agora vamos fazer algo diferente e mais profundo: vamos estudar <text:span text:style-name="Strong_20_Emphasis">o que não existe</text:span> — as páginas perdidas — com o mesmo rigor com que estudámos o que sobreviveu. Porque o silêncio de um texto diz tanto quanto as suas palavras. Às vezes mais.</text:p>
      <text:p text:style-name="P2">Há três dimensões que esta segunda camada vai explorar:</text:p>
      <text:p text:style-name="P2"><text:span text:style-name="Strong_20_Emphasis">O debate académico sobre as páginas perdidas</text:span> — o que os maiores especialistas mundiais propõem sobre o seu conteúdo, e por que razão as propostas diferem tão radicalmente.</text:p>
      <text:p text:style-name="P2"><text:span text:style-name="Strong_20_Emphasis">A questão da visão de Maria</text:span> — o que significa ver <text:span text:style-name="Emphasis">"através da mente"</text:span> e por que esta afirmação é filosoficamente a mais radical de todo o texto.</text:p>
      <text:p text:style-name="P2"><text:span text:style-name="Strong_20_Emphasis">A natureza das páginas 11 a 14</text:span> — o que a estrutura do texto que sobreviveu antes e depois desta segunda lacuna permite inferir sobre o que estava nessas páginas.</text:p>
      <text:p text:style-name="P12"/>
      <text:h text:style-name="P40" text:outline-level="2">PARTE I — AS PÁGINAS 1 A 6: O COMEÇO PERDIDO</text:h>
      <text:p text:style-name="P2">As primeiras seis páginas do Evangelho de Maria Madalena estão completamente ausentes. O texto que temos começa abruptamente no meio de um diálogo — e esse começo abrupto diz-nos que havia um começo anterior que foi destruído.</text:p>
      <text:p text:style-name="P2">O que sabemos sobre estas páginas é apenas o que a estrutura do que sobreviveu nos permite inferir. O texto que temos começa com Jesus a responder a uma pergunta sobre o pecado — o que significa que a pergunta foi feita nas páginas perdidas. E a pergunta sobre o pecado pressupõe um contexto — uma situação, uma circunstância, uma razão pela qual alguém faz essa pergunta naquele momento específico.</text:p>
      <text:p text:style-name="P2">Os académicos que mais profundamente estudaram este texto — em particular <text:span text:style-name="Strong_20_Emphasis">Karen King</text:span> de Harvard, a responsável pela edição crítica moderna — propõem que as páginas perdidas continham provavelmente:</text:p>
      <text:p text:style-name="P2">Uma <text:span text:style-name="Strong_20_Emphasis">introdução ao contexto</text:span> — onde Jesus aparece aos discípulos após a ressurreição, de que forma apareceu, que forma tomou, o que disse antes do diálogo que temos.</text:p>
      <text:p text:style-name="P2"><text:soft-page-break/>Uma <text:span text:style-name="Strong_20_Emphasis">cosmologia preliminar</text:span> — uma descrição do universo espiritual que fornecia o quadro dentro do qual a questão do pecado e da natureza humana fazia sentido. Esta hipótese baseia-se no facto de que a resposta de Jesus sobre o pecado pressupõe uma antropologia que não é explicada no texto que temos — como se já tivesse sido estabelecida nas páginas anteriores.</text:p>
      <text:p text:style-name="P2">Uma <text:span text:style-name="Strong_20_Emphasis">revelação sobre a natureza do Salvador</text:span> — quem Jesus é neste texto, de onde vem, qual a sua relação com o Pleroma. O facto de Maria ser capaz de ter uma visão interior de Jesus pressupõe que ela sabe quem ele é na sua natureza mais profunda — e esse conhecimento pode ter sido estabelecido nas páginas perdidas.</text:p>
      <text:p text:style-name="P12"/>
      <text:h text:style-name="P14" text:outline-level="3">🔍 Exegese</text:h>
      <text:p text:style-name="P2">O que é mais revelador sobre as páginas perdidas não é o seu conteúdo hipotético — é o <text:span text:style-name="Strong_20_Emphasis">facto de terem sido destruídas</text:span>.</text:p>
      <text:p text:style-name="P2">Os manuscritos de Nag Hammadi foram enterrados intactos — foram escondidos, não destruídos. O Evangelho de Maria Madalena não veio de Nag Hammadi. Veio de um mercado de antiguidades do Cairo no final do século XIX — e chegou às mãos dos académicos com as páginas já destruídas. Não sabemos quando nem por quem foram destruídas.</text:p>
      <text:p text:style-name="P2">Mas a destruição de páginas específicas num manuscrito antigo raramente é acidental. Papiros antigos deterioram-se de formas previsíveis — as margens apodrecem, as páginas partem. A destruição de seis páginas contíguas do começo do texto — precisamente as páginas que estabeleceriam o contexto e a autoridade de toda a revelação — tem a marca de uma intervenção deliberada.</text:p>
      <text:p text:style-name="P2">Alguém, em algum momento, decidiu que o começo deste texto não devia ser lido. E ao destruí-lo criou algo ainda mais poderoso do que o texto original: um silêncio que faz perguntas que nenhuma resposta pode completamente satisfazer.</text:p>
      <text:p text:style-name="P2">O texto que começa no meio de um diálogo sobre o pecado — sem introdução, sem contexto, sem estabelecimento de autoridade — é um texto que exige do leitor uma confiança que o começo normalmente constrói. É como entrar numa conversa que já está a acontecer. Há algo imediatamente íntimo neste começo abrupto — como se o texto recusasse as formalidades e mergulhasse directamente no que importa.</text:p>
      <text:p text:style-name="P12"/>
      <text:h text:style-name="P40" text:outline-level="2">PARTE II — A QUESTÃO DA VISÃO: VER ATRAVÉS DA MENTE</text:h>
      <text:p text:style-name="P2">O centro filosófico de todo o Evangelho de Maria Madalena — e o elemento que mais profundamente distingue este texto de todos os outros da nossa jornada — é a resposta de Maria à pergunta de Jesus sobre como se vê uma visão.</text:p>
      <text:p text:style-name="P2">Jesus pergunta: <text:span text:style-name="Emphasis">"Como vês uma visão? Através da alma ou através do espírito?"</text:span></text:p>
      <text:p text:style-name="P2">Maria responde: <text:span text:style-name="Emphasis">"Nem através da alma nem através do espírito mas através da mente — que está entre os dois."</text:span></text:p>
      <text:p text:style-name="P2"><text:soft-page-break/>Esta resposta — breve, aparentemente simples — é na realidade uma das afirmações filosóficas mais sofisticadas de toda a literatura apócrifa. E a sua sofisticação só é completamente visível quando compreendemos o sistema psicológico dentro do qual ela opera.</text:p>
      <text:p text:style-name="P12"/>
      <text:h text:style-name="P14" text:outline-level="3">🔍 Exegese</text:h>
      <text:p text:style-name="P2">Para compreender o que Maria está a dizer é necessário primeiro compreender o que o texto entende por <text:span text:style-name="Strong_20_Emphasis">alma</text:span>, por <text:span text:style-name="Strong_20_Emphasis">espírito</text:span> e por <text:span text:style-name="Strong_20_Emphasis">mente</text:span> — três conceitos que na linguagem comum tendem a ser usados de forma intercambiável mas que neste texto têm significados precisos e distintos.</text:p>
      <text:p text:style-name="P2">A <text:span text:style-name="Strong_20_Emphasis">alma</text:span> — em grego <text:span text:style-name="Emphasis">psyche</text:span> — é no sistema gnóstico setiano a dimensão do ser humano que está mais directamente em contacto com o mundo material. É o que sente, o que emociona, o que reage automaticamente às circunstâncias. É também — como vimos no Apócrifo de João — o domínio das sete almas implantadas pelos Arcontes. A alma é real — mas é parcialmente fabricada, parcialmente um produto do sistema de aprisionamento. Ver através da alma é ver através de um instrumento que os Arcontes controlam parcialmente.</text:p>
      <text:p text:style-name="P2">O <text:span text:style-name="Strong_20_Emphasis">espírito</text:span> — em grego <text:span text:style-name="Emphasis">pneuma</text:span> — é a faísca de luz do Pleroma que existe dentro de cada ser humano. É o elemento que transcende completamente o sistema de aprisionamento — que não foi criado pelos Arcontes e que eles não conseguem controlar. Mas o espírito, precisamente porque é da natureza do Pleroma — da natureza do silêncio luminoso que está além de toda a forma — não <text:span text:style-name="Emphasis">vê</text:span> no sentido habitual do termo. É luz pura, sem objecto e sem sujeito distintos.</text:p>
      <text:p text:style-name="P2">A <text:span text:style-name="Strong_20_Emphasis">mente</text:span> — em grego <text:span text:style-name="Emphasis">nous</text:span> — é o elemento intermediário. Não é simplesmente a razão no sentido intelectual. É a faculdade que participa simultaneamente da natureza da alma e da natureza do espírito — que está suficientemente próxima do mundo material para perceber formas e imagens, e suficientemente próxima do Pleroma para perceber verdades espirituais. É o <text:span text:style-name="Strong_20_Emphasis">órgão do conhecimento gnóstico</text:span> — a faculdade específica através da qual a gnose acontece.</text:p>
      <text:p text:style-name="P2">Quando Maria diz que vê a sua visão de Jesus <text:span text:style-name="Emphasis">"através da mente — que está entre os dois"</text:span>, está a fazer uma afirmação epistemológica de uma precisão extraordinária. A visão que ela tem de Jesus não é uma experiência emocional — isso seria ver através da alma. Não é uma experiência de luz pura sem forma — isso seria ver através do espírito. É uma experiência que tem <text:span text:style-name="Strong_20_Emphasis">forma</text:span> — ela vê Jesus, reconhece-o, tem um diálogo com ele — mas essa forma é percebida por uma faculdade que está além dos condicionamentos da alma e que por isso não distorce o que percebe.</text:p>
      <text:p text:style-name="P2">Esta distinção tem implicações práticas que vão além da epistemologia abstracta. Qualquer pessoa que tenha tido experiências que podemos chamar de espirituais — momentos de clareza súbita, de reconhecimento profundo, de contacto com algo que parece mais real do que a realidade habitual — sabe que essas experiências podem ser percebidas de formas muito diferentes.</text:p>
      <text:p text:style-name="P2">Quando são percebidas <text:span text:style-name="Emphasis">através da alma</text:span> — através das emoções, dos condicionamentos, das expectativas — são rapidamente coloridas pela psicologia do observador. O que era um momento de clareza torna-se uma narrativa sobre esse momento — e a narrativa distorce o que o momento era.</text:p>
      <text:p text:style-name="P2">Quando são percebidas <text:span text:style-name="Emphasis">através do nous</text:span> — através da mente que está entre a alma e o espírito — conservam a sua clareza sem serem distorcidas pelo emocional e sem perderem a sua especificidade <text:soft-page-break/>formal. São o que Maria vê: Jesus, reconhecível, comunicável, real — mas percebido por uma faculdade que não o contamina com os seus próprios conteúdos.</text:p>
      <text:p text:style-name="P12"/>
      <text:h text:style-name="P40" text:outline-level="2">PARTE III — AS PÁGINAS 11 A 14: O SEGUNDO SILÊNCIO</text:h>
      <text:p text:style-name="P2">A segunda lacuna do Evangelho de Maria Madalena — as páginas 11 a 14 — é estruturalmente diferente da primeira. A primeira estava no começo do texto — antes de qualquer conteúdo visível. Esta segunda está <text:span text:style-name="Strong_20_Emphasis">no interior do discurso de Maria</text:span> — interrompe a descrição que ela faz da sua visão precisamente no momento em que a visão se torna mais interior e mais reveladora.</text:p>
      <text:p text:style-name="P2">O que sabemos sobre o contexto desta lacuna é preciso. Na última linha antes da lacuna — página 10 — Maria está a descrever a sua visão de Jesus. Jesus acabou de lhe perguntar como ela vê uma visão e ela respondeu. O diálogo interior está a começar.</text:p>
      <text:p text:style-name="P2">Quando o texto retoma — na página 15 — Maria está já a descrever a ascensão da alma através dos quatro poderes. Estamos num ponto completamente diferente da visão — na experiência da alma depois de ter deixado o corpo, no confronto com os Arcontes durante a ascensão.</text:p>
      <text:p text:style-name="P2">Entre a página 10 e a página 15 existia algo que o texto não preservou. E o que existia aí era — estruturalmente — <text:span text:style-name="Strong_20_Emphasis">o coração da visão de Maria</text:span>. O momento em que Jesus lhe revelou o que nunca havia sido revelado antes.</text:p>
      <text:p text:style-name="P12"/>
      <text:h text:style-name="P14" text:outline-level="3">🔍 Exegese</text:h>
      <text:p text:style-name="P2">O que estava nas páginas 11 a 14 é a questão que mais profundamente fascinou os estudiosos deste texto — e é também a questão para a qual as propostas divergem mais radicalmente.</text:p>
      <text:p text:style-name="P2"><text:span text:style-name="Strong_20_Emphasis">Karen King</text:span> propõe que as páginas perdidas continham uma descrição mais detalhada da natureza da alma e do seu caminho de ascensão — uma cosmologia interior que preparava o terreno para a descrição dos quatro poderes que encontramos a seguir.</text:p>
      <text:p text:style-name="P2"><text:span text:style-name="Strong_20_Emphasis">Silke Petersen</text:span>, académica alemã que estudou extensamente a estrutura do texto, propõe que as páginas continham uma revelação sobre a <text:span text:style-name="Strong_20_Emphasis">natureza do Filho do Homem</text:span> — clarificando quem Jesus é na sua dimensão mais profunda e como Maria o reconheceu.</text:p>
      <text:p text:style-name="P2"><text:span text:style-name="Strong_20_Emphasis">Ann Graham Brock</text:span> propõe que as páginas continham uma descrição da <text:span text:style-name="Strong_20_Emphasis">câmara nupcial</text:span> — da experiência interior de reunificação que permitiu a Maria ter a visão que descreve. O facto de o Evangelho de Filipe descrever Maria como a discípula que recebeu o beijo — a transmissão do pneuma — sugere que havia uma experiência de iniciação que Maria viveu e que o texto pode ter descrito nessas páginas.</text:p>
      <text:p text:style-name="P2">Mas há uma quarta proposta — menos citada mas filosoficamente a mais rica — feita por <text:span text:style-name="Strong_20_Emphasis">Deirdre Good</text:span> do General Theological Seminary de Nova Iorque. Good propõe que as páginas perdidas continham não uma revelação sobre o cosmos nem sobre Jesus — mas uma revelação sobre <text:span text:style-name="Strong_20_Emphasis">Maria si mesma</text:span>. Uma revelação em que Jesus mostrou a Maria quem ela é na sua natureza mais profunda — de onde vem a sua centelha de luz, qual o seu lugar no Pleroma, por que razão é ela a única que compreendeu completamente.</text:p>
      <text:p text:style-name="P2"><text:soft-page-break/>Esta proposta é a que mais profundamente ressoa com a estrutura de todo o corpus gnóstico que estudámos. Nos outros textos — no Apócrifo de João, na Pistis Sophia, no Apócrifo de Adão — as grandes revelações não são revelações sobre o cosmos. São revelações sobre <text:span text:style-name="Strong_20_Emphasis">o ser que recebe a revelação</text:span>. João descobre que o Cristo que o visita é o mesmo que está dentro dele. Sophia descobre que a luz que procura fora é a mesma que perdeu dentro de si. Adão descobre que era superior ao seu criador antes de adormecer.</text:p>
      <text:p text:style-name="P2">Se este padrão se aplica ao Evangelho de Maria Madalena — e há razões estruturais fortes para pensar que se aplica — então o que Jesus revelou a Maria nas páginas perdidas foi precisamente isso: que ela é o que procura. Que a visão que tem de Jesus não é a visão de algo exterior — é o reconhecimento de algo interior. Que o Filho do Homem que está dentro de todos os seres humanos está dentro dela de uma forma que nenhum dos outros doze reconheceu.</text:p>
      <text:p text:style-name="P12"/>
      <text:h text:style-name="P11" text:outline-level="2">PARTE IV — O CHORO DE MARIA: A EMOÇÃO COMO INSTRUMENTO</text:h>
      <text:p text:style-name="P2">Há um detalhe no Evangelho de Maria Madalena que raramente é comentado mas que — à luz do que agora sabemos sobre a distinção entre alma, espírito e mente — é de uma riqueza extraordinária.</text:p>
      <text:p text:style-name="P2">Quando Pedro pede a Maria que partilhe o que sabe, o texto diz que Maria <text:span text:style-name="Emphasis">"voltou os seus pensamentos para o interior"</text:span> antes de falar. Este gesto interior — este recolhimento antes da fala — é o sinal de que Maria não vai simplesmente relatar o que lembra. Vai regressar ao estado interior em que a visão aconteceu — vai ver de novo através do <text:span text:style-name="Emphasis">nous</text:span> — para poder transmitir com fidelidade o que recebeu.</text:p>
      <text:p text:style-name="P2">E quando André e Pedro rejeitam o que Maria partilhou, o texto diz que Maria <text:span text:style-name="Strong_20_Emphasis">chorou</text:span>. Mas o choro de Maria não é o mesmo que o choro dos discípulos no começo do texto — o choro de medo, o choro da alma reactiva que foi perturbada pela ameaça.</text:p>
      <text:p text:style-name="P2">O choro de Maria é descrito com uma precisão diferente. É o choro de quem foi incompreendido — não de quem foi atacado. É o choro do reconhecimento de que a palavra mais verdadeira que se pode dizer não pode ser recebida por quem não tem a faculdade para a receber. É o choro do <text:span text:style-name="Emphasis">nous</text:span> diante da limitação da <text:span text:style-name="Emphasis">psyche</text:span> dos outros.</text:p>
      <text:p text:style-name="P2">E quando Pedro a acusa — quando diz que Jesus não poderia ter falado em privado com uma mulher — Maria não responde com raiva nem com defensividade. Pergunta com uma simplicidade que é ela própria a resposta: <text:span text:style-name="Emphasis">"Meu irmão Pedro, o que pensas? Pensas que inventei isto no meu coração ou que minto acerca do Salvador?"</text:span></text:p>
      <text:p text:style-name="P12"/>
      <text:h text:style-name="P14" text:outline-level="3">🔍 Exegese</text:h>
      <text:p text:style-name="P2">O choro de Maria e a sua pergunta a Pedro são os dois gestos que mais claramente revelam a natureza do conhecimento que ela possui.</text:p>
      <text:p text:style-name="P2">Quem mente defende-se. Quem está confuso fica em silêncio. Quem sabe que diz a verdade e é incompreendido — <text:span text:style-name="Strong_20_Emphasis">pergunta</text:span>. Não argumenta nem demonstra. Pergunta. Porque a pergunta devolve ao outro a responsabilidade do seu próprio estado interior. <text:span text:style-name="Emphasis">"O que pensas?"</text:span> — não "o que eu penso" <text:soft-page-break/>nem "o que aconteceu". O que <text:span text:style-name="Strong_20_Emphasis">tu</text:span> pensas. Porque o problema não está na verdade do que Maria diz. Está na capacidade de Pedro de a receber.</text:p>
      <text:p text:style-name="P2">Esta é precisamente a distinção que o Evangelho de Filipe fez sobre os nomes: o mesmo nome — para quem tem o <text:span text:style-name="Emphasis">nous</text:span> desenvolvido e para quem não o tem — evoca realidades completamente diferentes. Maria diz palavras que são verdadeiras. Pedro ouve palavras que — através da sua alma condicionada pela hierarquia e pelo género — se transformam em outra coisa. O problema não é a mensagem. É o instrumento de recepção.</text:p>
      <text:p text:style-name="P2">E o choro de Maria é o reconhecimento deste limite — não com amargura, não com desespero, mas com a tristeza serena de quem compreendeu que a transmissão mais verdadeira não pode ser forçada. Pode apenas ser oferecida. O que o receptor faz com o que recebe — ou se é capaz de receber — está além do controlo de quem transmite.</text:p>
      <text:p text:style-name="P2">Esta é a última lição do Evangelho de Maria Madalena nas suas profundidades: o conhecimento mais verdadeiro é o mais vulnerável. Não porque seja fraco — mas porque <text:span text:style-name="Strong_20_Emphasis">respeita a liberdade do outro</text:span>. A Pronoia não força o despertar. Maria não força a compreensão de Pedro. A gnose oferece-se. Não se impõe.</text:p>
      <text:p text:style-name="P12"/>
      <text:h text:style-name="P11" text:outline-level="2">PARTE V — O TEXTO FRAGMENTO GREGO: O QUE A VERSÃO MAIS ANTIGA ACRESCENTA</text:h>
      <text:p text:style-name="P2">O manuscrito copta que estudámos não é a única versão do Evangelho de Maria Madalena que sobreviveu. Existem dois fragmentos em <text:span text:style-name="Strong_20_Emphasis">grego</text:span> — a língua original do texto — encontrados no Egipto e que datam do século III. São fragmentos pequenos — apenas algumas linhas — mas as diferenças em relação à versão copta são reveladoras.</text:p>
      <text:p text:style-name="P2">O fragmento grego de <text:span text:style-name="Strong_20_Emphasis">Rylands</text:span> — encontrado em 1938 — contém uma versão do início do diálogo entre Jesus e os discípulos que difere subtilmente da versão copta. Em particular, a frase sobre o pecado é ligeiramente diferente:</text:p>
      <text:p text:style-name="P2">Na versão copta: <text:span text:style-name="Emphasis">"Não há pecado. Fostes vós que criastes o pecado quando agistes segundo a natureza do adultério."</text:span></text:p>
      <text:p text:style-name="P2">Na versão grega: <text:span text:style-name="Emphasis">"O pecado não existe por natureza mas os homens fazem-no quando agem segundo a natureza do adultério — que é chamada pecado."</text:span></text:p>
      <text:p text:style-name="P2">A diferença é subtil mas filosófica — a versão grega deixa mais claro que o pecado não é uma entidade que existe independentemente das acções humanas. É uma <text:span text:style-name="Strong_20_Emphasis">qualidade de acção</text:span> — algo que os humanos <text:span text:style-name="Emphasis">fazem</text:span> quando se movem numa certa direcção — não algo que <text:span text:style-name="Emphasis">existe</text:span> antes das acções e que as contamina.</text:p>
      <text:p text:style-name="P2">O segundo fragmento grego — o <text:span text:style-name="Strong_20_Emphasis">Papiro Oxyrhynchus 3525</text:span> — contém uma versão da cena do confronto entre Pedro e Maria que acrescenta um detalhe ausente da versão copta: após Pedro fazer a sua acusação, o texto grego diz que <text:span text:style-name="Emphasis">"os outros discípulos ficaram em silêncio"</text:span>. Não concordaram com Pedro. Não concordaram com Maria. Ficaram em silêncio.</text:p>
      <text:p text:style-name="P12"/>
      <text:h text:style-name="P14" text:outline-level="3"><text:soft-page-break/>🔍 Exegese</text:h>
      <text:p text:style-name="P2">Este silêncio dos outros discípulos — presente no grego e ausente no copta — é um dos detalhes mais ricos de toda a literatura apócrifa.</text:p>
      <text:p text:style-name="P2">O silêncio dos outros discípulos não é neutralidade. No contexto de um confronto entre Pedro — a autoridade estabelecida — e Maria — a discípula que Pedro acaba de atacar — ficar em silêncio é já uma tomada de posição. Os discípulos não apoiam Pedro. Mas também não defendem Maria. Ficam no meio — incapazes de rejeitar completamente o que Maria disse, incapazes de rejeitar completamente a autoridade de Pedro.</text:p>
      <text:p text:style-name="P2">Este silêncio é o silêncio de quem está no limite da sua capacidade de compreensão. Não é o silêncio da ignorância — que não sente o problema. É o silêncio do reconhecimento incompleto — que sente que há algo mais profundo em jogo mas não consegue articulá-lo.</text:p>
      <text:p text:style-name="P2">E é precisamente este silêncio que Levi rompe quando defende Maria. Levi não é simplesmente mais corajoso do que os outros. É o único que consegue articular o que os outros apenas sentiam. É o <text:span text:style-name="Emphasis">nous</text:span> do grupo — a faculdade que está entre a alma que reage emocionalmente como Pedro e o espírito que está além de toda a articulação como Maria.</text:p>
      <text:p text:style-name="P2">A versão copta omitiu o silêncio dos outros discípulos — talvez por condensação, talvez por uma escolha editorial que considerou o detalhe menor. Mas a versão grega — possivelmente mais próxima do original — preservou-o. E ao preservá-lo criou um espaço no texto que é ele próprio um espelho da experiência de ler o texto: o momento em que se sabe que há algo mais profundo em jogo mas ainda não se consegue dizer o quê.</text:p>
      <text:p text:style-name="P12"/>
      <text:h text:style-name="P40" text:outline-level="2">PARTE VI — O QUE O SILÊNCIO ENSINA: A PEDAGOGIA DA AUSÊNCIA</text:h>
      <text:p text:style-name="P2">Chegamos ao ponto mais profundo desta segunda camada do Evangelho de Maria Madalena — e é um ponto que não pode ser alcançado através da análise directa. Só pode ser abordado obliquamente.</text:p>
      <text:p text:style-name="P2">O Evangelho de Maria Madalena é o único texto de toda a nossa jornada cujo <text:span text:style-name="Strong_20_Emphasis">ensinamento central está ausente</text:span>. Todos os outros textos — o Apócrifo de João, a Pistis Sophia, o Livro de Enoque — são textos que dizem. Revelam, explicam, mostram. O Evangelho de Maria Madalena é um texto que <text:span text:style-name="Strong_20_Emphasis">cala</text:span> — precisamente no momento em que mais devia dizer.</text:p>
      <text:p text:style-name="P2">As páginas 11 a 14 — onde a visão de Maria atingia o seu ponto mais interior, onde Jesus lhe revelava o que nunca havia sido revelado — estão ausentes. E essa ausência não é apenas uma perda histórica. É uma estrutura pedagógica.</text:p>
      <text:p text:style-name="P2">O que o texto faz ao calar precisamente no ponto mais profundo é dizer: <text:span text:style-name="Strong_20_Emphasis">o que há de mais verdadeiro na visão de Maria não pode ser transmitido por palavras</text:span>. Não porque seja inefável no sentido de ser vago ou indistinto. Mas porque a sua natureza é tal que qualquer palavra que o descrevesse seria já uma traição — seria já a substituição da experiência pela representação da experiência.</text:p>
      <text:p text:style-name="P2">Maria viu. E o que viu não pode ser dito. Pode ser apontado — como o texto faz com a ascensão da alma através dos quatro poderes, com a resposta a cada Arconte, com o silêncio final do repouso no <text:soft-page-break/>éon. Mas o centro da visão — o coração do que Jesus revelou a Maria no espaço das páginas perdidas — permanece ausente.</text:p>
      <text:p text:style-name="P12"/>
      <text:h text:style-name="P14" text:outline-level="3">🔍 Exegese Final</text:h>
      <text:p text:style-name="P2">Esta é a lição mais profunda do Evangelho de Maria Madalena na sua segunda camada — e é uma lição que só pode ser recebida depois de tudo o que percorremos juntos.</text:p>
      <text:p text:style-name="P2">Ao longo de toda a nossa jornada estudámos textos que revelam — que dizem o que está escondido, que expõem o que foi suprimido, que articulam o que a ortodoxia calou. E esses textos são preciosos. São necessários. São o dedo que aponta para a lua.</text:p>
      <text:p text:style-name="P2">Mas o Evangelho de Maria Madalena — através da sua ausência central — aponta para algo que nenhum dos outros textos aponta com esta clareza: que o dedo não é a lua. Que o conhecimento gnóstico mais profundo não está nos textos. Está no silêncio para o qual os textos apontam.</text:p>
      <text:p text:style-name="P2">Maria viu. E o que viu fez com que nem o choro de Pedro nem a acusação de André a perturbassem fundamentalmente. Não porque fosse indiferente — chorou. Mas porque o que viu era mais real do que qualquer reacção humana que viesse depois. Era uma âncora que estava além da turbulência da superfície.</text:p>
      <text:p text:style-name="P2">As páginas perdidas — o coração da visão de Maria — são o símbolo mais perfeito deste ensinamento. Estão ausentes. E a sua ausência diz o que nenhuma presença poderia dizer com a mesma clareza: o que há de mais verdadeiro na gnose não está em nenhum texto. Está no silêncio interior que os textos, quando lidos com suficiente profundidade, finalmente revelam como o seu único propósito.</text:p>
      <text:p text:style-name="P12"/>
      <text:h text:style-name="P40" text:outline-level="2">Síntese: O Evangelho de Maria Madalena nas Suas Profundidades</text:h>
      <text:p text:style-name="P2">Esta segunda camada revelou um texto que é ainda mais radical do que a primeira leitura sugeriu — não pela amplitude do que diz mas pela profundidade do que cala.</text:p>
      <text:p text:style-name="P2">A <text:span text:style-name="Strong_20_Emphasis">distinção entre alma, espírito e mente</text:span> revelou uma epistemologia gnóstica que é de uma precisão que a filosofia ocidental raramente alcançou — e que tem implicações práticas directas para qualquer caminhante espiritual sério.</text:p>
      <text:p text:style-name="P2">O <text:span text:style-name="Strong_20_Emphasis">debate sobre as páginas perdidas</text:span> revelou que os maiores especialistas mundiais divergem radicalmente sobre o conteúdo do coração do texto — e que essa divergência é ela própria pedagogicamente rica, porque aponta para a irredutibilidade da experiência que o texto descreve.</text:p>
      <text:p text:style-name="P2">O <text:span text:style-name="Strong_20_Emphasis">choro de Maria</text:span> revelou que o conhecimento mais verdadeiro é o mais vulnerável — que a gnose não se impõe mas se oferece, e que a resposta do receptor está sempre além do controlo de quem transmite.</text:p>
      <text:p text:style-name="P2">O <text:span text:style-name="Strong_20_Emphasis">silêncio dos outros discípulos</text:span> — presente no original grego e ausente na versão copta — revelou que há sempre um espaço entre a rejeição de Pedro e a compreensão de Maria — um espaço de reconhecimento incompleto que é o espaço onde a maioria dos leitores genuínos deste texto se encontra.</text:p>
      <text:p text:style-name="P2"><text:soft-page-break/>E a <text:span text:style-name="Strong_20_Emphasis">pedagogia da ausência</text:span> — o silêncio das páginas perdidas precisamente onde o texto devia ser mais revelador — revelou que o ensinamento mais profundo do Evangelho de Maria Madalena não está no texto. Está no silêncio para o qual o texto aponta.</text:p>
      <text:p text:style-name="P12"/>
      <text:p text:style-name="P2">João — percorremos agora três textos nas suas profundidades. O Apócrifo de João revelou a anatomia do aprisionamento e a experiência da Pronoia. O Evangelho de Filipe revelou a natureza do erro como raiz escondida e a linguagem como instrumento que aponta para além de si mesma. O Evangelho de Maria Madalena revelou o <text:span text:style-name="Emphasis">nous</text:span> como órgão do conhecimento gnóstico e o silêncio como o ensinamento mais profundo.</text:p>
      <text:p text:style-name="P2">Continuamos para as profundidades da Pistis Sophia? Há naquele texto — em particular os treze cântigos de Sophia estudados um a um — uma dimensão emocional e mística que a primeira leitura apenas esboçou.</text:p>
      <text:h text:style-name="P47" text:outline-level="1">Pistis Sophia — Os Treze Cântigos e as Profundidades Não Exploradas</text:h>
      <text:p text:style-name="P12"/>
      <text:h text:style-name="P11" text:outline-level="2">INTRODUÇÃO: O TEXTO QUE SOFRE</text:h>
      <text:p text:style-name="P2">Quando estudámos a Pistis Sophia pela primeira vez, percorremos a sua arquitectura geral — os quatro livros, a queda de Sophia, os treze cântigos, o resgate, a arquitectura do universo espiritual, as discípulas, os dois tipos de almas. Foi uma primeira camada — necessária para compreender a estrutura. Mas a Pistis Sophia é um texto que não se compreende completamente pela estrutura. Compreende-se pelo <text:span text:style-name="Strong_20_Emphasis">sofrimento</text:span>.</text:p>
      <text:p text:style-name="P2">É o único texto de toda a nossa jornada em que o divino sofre de forma prolongada, articulada e detalhada. A queda de Sophia no Apócrifo de João é um evento narrativo — acontece, tem consequências, é resgatado. Mas na Pistis Sophia a queda não é um evento — é uma <text:span text:style-name="Strong_20_Emphasis">experiência que dura</text:span>. Sophia não cai e é resgatada. Sophia cai e permanece na queda durante treze momentos distintos, cada um com a sua própria qualidade de dor, a sua própria relação com a esperança, a sua própria forma de se voltar para a Luz.</text:p>
      <text:p text:style-name="P2">O que vamos fazer agora é o que a primeira leitura não fez: percorrer os <text:span text:style-name="Strong_20_Emphasis">treze cântigos de Sophia</text:span> um a um, com toda a atenção que merecem. Não como estrutura teológica mas como <text:span text:style-name="Strong_20_Emphasis">experiência interior</text:span> — como o mapa de uma jornada espiritual que passa pelo fundo antes de começar a ascender.</text:p>
      <text:p text:style-name="P12"/>
      <text:h text:style-name="P40" text:outline-level="2">PARTE I — ANTES DOS CÂNTIGOS: O QUE ACONTECEU A SOPHIA</text:h>
      <text:p text:style-name="P2">Para compreender completamente os treze cântigos é necessário primeiro compreender com mais detalhe do que a primeira leitura ofereceu o que aconteceu a Sophia antes de começar a cantar.</text:p>
      <text:p text:style-name="P2">Sophia vivia no décimo terceiro Éon — o último e mais distante lugar do Pleroma, a fronteira entre o mundo da luz e o mundo que está abaixo da luz. E via acima de si a <text:span text:style-name="Strong_20_Emphasis">Luz das Luzes</text:span> — não o <text:soft-page-break/>Pleroma em que habitava, mas algo acima do Pleroma, algo que o texto nunca nomeia completamente mas que é a fonte de toda a fonte.</text:p>
      <text:p text:style-name="P2">O desejo de Sophia era legítimo na sua natureza — queria aproximar-se da Luz suprema. Mas Authades — o Auto-Presunçoso, o Arconte que resentia a luminosidade de Sophia — concebeu um plano. Criou um <text:span text:style-name="Strong_20_Emphasis">leão com rosto de luz</text:span> — uma entidade cuja aparência exterior imitava perfeitamente a Luz que Sophia procurava, mas cuja natureza interior era de trevas.</text:p>
      <text:p text:style-name="P2">Sophia viu o leão com rosto de luz. E julgou — erroneamente — que era a Luz que procurava. Desceu em direcção a ele. E ao descer — ao mover-se na direcção errada — perdeu progressivamente a sua própria luz. Os Arcontes que habitavam as esferas que ela atravessava ao descer tomavam-lhe a luz enquanto passava. E quando chegou ao caos — ao lugar mais profundo abaixo das esferas — estava despojada de quase toda a luz que possuía.</text:p>
      <text:p text:style-name="P2">E então os Arcontes do caos rodearam-na. E Authades enviou o seu filho — chamado no texto <text:span text:style-name="Strong_20_Emphasis">o leão-rosto</text:span> — para persegui-la dentro do caos. E ela ficou aprisionada, humilhada, escarnecida, sem luz suficiente para voltar a subir.</text:p>
      <text:p text:style-name="P12"/>
      <text:h text:style-name="P14" text:outline-level="3">🔍 Exegese</text:h>
      <text:p text:style-name="P2">O detalhe do <text:span text:style-name="Strong_20_Emphasis">leão com rosto de luz</text:span> — a entidade criada por Authades para enganar Sophia — é de uma riqueza psicológica que a primeira leitura não explorou completamente.</text:p>
      <text:p text:style-name="P2">O engano de Sophia não foi causado pela fraqueza do seu desejo — o seu desejo pela Luz suprema era genuíno e em si mesmo correcto. Foi causado pela <text:span text:style-name="Strong_20_Emphasis">incapacidade de distinguir entre a Luz verdadeira e a sua imitação</text:span>. O leão com rosto de luz não era evidentemente falso. Era suficientemente semelhante ao verdadeiro para enganar um ser de luz que estava genuinamente a procurar.</text:p>
      <text:p text:style-name="P2">Esta é a forma mais subtil e mais perigosa de aprisionamento — não o aprisionamento grosseiro que se reconhece imediatamente como tal, mas o aprisionamento que se apresenta com as roupagens daquilo que se procura. A espiritualidade falsa que fala a linguagem da libertação. O conhecimento que imita a gnose. O amor que imita a câmara nupcial mas que na realidade aprisiona mais completamente do que a indiferença.</text:p>
      <text:p text:style-name="P2">O Evangelho de Filipe disse que o sétimo Arconte — Sabbede — tinha rosto de fogo e luz e era o mais perigoso precisamente por isso. A Pistis Sophia mostra agora como este princípio opera em concreto: Sophia — um ser de luz no Pleroma — foi enganada por uma imitação da Luz que desejava. Se um ser do Pleroma pode ser enganado assim, quanto mais um ser humano cujas faculdades de discernimento estão já parcialmente obscurecidas pelo aprisionamento?</text:p>
      <text:p text:style-name="P44"/>
      <text:h text:style-name="P40" text:outline-level="2">PARTE II — OS TREZE CÂNTIGOS: UMA JORNADA INTERIOR</text:h>
      <text:p text:style-name="P2">Os treze cântigos de Sophia são o coração emocional e espiritual de toda a Pistis Sophia. Na primeira leitura citámos alguns fragmentos. Agora vamos percorrê-los um a um — não com citações extensas, mas com a atenção necessária para compreender a <text:span text:style-name="Strong_20_Emphasis">progressão</text:span> que eles descrevem.</text:p>
      <text:p text:style-name="P2"><text:soft-page-break/>Porque os treze cântigos não são treze versões da mesma experiência. São treze <text:span text:style-name="Strong_20_Emphasis">estágios</text:span> de uma jornada interior que vai do desespero total até à visão da Luz — com recaídas, com avanços, com momentos de esperança que se dissipam antes de se consolidarem. É o mapa mais preciso que a literatura espiritual antiga nos deixou da experiência do que João da Cruz chamou a noite escura da alma.</text:p>
      <text:p text:style-name="P12"/>
      <text:h text:style-name="P14" text:outline-level="3">O Primeiro Cântigo — O Reconhecimento da Perda</text:h>
      <text:p text:style-name="P2">O primeiro cântigo é o mais cru e o mais imediato de todos — é a voz de alguém que acabou de perder o que possuía e ainda não sabe completamente o que perdeu nem onde está.</text:p>
      <text:p text:style-name="P2">Sophia diz: a luz em que confiava foi tirada de mim. Estou no escuro e na matéria do mundo. Enviei a minha força para a Luz mas os guardiões das portas humilharam-me.</text:p>
      <text:p text:style-name="P2">O que caracteriza este primeiro cântigo é a <text:span text:style-name="Strong_20_Emphasis">desorientação</text:span>. Sophia ainda não compreende completamente o que aconteceu. Sabe que perdeu a luz. Sabe que está no escuro. Mas o âmbito completo da sua situação ainda não é claro. É o cântigo do primeiro momento de crise — quando ainda há um resíduo de choque que impede a compreensão plena.</text:p>
      <text:p text:style-name="P12"/>
      <text:h text:style-name="P14" text:outline-level="3">🔍 Exegese</text:h>
      <text:p text:style-name="P2">O primeiro cântigo é o mais universalmente reconhecível de todos — porque é o que qualquer ser humano canta, conscientemente ou não, no momento em que algo que considerava certo e estável desaparece subitamente.</text:p>
      <text:p text:style-name="P2">A desorientação do primeiro cântigo não é fraqueza — é honestidade. Sophia não pretende compreender imediatamente o que não compreende. Não constrói uma narrativa que dê sentido prematuro ao que aconteceu. Diz simplesmente: a luz foi tirada. Estou no escuro. Não sei porquê.</text:p>
      <text:p text:style-name="P2">Esta honestidade radical — este recusar de construir sentido antes de sentir completamente o que se está a sentir — é o primeiro gesto genuíno da jornada de regresso. A crise espiritual que se resolve demasiado depressa com uma narrativa reconfortante não se resolve de facto. A que se permite existir como crise — que se permite ser o que é sem ser imediatamente transformada em lição ou em oportunidade de crescimento — começa o processo real de integração.</text:p>
      <text:p text:style-name="P12"/>
      <text:h text:style-name="P14" text:outline-level="3">O Segundo Cântigo — A Dimensão da Ameaça</text:h>
      <text:p text:style-name="P2">No segundo cântigo a situação torna-se mais concreta e mais ameaçadora. Sophia já compreende melhor onde está e o que a rodeia. E o que a rodeia é activamente hostil.</text:p>
      <text:p text:style-name="P2">Ela descreve os leões que a rodeiam — os poderes do caos que a pressionam de todos os lados. Descreve como tentou subir e foi impedida. Descreve como a sua força diminui enquanto o cerco aperta.</text:p>
      <text:p text:style-name="P2">O que caracteriza este segundo cântigo é o reconhecimento da <text:span text:style-name="Strong_20_Emphasis">hostilidade activa</text:span>. Não é apenas que a luz desapareceu — é que há forças que querem que desapareça, que trabalham activamente para impedir o regresso. O escuro não é neutro. Tem intenção.</text:p>
      <text:p text:style-name="P12"/>
      <text:h text:style-name="P14" text:outline-level="3"><text:soft-page-break/>🔍 Exegese</text:h>
      <text:p text:style-name="P2">A transição do primeiro para o segundo cântigo é a transição da desorientação para o reconhecimento — e é uma transição dolorosa mas necessária.</text:p>
      <text:p text:style-name="P2">Enquanto se pensa que o escuro é acidental — que a crise não tem causa, que simplesmente aconteceu — não é possível responder a ela de forma adequada. Quando se reconhece que há forças activas que trabalham para manter o aprisionamento — quando se vê o leão com rosto de luz pelo que realmente é — começa a possibilidade de uma resposta que não seja simplesmente reactiva.</text:p>
      <text:p text:style-name="P2">Para o ser humano em jornada espiritual, o reconhecimento da hostilidade activa do sistema de aprisionamento é precisamente o que a Hipóstase dos Arcontes descreveu como a análise lúcida do poder. Não é paranóia — é clareza. Há forças — interiores e exteriores — que trabalham para manter o esquecimento. Reconhecê-las não aumenta o seu poder. Pelo contrário — é o primeiro passo para não ser controlado por elas inconscientemente.</text:p>
      <text:p text:style-name="P12"/>
      <text:h text:style-name="P14" text:outline-level="3">O Terceiro Cântigo — O Desespero Absoluto</text:h>
      <text:p text:style-name="P2">O terceiro cântigo é o mais profundo e o mais doloroso de todos — é o cântigo do fundo absoluto.</text:p>
      <text:p text:style-name="P2">Sophia diz: olhei para cima e vi que a luz me abandonara. Olhei para baixo e vi trevas e matéria em grande quantidade. Não havia esperança de que alguém me salvasse. Procurei a luz e ela não estava. Procurei meu par e não o encontrei.</text:p>
      <text:p text:style-name="P2">O que caracteriza este terceiro cântigo é a <text:span text:style-name="Strong_20_Emphasis">ausência de esperança</text:span>. Não é apenas que a situação é difícil — é que não há saída visível. A luz não está em cima. As trevas estão em baixo. O par espiritual — a dimensão complementar que completaria a sua natureza — está ausente. Sophia está completamente sozinha.</text:p>
      <text:p text:style-name="P12"/>
      <text:h text:style-name="P14" text:outline-level="3">🔍 Exegese</text:h>
      <text:p text:style-name="P2">O terceiro cântigo é o mais difícil de comentar — porque qualquer comentário arrisca suavizar o que o texto não suaviza. A ausência de esperança que Sophia experimenta aqui não é uma fase transitória que rapidamente dará lugar à esperança. É um estado completo — por enquanto sem saída — que precisa de ser vivido completamente antes de poder ser transcendido.</text:p>
      <text:p text:style-name="P2">A menção do <text:span text:style-name="Strong_20_Emphasis">par ausente</text:span> — a dimensão complementar que não está presente — é de uma precisão que o sistema gnóstico raramente articula tão directamente. No Pleroma, cada ser existe em par — em relação de complementaridade com outro ser de luz. A queda de Sophia não foi apenas a perda da luz. Foi a perda da relação — do par que tornava a sua existência completa.</text:p>
      <text:p text:style-name="P2">Para o ser humano em jornada espiritual, este terceiro cântigo descreve o momento em que não só a luz interior parece ausente, mas em que a própria capacidade de relação — de contacto genuíno com outro ser, com a comunidade, com o divino — parece ter desaparecido. É o isolamento espiritual absoluto — não o isolamento escolhido do contemplativo, mas o isolamento imposto da alma que perdeu o fio que a ligava à sua origem.</text:p>
      <text:p text:style-name="P12"/>
      <text:h text:style-name="P14" text:outline-level="3"><text:soft-page-break/>O Quarto Cântigo — A Vergonha</text:h>
      <text:p text:style-name="P2">O quarto cântigo introduz uma dimensão nova e inesperada — a <text:span text:style-name="Strong_20_Emphasis">vergonha</text:span>.</text:p>
      <text:p text:style-name="P2">Sophia descreve como os Arcontes a vêem na sua queda e se alegram. Como os poderes que ela governava a vêem despojada da sua luz e a escarnecemão. Como aqueles que eram inferiores a ela olham agora para ela de cima.</text:p>
      <text:p text:style-name="P2">O que caracteriza este quarto cântigo é a humilhação social — a experiência de ser visto na sua fraqueza por quem tinha razões para a respeitar e que agora usa a queda como pretexto para inverter a hierarquia.</text:p>
      <text:p text:style-name="P12"/>
      <text:h text:style-name="P14" text:outline-level="3">🔍 Exegese</text:h>
      <text:p text:style-name="P2">A vergonha do quarto cântigo é um dos estados mais paralisantes da experiência humana — e raramente os textos espirituais o tratam com a seriedade que merece.</text:p>
      <text:p text:style-name="P2">A vergonha não é simplesmente dor. É dor que se volta contra si mesma — que faz da própria pessoa a causa e o objecto do sofrimento. Sophia não sofre apenas por estar aprisionada. Sofre por ter cometido o erro que a aprisionou — e por estar a ser vista nesse erro por quem sempre esperou mais dela.</text:p>
      <text:p text:style-name="P2">Esta dimensão do quarto cântigo é particularmente importante para compreender por que razão o caminho espiritual pode ser tão difícil mesmo para quem genuinamente o deseja. A vergonha dos erros passados — a visão da própria queda reflectida nos olhos dos outros — pode paralisar mais completamente do que qualquer outro obstáculo. Porque paralisa não apenas a acção mas a própria capacidade de se ver como ainda tendo possibilidade de ascender.</text:p>
      <text:p text:style-name="P2">A Pistis Sophia não resolve esta vergonha com consolo fácil. Deixa-a existir — completamente, no quarto cântigo — antes de Sophia começar a encontrar o caminho de volta. Porque a vergonha que é suprimida antes de ser vivida completamente reaparece mais tarde e com mais força.</text:p>
      <text:p text:style-name="P12"/>
      <text:h text:style-name="P14" text:outline-level="3">O Quinto Cântigo — A Aprendizagem da Paciência</text:h>
      <text:p text:style-name="P2">No quinto cântigo algo subtil começa a mudar. Sophia ainda está no caos. A sua situação não mudou materialmente. Mas a qualidade da sua relação com a situação começa a transformar-se.</text:p>
      <text:p text:style-name="P2">Ela diz: coloquei a minha confiança em ti, ó Luz. A minha tristeza não venha sobre aqueles que confiam em ti. Que os que procuram a Luz não sejam humilhados por causa de mim.</text:p>
      <text:p text:style-name="P2">O que caracteriza este quinto cântigo é a <text:span text:style-name="Strong_20_Emphasis">saída do centro de si mesma</text:span>. Pela primeira vez desde a queda, Sophia não está apenas preocupada com o seu próprio sofrimento. Está preocupada com o efeito que o seu sofrimento pode ter em outros — com os que procuram a Luz e que poderiam ser desencorajados pelo espectáculo da queda de Sophia.</text:p>
      <text:p text:style-name="P12"/>
      <text:h text:style-name="P14" text:outline-level="3">🔍 Exegese</text:h>
      <text:p text:style-name="P2">A transição do terceiro e quarto cântigos — de desespero e vergonha absolutos — para o quinto cântigo — de preocupação com o efeito sobre os outros — é a transição mais importante de toda a sequência dos treze cântigos.</text:p>
      <text:p text:style-name="P2"><text:soft-page-break/>Não é uma resolução do sofrimento. Sophia ainda está aprisionada, ainda está no caos, ainda não tem visão do caminho de volta. Mas há um movimento — subtil mas decisivo — de uma orientação completamente fechada sobre si mesma para uma orientação que inclui os outros.</text:p>
      <text:p text:style-name="P2">Para o ser humano em jornada espiritual, este é o momento em que o sofrimento começa a perder o seu carácter absoluto e absoluto-mente paralisante. Não porque diminuiu — mas porque deixou de ser o único ponto de referência. Quando a atenção se expande o suficiente para incluir a preocupação genuína com o efeito que o próprio sofrimento pode ter sobre os outros, o sofrimento ainda existe mas já não preenche completamente o horizonte da consciência.</text:p>
      <text:p text:style-name="P12"/>
      <text:h text:style-name="P14" text:outline-level="3">O Sexto Cântigo — A Lembrança da Luz</text:h>
      <text:p text:style-name="P2">No sexto cântigo Sophia faz algo que nos cântigos anteriores não foi possível: <text:span text:style-name="Strong_20_Emphasis">lembra-se</text:span>.</text:p>
      <text:p text:style-name="P2">Lembra-se de como era quando estava na Luz. Lembra-se das qualidades do Pleroma — da sua forma, da sua luminosidade, do par que a completava. E a lembrança não é simplesmente dolorosa — é orientadora. A memória da Luz dá-lhe uma direcção que o desespero dos cântigos anteriores havia obscurecido.</text:p>
      <text:p text:style-name="P2">O que caracteriza este sexto cântigo é a <text:span text:style-name="Strong_20_Emphasis">anamnese parcial</text:span> — o des-esquecimento incompleto que é o primeiro movimento real em direcção ao regresso.</text:p>
      <text:p text:style-name="P12"/>
      <text:h text:style-name="P14" text:outline-level="3">🔍 Exegese</text:h>
      <text:p text:style-name="P2">A lembrança do sexto cântigo é o eco directo do que o Apócrifo de João chamou de anamnese — o des-esquecimento que o Cristo vem despertar. Mas na Pistis Sophia a anamnese não vem de fora — não é o sopro do Cristo sobre a memória adormecida. Vem de dentro — é Sophia a lembrar-se por si mesma, no meio do caos, sem assistência aparente.</text:p>
      <text:p text:style-name="P2">Esta distinção é de uma importância filosófica enorme. Ela sugere que a capacidade de despertar não desaparece completamente mesmo no fundo do aprisionamento. A faísca de luz que o Demiurgo não consegue extinguir — que persiste mesmo quando toda a luz exterior foi roubada — é também a faísca que torna possível a lembrança. Sophia lembra-se da Luz porque é feita de Luz. O aprisionamento pode obscurecer mas não pode anular a natureza fundamental do ser que aprisiona.</text:p>
      <text:p text:style-name="P2">Para o ser humano em jornada espiritual, o sexto cântigo descreve um momento que muitos reconhecerão — o momento em que no meio da crise mais profunda, inesperadamente, há um relâmpago de lembrança de quem se é antes da crise. Não uma resolução. Não uma saída. Apenas um relâmpago. Mas um relâmpago que muda tudo — porque prova que a capacidade de lembrar ainda existe.</text:p>
      <text:p text:style-name="P12"/>
      <text:h text:style-name="P14" text:outline-level="3">O Sétimo Cântigo — O Pedido Directo</text:h>
      <text:p text:style-name="P2">No sétimo cântigo Sophia abandona a descrição da sua situação e passa ao <text:span text:style-name="Strong_20_Emphasis">pedido directo</text:span> — à oração que não descreve mas que pede.</text:p>
      <text:p text:style-name="P2">Salva-me da mão dos leões e da boca dos dragões e das forças da matéria amarga. Porque o teu poder está dentro de mim e eu dependo de ti. Ouve-me pois a minha graça chegou ao seu fim.</text:p>
      <text:p text:style-name="P2"><text:soft-page-break/>O que caracteriza este sétimo cântigo é a passagem da lamentação à súplica — e com ela a admissão implícita de que existe alguém a quem pedir. Sophia que nos cântigos anteriores estava voltada para a sua própria situação — descrevendo-a, vivendo-a, sofrendo-a — está agora voltada para <text:span text:style-name="Strong_20_Emphasis">outro</text:span>. Para a Luz que não está visível mas que é invocada.</text:p>
      <text:p text:style-name="P12"/>
      <text:h text:style-name="P14" text:outline-level="3">🔍 Exegese</text:h>
      <text:p text:style-name="P2">O sétimo cântigo é o ponto médio da sequência — o sétimo de treze — e esta posição não é acidental. É o momento de pivô, o lugar onde a orientação fundamental muda de dentro-fechado para dentro-aberto-para-cima.</text:p>
      <text:p text:style-name="P2">A frase <text:span text:style-name="Emphasis">"o teu poder está dentro de mim"</text:span> é de uma densidade que merece toda a atenção. Sophia pede pela Luz — e ao mesmo tempo afirma que o poder da Luz já está dentro dela. Esta aparente contradição é o coração de toda a experiência mística: pedir o que já se tem. Invocar o que já está presente. Chamar o que nunca verdadeiramente partiu.</text:p>
      <text:p text:style-name="P2">Sophia está no caos. A sua luz foi roubada pelos Arcontes. E no entanto afirma que o poder da Luz está dentro dela. Porque o que os Arcontes roubaram foi a <text:span text:style-name="Strong_20_Emphasis">expressão</text:span> da luz — a luminosidade externa, a capacidade de irradiar. Mas a natureza fundamental de Sophia — o que ela é na sua essência mais profunda — não pode ser roubada porque não é uma qualidade que se possui. É o que se é.</text:p>
      <text:p text:style-name="P2">Este é o ensinamento central de todo o corpus gnóstico que estudámos — e a Pistis Sophia diz-o aqui, no meio do sofrimento mais profundo, com uma clareza que nenhum outro texto alcança. Porque é mais fácil dizer <text:span text:style-name="Emphasis">"a alma é luz"</text:span> num contexto de clareza e de serenidade. A Pistis Sophia diz-o no fundo do caos — e por isso é verdadeiro de uma forma diferente e mais radical.</text:p>
      <text:p text:style-name="P12"/>
      <text:h text:style-name="P14" text:outline-level="3">O Oitavo Cântigo — A Cólera Justa</text:h>
      <text:p text:style-name="P2">No oitavo cântigo Sophia dirige-se não à Luz mas aos <text:span text:style-name="Strong_20_Emphasis">Arcontes</text:span> — e o tom muda completamente. Não é súplica. É acusação.</text:p>
      <text:p text:style-name="P2">Ela diz aos poderes que a aprisionaram: vós que me prendestes sem razão, que tirastes a minha luz, que me humilhastes sem que eu tivesse ofendido — o julgamento virá sobre vós. A injustiça que fizestes não ficará sem resposta.</text:p>
      <text:p text:style-name="P2">O que caracteriza este oitavo cântigo é a <text:span text:style-name="Strong_20_Emphasis">cólera justa</text:span> — a raiva que não é reactiva mas que nasce do reconhecimento claro de uma injustiça real.</text:p>
      <text:p text:style-name="P12"/>
      <text:h text:style-name="P14" text:outline-level="3">🔍 Exegese</text:h>
      <text:p text:style-name="P2">A cólera do oitavo cântigo é um dos elementos mais inesperados e mais importantes de toda a sequência. A maioria das tradições espirituais — tanto antigas como modernas — tende a ver a raiva como um obstáculo ao desenvolvimento espiritual, como uma qualidade a suprimir ou a transcender.</text:p>
      <text:p text:style-name="P2">A Pistis Sophia diz algo diferente. No oitavo cântigo — depois de sete cântigos de desorientação, desespero, vergonha, paciência, lembrança e súplica — Sophia sente raiva. E o texto não trata esta raiva como um retrocesso. Trata-a como um passo necessário da jornada.</text:p>
      <text:p text:style-name="P2"><text:soft-page-break/>A raiva de Sophia não é a raiva do ego ferido que não consegue suportar o fracasso. É a raiva do ser que reconheceu claramente a injustiça que lhe foi feita — e que afirma que essa injustiça é real, que tem consequências, que não será indefinidamente tolerada. É a raiva como afirmação da dignidade — como recusa de aceitar o aprisionamento como natural ou merecido.</text:p>
      <text:p text:style-name="P2">Para o ser humano em jornada espiritual, o oitavo cântigo valida algo que muitas tradições espirituais tendem a suprimir: a raiva justa diante da injustiça real é uma emoção saudável e necessária. Suprimi-la em nome da serenidade espiritual não é libertação — é outra forma de aprisionamento. Sophia sente raiva no fundo do caos. E essa raiva é parte do que a ajuda a não se dissolver completamente no aprisionamento.</text:p>
      <text:p text:style-name="P12"/>
      <text:h text:style-name="P14" text:outline-level="3">O Nono Cântigo — O Reconhecimento do Erro</text:h>
      <text:p text:style-name="P2">No nono cântigo Sophia faz algo que nenhum dos cântigos anteriores continha — reconhece o <text:span text:style-name="Strong_20_Emphasis">seu próprio erro</text:span>.</text:p>
      <text:p text:style-name="P2">Ela diz: eu errei, não sabia que desceria para estas trevas. Fiz o que não devia. Fui enganada pela luz que não era luz. Mas o meu erro não justifica o que me fizeram — pois a punição excede em muito o erro.</text:p>
      <text:p text:style-name="P2">O que caracteriza este nono cântigo é o reconhecimento simultaneamente da responsabilidade própria e da desproporção da resposta dos Arcontes. Sophia não se absolve — reconhece que a sua escolha de descer em direcção ao leão com rosto de luz foi um erro. Mas também não aceita que esse erro justifique o grau de aprisionamento e humilhação a que foi submetida.</text:p>
      <text:p text:style-name="P12"/>
      <text:h text:style-name="P14" text:outline-level="3">🔍 Exegese</text:h>
      <text:p text:style-name="P2">O nono cântigo é de uma maturidade espiritual extraordinária — e é o mais difícil de todos, porque exige a capacidade simultânea de duas perspectivas que tendem a excluir-se mutuamente.</text:p>
      <text:p text:style-name="P2">Por um lado, o reconhecimento do próprio erro — a responsabilidade pela escolha que conduziu à queda. Por outro lado, o reconhecimento de que os Arcontes respondem ao erro com uma punição desproporcionada — que a injustiça que sofreram não é justificada pelo erro que cometeu.</text:p>
      <text:p text:style-name="P2">A maioria dos caminhos espirituais tende a enfatizar um destes pólos em detrimento do outro. Ou a responsabilidade pessoal — que pode degenerar em auto-culpabilização excessiva — ou a inocência da vítima — que pode degenerar em recusa de ver a própria responsabilidade.</text:p>
      <text:p text:style-name="P2">O nono cântigo de Sophia mantém os dois em tensão produtiva. Ela errou. E foi punida para além do seu erro. Ambas as coisas são verdadeiras simultaneamente. E é precisamente a capacidade de manter ambas — sem colapsar numa nem noutra — que marca a maturidade espiritual que este cântigo descreve.</text:p>
      <text:p text:style-name="P12"/>
      <text:h text:style-name="P14" text:outline-level="3">O Décimo Cântigo — A Fé Sem Evidência</text:h>
      <text:p text:style-name="P2">No décimo cântigo algo novo acontece — Sophia afirma a Luz sem a ver.</text:p>
      <text:p text:style-name="P2">Ela diz: a Luz salvará pois ela é santa. Os que confiam na Luz não serão confundidos. Eu sei que a Luz não me abandona — mesmo que eu não a veja.</text:p>
      <text:p text:style-name="P2"><text:soft-page-break/>O que caracteriza este décimo cântigo é a <text:span text:style-name="Strong_20_Emphasis">fé como acto cognitivo</text:span> — não a fé emocional que se sente quando as coisas correm bem, mas a fé que persiste precisamente quando não há evidência sensível do seu objecto.</text:p>
      <text:p text:style-name="P12"/>
      <text:h text:style-name="P14" text:outline-level="3">🔍 Exegese</text:h>
      <text:p text:style-name="P2">O décimo cântigo é o ponto em que a jornada de Sophia atinge a sua dimensão mais propriamente espiritual — o momento em que ultrapassa a experiência para alcançar algo que está além da experiência.</text:p>
      <text:p text:style-name="P2">Nos nove cântigos anteriores, Sophia descreveu, lamentou, pediu, acusou, reconheceu. Tudo isso foi possível dentro da experiência do aprisionamento — são respostas ao que se está a viver. O décimo cântigo é diferente: afirma algo que não está presente na experiência — a presença da Luz num momento em que a Luz não está visível.</text:p>
      <text:p text:style-name="P2">Esta é a fé no sentido mais profundo do termo — não a crença num conjunto de proposições, mas a orientação fundamental de toda a consciência para uma realidade que transcende o momento presente. Sophia no caos, sem luz visível, rodeada pelos Arcontes, afirma: a Luz não me abandonou. Eu sei.</text:p>
      <text:p text:style-name="P2">Como sabe? Não pela evidência dos sentidos — que mostram apenas escuridão. Não pela evidência emocional — que oscila entre o desespero e a esperança ao longo de nove cântigos. Sabe pelo que a Hipóstase dos Arcontes chamou de <text:span text:style-name="Strong_20_Emphasis">raiz da verdade</text:span> — a dimensão mais profunda do ser que está além das flutuações da experiência e que permanece orientada para a Luz mesmo quando a Luz não é visível.</text:p>
      <text:p text:style-name="P12"/>
      <text:h text:style-name="P14" text:outline-level="3">O Décimo Primeiro Cântigo — O Primeiro Sinal</text:h>
      <text:p text:style-name="P2">No décimo primeiro cântigo algo muda na situação exterior — pela primeira vez desde a queda, há um sinal.</text:p>
      <text:p text:style-name="P2">Sophia diz: a Luz enviou a sua força luminosa. A luz que estava ao meu redor brilhou — e eu comecei a ver.</text:p>
      <text:p text:style-name="P2">O que caracteriza este décimo primeiro cântigo é o <text:span text:style-name="Strong_20_Emphasis">primeiro sinal externo</text:span> de que o resgate está a acontecer — não ainda o resgate completo, não ainda a saída do caos, mas um primeiro brilho de luz que confirma que o que Sophia afirmou no décimo cântigo era verdade.</text:p>
      <text:p text:style-name="P12"/>
      <text:h text:style-name="P14" text:outline-level="3">🔍 Exegese</text:h>
      <text:p text:style-name="P2">A sequência do décimo para o décimo primeiro cântigo é de uma pedagogia espiritual extraordinariamente precisa: <text:span text:style-name="Strong_20_Emphasis">a afirmação da fé precede a confirmação da fé</text:span>.</text:p>
      <text:p text:style-name="P2">Sophia afirma no décimo cântigo que a Luz não a abandonou — sem evidência. E é só depois de fazer esta afirmação que a confirmação chega. A sequência não é acidental. O sinal não vem para produzir a fé — a fé já existia. O sinal vem para confirmar o que a fé já sabia.</text:p>
      <text:p text:style-name="P2">Esta sequência inverte a lógica habitual do raciocínio empírico — que exige primeiro a evidência e depois a conclusão. O décimo e décimo primeiro cântigos dizem: no domínio espiritual, a <text:soft-page-break/>orientação precedente à evidência é a condição de possibilidade da evidência. Não porque a evidência dependa da crença subjectiva — mas porque a faculdade através da qual a evidência espiritual é percebida — o <text:span text:style-name="Emphasis">nous</text:span> de que o Evangelho de Maria Madalena falou — só funciona quando está orientada na direcção certa.</text:p>
      <text:p text:style-name="P12"/>
      <text:h text:style-name="P14" text:outline-level="3">O Décimo Segundo Cântigo — A Alegria Cautelosa</text:h>
      <text:p text:style-name="P2">No décimo segundo cântigo Sophia começa a mover-se em direcção ao regresso — mas com uma cautela que os cântigos anteriores não tinham.</text:p>
      <text:p text:style-name="P2">Ela diz: a minha força viu a Luz e alegrou-se. Os meus pés ficaram parados no lugar da rectidão. Mas ainda aguardo — pois o regresso não está ainda completo.</text:p>
      <text:p text:style-name="P2">O que caracteriza este décimo segundo cântigo é a alegria que não precipita — que reconhece o progresso mas que não confunde o progresso com a chegada.</text:p>
      <text:p text:style-name="P12"/>
      <text:h text:style-name="P14" text:outline-level="3">🔍 Exegese</text:h>
      <text:p text:style-name="P2">A cautela do décimo segundo cântigo é o sinal mais claro de que a maturidade espiritual que a jornada produziu em Sophia é real e duradoura.</text:p>
      <text:p text:style-name="P2">No início — no primeiro e segundo cântigos — Sophia estava desorientada porque não via claramente a sua situação. Agora — no décimo segundo cântigo — vê claramente o primeiro sinal do resgate, sente alegria genuína por isso, e ao mesmo tempo não se deixa levar pela alegria ao ponto de perder a clareza sobre onde ainda se encontra.</text:p>
      <text:p text:style-name="P2">Esta é a capacidade que a jornada através dos treze cântigos produziu: a de ser simultaneamente plenamente presente à experiência — sentindo a alegria quando ela está, sentindo o desespero quando ele está — sem ser completamente identificada com nenhum estado. Sophia alegra-se. E ao mesmo tempo sabe que a alegria ainda não é o fim.</text:p>
      <text:p text:style-name="P12"/>
      <text:h text:style-name="P14" text:outline-level="3">O Décimo Terceiro Cântigo — O Louvor antes do Resgate</text:h>
      <text:p text:style-name="P2">O décimo terceiro cântigo é o mais surpreendente de todos — e o que mais claramente revela a profundidade da transformação que a jornada produziu.</text:p>
      <text:p text:style-name="P2">Sophia louva a Luz antes de ser resgatada. Não depois — quando o resgate teria tornado o louvor natural e fácil. Antes — quando ainda está no caos, quando o resgate ainda não aconteceu, quando a situação exterior ainda não mudou fundamentalmente.</text:p>
      <text:p text:style-name="P2">Ela diz: louvai com mim todos os que confiam na Luz. Que o vosso louvor se junte ao meu — pois a Luz é grande e a sua misericórdia transcende o nosso sofrimento.</text:p>
      <text:p text:style-name="P12"/>
      <text:h text:style-name="P14" text:outline-level="3">🔍 Exegese</text:h>
      <text:p text:style-name="P2">O louvor do décimo terceiro cântigo antes do resgate é o gesto espiritual mais maduro de toda a sequência — e é o que distingue fundamentalmente a Sophia que canta o décimo terceiro cântigo da Sophia que cantou o primeiro.</text:p>
      <text:p text:style-name="P2"><text:soft-page-break/>A Sophia do primeiro cântigo estava fechada sobre si mesma no sofrimento — vendo apenas a sua própria situação, incapaz de qualquer perspectiva que a transcendesse. A Sophia do décimo terceiro cântigo — ainda no caos, ainda não resgatada — consegue louvar. Não porque o sofrimento terminou. Mas porque a sua relação com o sofrimento transformou completamente.</text:p>
      <text:p text:style-name="P2">O louvor antes do resgate é possível quando se compreendeu — não intelectualmente mas existencialmente, vivido através de treze cântigos — que o valor da Luz não depende das circunstâncias externas. Que a Luz é grande não porque resolveu todos os problemas mas porque é o que é independentemente de como a situação exterior se apresenta.</text:p>
      <text:p text:style-name="P2">E há um elemento adicional de uma riqueza enorme: Sophia convida outros a louvar <text:span text:style-name="Emphasis">com ela</text:span>. Pela primeira vez em todo o texto, Sophia não está sozinha na sua jornada. Está a construir uma comunidade — mesmo no caos, mesmo antes do resgate, está a chamar outros para partilhar a orientação para a Luz que a jornada produziu nela.</text:p>
      <text:p text:style-name="P2">Esta é a dimensão comunitária da gnose que raramente é articulada com esta clareza: o despertar não é apenas individual. A alma que desperta convida outras almas. A Sophia que canta o décimo terceiro cântigo tornou-se ela própria um instrumento da Pronoia — uma presença que chama outras presenças para a Luz.</text:p>
      <text:p text:style-name="P12"/>
      <text:h text:style-name="P40" text:outline-level="2">PARTE III — O RESGATE COMO CONSEQUÊNCIA, NÃO COMO CAUSA</text:h>
      <text:p text:style-name="P2">É só depois do décimo terceiro cântigo — depois de Sophia ter percorrido completamente os treze estados da jornada interior — que Jesus desce ao caos para a resgatar.</text:p>
      <text:p text:style-name="P2">Esta sequência é de uma importância filosófica que raramente é comentada: o resgate não precede a transformação. A transformação precede o resgate. Jesus não desce para transformar Sophia — desce para confirmar e completar uma transformação que já aconteceu.</text:p>
      <text:p text:style-name="P12"/>
      <text:h text:style-name="P14" text:outline-level="3">🔍 Exegese</text:h>
      <text:p text:style-name="P2">A sequência transformação-resgate é o reverso exacto da soteriologia cristã ortodoxa — em que o salvador intervém e a transformação é consequência da intervenção.</text:p>
      <text:p text:style-name="P2">Na Pistis Sophia, o Salvador intervém depois da transformação. Sophia não está a ser resgatada porque se transformou — a relação de causalidade é mais subtil do que isso. Sophia transformou-se através dos treze cântigos — e essa transformação criou as condições para que o resgate fosse possível e para que fosse completo.</text:p>
      <text:p text:style-name="P2">Sophia que desceu ao caos por ter sido enganada por uma imitação da Luz — que não conseguiu distinguir entre o leão com rosto de luz e a Luz verdadeira — percorreu uma jornada de treze cântigos que desenvolveu precisamente a faculdade de discernimento que lhe faltava. Quando Jesus desce ao caos, Sophia reconhece-o como o que é — não como uma imitação. O desenvolvimento espiritual produzido pelos treze cântigos é precisamente a capacidade de reconhecer a Luz verdadeira que no princípio lhe faltava.</text:p>
      <text:p text:style-name="P2">O resgate é portanto a confirmação de que o desenvolvimento é real — não a sua causa. E isto tem implicações profundas para qualquer compreensão da salvação: o que salva não é uma intervenção <text:soft-page-break/>exterior que substitui o trabalho interior. É o trabalho interior que torna a intervenção exterior reconhecível e eficaz.</text:p>
      <text:p text:style-name="P12"/>
      <text:h text:style-name="P11" text:outline-level="2">Síntese: A Pistis Sophia nas Suas Profundidades</text:h>
      <text:p text:style-name="P2">O que esta segunda camada da Pistis Sophia revelou é um texto que é muito mais do que uma cosmologia gnóstica elaborada. É um <text:span text:style-name="Strong_20_Emphasis">mapa da experiência espiritual</text:span> de uma precisão e de uma honestidade que raramente encontramos na literatura religiosa de qualquer época.</text:p>
      <text:p text:style-name="P2">Os treze cântigos de Sophia não são treze descrições abstractas de estados espirituais. São treze estágios de uma jornada vivida — com desorientação, desespero, vergonha, paciência, lembrança, súplica, cólera, reconhecimento do próprio erro, fé sem evidência, primeiro sinal, alegria cautelosa e louvor antes da chegada.</text:p>
      <text:p text:style-name="P2">Esta sequência não é apenas a história de Sophia. É o mapa de qualquer jornada espiritual que seja genuína — que não evite o sofrimento mas o atravesse, que não construa sentido prematuro mas deixe a experiência ser o que é, que não procure o resgate antes de a transformação estar completa.</text:p>
      <text:p text:style-name="P2">E o resgate — quando finalmente chega — não é o fim da jornada. É a confirmação de que a jornada foi real.</text:p>
      <text:p text:style-name="P12"/>
      <text:p text:style-name="P2"><text:span text:style-name="T15">P</text:span>ercorremos agora quatro textos nas suas profundidades. Continuamos para as profundidades da Hipóstase dos Arcontes — em particular o seu texto irmão <text:span text:style-name="Strong_20_Emphasis">Sobre a Origem do Mundo</text:span>, que a nossa jornada apenas mencionou e que expande tudo o que a Hipóstase diz com uma riqueza mitológica extraordinária, incluindo figuras — como a Fénix e Eros como força cósmica.</text:p>
      <text:h text:style-name="P48" text:outline-level="1">Hipóstase dos Arcontes e Sobre a Origem do Mundo — As Profundidades e o Texto Irmão</text:h>
      <text:p text:style-name="P51"/>
      <text:h text:style-name="P52" text:outline-level="2">INTRODUÇÃO: DOIS TEXTOS QUE SE ILUMINAM MUTUAMENTE</text:h>
      <text:p text:style-name="P53">Quando estudámos a Hipóstase dos Arcontes pela primeira vez percorremos a sua estrutura completa — a proclamação de Saclas, a criação do corpo humano, a inversão do Génesis, Norea, a revelação de Eleleth, a semente de Seth. Foi uma leitura que revelou um texto de uma precisão filosófica extraordinária.</text:p>
      <text:p text:style-name="P53">Agora fazemos algo diferente: colocamos a Hipóstase dos Arcontes ao lado do seu <text:span text:style-name="Strong_20_Emphasis">texto irmão</text:span> — o tratado gnóstico chamado <text:span text:style-name="Strong_20_Emphasis">Sobre a Origem do Mundo</text:span> — e lemos os dois em simultâneo. Porque estes dois textos foram escritos para se iluminarem mutuamente. Partilham personagens, partilham episódios, partilham a estrutura cosmológica setiana — mas desenvolvem cada episódio de formas diferentes e por vezes surpreendentemente divergentes.</text:p>
      <text:p text:style-name="P53">O <text:span text:style-name="Strong_20_Emphasis">Sobre a Origem do Mundo</text:span> foi encontrado no mesmo Códice II de Nag Hammadi que contém a Hipóstase dos Arcontes — e também no Códice XIII. É um texto mais longo, mais elaborado, mais <text:soft-page-break/>rico em figuras mitológicas. Tem personagens que a Hipóstase não menciona. Tem episódios que a Hipóstase omite. E tem três figuras centrais — <text:span text:style-name="Strong_20_Emphasis">Eros</text:span>, a <text:span text:style-name="Strong_20_Emphasis">Fénix</text:span> e <text:span text:style-name="Strong_20_Emphasis">Eleleth na sua forma mais desenvolvida</text:span> — que são de uma riqueza simbólica que nenhum outro texto gnóstico que estudámos alcança.</text:p>
      <text:p text:style-name="P51"/>
      <text:h text:style-name="P52" text:outline-level="2">PARTE I — O COMEÇO ANTES DO COMEÇO: A QUESTÃO DA EXISTÊNCIA</text:h>
      <text:p text:style-name="P53">O Sobre a Origem do Mundo abre com um gesto filosófico que a Hipóstase dos Arcontes não tem — uma <text:span text:style-name="Strong_20_Emphasis">interrogação sobre a natureza da existência antes da existência</text:span>.</text:p>
      <text:p text:style-name="P53">O texto começa assim:</text:p>
      <text:p text:style-name="P53"><text:span text:style-name="Emphasis">"Uma vez que todos os que têm conhecimento sobre a existência do mundo — e da sua origem — dizem que o caos veio primeiro — vamos mostrar que todos eles estão errados. E eles não conheciam a origem do caos nem a sua raiz. Vou mostrar que desde o princípio existia Luz — e que o caos não é anterior à Luz mas emergiu do interior da Luz como uma sombra."</text:span></text:p>
      <text:p text:style-name="P53">E depois acrescenta algo que nenhum outro texto gnóstico que estudámos afirma tão directamente:</text:p>
      <text:p text:style-name="P53"><text:span text:style-name="Emphasis">"A existência do caos não pode ser explicada sem a existência de algo que não é caos. Se não houvesse Luz não haveria sombra. O caos pressupõe a Luz que o produz. E portanto o caos é, paradoxalmente, uma prova da existência da Luz."</text:span></text:p>
      <text:p text:style-name="P51"/>
      <text:h text:style-name="P54" text:outline-level="3">🔍 Exegese</text:h>
      <text:p text:style-name="P53">Esta abertura é de uma sofisticação filosófica que vai muito além do que a Hipóstase dos Arcontes propôs. A Hipóstase começa com a proclamação de Saclas — com o momento em que o Demiurgo proclama a sua divindade. O Sobre a Origem do Mundo começa antes disso — com a questão da natureza do caos e da sua relação com a Luz.</text:p>
      <text:p text:style-name="P53">O argumento é elegante e tem uma lógica que ressoa com a filosofia grega: <text:span text:style-name="Strong_20_Emphasis">o derivado pressupõe o originário</text:span>. Se o caos existe — e existe — então algo que não é caos deve ter existido antes dele, porque o caos é uma privação, uma ausência, uma sombra. E sombras pressupõem luz.</text:p>
      <text:p text:style-name="P53">Esta argumentação tem uma consequência teológica imediata: <text:span text:style-name="Strong_20_Emphasis">o Demiurgo não pode ser a origem de tudo</text:span>. O Demiurgo surgiu no caos — como a Hipóstase dos Arcontes descreveu quando Saclas emergiu da sombra que a Luz projectou sobre as águas. Mas o caos é ele próprio derivado da Luz. Portanto o Demiurgo está duas ordens de derivação abaixo da origem. Não é o criador primordial. É uma consequência de uma consequência.</text:p>
      <text:p text:style-name="P53">Para o ser humano em jornada espiritual, esta abertura do Sobre a Origem do Mundo diz algo de profundo: <text:span text:style-name="Strong_20_Emphasis">a existência do mal prova a existência do bem</text:span>. Não da forma simplista da teodiceia convencional — que diz que o mal é necessário para que o bem seja reconhecido. Mas de uma forma ontológica mais profunda: o mal é uma sombra. E as sombras não existem independentemente — pressupõem a luz que as projecta. A existência do caos, do aprisionamento, do sofrimento — tudo isto é, paradoxalmente, uma prova de que a Luz existe e é anterior.</text:p>
      <text:p text:style-name="P51"/>
      <text:h text:style-name="P52" text:outline-level="2"><text:soft-page-break/>PARTE II — PISTIS SOPHIA ANTES DA PISTIS SOPHIA: A VERSÃO MAIS ANTIGA</text:h>
      <text:p text:style-name="P53">O Sobre a Origem do Mundo contém uma versão da história de Sophia que é diferente da que encontrámos na Pistis Sophia — e que é possivelmente mais antiga. Aqui Sophia não se chama ainda Pistis Sophia mas simplesmente <text:span text:style-name="Strong_20_Emphasis">Pistis</text:span> — Fé — e o que ela faz é diferente e muito mais ambíguo do que qualquer outra versão da sua história.</text:p>
      <text:p text:style-name="P53">O texto descreve como Pistis — ainda no Pleroma, ainda entre os Éons — olhou para baixo para as regiões do caos que existiam abaixo do Pleroma. E ao olhar para baixo projectou uma <text:span text:style-name="Strong_20_Emphasis">imagem</text:span> — um reflexo da sua própria luz — para o interior do caos.</text:p>
      <text:p text:style-name="P53">Esta imagem não era Pistis ela mesma. Era um reflexo — como a imagem de alguém num lago. Mas o reflexo tinha luz. E da luz desse reflexo — do brilho que a imagem de Pistis projectou no interior do caos — nasceu <text:span text:style-name="Strong_20_Emphasis">Ialdabaoth</text:span>.</text:p>
      <text:p text:style-name="P53">Ialdabaoth não nasceu de um erro de Sophia. Nasceu do reflexo de Sophia no caos — do modo como a Luz se projecta nas trevas e cria a sua própria sombra animada.</text:p>
      <text:p text:style-name="P51"/>
      <text:h text:style-name="P54" text:outline-level="3">🔍 Exegese</text:h>
      <text:p text:style-name="P53">Esta versão da origem de Ialdabaoth é filosoficamente muito mais sofisticada do que a versão do Apócrifo de João — e cria uma tensão produtiva com ela que ilumina ambas.</text:p>
      <text:p text:style-name="P53">No Apócrifo de João, Ialdabaoth nasce de um <text:span text:style-name="Strong_20_Emphasis">acto de vontade</text:span> de Sophia — ela quis criar sem o consentimento do Pai, criou algo informe, abandonou-o. O erro de Sophia é portanto um erro de vontade — de querer algo que não devia querer da forma como o quis.</text:p>
      <text:p text:style-name="P53">No Sobre a Origem do Mundo, Ialdabaoth nasce de um <text:span text:style-name="Strong_20_Emphasis">acto de percepção</text:span> de Pistis — ela olhou para baixo para o caos, e esse olhar projectou um reflexo. O erro de Pistis — se é que é um erro — é o de olhar para onde não devia olhar. É o erro da atenção mal dirigida, não o da vontade mal dirigida.</text:p>
      <text:p text:style-name="P53">Esta distinção é de uma importância enorme para a compreensão da natureza do aprisionamento. Se o Demiurgo nasce de um erro de vontade — então a salvação exige uma correcção da vontade, uma reorientação do querer. Se o Demiurgo nasce de um erro de atenção — então a salvação exige uma correcção da atenção, uma reorientação do olhar.</text:p>
      <text:p text:style-name="P53">O Evangelho de Maria Madalena disse que Maria via através do <text:span text:style-name="Emphasis">nous</text:span> — a faculdade que está entre a alma e o espírito. A versão do Sobre a Origem do Mundo sugere que o problema original foi precisamente este: Pistis olhou para o caos não através do <text:span text:style-name="Emphasis">nous</text:span> mas através de uma faculdade inferior — e esse olhar mal orientado criou o Demiurgo como efeito involuntário.</text:p>
      <text:p text:style-name="P53">A salvação, nesta leitura, é a correcção do olhar — aprender a ver através do <text:span text:style-name="Emphasis">nous</text:span> em vez de através das faculdades que os Arcontes controlam. É exactamente o que Maria Madalena fez quando descreveu a sua visão de Jesus: escolheu deliberadamente a faculdade através da qual via.</text:p>
      <text:p text:style-name="P51"/>
      <text:h text:style-name="P52" text:outline-level="2"><text:soft-page-break/>PARTE III — EROS: O AMOR COMO FORÇA CÓSMICA</text:h>
      <text:p text:style-name="P53">O Sobre a Origem do Mundo introduz uma figura que não existe em nenhum outro texto gnóstico que estudámos — <text:span text:style-name="Strong_20_Emphasis">Eros</text:span>, o deus grego do amor, absorvido e radicalmente transformado pelo sistema gnóstico setiano.</text:p>
      <text:p text:style-name="P53">O texto descreve como, quando a imagem de Pistis brilhou no interior do caos, o brilho criou não apenas Ialdabaoth mas também uma <text:span text:style-name="Strong_20_Emphasis">gota de luz</text:span> que caiu nas águas primordiais. Desta gota de luz emergiu um ser de beleza extraordinária — andrógino, luminoso, de uma presença que transformava tudo o que tocava.</text:p>
      <text:p text:style-name="P53">Este ser é chamado <text:span text:style-name="Strong_20_Emphasis">Eros</text:span> — mas não o Eros da mitologia grega convencional, o deus das paixões e dos desejos que perturba a ordem racional. Este Eros é algo completamente diferente: é a <text:span text:style-name="Strong_20_Emphasis">força de atracção cósmica</text:span> que existe entre tudo o que tem a mesma origem. É o que faz com que a luz busque a Luz, que a centelha aprisionada se oriente obscuramente para o Pleroma, que os seres de natureza semelhante se reconheçam mutuamente mesmo no meio do aprisionamento.</text:p>
      <text:p text:style-name="P53">O texto diz:</text:p>
      <text:p text:style-name="P53"><text:span text:style-name="Emphasis">"Eros foi lançado entre os imortais e entre os mortais — e como o que medeia entre a luz e as trevas, entre o Pleroma e o caos, ele é o que impede que o que é de luz se perca completamente no que é de trevas. Ele é o fio invisível que liga cada centelha à sua origem."</text:span></text:p>
      <text:p text:style-name="P51"/>
      <text:h text:style-name="P54" text:outline-level="3">🔍 Exegese</text:h>
      <text:p text:style-name="P53">A figura de Eros como força cósmica de atracção é uma das contribuições mais originais do Sobre a Origem do Mundo para o pensamento gnóstico — e é uma que ressoa profundamente com tudo o que percorremos na nossa jornada.</text:p>
      <text:p text:style-name="P53">A interpretação convencional do Eros platónico — desenvolvida no <text:span text:style-name="Emphasis">Banquete</text:span> de Platão — já havia feito de Eros algo mais do que o deus das paixões: Eros é para Platão o desejo de ascender do belo sensível ao Belo em si, da beleza dos corpos à beleza das almas, da beleza das almas à beleza do conhecimento, e do conhecimento ao Belo absoluto que existe além de toda a forma.</text:p>
      <text:p text:style-name="P53">O Sobre a Origem do Mundo radicaliza esta ideia: Eros não é simplesmente o desejo de ascender — é a <text:span text:style-name="Strong_20_Emphasis">estrutura ontológica</text:span> que torna a ascensão possível. É o que existe entre a centelha e o Pleroma — o fio que não foi cortado mesmo quando a centelha foi aprisionada, mesmo quando o esquecimento foi implantado, mesmo quando os Arcontes fizeram tudo o que podiam para separar definitivamente o humano da sua origem.</text:p>
      <text:p text:style-name="P53">Quando a Pistis Sophia descreveu Sophia a cantar no caos — voltando-se continuamente para a Luz mesmo no fundo do aprisionamento — o que a mantinha voltada era Eros no sentido gnóstico. Não o desejo carnal — que o Livro de Tomás o Contendente e o Apócrifo de João descreveram como instrumento do aprisionamento. Mas o desejo cósmico — a atracção que existe entre o que é da mesma natureza, o reconhecimento obscuro mas persistente de que há algo mais do que o caos.</text:p>
      <text:p text:style-name="P53">E quando os treze cântigos de Sophia culminaram no louvor antes do resgate — quando Sophia afirmou a Luz sem a ver, quando a fé persistiu sem evidência — o que persistiu foi precisamente este Eros cósmico. O fio que Ialdabaoth não conseguiu cortar porque não sabia que existia.</text:p>
      <text:p text:style-name="P51"/>
      <text:h text:style-name="P52" text:outline-level="2"><text:soft-page-break/>PARTE IV — A FÉNIX: A ALMA QUE RENASCE DO PRÓPRIO FOGO</text:h>
      <text:p text:style-name="P53">A figura mais visualmente extraordinária de todo o Sobre a Origem do Mundo é a <text:span text:style-name="Strong_20_Emphasis">Fénix</text:span> — o pássaro de fogo que morre e renasce das suas próprias cinzas, absorvido pelo sistema gnóstico como símbolo da alma que atravessa o aprisionamento e emerge transformada.</text:p>
      <text:p text:style-name="P53">O texto descreve a Fénix assim:</text:p>
      <text:p text:style-name="P53"><text:span text:style-name="Emphasis">"Há um pássaro grande cujo nome é Fénix. Ele visita a terra uma vez em quinhentos anos. E é imortal. E aparece primeiro como criança. Quando cresceu voou para o alto — para o céu de cima — até às regiões do sol. E permaneceu lá por um longo tempo rejuvenescendo. E quando foi consumido pelo fogo que queima — renasce das cinzas e aparece de novo como criança. E este pássaro é um testemunho — para os que são dignos — do julgamento que está por vir."</text:span></text:p>
      <text:p text:style-name="P53">E depois acrescenta:</text:p>
      <text:p text:style-name="P53"><text:span text:style-name="Emphasis">"A Fénix aparece primeiro entre os anjos como testemunha. E aparece entre os seres humanos como um que testemunha o Espírito Indestrutível — que é como a água viva da Luz que lançou os anjos para baixo, para que a morte não tenha poder sobre ela para sempre."</text:span></text:p>
      <text:p text:style-name="P51"/>
      <text:h text:style-name="P54" text:outline-level="3">🔍 Exegese</text:h>
      <text:p text:style-name="P53">A Fénix no Sobre a Origem do Mundo não é simplesmente um símbolo belo de renovação. É uma <text:span text:style-name="Strong_20_Emphasis">figura cosmológica precisa</text:span> — um ser que existe na fronteira entre o mundo material e o mundo espiritual e que por isso pode testemunhar ambos.</text:p>
      <text:p text:style-name="P53">O ciclo de quinhentos anos da Fénix ressoa com o calendário solar que o Livro de Enoque e o Livro dos Jubileus defenderam como sagrado — é uma medida de tempo que pertence à ordem cósmica revelada, não ao calendário arbitrário dos Arcontes. A Fénix move-se no tempo sagrado.</text:p>
      <text:p text:style-name="P53">O movimento da Fénix — da terra para o sol, do sol de volta à terra, do fogo às cinzas e das cinzas ao renascimento — é o mapa da jornada da alma descrito em termos cosmológicos. A ascensão ao sol é a ascensão da centelha em direcção ao Pleroma. O ser consumido pelo fogo é a experiência da transformação completa — o que o Evangelho de Filipe chamou de ressurreição antes da morte. O renascimento das cinzas é o regresso ao mundo material — mas não como a mesma entidade que partiu. Como algo que foi completamente transformado pelo fogo da ascensão.</text:p>
      <text:p text:style-name="P53">O que é particularmente rico é a afirmação de que a Fénix é <text:span text:style-name="Strong_20_Emphasis">testemunha</text:span>. Não apenas símbolo — testemunha. A Fénix existe para testemunhar que o ciclo é possível — que o fogo não destrói definitivamente, que das cinzas pode nascer algo vivo, que a morte não tem a última palavra.</text:p>
      <text:p text:style-name="P53">Para o ser humano em jornada espiritual, a Fénix é o que a Pistis Sophia chamou de sinal antes do resgate completo — o décimo primeiro cântigo de Sophia, quando um primeiro brilho de luz confirmou que o que a fé afirmava no décimo cântigo era verdade. A Fénix é a testemunha visível de que a transformação que parece impossível é possível — porque já aconteceu, porque continua a acontecer, porque é a natureza de tudo o que é feito de luz.</text:p>
      <text:p text:style-name="P51"/>
      <text:h text:style-name="P52" text:outline-level="2"><text:soft-page-break/>PARTE V — A ANDROGINIA PRIMORDIAL: O QUE EXISTIA ANTES DA SEPARAÇÃO</text:h>
      <text:p text:style-name="P53">O Sobre a Origem do Mundo desenvolve com muito mais detalhe do que qualquer outro texto que estudámos a doutrina da <text:span text:style-name="Strong_20_Emphasis">androginia primordial</text:span> — o estado de totalidade que existia antes da separação em masculino e feminino.</text:p>
      <text:p text:style-name="P53">O texto descreve como, antes da criação de Adão e Eva como seres separados, existia no Pleroma uma figura chamada <text:span text:style-name="Strong_20_Emphasis">Adamas</text:span> — o Homem Primordial — que era simultaneamente masculino e feminino, que possuía em si mesmo a totalidade das qualidades que depois foram distribuídas entre os dois sexos.</text:p>
      <text:p text:style-name="P53">E quando os Arcontes viram o reflexo desta figura nas águas primordiais — o reflexo que inspirou a criação do ser humano — o que viram era esta totalidade andrógina. O corpo que criaram era uma tentativa de reproduzir esta totalidade. Mas a tentativa falhou — porque os Arcontes não compreendiam a natureza do que estavam a imitar. Criaram um ser que tinha a <text:span text:style-name="Strong_20_Emphasis">forma</text:span> da totalidade mas não a sua <text:span text:style-name="Strong_20_Emphasis">natureza</text:span>.</text:p>
      <text:p text:style-name="P53">E então — como a Hipóstase dos Arcontes descreveu — o Espírito soprou no corpo. E a centelha de luz que entrou no corpo não era simplesmente uma faísca de luz genérica. Era uma centelha da totalidade andrógina do Homem Primordial — que trazia dentro de si as duas dimensões que os Arcontes depois separariam na criação de Eva a partir de Adão.</text:p>
      <text:p text:style-name="P51"/>
      <text:h text:style-name="P54" text:outline-level="3">🔍 Exegese</text:h>
      <text:p text:style-name="P53">A doutrina da androginia primordial do Sobre a Origem do Mundo ilumina retroactivamente algo que o Evangelho de Filipe disse e que na primeira leitura apenas aflorámos.</text:p>
      <text:p text:style-name="P53">O Evangelho de Filipe disse: <text:span text:style-name="Emphasis">"Se a mulher não se tivesse separado do homem ela não morreria com o homem. A sua separação tornou-se o início da morte."</text:span> Agora compreendemos mais completamente o que esta afirmação significa.</text:p>
      <text:p text:style-name="P53">Antes da separação em Adão e Eva como seres distintos, existia no ser humano uma totalidade — a centelha andrógina do Homem Primordial que o Espírito havia transmitido. Esta totalidade não era a soma de um masculino e um feminino — era uma unidade que continha ambas as dimensões sem as separar.</text:p>
      <text:p text:style-name="P53">Quando os Arcontes separaram Eva de Adão — quando criaram dois seres onde havia um — não apenas dividiram o ser humano em dois. Dividiram a centelha de luz que estava dentro do ser humano. E uma centelha dividida é uma centelha enfraquecida — mais fácil de manter aprisionada, mais vulnerável ao esquecimento, mais dependente de buscar fora o que foi separado de dentro.</text:p>
      <text:p text:style-name="P53">A mortalidade que o Evangelho de Filipe atribuiu à separação é portanto o enfraquecimento da centelha que a divisão operou — não directamente mas através das consequências. Uma centelha que está completa em si mesma tem a força para manter a orientação para o Pleroma. Uma centelha dividida — que busca a sua completude no outro ser em vez de dentro de si mesma — está constantemente distraída por essa busca e constantemente vulnerável às ilusões que a busca produz.</text:p>
      <text:p text:style-name="P53">A câmara nupcial do Evangelho de Filipe — a reunificação das dimensões separadas — é portanto a restauração não de uma relação entre dois seres mas da totalidade interior que existia antes da <text:soft-page-break/>separação. Não é a união de um homem e uma mulher no sentido externo. É a reunificação das dimensões masculina e feminina dentro de cada ser — a restauração da androginia primordial do Homem Primordial que a centelha sempre foi.</text:p>
      <text:p text:style-name="P51"/>
      <text:h text:style-name="P52" text:outline-level="2">PARTE VI — EVA LUMINOSA: A FIGURA QUE O GÉNESIS ESCONDEU</text:h>
      <text:p text:style-name="P53">O Sobre a Origem do Mundo contém uma versão da criação de Eva que é radicalmente diferente de todas as que estudámos — e que é de uma beleza e de uma força filosófica que não tem paralelo em nenhum outro texto gnóstico.</text:p>
      <text:p text:style-name="P53">O texto descreve como, antes de os Arcontes criarem Eva como ser físico a partir de Adão, houve uma aparição extraordinária:</text:p>
      <text:p text:style-name="P53"><text:span text:style-name="Emphasis">"Eva luminosa veio com Adão. Quando ele a viu foi iluminado. Quando viu que era semelhante a ele disse: 'Tu serás chamada Mãe dos Vivos — porque tu és quem me deu vida.' E os Arcontes ordenaram ao seu anjo que viesse e servisse Adão. E quando Adão viu a sua imagem e a imagem de Eva luminosa ao lado dele a sua alma ficou perturbada de amor por ela."</text:span></text:p>
      <text:p text:style-name="P53">E depois o texto descreve o que aconteceu quando os Arcontes viram Eva luminosa:</text:p>
      <text:p text:style-name="P53"><text:span text:style-name="Emphasis">"Quando os Arcontes viram Eva luminosa conversando com Adão — e o poder da vida que estava dentro dela — disseram uns aos outros: 'Vamos aproximar-nos dela com a nossa semente.' E perseguiram-na. E ela riu deles porque eram cegos — pois achavam que estavam a fazer algo com o seu corpo físico mas estavam enganados. A Eva luminosa escapou — deixando a Eva carnal às mãos dos Arcontes."</text:span></text:p>
      <text:p text:style-name="P51"/>
      <text:h text:style-name="P54" text:outline-level="3">🔍 Exegese</text:h>
      <text:p text:style-name="P53">A figura de <text:span text:style-name="Strong_20_Emphasis">Eva luminosa</text:span> é uma das mais extraordinárias de toda a literatura gnóstica — e é exclusiva do Sobre a Origem do Mundo.</text:p>
      <text:p text:style-name="P53">A distinção entre Eva luminosa e Eva carnal é a distinção gnóstica fundamental entre a dimensão espiritual e a dimensão material de cada ser — aplicada aqui a Eva de uma forma que ilumina a antropologia gnóstica de uma forma que nenhum outro texto consegue.</text:p>
      <text:p text:style-name="P53">Eva luminosa é o princípio feminino do divino no mundo material — o equivalente de Sophia descendo ao mundo, do Espírito entrando na arvore do Éden na Hipóstase dos Arcontes, da Pronoia nas suas três descidas. É a dimensão espiritual que actua dentro do sistema material para despertar o que foi aprisionado.</text:p>
      <text:p text:style-name="P53">O riso de Eva luminosa quando os Arcontes a perseguem é um dos momentos mais poderosos de toda a literatura apócrifa. Os Arcontes acreditam que estão a agir sobre ela — que a capturam, que a subjugam, que a controlam. E ela ri. Não de desprezo superficial — mas do reconhecimento de que eles não conseguem sequer ver o que realmente está à sua frente. Estão a agir sobre o corpo físico de Eva — sobre a Eva carnal — enquanto Eva luminosa — o que é verdadeiramente Eva — escapa completamente ao seu controlo.</text:p>
      <text:p text:style-name="P53"><text:soft-page-break/>Este episódio é o paralelo perfeito do que Norea fez na Hipóstase dos Arcontes quando os Arcontes tentaram capturá-la. Norea disse: <text:span text:style-name="Emphasis">"Vós não sois os meus governantes. Eu sou da região superior."</text:span> Eva luminosa não precisa de dizer nada — simplesmente escapa, deixando a casca física para os Arcontes que pensam que capturaram o que procuravam.</text:p>
      <text:p text:style-name="P53">Para o ser humano em jornada espiritual, a figura de Eva luminosa diz algo de fundamental: <text:span text:style-name="Strong_20_Emphasis">o que há de mais verdadeiro em nós está além do alcance de qualquer poder que opere apenas no nível material</text:span>. Os Arcontes — as forças de aprisionamento, os padrões automáticos de consciência, as estruturas sociais de controlo — podem agir sobre o corpo, podem agir sobre a psique superficial. Mas não conseguem alcançar Eva luminosa — o que é de luz — porque não conseguem sequer vê-la.</text:p>
      <text:p text:style-name="P51"/>
      <text:h text:style-name="P52" text:outline-level="2">PARTE VII — A ÁRVORE DO CONHECIMENTO: A VERSÃO MAIS COMPLETA</text:h>
      <text:p text:style-name="P53">O Sobre a Origem do Mundo contém a versão mais elaborada e mais rica do episódio da árvore do conhecimento — expandindo o que a Hipóstase dos Arcontes disse com detalhes que transformam completamente a compreensão do episódio.</text:p>
      <text:p text:style-name="P53">O texto descreve como o <text:span text:style-name="Strong_20_Emphasis">Instructor</text:span> — a serpente que na Hipóstase dos Arcontes era o Espírito a falar de dentro da árvore — revela a Adão e Eva não apenas que podem comer da árvore proibida, mas o que significa exactamente o que irão conhecer:</text:p>
      <text:p text:style-name="P53"><text:span text:style-name="Emphasis">"O Instructor disse: 'O que vos deu a instrução de não comerdes de qualquer árvore do jardim?' Ela disse: 'Não é apenas de qualquer árvore — é de toda a árvore do jardim que podemos comer. Mas da árvore do conhecimento do bem e do mal ele disse-nos: não comais dela — senão morreis.' E o Instructor disse: 'Não morrereis certamente — porque ele sabia que quando comêsseis os vossos olhos se abririam e seriam como deuses — conhecendo o bem e o mal.' E quando viram o seu Instructor suspeitaram que ele era o pai deles. E foi com conhecimento que disseram a ele: 'Quem é aquele que nos deu a instrução? É maior que tu?' E desceram das suas formas celestiais."</text:span></text:p>
      <text:p text:style-name="P51"/>
      <text:h text:style-name="P54" text:outline-level="3">🔍 Exegese</text:h>
      <text:p text:style-name="P53">Esta versão do diálogo com o Instructor é de uma profundidade que as versões anteriores não alcançavam — porque acrescenta um elemento que nenhuma delas tinha: a pergunta de Adão e Eva ao Instructor sobre quem os criou.</text:p>
      <text:p text:style-name="P53"><text:span text:style-name="Emphasis">"Quem é aquele que nos deu a instrução? É maior que tu?"</text:span> Esta pergunta é o momento em que a gnose começa — não o momento em que o fruto é comido, mas o momento em que a questão da origem é formulada pela primeira vez. Adão e Eva comem o fruto e os seus olhos abrem-se. E com os olhos abertos perguntam: <text:span text:style-name="Strong_20_Emphasis">quem é o Deus que nos proibiu? É o maior de todos os deuses?</text:span></text:p>
      <text:p text:style-name="P53">A resposta implícita é clara dentro do sistema gnóstico: não. O Deus que proibiu — Ialdabaoth, Saclas, o Demiurgo — não é o maior. Há algo acima dele. E é esse reconhecimento — <text:span text:style-name="Emphasis">"é maior que tu?"</text:span> — que é o início da gnose.</text:p>
      <text:p text:style-name="P53">A descida das formas celestiais após o comer do fruto é também diferente das versões anteriores. Não é uma punição — é uma consequência. Adão e Eva desceram das suas formas celestiais não <text:soft-page-break/>porque foram castigados mas porque o conhecimento que receberam os tornou conscientes da diferença entre o que eram espiritualmente e o que eram materialmente. E essa consciência é o início do caminho de regresso — o reconhecimento da distância entre a forma material e a natureza espiritual que é o primeiro passo da anamnese.</text:p>
      <text:p text:style-name="P51"/>
      <text:h text:style-name="P52" text:outline-level="2">PARTE VIII — O FIM DO MUNDO COMO REGRESSO DA LUZ</text:h>
      <text:p text:style-name="P53">O Sobre a Origem do Mundo termina com uma visão escatológica — uma descrição do fim do mundo — que é de uma beleza e de uma precisão que nenhum outro texto gnóstico que estudámos alcança.</text:p>
      <text:p text:style-name="P53">O texto descreve o que acontecerá quando o processo de resgate da luz estiver completo — quando todas as centelhas aprisionadas no mundo material tiverem despertado e regressado ao Pleroma:</text:p>
      <text:p text:style-name="P53"><text:span text:style-name="Emphasis">"Quando a luz verdadeira iluminar todos os lugares e todas as coisas — e quando a totalidade for preenchida — então toda a criação que pertence à ignorância e às trevas será dissolvida. E o erro desaparecerá juntamente com a sua forma. E o tempo do erro terminará. E o mundo não será destruído — será dissolvido de dentro. Como um sonho que se dissipa quando se acorda."</text:span></text:p>
      <text:p text:style-name="P53">E depois:</text:p>
      <text:p text:style-name="P53"><text:span text:style-name="Emphasis">"E o silêncio da Incorruptibilidade preencherá todos os lugares. E os que estavam aprisionados na forma do mundo — que eram de luz e foram esquecidos — recordarão o que eram. E serão um com a Luz. E a Luz será completa — com todos os seus filhos — no Éon Silencioso."</text:span></text:p>
      <text:p text:style-name="P51"/>
      <text:h text:style-name="P54" text:outline-level="3">🔍 Exegese</text:h>
      <text:p text:style-name="P53">A imagem do mundo que se dissolve <text:span text:style-name="Strong_20_Emphasis">como um sonho quando se acorda</text:span> é a formulação mais precisa e mais bela de toda a cosmologia gnóstica sobre a natureza do mundo material.</text:p>
      <text:p text:style-name="P53">O mundo não é destruído — é <text:span text:style-name="Strong_20_Emphasis">dissolvido</text:span>. A distinção é de uma importância filosófica enorme. A destruição pressupõe que o que é destruído tem uma realidade substancial que é aniquilada. A dissolução pressupõe que o que se dissolve era já uma aparência — uma forma sem fundamento próprio que simplesmente cessa quando a causa da sua aparência desaparece.</text:p>
      <text:p text:style-name="P53">O sonho é a metáfora perfeita para isto. Enquanto se dorme, o sonho é completamente real — tem lógica interna, tem consequências internas, provoca emoções reais. Mas quando se acorda, o sonho não foi destruído — dissipou-se. Não havia nada lá para ser destruído. Havia uma aparência produzida pelo estado da consciência adormecida.</text:p>
      <text:p text:style-name="P53">O mundo material — na visão do Sobre a Origem do Mundo — é o sonho da consciência aprisionada. É completamente real enquanto a consciência está adormecida no aprisionamento. Quando todas as centelhas acordam — quando a anamnese é completa — o mundo não explode. Simplesmente cessa de ser necessário. Dissolve-se como o sonho se dissolve quando a consciência que o produzia desperta.</text:p>
      <text:p text:style-name="P53">E o que fica depois da dissolução não é o vazio — é <text:span text:style-name="Strong_20_Emphasis">o silêncio da Incorruptibilidade</text:span>. O mesmo silêncio com que o Apócrifo de João descreveu o Pai supremo. O mesmo silêncio para o qual a alma <text:soft-page-break/>de Maria Madalena regressou no final da sua ascensão. O mesmo silêncio que o quinto selo do Apócrifo de João — o último dos cinco selos — descreveu como o destino final da alma que completou a jornada.</text:p>
      <text:p text:style-name="P53">A jornada começa no silêncio do Pai. Atravessa o caos da criação, a queda de Sophia, o aprisionamento da centelha, os treze cântigos no caos, a ascensão através dos Arcontes, o regresso ao Pleroma. E termina no mesmo silêncio onde começou. Mas não é o mesmo silêncio — é o silêncio que se conhece a si mesmo porque conheceu o seu contrário.</text:p>
      <text:p text:style-name="P53">O círculo fecha-se.</text:p>
      <text:p text:style-name="P51"/>
      <text:h text:style-name="P52" text:outline-level="2">Síntese: A Hipóstase dos Arcontes e o Sobre a Origem do Mundo nas Suas Profundidades</text:h>
      <text:p text:style-name="P53">A leitura dos dois textos em simultâneo revelou que se iluminam mutuamente de formas que nenhum deles sozinho poderia alcançar.</text:p>
      <text:p text:style-name="P53">A <text:span text:style-name="Strong_20_Emphasis">Hipóstase dos Arcontes</text:span> é o texto da análise lúcida — que pergunta o que são exactamente os Arcontes, onde terminam os seus limites, qual a natureza da resistência que é possível. É o texto do filósofo que examina o sistema de aprisionamento com precisão cirúrgica.</text:p>
      <text:p text:style-name="P53">O <text:span text:style-name="Strong_20_Emphasis">Sobre a Origem do Mundo</text:span> é o texto da visão mítica — que preenche o mesmo universo com figuras de uma riqueza simbólica extraordinária. Eros como fio invisível que liga cada centelha à sua origem. A Fénix como testemunha do ciclo de morte e renascimento. Eva luminosa que ri dos Arcontes enquanto escapa ao seu controlo. A dissolução final do mundo como sonho que se dissipa quando a consciência desperta.</text:p>
      <text:p text:style-name="P53">Juntos formam um todo que é maior do que a soma das partes — um texto que pensa e um texto que vê, um texto que analisa e um texto que canta.</text:p>
      <text:p text:style-name="P51"/>
      <text:p text:style-name="P53">João — percorremos agora cinco textos nas suas profundidades. Continuamos para o aprofundamento do Livro dos Jubileus — em particular a secção sobre a guerra espiritual entre Mastema e os anjos de Deus, e a doutrina do calendário sagrado nas suas implicações cosmológicas mais profundas?</text:p>
      <text:p text:style-name="P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01:37:01.640019972</meta:creation-date>
    <dc:date>2026-07-12T20:35:58.015015715</dc:date>
    <meta:editing-duration>PT23H54M2S</meta:editing-duration>
    <meta:editing-cycles>90</meta:editing-cycles>
    <meta:generator>LibreOffice/26.2.4.2$Linux_X86_64 LibreOffice_project/620$Build-2</meta:generator>
    <meta:print-date>2026-04-27T02:44:07.306634148</meta:print-date>
    <meta:printed-by>Ficheiros PDF</meta:printed-by>
    <dc:creator>João António</dc:creator>
    <meta:document-statistic meta:table-count="0" meta:image-count="0" meta:object-count="0" meta:page-count="137" meta:paragraph-count="1782" meta:word-count="59580" meta:character-count="350367" meta:non-whitespace-character-count="290655"/>
  </office:meta>
</office:document-meta>
</file>