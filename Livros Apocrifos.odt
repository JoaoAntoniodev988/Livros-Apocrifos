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5_2515542930"/><text:bookmark-start text:name="__DdeLink__9389_3147029182"/><text:bookmark-start text:name="__DdeLink__8998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9389_3147029182"/><text:bookmark-end text:name="__DdeLink__8995_2515542930"/><text:bookmark-end text:name="__DdeLink__8998_2515542930"/></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3_3147029182"/><text:bookmark-start text:name="__DdeLink__9406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3_3147029182"/><text:bookmark-end text:name="__DdeLink__9406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2_3147029182"/><text:bookmark-start text:name="__DdeLink__9435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2_3147029182"/><text:bookmark-end text:name="__DdeLink__9435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37_3147029182"/><text:bookmark-start text:name="__DdeLink__9440_3147029182"/><text:bookmark-start text:name="__DdeLink__9444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37_3147029182"/><text:bookmark-end text:name="__DdeLink__9440_3147029182"/><text:bookmark-end text:name="__DdeLink__9444_3147029182"/></text:p>
      <text:p text:style-name="P12"/>
      <text:h text:style-name="P39" text:outline-level="1"><text:bookmark-start text:name="__DdeLink__9448_3147029182"/><text:bookmark-start text:name="__DdeLink__9908_3997500991"/><text:bookmark-start text:name="__DdeLink__9901_257282931"/><text:bookmark-start text:name="__DdeLink__9454_3147029182"/>Apócrifo de João — Reconstrução Interpretativa e Exegese Gnóstica<text:bookmark-end text:name="__DdeLink__9448_3147029182"/><text:bookmark-end text:name="__DdeLink__9454_3147029182"/></text:h>
      <text:p text:style-name="P12"/>
      <text:h text:style-name="P11" text:outline-level="2"><text:bookmark-start text:name="__DdeLink__9446_3147029182"/><text:bookmark-start text:name="__DdeLink__9451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901_257282931"/><text:bookmark-end text:name="__DdeLink__9451_3147029182"/><text:bookmark-end text:name="__DdeLink__9908_3997500991"/></text:p>
      <text:h text:style-name="P39" text:outline-level="1"><text:bookmark-start text:name="__DdeLink__12615_257282931"/><text:bookmark-start text:name="__DdeLink__9460_2045297844"/>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bookmark-end text:name="__DdeLink__12615_257282931"/></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bookmark-end text:name="__DdeLink__9460_2045297844"/></text:p>
      <text:h text:style-name="P13" text:outline-level="1"><text:bookmark-start text:name="__DdeLink__9462_2045297844"/><text:bookmark-start text:name="__DdeLink__18461_2597948309"/>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bookmark-end text:name="__DdeLink__18461_2597948309"/></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bookmark-end text:name="__DdeLink__9462_2045297844"/></text:p>
      <text:h text:style-name="P13" text:outline-level="1"><text:bookmark-start text:name="__DdeLink__9464_2045297844"/><text:bookmark-start text:name="__DdeLink__18466_2597948309"/>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text:bookmark-start text:name="__DdeLink__9469_3434306060"/>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bookmark-end text:name="__DdeLink__9469_3434306060"/></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bookmark-start text:name="__DdeLink__9471_3434306060"/><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bookmark-end text:name="__DdeLink__9471_3434306060"/></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bookmark-end text:name="__DdeLink__18466_2597948309"/></text:p>
      <text:p text:style-name="P12"><text:bookmark-end text:name="__DdeLink__9464_2045297844"/></text:p>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text:bookmark-start text:name="__DdeLink__9473_3434306060"/><text:bookmark-start text:name="__DdeLink__18469_2597948309"/>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bookmark-end text:name="__DdeLink__9473_3434306060"/><text:bookmark-end text:name="__DdeLink__18469_2597948309"/></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bookmark-start text:name="__DdeLink__9475_3434306060"/><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bookmark-end text:name="__DdeLink__9475_3434306060"/></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7-12T22:21:15.466024194</dc:date>
    <meta:editing-duration>PT23H54M17S</meta:editing-duration>
    <meta:editing-cycles>92</meta:editing-cycles>
    <meta:generator>LibreOffice/26.2.4.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80" meta:character-count="350367" meta:non-whitespace-character-count="290655"/>
  </office:meta>
</office:document-meta>
</file>