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5_2515542930"/><text:bookmark-start text:name="__DdeLink__9389_3147029182"/><text:bookmark-start text:name="__DdeLink__8998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9389_3147029182"/><text:bookmark-end text:name="__DdeLink__8995_2515542930"/><text:bookmark-end text:name="__DdeLink__8998_2515542930"/></text:p>
      <text:p text:style-name="P7"/>
      <text:h text:style-name="P8" text:outline-level="2">2. Origem histórica</text:h>
      <text:p text:style-name="P2"><text:bookmark-start text:name="__DdeLink__9391_314702918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bookmark-end text:name="__DdeLink__9391_3147029182"/></text:p>
      <text:p text:style-name="P7"/>
      <text:h text:style-name="P8" text:outline-level="2">3. Por que foram excluídos do cânon?</text:h>
      <text:p text:style-name="P2"><text:bookmark-start text:name="__DdeLink__9395_314702918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bookmark-end text:name="__DdeLink__9395_3147029182"/></text:p>
      <text:p text:style-name="P7"/>
      <text:h text:style-name="P8" text:outline-level="2">4. A questão do cânon — católicos, ortodoxos e protestantes</text:h>
      <text:p text:style-name="P2"><text:bookmark-start text:name="__DdeLink__9397_314702918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bookmark-end text:name="__DdeLink__9397_3147029182"/></text:p>
      <text:p text:style-name="P7"/>
      <text:h text:style-name="P8" text:outline-level="2">5. Quantos são?</text:h>
      <text:p text:style-name="P2"><text:bookmark-start text:name="__DdeLink__9393_314702918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bookmark-end text:name="__DdeLink__9393_3147029182"/></text:p>
      <text:p text:style-name="P7"/>
      <text:h text:style-name="P8" text:outline-level="2">6. Os textos mais famosos</text:h>
      <text:p text:style-name="P6"><text:bookmark-start text:name="__DdeLink__9399_3147029182"/><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bookmark-end text:name="__DdeLink__9399_3147029182"/></text:p>
      <text:p text:style-name="P7"/>
      <text:h text:style-name="P8" text:outline-level="2">7. A grande descoberta: Nag Hammadi (1945)</text:h>
      <text:p text:style-name="P2"><text:bookmark-start text:name="__DdeLink__9401_314702918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bookmark-end text:name="__DdeLink__9401_3147029182"/></text:p>
      <text:p text:style-name="P7"/>
      <text:h text:style-name="P8" text:outline-level="2">8. Os Manuscritos do Mar Morto (1947)</text:h>
      <text:p text:style-name="P9"><text:bookmark-start text:name="__DdeLink__9403_3147029182"/><text:bookmark-start text:name="__DdeLink__9406_3147029182"/>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 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bookmark-end text:name="__DdeLink__9403_3147029182"/><text:bookmark-end text:name="__DdeLink__9406_3147029182"/></text:p>
      <text:p text:style-name="P7"/>
      <text:h text:style-name="P8" text:outline-level="2">9. Importância para a história do Cristianismo</text:h>
      <text:p text:style-name="P2"><text:bookmark-start text:name="__DdeLink__9408_314702918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bookmark-end text:name="__DdeLink__9408_3147029182"/></text:p>
      <text:p text:style-name="P7"/>
      <text:p text:style-name="P6"><text:bookmark-start text:name="__DdeLink__9410_3147029182"/><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410_3147029182"/><text:bookmark-end text:name="__DdeLink__9380_4151765368"/></text:p>
      <text:h text:style-name="P10" text:outline-level="1"><text:bookmark-start text:name="__DdeLink__9412_3147029182"/>Culturas e Espiritualidades Fundamentadas nos Apócrifos<text:bookmark-end text:name="__DdeLink__9412_3147029182"/></text:h>
      <text:h text:style-name="P11" text:outline-level="2">1. O Gnosticismo — a raiz de tudo</text:h>
      <text:p text:style-name="P2"><text:bookmark-start text:name="__DdeLink__9416_314702918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bookmark-end text:name="__DdeLink__9416_3147029182"/></text:p>
      <text:p text:style-name="P12"/>
      <text:h text:style-name="P11" text:outline-level="2">2. O Mandeísmo — o único gnosticismo vivo</text:h>
      <text:p text:style-name="P6"><text:bookmark-start text:name="__DdeLink__9418_3147029182"/><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bookmark-end text:name="__DdeLink__9418_3147029182"/></text:p>
      <text:p text:style-name="P12"/>
      <text:h text:style-name="P11" text:outline-level="2">3. Os Cátaros — o gnosticismo medieval da Europa</text:h>
      <text:p text:style-name="P2"><text:bookmark-start text:name="__DdeLink__9420_314702918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bookmark-end text:name="__DdeLink__9420_3147029182"/></text:p>
      <text:p text:style-name="P12"/>
      <text:h text:style-name="P11" text:outline-level="2">4. A Rosa-Cruz — hermetismo e apócrifos</text:h>
      <text:p text:style-name="P2"><text:bookmark-start text:name="__DdeLink__9422_314702918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bookmark-end text:name="__DdeLink__9422_3147029182"/></text:p>
      <text:p text:style-name="P12"/>
      <text:h text:style-name="P11" text:outline-level="2">5. A Teosofia e o Cristianismo Esotérico</text:h>
      <text:p text:style-name="P2"><text:bookmark-start text:name="__DdeLink__9424_314702918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bookmark-end text:name="__DdeLink__9424_3147029182"/></text:p>
      <text:p text:style-name="P12"/>
      <text:h text:style-name="P11" text:outline-level="2">6. O Islamismo — influência silenciosa</text:h>
      <text:p text:style-name="P2"><text:bookmark-start text:name="__DdeLink__9428_314702918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bookmark-end text:name="__DdeLink__9428_3147029182"/></text:p>
      <text:p text:style-name="P12"/>
      <text:h text:style-name="P11" text:outline-level="2">7. A Cabala Judaica</text:h>
      <text:p text:style-name="P6"><text:bookmark-start text:name="__DdeLink__9426_3147029182"/><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bookmark-end text:name="__DdeLink__9426_3147029182"/></text:p>
      <text:p text:style-name="P12"/>
      <text:h text:style-name="P11" text:outline-level="2">8. A Gnose Contemporânea</text:h>
      <text:p text:style-name="P2"><text:bookmark-start text:name="__DdeLink__9430_314702918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bookmark-end text:name="__DdeLink__9430_3147029182"/></text:p>
      <text:p text:style-name="P12"/>
      <text:h text:style-name="P13" text:outline-level="1"><text:bookmark-start text:name="__DdeLink__9432_3147029182"/><text:bookmark-start text:name="__DdeLink__9435_3147029182"/>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bookmark-end text:name="__DdeLink__9432_3147029182"/><text:bookmark-end text:name="__DdeLink__9435_3147029182"/></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text:bookmark-start text:name="__DdeLink__9437_3147029182"/><text:bookmark-start text:name="__DdeLink__9440_3147029182"/><text:bookmark-start text:name="__DdeLink__9444_314702918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bookmark-end text:name="__DdeLink__9437_3147029182"/><text:bookmark-end text:name="__DdeLink__9440_3147029182"/><text:bookmark-end text:name="__DdeLink__9444_3147029182"/></text:p>
      <text:p text:style-name="P12"/>
      <text:h text:style-name="P39" text:outline-level="1"><text:bookmark-start text:name="__DdeLink__9448_3147029182"/><text:bookmark-start text:name="__DdeLink__9908_3997500991"/><text:bookmark-start text:name="__DdeLink__9901_257282931"/><text:bookmark-start text:name="__DdeLink__9454_3147029182"/>Apócrifo de João — Reconstrução Interpretativa e Exegese Gnóstica<text:bookmark-end text:name="__DdeLink__9448_3147029182"/><text:bookmark-end text:name="__DdeLink__9454_3147029182"/></text:h>
      <text:p text:style-name="P12"/>
      <text:h text:style-name="P11" text:outline-level="2"><text:bookmark-start text:name="__DdeLink__9446_3147029182"/><text:bookmark-start text:name="__DdeLink__9451_314702918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bookmark-end text:name="__DdeLink__9446_3147029182"/></text:p>
      <text:p text:style-name="P12"/>
      <text:h text:style-name="P14" text:outline-level="3">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bookmark-end text:name="__DdeLink__9901_257282931"/><text:bookmark-end text:name="__DdeLink__9451_3147029182"/><text:bookmark-end text:name="__DdeLink__9908_3997500991"/></text:p>
      <text:h text:style-name="P39" text:outline-level="1"><text:bookmark-start text:name="__DdeLink__12615_257282931"/><text:bookmark-start text:name="__DdeLink__9460_2045297844"/>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bookmark-end text:name="__DdeLink__12615_257282931"/></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bookmark-end text:name="__DdeLink__9460_2045297844"/></text:p>
      <text:h text:style-name="P13" text:outline-level="1"><text:bookmark-start text:name="__DdeLink__9462_2045297844"/><text:bookmark-start text:name="__DdeLink__18461_2597948309"/>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bookmark-end text:name="__DdeLink__18461_2597948309"/></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bookmark-end text:name="__DdeLink__9462_2045297844"/></text:p>
      <text:h text:style-name="P13" text:outline-level="1"><text:bookmark-start text:name="__DdeLink__9464_2045297844"/><text:bookmark-start text:name="__DdeLink__18466_2597948309"/>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text:bookmark-start text:name="__DdeLink__9469_3434306060"/>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bookmark-end text:name="__DdeLink__9469_3434306060"/></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bookmark-start text:name="__DdeLink__9471_3434306060"/><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bookmark-end text:name="__DdeLink__9471_3434306060"/></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bookmark-end text:name="__DdeLink__18466_2597948309"/></text:p>
      <text:p text:style-name="P12"><text:bookmark-end text:name="__DdeLink__9464_2045297844"/></text:p>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text:bookmark-start text:name="__DdeLink__9473_3434306060"/><text:bookmark-start text:name="__DdeLink__18469_2597948309"/>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bookmark-end text:name="__DdeLink__9473_3434306060"/><text:bookmark-end text:name="__DdeLink__18469_2597948309"/></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bookmark-start text:name="__DdeLink__9475_3434306060"/><text:bookmark-start text:name="__DdeLink__18474_2597948309"/><text:bookmark-start text:name="__DdeLink__18471_2597948309"/><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text:bookmark-end text:name="__DdeLink__18474_2597948309"/><text:bookmark-end text:name="__DdeLink__18471_2597948309"/></text:p>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bookmark-end text:name="__DdeLink__9475_3434306060"/></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7-13T06:27:21.116992789</dc:date>
    <meta:editing-duration>P1DT7H50M1S</meta:editing-duration>
    <meta:editing-cycles>93</meta:editing-cycles>
    <meta:generator>LibreOffice/26.2.4.2$Linux_X86_64 LibreOffice_project/620$Build-2</meta:generator>
    <meta:print-date>2026-04-27T02:44:07.306634148</meta:print-date>
    <meta:printed-by>Ficheiros PDF</meta:printed-by>
    <dc:creator>João António</dc:creator>
    <meta:document-statistic meta:table-count="0" meta:image-count="0" meta:object-count="0" meta:page-count="137" meta:paragraph-count="1782" meta:word-count="59580" meta:character-count="350367" meta:non-whitespace-character-count="290655"/>
  </office:meta>
</office:document-meta>
</file>