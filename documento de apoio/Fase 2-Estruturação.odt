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3" style:family="table">
      <style:table-properties style:width="13.337cm" table:align="left"/>
    </style:style>
    <style:style style:name="Tabela3.A" style:family="table-column">
      <style:table-column-properties style:column-width="4.023cm"/>
    </style:style>
    <style:style style:name="Tabela3.B" style:family="table-column">
      <style:table-column-properties style:column-width="9.313cm"/>
    </style:style>
    <style:style style:name="Tabela3.A1" style:family="table-cell">
      <style:table-cell-properties style:vertical-align="middle" fo:padding="0.049cm" fo:border="none"/>
    </style:style>
    <style:style style:name="Tabela1" style:family="table">
      <style:table-properties style:width="15.73cm" table:align="left"/>
    </style:style>
    <style:style style:name="Tabela1.A" style:family="table-column">
      <style:table-column-properties style:column-width="4.023cm"/>
    </style:style>
    <style:style style:name="Tabela1.B" style:family="table-column">
      <style:table-column-properties style:column-width="11.707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2.358cm" table:align="left"/>
    </style:style>
    <style:style style:name="Tabela2.A" style:family="table-column">
      <style:table-column-properties style:column-width="4.023cm"/>
    </style:style>
    <style:style style:name="Tabela2.B" style:family="table-column">
      <style:table-column-properties style:column-width="8.334cm"/>
    </style:style>
    <style:style style:name="Tabela2.A1" style:family="table-cell">
      <style:table-cell-properties style:vertical-align="middle" fo:padding="0.049cm" fo:border="none"/>
    </style:style>
    <style:style style:name="Tabela4" style:family="table">
      <style:table-properties style:width="12.672cm" table:align="left"/>
    </style:style>
    <style:style style:name="Tabela4.A" style:family="table-column">
      <style:table-column-properties style:column-width="3.769cm"/>
    </style:style>
    <style:style style:name="Tabela4.B" style:family="table-column">
      <style:table-column-properties style:column-width="8.902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4.734cm" table:align="left"/>
    </style:style>
    <style:style style:name="Tabela5.A" style:family="table-column">
      <style:table-column-properties style:column-width="2.517cm"/>
    </style:style>
    <style:style style:name="Tabela5.B" style:family="table-column">
      <style:table-column-properties style:column-width="2.217cm"/>
    </style:style>
    <style:style style:name="Tabela5.A1" style:family="table-cell">
      <style:table-cell-properties style:vertical-align="middle" fo:padding="0.049cm" fo:border="none"/>
    </style:style>
    <style:style style:name="Tabela6" style:family="table">
      <style:table-properties style:width="7.165cm" table:align="left"/>
    </style:style>
    <style:style style:name="Tabela6.A" style:family="table-column">
      <style:table-column-properties style:column-width="2.835cm"/>
    </style:style>
    <style:style style:name="Tabela6.B" style:family="table-column">
      <style:table-column-properties style:column-width="4.33cm"/>
    </style:style>
    <style:style style:name="Tabela6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Text_20_body" style:list-style-name="L25"/>
    <style:style style:name="P27" style:family="paragraph" style:parent-style-name="Text_20_body" style:list-style-name="L26"/>
    <style:style style:name="P28" style:family="paragraph" style:parent-style-name="Text_20_body" style:list-style-name="L27"/>
    <style:style style:name="P29" style:family="paragraph" style:parent-style-name="Text_20_body" style:list-style-name="L28"/>
    <style:style style:name="P30" style:family="paragraph" style:parent-style-name="Text_20_body" style:list-style-name="L29"/>
    <style:style style:name="P31" style:family="paragraph" style:parent-style-name="Text_20_body" style:list-style-name="L30"/>
    <style:style style:name="P32" style:family="paragraph" style:parent-style-name="Text_20_body" style:list-style-name="L31"/>
    <style:style style:name="P33" style:family="paragraph" style:parent-style-name="Text_20_body" style:list-style-name="L32"/>
    <style:style style:name="P34" style:family="paragraph" style:parent-style-name="Text_20_body" style:list-style-name="L33"/>
    <style:style style:name="P35" style:family="paragraph" style:parent-style-name="Text_20_body" style:list-style-name="L34"/>
    <style:style style:name="P36" style:family="paragraph" style:parent-style-name="Text_20_body" style:list-style-name="L35"/>
    <style:style style:name="P37" style:family="paragraph" style:parent-style-name="Text_20_body" style:list-style-name="L36"/>
    <style:style style:name="P38" style:family="paragraph" style:parent-style-name="Text_20_body" style:list-style-name="L37"/>
    <style:style style:name="P39" style:family="paragraph" style:parent-style-name="Text_20_body" style:list-style-name="L38"/>
    <style:style style:name="P40" style:family="paragraph" style:parent-style-name="Text_20_body" style:list-style-name="L39"/>
    <style:style style:name="P41" style:family="paragraph" style:parent-style-name="Text_20_body" style:list-style-name="L40"/>
    <style:style style:name="P42" style:family="paragraph" style:parent-style-name="Text_20_body" style:list-style-name="L41"/>
    <style:style style:name="P43" style:family="paragraph" style:parent-style-name="Text_20_body" style:list-style-name="L42"/>
    <style:style style:name="P44" style:family="paragraph" style:parent-style-name="Text_20_body" style:list-style-name="L43"/>
    <style:style style:name="P45" style:family="paragraph" style:parent-style-name="Text_20_body" style:list-style-name="L44"/>
    <style:style style:name="P46" style:family="paragraph" style:parent-style-name="Text_20_body" style:list-style-name="L45"/>
    <style:style style:name="P47" style:family="paragraph" style:parent-style-name="Text_20_body" style:list-style-name="L46"/>
    <style:style style:name="P48" style:family="paragraph" style:parent-style-name="Text_20_body" style:list-style-name="L47"/>
    <style:style style:name="P49" style:family="paragraph" style:parent-style-name="Text_20_body" style:list-style-name="L48"/>
    <style:style style:name="P50" style:family="paragraph" style:parent-style-name="Text_20_body" style:list-style-name="L49"/>
    <style:style style:name="P51" style:family="paragraph" style:parent-style-name="Text_20_body" style:list-style-name="L50"/>
    <style:style style:name="P52" style:family="paragraph" style:parent-style-name="Text_20_body" style:list-style-name="L51"/>
    <style:style style:name="P53" style:family="paragraph" style:parent-style-name="Text_20_body" style:list-style-name="L52"/>
    <style:style style:name="P54" style:family="paragraph" style:parent-style-name="Text_20_body" style:list-style-name="L53"/>
    <style:style style:name="P55" style:family="paragraph" style:parent-style-name="Text_20_body" style:list-style-name="L54"/>
    <style:style style:name="P56" style:family="paragraph" style:parent-style-name="Text_20_body" style:list-style-name="L55"/>
    <style:style style:name="P57" style:family="paragraph" style:parent-style-name="Text_20_body" style:list-style-name="L56"/>
    <style:style style:name="P58" style:family="paragraph" style:parent-style-name="Text_20_body" style:list-style-name="L57"/>
    <style:style style:name="P59" style:family="paragraph" style:parent-style-name="Text_20_body" style:list-style-name="L58"/>
    <style:style style:name="P60" style:family="paragraph" style:parent-style-name="Text_20_body" style:list-style-name="L59"/>
    <style:style style:name="P61" style:family="paragraph" style:parent-style-name="Text_20_body" style:list-style-name="L60"/>
    <style:style style:name="P62" style:family="paragraph" style:parent-style-name="Text_20_body" style:list-style-name="L61"/>
    <style:style style:name="P63" style:family="paragraph" style:parent-style-name="Text_20_body" style:list-style-name="L62"/>
    <style:style style:name="P64" style:family="paragraph" style:parent-style-name="Text_20_body" style:list-style-name="L63"/>
    <style:style style:name="P65" style:family="paragraph" style:parent-style-name="Text_20_body" style:list-style-name="L64"/>
    <style:style style:name="P66" style:family="paragraph" style:parent-style-name="Text_20_body" style:list-style-name="L65"/>
    <style:style style:name="P67" style:family="paragraph" style:parent-style-name="Text_20_body" style:list-style-name="L66"/>
    <style:style style:name="P68" style:family="paragraph" style:parent-style-name="Text_20_body" style:list-style-name="L67"/>
    <style:style style:name="P69" style:family="paragraph" style:parent-style-name="Text_20_body" style:list-style-name="L68"/>
    <style:style style:name="P70" style:family="paragraph" style:parent-style-name="Text_20_body" style:list-style-name="L69"/>
    <style:style style:name="P71" style:family="paragraph" style:parent-style-name="Text_20_body" style:list-style-name="L70"/>
    <style:style style:name="P72" style:family="paragraph" style:parent-style-name="Text_20_body" style:list-style-name="L71"/>
    <style:style style:name="P73" style:family="paragraph" style:parent-style-name="Text_20_body" style:list-style-name="L72"/>
    <style:style style:name="P74" style:family="paragraph" style:parent-style-name="Text_20_body" style:list-style-name="L73"/>
    <style:style style:name="P75" style:family="paragraph" style:parent-style-name="Text_20_body" style:list-style-name="L74"/>
    <style:style style:name="P76" style:family="paragraph" style:parent-style-name="Text_20_body" style:list-style-name="L75"/>
    <style:style style:name="P77" style:family="paragraph" style:parent-style-name="Text_20_body" style:list-style-name="L76"/>
    <style:style style:name="P78" style:family="paragraph" style:parent-style-name="Text_20_body" style:list-style-name="L77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strutura definitiva do projeto</text:h>
      <text:p text:style-name="Preformatted_20_Text"><text:span text:style-name="Source_20_Text">Biblioteca-Apocrifa/</text:span></text:p>
      <text:p text:style-name="Preformatted_20_Text"><text:span text:style-name="Source_20_Text">│</text:span></text:p>
      <text:p text:style-name="Preformatted_20_Text"><text:span text:style-name="Source_20_Text">├── index.html</text:span></text:p>
      <text:p text:style-name="Preformatted_20_Text"><text:span text:style-name="Source_20_Text">├── README.md</text:span></text:p>
      <text:p text:style-name="Preformatted_20_Text"><text:span text:style-name="Source_20_Text">├── LICENSE</text:span></text:p>
      <text:p text:style-name="Preformatted_20_Text"><text:span text:style-name="Source_20_Text">├── PLANEJAMENTO.md</text:span></text:p>
      <text:p text:style-name="Preformatted_20_Text"><text:span text:style-name="Source_20_Text">├── ARQUITETURA.md</text:span></text:p>
      <text:p text:style-name="Preformatted_20_Text"><text:span text:style-name="Source_20_Text">├── manifest.json</text:span></text:p>
      <text:p text:style-name="Preformatted_20_Text"><text:span text:style-name="Source_20_Text">├── sw.js</text:span></text:p>
      <text:p text:style-name="Preformatted_20_Text"><text:span text:style-name="Source_20_Text">│</text:span></text:p>
      <text:p text:style-name="Preformatted_20_Text"><text:span text:style-name="Source_20_Text">├── paginas/</text:span></text:p>
      <text:p text:style-name="Preformatted_20_Text"><text:span text:style-name="Source_20_Text">│ <text:s text:c="2"/>├── biblioteca.html</text:span></text:p>
      <text:p text:style-name="Preformatted_20_Text"><text:span text:style-name="Source_20_Text">│ <text:s text:c="2"/>├── leitura.html</text:span></text:p>
      <text:p text:style-name="Preformatted_20_Text"><text:span text:style-name="Source_20_Text">│ <text:s text:c="2"/>├── comunidade.html</text:span></text:p>
      <text:p text:style-name="Preformatted_20_Text"><text:span text:style-name="Source_20_Text">│ <text:s text:c="2"/>├── perfil.html</text:span></text:p>
      <text:p text:style-name="Preformatted_20_Text"><text:span text:style-name="Source_20_Text">│ <text:s text:c="2"/>└── sobre.html</text:span></text:p>
      <text:p text:style-name="Preformatted_20_Text"><text:span text:style-name="Source_20_Text">│</text:span></text:p>
      <text:p text:style-name="Preformatted_20_Text"><text:span text:style-name="Source_20_Text">├── assets/</text:span></text:p>
      <text:p text:style-name="Preformatted_20_Text"><text:span text:style-name="Source_20_Text">│ <text:s text:c="2"/>├── css/</text:span></text:p>
      <text:p text:style-name="Preformatted_20_Text"><text:span text:style-name="Source_20_Text">│ <text:s text:c="2"/>├── js/</text:span></text:p>
      <text:p text:style-name="Preformatted_20_Text"><text:span text:style-name="Source_20_Text">│ <text:s text:c="2"/>├── dados/</text:span></text:p>
      <text:p text:style-name="Preformatted_20_Text"><text:span text:style-name="Source_20_Text">│ <text:s text:c="2"/>├── imagens/</text:span></text:p>
      <text:p text:style-name="Preformatted_20_Text"><text:span text:style-name="Source_20_Text">│ <text:s text:c="2"/>├── icones/</text:span></text:p>
      <text:p text:style-name="Preformatted_20_Text"><text:span text:style-name="Source_20_Text">│ <text:s text:c="2"/>└── fonts/</text:span></text:p>
      <text:p text:style-name="Preformatted_20_Text"><text:span text:style-name="Source_20_Text">│</text:span></text:p>
      <text:p text:style-name="Preformatted_20_Text"><text:span text:style-name="Source_20_Text">└── components/</text:span></text:p>
      <text:p text:style-name="Preformatted_20_Text"><text:span text:style-name="Source_20_Text"><text:s text:c="4"/>├── header.html</text:span></text:p>
      <text:p text:style-name="Preformatted_20_Text"><text:span text:style-name="Source_20_Text"><text:s text:c="4"/>├── footer.html</text:span></text:p>
      <text:p text:style-name="Preformatted_20_Text"><text:span text:style-name="Source_20_Text"><text:s text:c="4"/>├── navbar.html</text:span></text:p>
      <text:p text:style-name="Preformatted_20_Text"><text:span text:style-name="Source_20_Text"><text:s text:c="4"/>├── book-card.html</text:span></text:p>
      <text:p text:style-name="Preformatted_20_Text"><text:span text:style-name="Source_20_Text"><text:s text:c="4"/>├── search-bar.html</text:span></text:p>
      <text:p text:style-name="P1"><text:span text:style-name="Source_20_Text"><text:s text:c="4"/>└── loading.html</text:span></text:p>
      <text:p text:style-name="Horizontal_20_Line"/>
      <text:h text:style-name="Heading_20_1" text:outline-level="1">O que aprendemos nesta Sprint</text:h>
      <text:p text:style-name="Text_20_body">Uma arquitetura não serve apenas para organizar arquivos. Ela define <text:span text:style-name="Strong_20_Emphasis">como o projeto será desenvolvido</text:span>.</text:p>
      <text:p text:style-name="Text_20_body">Cada pasta tem uma responsabilidade única:</text:p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Table_20_Heading">Pasta</text:p>
            </table:table-cell>
            <table:table-cell table:style-name="Tabela3.A1" office:value-type="string">
              <text:p text:style-name="Table_20_Heading">Responsabilidade</text:p>
            </table:table-cell>
          </table:table-row>
        </table:table-header-rows>
        <table:table-row>
          <table:table-cell table:style-name="Tabela3.A1" office:value-type="string">
            <text:p text:style-name="Table_20_Contents"><text:span text:style-name="Source_20_Text">paginas/</text:span></text:p>
          </table:table-cell>
          <table:table-cell table:style-name="Tabela3.A1" office:value-type="string">
            <text:p text:style-name="Table_20_Contents">Contém as páginas da aplicação.</text:p>
          </table:table-cell>
        </table:table-row>
        <table:table-row>
          <table:table-cell table:style-name="Tabela3.A1" office:value-type="string">
            <text:p text:style-name="Table_20_Contents"><text:span text:style-name="Source_20_Text">assets/css/</text:span></text:p>
          </table:table-cell>
          <table:table-cell table:style-name="Tabela3.A1" office:value-type="string">
            <text:p text:style-name="Table_20_Contents">Estilos da interface.</text:p>
          </table:table-cell>
        </table:table-row>
        <table:table-row>
          <table:table-cell table:style-name="Tabela3.A1" office:value-type="string">
            <text:p text:style-name="Table_20_Contents"><text:span text:style-name="Source_20_Text">assets/js/</text:span></text:p>
          </table:table-cell>
          <table:table-cell table:style-name="Tabela3.A1" office:value-type="string">
            <text:p text:style-name="Table_20_Contents">Lógica da aplicação.</text:p>
          </table:table-cell>
        </table:table-row>
        <table:table-row>
          <table:table-cell table:style-name="Tabela3.A1" office:value-type="string">
            <text:p text:style-name="Table_20_Contents"><text:span text:style-name="Source_20_Text">assets/dados/</text:span></text:p>
          </table:table-cell>
          <table:table-cell table:style-name="Tabela3.A1" office:value-type="string">
            <text:p text:style-name="Table_20_Contents">Dados da plataforma (JSON).</text:p>
          </table:table-cell>
        </table:table-row>
        <table:table-row>
          <table:table-cell table:style-name="Tabela3.A1" office:value-type="string">
            <text:p text:style-name="Table_20_Contents"><text:span text:style-name="Source_20_Text">assets/imagens/</text:span></text:p>
          </table:table-cell>
          <table:table-cell table:style-name="Tabela3.A1" office:value-type="string">
            <text:p text:style-name="Table_20_Contents">Capas, ilustrações e demais imagens.</text:p>
          </table:table-cell>
        </table:table-row>
        <table:table-row>
          <table:table-cell table:style-name="Tabela3.A1" office:value-type="string">
            <text:p text:style-name="Table_20_Contents"><text:span text:style-name="Source_20_Text">assets/icones/</text:span></text:p>
          </table:table-cell>
          <table:table-cell table:style-name="Tabela3.A1" office:value-type="string">
            <text:p text:style-name="Table_20_Contents">Ícones utilizados pela interface e pelo PWA.</text:p>
          </table:table-cell>
        </table:table-row>
        <table:table-row>
          <table:table-cell table:style-name="Tabela3.A1" office:value-type="string">
            <text:p text:style-name="Table_20_Contents"><text:span text:style-name="Source_20_Text">assets/fonts/</text:span></text:p>
          </table:table-cell>
          <table:table-cell table:style-name="Tabela3.A1" office:value-type="string">
            <text:p text:style-name="Table_20_Contents">Fontes locais do projeto.</text:p>
          </table:table-cell>
        </table:table-row>
        <table:table-row>
          <table:table-cell table:style-name="Tabela3.A1" office:value-type="string">
            <text:p text:style-name="Table_20_Contents"><text:span text:style-name="Source_20_Text">components/</text:span></text:p>
          </table:table-cell>
          <table:table-cell table:style-name="Tabela3.A1" office:value-type="string">
            <text:p text:style-name="Table_20_Contents">Componentes HTML reutilizáveis em várias páginas.</text:p>
          </table:table-cell>
        </table:table-row>
      </table:table>
      <text:p text:style-name="Text_20_body"><text:soft-page-break/>Essa separação facilita a manutenção, reduz duplicação de código e prepara a aplicação para crescer.</text:p>
      <text:p text:style-name="Horizontal_20_Line"/>
      <text:h text:style-name="Heading_20_1" text:outline-level="1">Atualização do Roadmap</text:h>
      <text:list text:style-name="L1">
        <text:list-item>
          <text:p text:style-name="P2">✅ Definir a estrutura definitiva das pastas.</text:p>
        </text:list-item>
        <text:list-item>
          <text:p text:style-name="P2">⏳ Organizar os arquivos HTML.</text:p>
        </text:list-item>
        <text:list-item>
          <text:p text:style-name="P2">⏳ Organizar os arquivos CSS.</text:p>
        </text:list-item>
        <text:list-item>
          <text:p text:style-name="P2">⏳ Organizar os arquivos JavaScript.</text:p>
        </text:list-item>
        <text:list-item>
          <text:p text:style-name="P2">⏳ Criar a estrutura inicial do <text:span text:style-name="Source_20_Text">livros.json</text:span>.</text:p>
        </text:list-item>
        <text:list-item>
          <text:p text:style-name="P2">⏳ Definir o padrão dos componentes reutilizáveis.</text:p>
        </text:list-item>
        <text:list-item>
          <text:p text:style-name="P2">⏳ Atualizar a documentação da arquitetura.</text:p>
        </text:list-item>
      </text:list>
      <text:p text:style-name="Horizontal_20_Line"/>
      <text:h text:style-name="Heading_20_1" text:outline-level="1">Próxima Sprint — Organizar os arquivos HTML</text:h>
      <text:p text:style-name="Text_20_body">Agora vamos trabalhar nos arquivos HTML de forma profissional.</text:p>
      <text:p text:style-name="Text_20_body">Não vamos apenas criar páginas; vamos definir <text:span text:style-name="Strong_20_Emphasis">a responsabilidade de cada uma</text:span> e estabelecer uma estrutura consistente para todas elas.</text:p>
      <text:p text:style-name="Text_20_body">Nessa etapa vamos responder perguntas como:</text:p>
      <text:list text:style-name="L2">
        <text:list-item>
          <text:p text:style-name="P3">Quais elementos estarão presentes em todas as páginas?</text:p>
        </text:list-item>
        <text:list-item>
          <text:p text:style-name="P3">O que será exclusivo de cada página?</text:p>
        </text:list-item>
        <text:list-item>
          <text:p text:style-name="P3">Qual será a estrutura semântica padrão (<text:span text:style-name="Source_20_Text">header</text:span>, <text:span text:style-name="Source_20_Text">main</text:span>, <text:span text:style-name="Source_20_Text">section</text:span>, <text:span text:style-name="Source_20_Text">footer</text:span>)?</text:p>
        </text:list-item>
        <text:list-item>
          <text:p text:style-name="P3">Como os componentes (<text:span text:style-name="Source_20_Text">header</text:span>, <text:span text:style-name="Source_20_Text">navbar</text:span>, <text:span text:style-name="Source_20_Text">footer</text:span>) serão reutilizados?</text:p>
        </text:list-item>
      </text:list>
      <text:p text:style-name="Text_20_body">Essa base vai garantir consistência em toda a plataforma antes de começarmos a escrever o HTML propriamente dito.</text:p>
      <text:p text:style-name="Standard"/>
      <text:p text:style-name="Text_20_body">Perfeito. Agora entramos na <text:span text:style-name="Strong_20_Emphasis">Sprint 2.2 — Organizar os Arquivos HTML</text:span>.</text:p>
      <text:p text:style-name="Text_20_body">Nesta sprint ainda <text:span text:style-name="Strong_20_Emphasis">não vamos escrever o HTML</text:span>. Primeiro vamos projetar a estrutura. Em desenvolvimento profissional, isso é chamado de <text:span text:style-name="Strong_20_Emphasis">Arquitetura da Interface</text:span>.</text:p>
      <text:p text:style-name="Horizontal_20_Line"/>
      <text:h text:style-name="Heading_20_1" text:outline-level="1"><text:soft-page-break/>Sprint 2.2 — Organizar os Arquivos HTML</text:h>
      <text:h text:style-name="Heading_20_2" text:outline-level="2">Objetivo</text:h>
      <text:p text:style-name="Text_20_body">Definir a responsabilidade de cada página e criar um padrão estrutural que será seguido em toda a plataforma.</text:p>
      <text:p text:style-name="Text_20_body">Ao final desta sprint, qualquer pessoa que abrir o projeto entenderá imediatamente a função de cada arquivo HTML.</text:p>
      <text:p text:style-name="Horizontal_20_Line"/>
      <text:h text:style-name="Heading_20_1" text:outline-level="1">Primeiro princípio</text:h>
      <text:p text:style-name="Text_20_body">Cada arquivo HTML deve representar <text:span text:style-name="Strong_20_Emphasis">uma funcionalidade da plataforma</text:span>, e não apenas uma tela.</text:p>
      <text:p text:style-name="Text_20_body">Por isso, teremos apenas cinco páginas principais.</text:p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Heading">Página</text:p>
            </table:table-cell>
            <table:table-cell table:style-name="Tabela1.A1" office:value-type="string">
              <text:p text:style-name="Table_20_Heading">Responsabilidade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ource_20_Text">index.html</text:span></text:p>
          </table:table-cell>
          <table:table-cell table:style-name="Tabela1.A1" office:value-type="string">
            <text:p text:style-name="Table_20_Contents">Apresentar a plataforma e direcionar o usuário para o estudo.</text:p>
          </table:table-cell>
        </table:table-row>
        <table:table-row>
          <table:table-cell table:style-name="Tabela1.A1" office:value-type="string">
            <text:p text:style-name="Table_20_Contents"><text:span text:style-name="Source_20_Text">biblioteca.html</text:span></text:p>
          </table:table-cell>
          <table:table-cell table:style-name="Tabela1.A1" office:value-type="string">
            <text:p text:style-name="Table_20_Contents">Exibir o catálogo de obras e permitir pesquisa e filtros.</text:p>
          </table:table-cell>
        </table:table-row>
        <table:table-row>
          <table:table-cell table:style-name="Tabela1.A1" office:value-type="string">
            <text:p text:style-name="Table_20_Contents"><text:span text:style-name="Source_20_Text">leitura.html</text:span></text:p>
          </table:table-cell>
          <table:table-cell table:style-name="Tabela1.A1" office:value-type="string">
            <text:p text:style-name="Table_20_Contents">Carregar dinamicamente uma obra e oferecer o ambiente de estudo.</text:p>
          </table:table-cell>
        </table:table-row>
        <table:table-row>
          <table:table-cell table:style-name="Tabela1.A1" office:value-type="string">
            <text:p text:style-name="Table_20_Contents"><text:span text:style-name="Source_20_Text">comunidade.html</text:span></text:p>
          </table:table-cell>
          <table:table-cell table:style-name="Tabela1.A1" office:value-type="string">
            <text:p text:style-name="Table_20_Contents">Espaço para interação entre usuários (versão futura).</text:p>
          </table:table-cell>
        </table:table-row>
        <table:table-row>
          <table:table-cell table:style-name="Tabela1.A1" office:value-type="string">
            <text:p text:style-name="Table_20_Contents"><text:span text:style-name="Source_20_Text">perfil.html</text:span></text:p>
          </table:table-cell>
          <table:table-cell table:style-name="Tabela1.A1" office:value-type="string">
            <text:p text:style-name="Table_20_Contents">Gerenciar informações e preferências do usuário (versão futura).</text:p>
          </table:table-cell>
        </table:table-row>
        <table:table-row>
          <table:table-cell table:style-name="Tabela1.A1" office:value-type="string">
            <text:p text:style-name="Table_20_Contents"><text:span text:style-name="Source_20_Text">sobre.html</text:span></text:p>
          </table:table-cell>
          <table:table-cell table:style-name="Tabela1.A1" office:value-type="string">
            <text:p text:style-name="Table_20_Contents">Explicar o projeto, sua missão e as fontes utilizadas.</text:p>
          </table:table-cell>
        </table:table-row>
      </table:table>
      <text:p text:style-name="Text_20_body">Observe que cada página possui uma responsabilidade clara.</text:p>
      <text:p text:style-name="Horizontal_20_Line"/>
      <text:h text:style-name="Heading_20_1" text:outline-level="1">Fluxo de navegação</text:h>
      <text:p text:style-name="Text_20_body">Antes de criar o HTML, precisamos entender como o usuário navegará pela plataforma.</text:p>
      <text:p text:style-name="Preformatted_20_Text"><text:span text:style-name="Source_20_Text"><text:s text:c="15"/>index.html</text:span></text:p>
      <text:p text:style-name="Preformatted_20_Text"><text:span text:style-name="Source_20_Text"><text:s text:c="20"/>│</text:span></text:p>
      <text:p text:style-name="Preformatted_20_Text"><text:span text:style-name="Source_20_Text"><text:s text:c="8"/>┌───────────┼───────────┐</text:span></text:p>
      <text:p text:style-name="Preformatted_20_Text"><text:span text:style-name="Source_20_Text"><text:s text:c="8"/>│ <text:s text:c="10"/>│ <text:s text:c="10"/>│</text:span></text:p>
      <text:p text:style-name="Preformatted_20_Text"><text:span text:style-name="Source_20_Text"><text:s/>biblioteca.html <text:s/>sobre.html <text:s/>comunidade.html</text:span></text:p>
      <text:p text:style-name="Preformatted_20_Text"><text:span text:style-name="Source_20_Text"><text:s text:c="8"/>│</text:span></text:p>
      <text:p text:style-name="Preformatted_20_Text"><text:span text:style-name="Source_20_Text"><text:s text:c="8"/>│</text:span></text:p>
      <text:p text:style-name="Preformatted_20_Text"><text:span text:style-name="Source_20_Text"><text:s/>leitura.html?id=evangelho-tomas</text:span></text:p>
      <text:p text:style-name="Preformatted_20_Text"><text:span text:style-name="Source_20_Text"><text:s text:c="8"/>│</text:span></text:p>
      <text:p text:style-name="Preformatted_20_Text"><text:span text:style-name="Source_20_Text"><text:s text:c="8"/>│</text:span></text:p>
      <text:p text:style-name="Preformatted_20_Text"><text:span text:style-name="Source_20_Text"><text:s/>leitura.html?id=livro-enoque</text:span></text:p>
      <text:p text:style-name="Preformatted_20_Text"><text:span text:style-name="Source_20_Text"><text:s text:c="8"/>│</text:span></text:p>
      <text:p text:style-name="Preformatted_20_Text"><text:span text:style-name="Source_20_Text"><text:s text:c="8"/>│</text:span></text:p>
      <text:p text:style-name="P1"><text:span text:style-name="Source_20_Text"><text:s/>leitura.html?id=evangelho-maria</text:span></text:p>
      <text:p text:style-name="Text_20_body">Esse fluxo mostra um detalhe importante:</text:p>
      <text:p text:style-name="Text_20_body"><text:span text:style-name="Strong_20_Emphasis">A página de leitura é única.</text:span></text:p>
      <text:p text:style-name="Text_20_body">Ela muda o conteúdo de acordo com o livro selecionado.</text:p>
      <text:p text:style-name="Text_20_body"><text:soft-page-break/>Isso evita dezenas ou centenas de páginas HTML.</text:p>
      <text:p text:style-name="Horizontal_20_Line"/>
      <text:h text:style-name="Heading_20_1" text:outline-level="1">Estrutura padrão de todas as páginas</text:h>
      <text:p text:style-name="Text_20_body">Todas as páginas seguirão a mesma estrutura semântica.</text:p>
      <text:p text:style-name="Preformatted_20_Text"><text:span text:style-name="Source_20_Text">&lt;header&gt;</text:span></text:p>
      <text:p text:style-name="Preformatted_20_Text"/>
      <text:p text:style-name="Preformatted_20_Text"><text:span text:style-name="Source_20_Text">&lt;nav&gt;</text:span></text:p>
      <text:p text:style-name="Preformatted_20_Text"/>
      <text:p text:style-name="Preformatted_20_Text"><text:span text:style-name="Source_20_Text">&lt;main&gt;</text:span></text:p>
      <text:p text:style-name="Preformatted_20_Text"/>
      <text:p text:style-name="Preformatted_20_Text"><text:span text:style-name="Source_20_Text">&lt;section&gt;</text:span></text:p>
      <text:p text:style-name="Preformatted_20_Text"/>
      <text:p text:style-name="P1"><text:span text:style-name="Source_20_Text">&lt;footer&gt;</text:span></text:p>
      <text:p text:style-name="Text_20_body">Essa organização melhora a acessibilidade, a manutenção e a consistência da interface.</text:p>
      <text:p text:style-name="Horizontal_20_Line"/>
      <text:h text:style-name="Heading_20_1" text:outline-level="1">O papel de cada elemento</text:h>
      <text:h text:style-name="Heading_20_2" text:outline-level="2"><text:span text:style-name="Source_20_Text">&lt;header&gt;</text:span></text:h>
      <text:p text:style-name="Text_20_body">Responsável por:</text:p>
      <text:list text:style-name="L3">
        <text:list-item>
          <text:p text:style-name="P4">identidade visual;</text:p>
        </text:list-item>
        <text:list-item>
          <text:p text:style-name="P4">logotipo;</text:p>
        </text:list-item>
        <text:list-item>
          <text:p text:style-name="P4">menu principal.</text:p>
        </text:list-item>
      </text:list>
      <text:p text:style-name="Text_20_body">O conteúdo virá do componente:</text:p>
      <text:p text:style-name="P1"><text:span text:style-name="Source_20_Text">components/header.html</text:span></text:p>
      <text:p text:style-name="Horizontal_20_Line"/>
      <text:h text:style-name="Heading_20_2" text:outline-level="2"><text:span text:style-name="Source_20_Text">&lt;nav&gt;</text:span></text:h>
      <text:p text:style-name="Text_20_body">Responsável pela navegação entre os módulos da plataforma.</text:p>
      <text:p text:style-name="Text_20_body">Também será um componente reutilizável.</text:p>
      <text:p text:style-name="Horizontal_20_Line"/>
      <text:h text:style-name="Heading_20_2" text:outline-level="2"><text:span text:style-name="Source_20_Text">&lt;main&gt;</text:span></text:h>
      <text:p text:style-name="Text_20_body">Cada página terá apenas um <text:span text:style-name="Source_20_Text">&lt;main&gt;</text:span>.</text:p>
      <text:p text:style-name="Text_20_body">Dentro dele ficará o conteúdo específico daquela funcionalidade.</text:p>
      <text:p text:style-name="Text_20_body">Exemplo:</text:p>
      <text:p text:style-name="Text_20_body"><text:soft-page-break/>Na Biblioteca:</text:p>
      <text:p text:style-name="Preformatted_20_Text"><text:span text:style-name="Source_20_Text">Pesquisar</text:span></text:p>
      <text:p text:style-name="Preformatted_20_Text"/>
      <text:p text:style-name="Preformatted_20_Text"><text:span text:style-name="Source_20_Text">↓</text:span></text:p>
      <text:p text:style-name="Preformatted_20_Text"/>
      <text:p text:style-name="Preformatted_20_Text"><text:span text:style-name="Source_20_Text">Filtros</text:span></text:p>
      <text:p text:style-name="Preformatted_20_Text"/>
      <text:p text:style-name="Preformatted_20_Text"><text:span text:style-name="Source_20_Text">↓</text:span></text:p>
      <text:p text:style-name="Preformatted_20_Text"/>
      <text:p text:style-name="P1"><text:span text:style-name="Source_20_Text">Lista de Livros</text:span></text:p>
      <text:p text:style-name="Text_20_body">Na Leitura:</text:p>
      <text:p text:style-name="Preformatted_20_Text"><text:span text:style-name="Source_20_Text">Informações da Obra</text:span></text:p>
      <text:p text:style-name="Preformatted_20_Text"/>
      <text:p text:style-name="Preformatted_20_Text"><text:span text:style-name="Source_20_Text">↓</text:span></text:p>
      <text:p text:style-name="Preformatted_20_Text"/>
      <text:p text:style-name="Preformatted_20_Text"><text:span text:style-name="Source_20_Text">Texto</text:span></text:p>
      <text:p text:style-name="Preformatted_20_Text"/>
      <text:p text:style-name="Preformatted_20_Text"><text:span text:style-name="Source_20_Text">↓</text:span></text:p>
      <text:p text:style-name="Preformatted_20_Text"/>
      <text:p text:style-name="Preformatted_20_Text"><text:span text:style-name="Source_20_Text">Comentário</text:span></text:p>
      <text:p text:style-name="Preformatted_20_Text"/>
      <text:p text:style-name="Preformatted_20_Text"><text:span text:style-name="Source_20_Text">↓</text:span></text:p>
      <text:p text:style-name="Preformatted_20_Text"/>
      <text:p text:style-name="P1"><text:span text:style-name="Source_20_Text">Navegação entre Seções</text:span></text:p>
      <text:p text:style-name="Horizontal_20_Line"/>
      <text:h text:style-name="Heading_20_2" text:outline-level="2"><text:span text:style-name="Source_20_Text">&lt;footer&gt;</text:span></text:h>
      <text:p text:style-name="Text_20_body">Outro componente reutilizável.</text:p>
      <text:p text:style-name="Text_20_body">Ele exibirá:</text:p>
      <text:list text:style-name="L4">
        <text:list-item>
          <text:p text:style-name="P5">licença;</text:p>
        </text:list-item>
        <text:list-item>
          <text:p text:style-name="P5">direitos autorais;</text:p>
        </text:list-item>
        <text:list-item>
          <text:p text:style-name="P5">links úteis;</text:p>
        </text:list-item>
        <text:list-item>
          <text:p text:style-name="P5">versão da plataforma.</text:p>
        </text:list-item>
      </text:list>
      <text:p text:style-name="Horizontal_20_Line"/>
      <text:h text:style-name="Heading_20_1" text:outline-level="1">Estrutura específica de cada página</text:h>
      <text:h text:style-name="Heading_20_2" text:outline-level="2"><text:span text:style-name="Source_20_Text">index.html</text:span></text:h>
      <text:p text:style-name="Text_20_body">Objetivo:</text:p>
      <text:p text:style-name="Text_20_body">Receber o visitante.</text:p>
      <text:p text:style-name="Text_20_body">Seções previstas:</text:p>
      <text:list text:style-name="L5">
        <text:list-item>
          <text:p text:style-name="P6">Hero</text:p>
        </text:list-item>
        <text:list-item>
          <text:p text:style-name="P6">O que são os textos apócrifos?</text:p>
        </text:list-item>
        <text:list-item>
          <text:p text:style-name="P6"><text:soft-page-break/>Destaques</text:p>
        </text:list-item>
        <text:list-item>
          <text:p text:style-name="P6">Chamada para explorar a biblioteca</text:p>
        </text:list-item>
      </text:list>
      <text:p text:style-name="Horizontal_20_Line"/>
      <text:h text:style-name="Heading_20_2" text:outline-level="2"><text:span text:style-name="Source_20_Text">biblioteca.html</text:span></text:h>
      <text:p text:style-name="Text_20_body">Objetivo:</text:p>
      <text:p text:style-name="Text_20_body">Catálogo.</text:p>
      <text:p text:style-name="Text_20_body">Seções:</text:p>
      <text:list text:style-name="L6">
        <text:list-item>
          <text:p text:style-name="P7">Cabeçalho</text:p>
        </text:list-item>
        <text:list-item>
          <text:p text:style-name="P7">Barra de pesquisa</text:p>
        </text:list-item>
        <text:list-item>
          <text:p text:style-name="P7">Filtros</text:p>
        </text:list-item>
        <text:list-item>
          <text:p text:style-name="P7">Lista de livros</text:p>
        </text:list-item>
        <text:list-item>
          <text:p text:style-name="P7">Paginação (futuro)</text:p>
        </text:list-item>
      </text:list>
      <text:p text:style-name="Horizontal_20_Line"/>
      <text:h text:style-name="Heading_20_2" text:outline-level="2"><text:span text:style-name="Source_20_Text">leitura.html</text:span></text:h>
      <text:p text:style-name="Text_20_body">Esta será a página mais importante da plataforma.</text:p>
      <text:p text:style-name="Text_20_body">Ela será composta por:</text:p>
      <text:list text:style-name="L7">
        <text:list-item>
          <text:p text:style-name="P8">Informações da obra</text:p>
        </text:list-item>
        <text:list-item>
          <text:p text:style-name="P8">Índice das seções</text:p>
        </text:list-item>
        <text:list-item>
          <text:p text:style-name="P8">Texto principal</text:p>
        </text:list-item>
        <text:list-item>
          <text:p text:style-name="P8">Comentário histórico</text:p>
        </text:list-item>
        <text:list-item>
          <text:p text:style-name="P8">Navegação entre seções</text:p>
        </text:list-item>
      </text:list>
      <text:p text:style-name="Text_20_body">Perceba que ela foi pensada como um <text:span text:style-name="Strong_20_Emphasis">ambiente de estudo</text:span>, não apenas como uma página de leitura.</text:p>
      <text:p text:style-name="Horizontal_20_Line"/>
      <text:h text:style-name="Heading_20_2" text:outline-level="2"><text:span text:style-name="Source_20_Text">comunidade.html</text:span></text:h>
      <text:p text:style-name="Text_20_body">Na versão inicial, poderá apresentar uma mensagem indicando que o módulo está em desenvolvimento.</text:p>
      <text:p text:style-name="Text_20_body">Assim, a estrutura da aplicação já fica preparada para futuras funcionalidades.</text:p>
      <text:p text:style-name="Horizontal_20_Line"/>
      <text:h text:style-name="Heading_20_2" text:outline-level="2"><text:span text:style-name="Source_20_Text">perfil.html</text:span></text:h>
      <text:p text:style-name="Text_20_body">Também começará simples.</text:p>
      <text:p text:style-name="Text_20_body"><text:soft-page-break/>No futuro poderá incluir:</text:p>
      <text:list text:style-name="L8">
        <text:list-item>
          <text:p text:style-name="P9">favoritos;</text:p>
        </text:list-item>
        <text:list-item>
          <text:p text:style-name="P9">progresso de leitura;</text:p>
        </text:list-item>
        <text:list-item>
          <text:p text:style-name="P9">preferências;</text:p>
        </text:list-item>
        <text:list-item>
          <text:p text:style-name="P9">configurações.</text:p>
        </text:list-item>
      </text:list>
      <text:p text:style-name="Horizontal_20_Line"/>
      <text:h text:style-name="Heading_20_2" text:outline-level="2"><text:span text:style-name="Source_20_Text">sobre.html</text:span></text:h>
      <text:p text:style-name="Text_20_body">Esta página reforçará a credibilidade do projeto.</text:p>
      <text:p text:style-name="Text_20_body">Ela pode apresentar:</text:p>
      <text:list text:style-name="L9">
        <text:list-item>
          <text:p text:style-name="P10">Missão da plataforma</text:p>
        </text:list-item>
        <text:list-item>
          <text:p text:style-name="P10">Objetivos</text:p>
        </text:list-item>
        <text:list-item>
          <text:p text:style-name="P10">Fontes históricas</text:p>
        </text:list-item>
        <text:list-item>
          <text:p text:style-name="P10">Aviso de finalidade acadêmica</text:p>
        </text:list-item>
        <text:list-item>
          <text:p text:style-name="P10">Licença</text:p>
        </text:list-item>
        <text:list-item>
          <text:p text:style-name="P10">Autor</text:p>
        </text:list-item>
      </text:list>
      <text:p text:style-name="Horizontal_20_Line"/>
      <text:h text:style-name="Heading_20_1" text:outline-level="1">Uma decisão importante</text:h>
      <text:p text:style-name="Text_20_body">Gostaria de propor uma mudança em relação ao seu planejamento original.</text:p>
      <text:p text:style-name="Text_20_body">Em vez de criar uma página <text:span text:style-name="Strong_20_Emphasis">Sobre</text:span> separada, podemos integrar esse conteúdo à página inicial (<text:span text:style-name="Source_20_Text">index.html</text:span>) e manter o menu mais enxuto:</text:p>
      <text:list text:style-name="L10">
        <text:list-item>
          <text:p text:style-name="P11">Início</text:p>
        </text:list-item>
        <text:list-item>
          <text:p text:style-name="P11">Biblioteca</text:p>
        </text:list-item>
        <text:list-item>
          <text:p text:style-name="P11">Comunidade</text:p>
        </text:list-item>
        <text:list-item>
          <text:p text:style-name="P11">Perfil</text:p>
        </text:list-item>
      </text:list>
      <text:p text:style-name="Text_20_body">Isso reduz um clique para o usuário e concentra as informações institucionais na página de entrada.</text:p>
      <text:h text:style-name="Heading_20_2" text:outline-level="2">O que você acha?</text:h>
      <text:p text:style-name="Text_20_body">Temos duas opções:</text:p>
      <text:list text:style-name="L11">
        <text:list-item>
          <text:p text:style-name="P12"><text:span text:style-name="Strong_20_Emphasis">Manter </text:span><text:span text:style-name="Strong_20_Emphasis"><text:span text:style-name="Source_20_Text">sobre.html</text:span></text:span> (separando completamente a apresentação institucional da página inicial).</text:p>
        </text:list-item>
        <text:list-item>
          <text:p text:style-name="P12"><text:span text:style-name="Strong_20_Emphasis">Remover </text:span><text:span text:style-name="Strong_20_Emphasis"><text:span text:style-name="Source_20_Text">sobre.html</text:span></text:span> e incorporar essas informações ao <text:span text:style-name="Source_20_Text">index.html</text:span>.</text:p>
        </text:list-item>
      </text:list>
      <text:p text:style-name="Text_20_body"><text:soft-page-break/><text:span text:style-name="Strong_20_Emphasis">Minha recomendação</text:span> é a segunda opção. Para uma plataforma como a Biblioteca Apócrifa, a página inicial pode cumprir muito bem esse papel, deixando a navegação mais simples e objetiva.</text:p>
      <text:p text:style-name="Text_20_body">Excelente escolha. Eu seguiria exatamente esse caminho.</text:p>
      <text:p text:style-name="Text_20_body">Para uma <text:span text:style-name="Strong_20_Emphasis">plataforma de estudo</text:span>, a página inicial deve responder três perguntas logo de início:</text:p>
      <text:list text:style-name="L12">
        <text:list-item>
          <text:p text:style-name="P13"><text:span text:style-name="Strong_20_Emphasis">O que é a Biblioteca Apócrifa?</text:span></text:p>
        </text:list-item>
        <text:list-item>
          <text:p text:style-name="P13"><text:span text:style-name="Strong_20_Emphasis">Por que ela existe?</text:span></text:p>
        </text:list-item>
        <text:list-item>
          <text:p text:style-name="P13"><text:span text:style-name="Strong_20_Emphasis">Como começar a estudar?</text:span></text:p>
        </text:list-item>
      </text:list>
      <text:p text:style-name="Text_20_body">Se essas respostas estiverem na <text:span text:style-name="Source_20_Text">index.html</text:span>, uma página <text:span text:style-name="Source_20_Text">sobre.html</text:span> se torna desnecessária na versão 1.0.</text:p>
      <text:p text:style-name="Horizontal_20_Line"/>
      <text:h text:style-name="Heading_20_1" text:outline-level="1">Decisão Arquitetural 02 — Remoção da página <text:span text:style-name="Source_20_Text">sobre.html</text:span></text:h>
      <text:p text:style-name="Text_20_body">A partir desta decisão, a estrutura das páginas fica assim:</text:p>
      <text:p text:style-name="Preformatted_20_Text"><text:span text:style-name="Source_20_Text">paginas/</text:span></text:p>
      <text:p text:style-name="Preformatted_20_Text"><text:span text:style-name="Source_20_Text">│</text:span></text:p>
      <text:p text:style-name="Preformatted_20_Text"><text:span text:style-name="Source_20_Text">├── biblioteca.html</text:span></text:p>
      <text:p text:style-name="Preformatted_20_Text"><text:span text:style-name="Source_20_Text">├── leitura.html</text:span></text:p>
      <text:p text:style-name="Preformatted_20_Text"><text:span text:style-name="Source_20_Text">├── comunidade.html</text:span></text:p>
      <text:p text:style-name="P1"><text:span text:style-name="Source_20_Text">└── perfil.html</text:span></text:p>
      <text:p text:style-name="Text_20_body">Na raiz:</text:p>
      <text:p text:style-name="P1"><text:span text:style-name="Source_20_Text">index.html</text:span></text:p>
      <text:p text:style-name="Text_20_body">Agora teremos <text:span text:style-name="Strong_20_Emphasis">cinco páginas</text:span> no total.</text:p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Página</text:p>
            </table:table-cell>
            <table:table-cell table:style-name="Tabela2.A1" office:value-type="string">
              <text:p text:style-name="Table_20_Heading">Função</text:p>
            </table:table-cell>
          </table:table-row>
        </table:table-header-rows>
        <table:table-row>
          <table:table-cell table:style-name="Tabela2.A1" office:value-type="string">
            <text:p text:style-name="Table_20_Contents"><text:span text:style-name="Source_20_Text">index.html</text:span></text:p>
          </table:table-cell>
          <table:table-cell table:style-name="Tabela2.A1" office:value-type="string">
            <text:p text:style-name="Table_20_Contents">Apresentação da plataforma e ponto de entrada.</text:p>
          </table:table-cell>
        </table:table-row>
        <table:table-row>
          <table:table-cell table:style-name="Tabela2.A1" office:value-type="string">
            <text:p text:style-name="Table_20_Contents"><text:span text:style-name="Source_20_Text">biblioteca.html</text:span></text:p>
          </table:table-cell>
          <table:table-cell table:style-name="Tabela2.A1" office:value-type="string">
            <text:p text:style-name="Table_20_Contents">Catálogo das obras e sistema de pesquisa.</text:p>
          </table:table-cell>
        </table:table-row>
        <table:table-row>
          <table:table-cell table:style-name="Tabela2.A1" office:value-type="string">
            <text:p text:style-name="Table_20_Contents"><text:span text:style-name="Source_20_Text">leitura.html</text:span></text:p>
          </table:table-cell>
          <table:table-cell table:style-name="Tabela2.A1" office:value-type="string">
            <text:p text:style-name="Table_20_Contents">Ambiente de estudo e leitura das obras.</text:p>
          </table:table-cell>
        </table:table-row>
        <table:table-row>
          <table:table-cell table:style-name="Tabela2.A1" office:value-type="string">
            <text:p text:style-name="Table_20_Contents"><text:span text:style-name="Source_20_Text">comunidade.html</text:span></text:p>
          </table:table-cell>
          <table:table-cell table:style-name="Tabela2.A1" office:value-type="string">
            <text:p text:style-name="Table_20_Contents">Espaço para interação entre usuários (futuro).</text:p>
          </table:table-cell>
        </table:table-row>
        <table:table-row>
          <table:table-cell table:style-name="Tabela2.A1" office:value-type="string">
            <text:p text:style-name="Table_20_Contents"><text:span text:style-name="Source_20_Text">perfil.html</text:span></text:p>
          </table:table-cell>
          <table:table-cell table:style-name="Tabela2.A1" office:value-type="string">
            <text:p text:style-name="Table_20_Contents">Preferências e progresso do usuário (futuro).</text:p>
          </table:table-cell>
        </table:table-row>
      </table:table>
      <text:p text:style-name="Horizontal_20_Line"/>
      <text:h text:style-name="Heading_20_1" text:outline-level="1">Fluxo definitivo da navegação</text:h>
      <text:p text:style-name="Preformatted_20_Text"><text:span text:style-name="Source_20_Text"><text:s text:c="17"/>index.html</text:span></text:p>
      <text:p text:style-name="Preformatted_20_Text"><text:span text:style-name="Source_20_Text"><text:s text:c="22"/>│</text:span></text:p>
      <text:p text:style-name="Preformatted_20_Text"><text:span text:style-name="Source_20_Text"><text:s text:c="10"/>┌───────────┼───────────┐</text:span></text:p>
      <text:p text:style-name="Preformatted_20_Text"><text:span text:style-name="Source_20_Text"><text:s text:c="10"/>│ <text:s text:c="10"/>│ <text:s text:c="10"/>│</text:span></text:p>
      <text:p text:style-name="Preformatted_20_Text"><text:span text:style-name="Source_20_Text"><text:s text:c="10"/>▼ <text:s text:c="10"/>▼ <text:s text:c="10"/>▼</text:span></text:p>
      <text:p text:style-name="Preformatted_20_Text"><text:span text:style-name="Source_20_Text"><text:s/>biblioteca.html comunidade.html perfil.html</text:span></text:p>
      <text:p text:style-name="Preformatted_20_Text"><text:span text:style-name="Source_20_Text"><text:s text:c="10"/>│</text:span></text:p>
      <text:p text:style-name="Preformatted_20_Text"><text:span text:style-name="Source_20_Text"><text:s text:c="10"/>▼</text:span></text:p>
      <text:p text:style-name="Preformatted_20_Text"><text:soft-page-break/><text:span text:style-name="Source_20_Text"><text:s/>leitura.html?id=evangelho-tomas</text:span></text:p>
      <text:p text:style-name="Preformatted_20_Text"><text:span text:style-name="Source_20_Text"><text:s text:c="10"/>│</text:span></text:p>
      <text:p text:style-name="Preformatted_20_Text"><text:span text:style-name="Source_20_Text"><text:s text:c="10"/>▼</text:span></text:p>
      <text:p text:style-name="Preformatted_20_Text"><text:span text:style-name="Source_20_Text"><text:s/>leitura.html?id=livro-enoque</text:span></text:p>
      <text:p text:style-name="Preformatted_20_Text"><text:span text:style-name="Source_20_Text"><text:s text:c="10"/>│</text:span></text:p>
      <text:p text:style-name="Preformatted_20_Text"><text:span text:style-name="Source_20_Text"><text:s text:c="10"/>▼</text:span></text:p>
      <text:p text:style-name="P1"><text:span text:style-name="Source_20_Text"><text:s/>leitura.html?id=evangelho-maria</text:span></text:p>
      <text:p text:style-name="Text_20_body">Esse fluxo é simples, direto e fácil de manter.</text:p>
      <text:p text:style-name="Horizontal_20_Line"/>
      <text:h text:style-name="Heading_20_1" text:outline-level="1">Responsabilidade de cada página</text:h>
      <text:h text:style-name="Heading_20_2" text:outline-level="2"><text:span text:style-name="Source_20_Text">index.html</text:span></text:h>
      <text:p text:style-name="Text_20_body">É a porta de entrada da plataforma.</text:p>
      <text:p text:style-name="Text_20_body">Ela deve:</text:p>
      <text:list text:style-name="L13">
        <text:list-item>
          <text:p text:style-name="P14">apresentar a Biblioteca Apócrifa;</text:p>
        </text:list-item>
        <text:list-item>
          <text:p text:style-name="P14">explicar sua finalidade histórica, literária e acadêmica;</text:p>
        </text:list-item>
        <text:list-item>
          <text:p text:style-name="P14">contextualizar os textos apócrifos;</text:p>
        </text:list-item>
        <text:list-item>
          <text:p text:style-name="P14">destacar algumas obras;</text:p>
        </text:list-item>
        <text:list-item>
          <text:p text:style-name="P14">convidar o usuário a explorar a biblioteca.</text:p>
        </text:list-item>
      </text:list>
      <text:p text:style-name="Quotations"><text:span text:style-name="Strong_20_Emphasis">Pergunta que ela responde:</text:span> "O que é esta plataforma e por onde começo?"</text:p>
      <text:p text:style-name="Horizontal_20_Line"/>
      <text:h text:style-name="Heading_20_2" text:outline-level="2"><text:span text:style-name="Source_20_Text">biblioteca.html</text:span></text:h>
      <text:p text:style-name="Text_20_body">É o catálogo principal.</text:p>
      <text:p text:style-name="Text_20_body">Ela deve:</text:p>
      <text:list text:style-name="L14">
        <text:list-item>
          <text:p text:style-name="P15">listar as obras;</text:p>
        </text:list-item>
        <text:list-item>
          <text:p text:style-name="P15">permitir pesquisa;</text:p>
        </text:list-item>
        <text:list-item>
          <text:p text:style-name="P15">permitir filtros;</text:p>
        </text:list-item>
        <text:list-item>
          <text:p text:style-name="P15">exibir informações resumidas de cada livro.</text:p>
        </text:list-item>
      </text:list>
      <text:p text:style-name="Quotations"><text:span text:style-name="Strong_20_Emphasis">Pergunta que ela responde:</text:span> "Qual obra desejo estudar?"</text:p>
      <text:p text:style-name="Horizontal_20_Line"/>
      <text:h text:style-name="Heading_20_2" text:outline-level="2"><text:span text:style-name="Source_20_Text">leitura.html</text:span></text:h>
      <text:p text:style-name="Text_20_body">É o coração da plataforma.</text:p>
      <text:p text:style-name="Text_20_body">Ela deve:</text:p>
      <text:list text:style-name="L15">
        <text:list-item>
          <text:p text:style-name="P16"><text:soft-page-break/>carregar uma obra dinamicamente;</text:p>
        </text:list-item>
        <text:list-item>
          <text:p text:style-name="P16">exibir suas seções;</text:p>
        </text:list-item>
        <text:list-item>
          <text:p text:style-name="P16">apresentar comentários e exegeses;</text:p>
        </text:list-item>
        <text:list-item>
          <text:p text:style-name="P16">facilitar a navegação entre os trechos.</text:p>
        </text:list-item>
      </text:list>
      <text:p text:style-name="Quotations"><text:span text:style-name="Strong_20_Emphasis">Pergunta que ela responde:</text:span> "Como posso estudar esta obra?"</text:p>
      <text:p text:style-name="Horizontal_20_Line"/>
      <text:h text:style-name="Heading_20_2" text:outline-level="2"><text:span text:style-name="Source_20_Text">comunidade.html</text:span></text:h>
      <text:p text:style-name="Text_20_body">Será preparada para evoluções futuras.</text:p>
      <text:p text:style-name="Text_20_body">Na versão inicial, pode apresentar uma mensagem indicando que o recurso está em desenvolvimento.</text:p>
      <text:p text:style-name="Horizontal_20_Line"/>
      <text:h text:style-name="Heading_20_2" text:outline-level="2"><text:span text:style-name="Source_20_Text">perfil.html</text:span></text:h>
      <text:p text:style-name="Text_20_body">Também começará simples, preparada para receber futuramente:</text:p>
      <text:list text:style-name="L16">
        <text:list-item>
          <text:p text:style-name="P17">favoritos;</text:p>
        </text:list-item>
        <text:list-item>
          <text:p text:style-name="P17">progresso de leitura;</text:p>
        </text:list-item>
        <text:list-item>
          <text:p text:style-name="P17">preferências;</text:p>
        </text:list-item>
        <text:list-item>
          <text:p text:style-name="P17">histórico de estudos.</text:p>
        </text:list-item>
      </text:list>
      <text:p text:style-name="Horizontal_20_Line"/>
      <text:h text:style-name="Heading_20_1" text:outline-level="1">Resultado da Sprint 2.2</text:h>
      <text:p text:style-name="Text_20_body">Concluímos a organização conceitual dos arquivos HTML.</text:p>
      <text:h text:style-name="Heading_20_3" text:outline-level="3">Checklist atualizado</text:h>
      <text:list text:style-name="L17">
        <text:list-item>
          <text:p text:style-name="P18">✅ Definir a estrutura definitiva das pastas.</text:p>
        </text:list-item>
        <text:list-item>
          <text:p text:style-name="P18">✅ Organizar os arquivos HTML.</text:p>
        </text:list-item>
        <text:list-item>
          <text:p text:style-name="P18">⏳ Organizar os arquivos CSS.</text:p>
        </text:list-item>
        <text:list-item>
          <text:p text:style-name="P18">⏳ Organizar os arquivos JavaScript.</text:p>
        </text:list-item>
        <text:list-item>
          <text:p text:style-name="P18">⏳ Criar a estrutura inicial do <text:span text:style-name="Source_20_Text">livros.json</text:span>.</text:p>
        </text:list-item>
        <text:list-item>
          <text:p text:style-name="P18">⏳ Definir o padrão dos componentes reutilizáveis.</text:p>
        </text:list-item>
        <text:list-item>
          <text:p text:style-name="P18">⏳ Atualizar a documentação da arquitetura.</text:p>
        </text:list-item>
      </text:list>
      <text:p text:style-name="Horizontal_20_Line"/>
      <text:h text:style-name="Heading_20_2" text:outline-level="2"><text:soft-page-break/>Próxima Sprint: 2.3 — Organizar os Arquivos CSS</text:h>
      <text:p text:style-name="Text_20_body">Nesta etapa, vamos definir a arquitetura do CSS antes de escrever estilos. Vamos estabelecer regras como:</text:p>
      <text:list text:style-name="L18">
        <text:list-item>
          <text:p text:style-name="P19">Como organizar os estilos globais e específicos?</text:p>
        </text:list-item>
        <text:list-item>
          <text:p text:style-name="P19">Qual será a ordem de importação dos arquivos?</text:p>
        </text:list-item>
        <text:list-item>
          <text:p text:style-name="P19">Como nomear classes de forma consistente?</text:p>
        </text:list-item>
        <text:list-item>
          <text:p text:style-name="P19">Como criar um Design System baseado em <text:span text:style-name="Strong_20_Emphasis">tokens de design</text:span> (cores, tipografia, espaçamentos e sombras)?</text:p>
        </text:list-item>
      </text:list>
      <text:p text:style-name="Text_20_body">Essa organização fará com que o CSS permaneça limpo e escalável conforme a plataforma crescer.</text:p>
      <text:p text:style-name="Text_20_body">Perfeito. Agora começamos uma das partes mais importantes do projeto.</text:p>
      <text:p text:style-name="Text_20_body">Muitos desenvolvedores pensam que <text:span text:style-name="Strong_20_Emphasis">CSS é "dar cor"</text:span> ao site. Na verdade, em projetos profissionais, <text:span text:style-name="Strong_20_Emphasis">CSS é arquitetura</text:span>.</text:p>
      <text:p text:style-name="Text_20_body">Se organizarmos essa parte corretamente agora, dificilmente teremos problemas quando o projeto crescer.</text:p>
      <text:p text:style-name="Horizontal_20_Line"/>
      <text:h text:style-name="Heading_20_1" text:outline-level="1">Sprint 2.3 — Organizar os Arquivos CSS</text:h>
      <text:h text:style-name="Heading_20_2" text:outline-level="2">Objetivo</text:h>
      <text:p text:style-name="Text_20_body">Criar uma arquitetura de estilos organizada, reutilizável e escalável.</text:p>
      <text:p text:style-name="Text_20_body">Não vamos escrever aparência ainda.</text:p>
      <text:p text:style-name="Text_20_body">Primeiro vamos definir <text:span text:style-name="Strong_20_Emphasis">quem faz o quê</text:span>.</text:p>
      <text:p text:style-name="Horizontal_20_Line"/>
      <text:h text:style-name="Heading_20_1" text:outline-level="1">O princípio da responsabilidade única</text:h>
      <text:p text:style-name="Text_20_body">Assim como fizemos com as pastas, cada arquivo CSS terá apenas <text:span text:style-name="Strong_20_Emphasis">uma responsabilidade</text:span>.</text:p>
      <text:p text:style-name="Text_20_body">Nossa estrutura será:</text:p>
      <text:p text:style-name="Preformatted_20_Text"><text:span text:style-name="Source_20_Text">assets/</text:span></text:p>
      <text:p text:style-name="Preformatted_20_Text"><text:span text:style-name="Source_20_Text">└── css/</text:span></text:p>
      <text:p text:style-name="Preformatted_20_Text"><text:span text:style-name="Source_20_Text"><text:s text:c="4"/>├── variables.css</text:span></text:p>
      <text:p text:style-name="Preformatted_20_Text"><text:span text:style-name="Source_20_Text"><text:s text:c="4"/>├── base.css</text:span></text:p>
      <text:p text:style-name="Preformatted_20_Text"><text:span text:style-name="Source_20_Text"><text:s text:c="4"/>├── layout.css</text:span></text:p>
      <text:p text:style-name="Preformatted_20_Text"><text:span text:style-name="Source_20_Text"><text:s text:c="4"/>├── components.css</text:span></text:p>
      <text:p text:style-name="Preformatted_20_Text"><text:span text:style-name="Source_20_Text"><text:s text:c="4"/>├── home.css</text:span></text:p>
      <text:p text:style-name="Preformatted_20_Text"><text:span text:style-name="Source_20_Text"><text:s text:c="4"/>├── biblioteca.css</text:span></text:p>
      <text:p text:style-name="Preformatted_20_Text"><text:span text:style-name="Source_20_Text"><text:s text:c="4"/>├── leitura.css</text:span></text:p>
      <text:p text:style-name="Preformatted_20_Text"><text:span text:style-name="Source_20_Text"><text:s text:c="4"/>├── comunidade.css</text:span></text:p>
      <text:p text:style-name="P1"><text:span text:style-name="Source_20_Text"><text:s text:c="4"/>└── perfil.css</text:span></text:p>
      <text:p text:style-name="Horizontal_20_Line"/>
      <text:h text:style-name="Heading_20_1" text:outline-level="1"><text:soft-page-break/><text:span text:style-name="Source_20_Text">variables.css</text:span></text:h>
      <text:p text:style-name="Text_20_body">Este será o <text:span text:style-name="Strong_20_Emphasis">coração do Design System</text:span>.</text:p>
      <text:p text:style-name="Text_20_body">Ele armazenará todos os <text:span text:style-name="Strong_20_Emphasis">Design Tokens</text:span>.</text:p>
      <text:p text:style-name="Text_20_body"><text:span text:style-name="Strong_20_Emphasis">Não terá estilos de componentes.</text:span></text:p>
      <text:p text:style-name="Text_20_body">Apenas variáveis como:</text:p>
      <text:list text:style-name="L19">
        <text:list-item>
          <text:p text:style-name="P20">cores;</text:p>
        </text:list-item>
        <text:list-item>
          <text:p text:style-name="P20">tipografia;</text:p>
        </text:list-item>
        <text:list-item>
          <text:p text:style-name="P20">espaçamentos;</text:p>
        </text:list-item>
        <text:list-item>
          <text:p text:style-name="P20">bordas;</text:p>
        </text:list-item>
        <text:list-item>
          <text:p text:style-name="P20">sombras;</text:p>
        </text:list-item>
        <text:list-item>
          <text:p text:style-name="P20">transições;</text:p>
        </text:list-item>
        <text:list-item>
          <text:p text:style-name="P20">larguras máximas.</text:p>
        </text:list-item>
      </text:list>
      <text:h text:style-name="Heading_20_3" text:outline-level="3">Exemplo de responsabilidade</text:h>
      <text:p text:style-name="Text_20_body">✅ Cor primária</text:p>
      <text:p text:style-name="Text_20_body">✅ Cor de fundo</text:p>
      <text:p text:style-name="Text_20_body">✅ Fonte principal</text:p>
      <text:p text:style-name="Text_20_body">✅ Espaçamento padrão</text:p>
      <text:p text:style-name="Text_20_body">❌ Estilizar botão</text:p>
      <text:p text:style-name="Text_20_body">❌ Estilizar card</text:p>
      <text:p text:style-name="Horizontal_20_Line"/>
      <text:h text:style-name="Heading_20_1" text:outline-level="1"><text:span text:style-name="Source_20_Text">base.css</text:span></text:h>
      <text:p text:style-name="Text_20_body">Responsável pelos estilos globais.</text:p>
      <text:p text:style-name="Text_20_body">Aqui ficarão:</text:p>
      <text:list text:style-name="L20">
        <text:list-item>
          <text:p text:style-name="P21">Reset CSS</text:p>
        </text:list-item>
        <text:list-item>
          <text:p text:style-name="P21"><text:span text:style-name="Source_20_Text">body</text:span></text:p>
        </text:list-item>
        <text:list-item>
          <text:p text:style-name="P21"><text:span text:style-name="Source_20_Text">html</text:span></text:p>
        </text:list-item>
        <text:list-item>
          <text:p text:style-name="P21">títulos (<text:span text:style-name="Source_20_Text">h1</text:span>, <text:span text:style-name="Source_20_Text">h2</text:span>...)</text:p>
        </text:list-item>
        <text:list-item>
          <text:p text:style-name="P21">parágrafos</text:p>
        </text:list-item>
        <text:list-item>
          <text:p text:style-name="P21">listas</text:p>
        </text:list-item>
        <text:list-item>
          <text:p text:style-name="P21">links</text:p>
        </text:list-item>
        <text:list-item>
          <text:p text:style-name="P21"><text:soft-page-break/>imagens</text:p>
        </text:list-item>
        <text:list-item>
          <text:p text:style-name="P21">comportamento padrão da página</text:p>
        </text:list-item>
      </text:list>
      <text:p text:style-name="Text_20_body">Uma regra importante:</text:p>
      <text:p text:style-name="Quotations"><text:span text:style-name="Strong_20_Emphasis">Nenhum componente será estilizado aqui.</text:span></text:p>
      <text:p text:style-name="Horizontal_20_Line"/>
      <text:h text:style-name="Heading_20_1" text:outline-level="1"><text:span text:style-name="Source_20_Text">layout.css</text:span></text:h>
      <text:p text:style-name="Text_20_body">Aqui definimos apenas o posicionamento dos elementos.</text:p>
      <text:p text:style-name="Text_20_body">Exemplos:</text:p>
      <text:list text:style-name="L21">
        <text:list-item>
          <text:p text:style-name="P22"><text:span text:style-name="Source_20_Text">.container</text:span></text:p>
        </text:list-item>
        <text:list-item>
          <text:p text:style-name="P22"><text:span text:style-name="Source_20_Text">.grid</text:span></text:p>
        </text:list-item>
        <text:list-item>
          <text:p text:style-name="P22"><text:span text:style-name="Source_20_Text">.section</text:span></text:p>
        </text:list-item>
        <text:list-item>
          <text:p text:style-name="P22"><text:span text:style-name="Source_20_Text">.wrapper</text:span></text:p>
        </text:list-item>
        <text:list-item>
          <text:p text:style-name="P22"><text:span text:style-name="Source_20_Text">.content</text:span></text:p>
        </text:list-item>
        <text:list-item>
          <text:p text:style-name="P22">espaçamento entre seções</text:p>
        </text:list-item>
      </text:list>
      <text:p text:style-name="Text_20_body">Esse arquivo organiza a página, mas não define sua aparência.</text:p>
      <text:p text:style-name="Horizontal_20_Line"/>
      <text:h text:style-name="Heading_20_1" text:outline-level="1"><text:span text:style-name="Source_20_Text">components.css</text:span></text:h>
      <text:p text:style-name="Text_20_body">Aqui ficam todos os componentes reutilizáveis.</text:p>
      <text:p text:style-name="Text_20_body">Por exemplo:</text:p>
      <text:list text:style-name="L22">
        <text:list-item>
          <text:p text:style-name="P23">botão;</text:p>
        </text:list-item>
        <text:list-item>
          <text:p text:style-name="P23">card;</text:p>
        </text:list-item>
        <text:list-item>
          <text:p text:style-name="P23">navbar;</text:p>
        </text:list-item>
        <text:list-item>
          <text:p text:style-name="P23">footer;</text:p>
        </text:list-item>
        <text:list-item>
          <text:p text:style-name="P23">header;</text:p>
        </text:list-item>
        <text:list-item>
          <text:p text:style-name="P23">input;</text:p>
        </text:list-item>
        <text:list-item>
          <text:p text:style-name="P23">badge;</text:p>
        </text:list-item>
        <text:list-item>
          <text:p text:style-name="P23">modal;</text:p>
        </text:list-item>
        <text:list-item>
          <text:p text:style-name="P23">loading.</text:p>
        </text:list-item>
      </text:list>
      <text:p text:style-name="Text_20_body">Uma regra importante:</text:p>
      <text:p text:style-name="Quotations">Se o componente aparece em mais de uma página, ele pertence a <text:span text:style-name="Source_20_Text">components.css</text:span>.</text:p>
      <text:p text:style-name="Horizontal_20_Line"><text:soft-page-break/></text:p>
      <text:h text:style-name="Heading_20_1" text:outline-level="1">CSS das páginas</text:h>
      <text:p text:style-name="Text_20_body">Agora sim entram os estilos específicos.</text:p>
      <text:h text:style-name="Heading_20_2" text:outline-level="2"><text:span text:style-name="Source_20_Text">home.css</text:span></text:h>
      <text:p text:style-name="Text_20_body">Somente estilos exclusivos da página inicial.</text:p>
      <text:p text:style-name="Text_20_body">Exemplos:</text:p>
      <text:list text:style-name="L23">
        <text:list-item>
          <text:p text:style-name="P24">Hero</text:p>
        </text:list-item>
        <text:list-item>
          <text:p text:style-name="P24">Banner</text:p>
        </text:list-item>
        <text:list-item>
          <text:p text:style-name="P24">Destaques</text:p>
        </text:list-item>
        <text:list-item>
          <text:p text:style-name="P24">Seção de apresentação</text:p>
        </text:list-item>
      </text:list>
      <text:p text:style-name="Horizontal_20_Line"/>
      <text:h text:style-name="Heading_20_2" text:outline-level="2"><text:span text:style-name="Source_20_Text">biblioteca.css</text:span></text:h>
      <text:p text:style-name="Text_20_body">Somente:</text:p>
      <text:list text:style-name="L24">
        <text:list-item>
          <text:p text:style-name="P25">grid dos livros;</text:p>
        </text:list-item>
        <text:list-item>
          <text:p text:style-name="P25">barra de pesquisa;</text:p>
        </text:list-item>
        <text:list-item>
          <text:p text:style-name="P25">filtros;</text:p>
        </text:list-item>
        <text:list-item>
          <text:p text:style-name="P25">paginação.</text:p>
        </text:list-item>
      </text:list>
      <text:p text:style-name="Horizontal_20_Line"/>
      <text:h text:style-name="Heading_20_2" text:outline-level="2"><text:span text:style-name="Source_20_Text">leitura.css</text:span></text:h>
      <text:p text:style-name="Text_20_body">Será um dos maiores arquivos do projeto.</text:p>
      <text:p text:style-name="Text_20_body">Porque controlará:</text:p>
      <text:list text:style-name="L25">
        <text:list-item>
          <text:p text:style-name="P26">cabeçalho da obra;</text:p>
        </text:list-item>
        <text:list-item>
          <text:p text:style-name="P26">índice;</text:p>
        </text:list-item>
        <text:list-item>
          <text:p text:style-name="P26">texto;</text:p>
        </text:list-item>
        <text:list-item>
          <text:p text:style-name="P26">comentários;</text:p>
        </text:list-item>
        <text:list-item>
          <text:p text:style-name="P26">navegação entre seções.</text:p>
        </text:list-item>
      </text:list>
      <text:p text:style-name="Horizontal_20_Line"/>
      <text:h text:style-name="Heading_20_2" text:outline-level="2"><text:span text:style-name="Source_20_Text">comunidade.css</text:span></text:h>
      <text:p text:style-name="Text_20_body">Quando o módulo for desenvolvido.</text:p>
      <text:p text:style-name="Horizontal_20_Line"><text:soft-page-break/></text:p>
      <text:h text:style-name="Heading_20_2" text:outline-level="2"><text:span text:style-name="Source_20_Text">perfil.css</text:span></text:h>
      <text:p text:style-name="Text_20_body">Quando o módulo for desenvolvido.</text:p>
      <text:p text:style-name="Horizontal_20_Line"/>
      <text:h text:style-name="Heading_20_1" text:outline-level="1">Fluxo do CSS</text:h>
      <text:p text:style-name="Text_20_body">A ordem de carregamento é importante.</text:p>
      <text:p text:style-name="Preformatted_20_Text"><text:span text:style-name="Source_20_Text">variables.css</text:span></text:p>
      <text:p text:style-name="Preformatted_20_Text"/>
      <text:p text:style-name="Preformatted_20_Text"><text:span text:style-name="Source_20_Text">↓</text:span></text:p>
      <text:p text:style-name="Preformatted_20_Text"/>
      <text:p text:style-name="Preformatted_20_Text"><text:span text:style-name="Source_20_Text">base.css</text:span></text:p>
      <text:p text:style-name="Preformatted_20_Text"/>
      <text:p text:style-name="Preformatted_20_Text"><text:span text:style-name="Source_20_Text">↓</text:span></text:p>
      <text:p text:style-name="Preformatted_20_Text"/>
      <text:p text:style-name="Preformatted_20_Text"><text:span text:style-name="Source_20_Text">layout.css</text:span></text:p>
      <text:p text:style-name="Preformatted_20_Text"/>
      <text:p text:style-name="Preformatted_20_Text"><text:span text:style-name="Source_20_Text">↓</text:span></text:p>
      <text:p text:style-name="Preformatted_20_Text"/>
      <text:p text:style-name="Preformatted_20_Text"><text:span text:style-name="Source_20_Text">components.css</text:span></text:p>
      <text:p text:style-name="Preformatted_20_Text"/>
      <text:p text:style-name="Preformatted_20_Text"><text:span text:style-name="Source_20_Text">↓</text:span></text:p>
      <text:p text:style-name="Preformatted_20_Text"/>
      <text:p text:style-name="P1"><text:span text:style-name="Source_20_Text">CSS específico da página</text:span></text:p>
      <text:p text:style-name="Text_20_body">Por quê?</text:p>
      <text:p text:style-name="Text_20_body">Porque cada camada depende da anterior.</text:p>
      <text:p text:style-name="Text_20_body">Por exemplo:</text:p>
      <text:p text:style-name="Text_20_body"><text:span text:style-name="Source_20_Text">components.css</text:span> usa as variáveis definidas em <text:span text:style-name="Source_20_Text">variables.css</text:span>.</text:p>
      <text:p text:style-name="Horizontal_20_Line"/>
      <text:h text:style-name="Heading_20_1" text:outline-level="1">O que não faremos</text:h>
      <text:p text:style-name="Text_20_body">Não criaremos:</text:p>
      <text:p text:style-name="P1"><text:span text:style-name="Source_20_Text">.botao-azul</text:span></text:p>
      <text:p text:style-name="Text_20_body">ou</text:p>
      <text:p text:style-name="P1"><text:span text:style-name="Source_20_Text">.card-verde</text:span></text:p>
      <text:p text:style-name="Text_20_body">Esses nomes descrevem aparência, e a aparência pode mudar.</text:p>
      <text:p text:style-name="Text_20_body">Preferimos nomes baseados na função.</text:p>
      <text:p text:style-name="Text_20_body">Exemplos:</text:p>
      <text:p text:style-name="Preformatted_20_Text"><text:span text:style-name="Source_20_Text">.button</text:span></text:p>
      <text:p text:style-name="Preformatted_20_Text"><text:span text:style-name="Source_20_Text">.button-primary</text:span></text:p>
      <text:p text:style-name="Preformatted_20_Text"><text:soft-page-break/></text:p>
      <text:p text:style-name="Preformatted_20_Text"><text:span text:style-name="Source_20_Text">.card</text:span></text:p>
      <text:p text:style-name="Preformatted_20_Text"/>
      <text:p text:style-name="Preformatted_20_Text"><text:span text:style-name="Source_20_Text">.card-book</text:span></text:p>
      <text:p text:style-name="Preformatted_20_Text"/>
      <text:p text:style-name="Preformatted_20_Text"><text:span text:style-name="Source_20_Text">.input</text:span></text:p>
      <text:p text:style-name="Preformatted_20_Text"/>
      <text:p text:style-name="P1"><text:span text:style-name="Source_20_Text">.search-bar</text:span></text:p>
      <text:p text:style-name="Text_20_body">Isso torna o CSS mais legível e fácil de manter.</text:p>
      <text:p text:style-name="Horizontal_20_Line"/>
      <text:h text:style-name="Heading_20_1" text:outline-level="1">Uma decisão importante sobre metodologia</text:h>
      <text:p text:style-name="Text_20_body">Agora quero propor uma prática que seguiremos durante todo o projeto.</text:p>
      <text:p text:style-name="Text_20_body">Em vez de escrever CSS "conforme a necessidade", vamos construir um <text:span text:style-name="Strong_20_Emphasis">Design System</text:span>.</text:p>
      <text:p text:style-name="Text_20_body">Isso significa que, antes de estilizar qualquer página, definiremos:</text:p>
      <text:list text:style-name="L26">
        <text:list-item>
          <text:p text:style-name="P27">🎨 Paleta de cores;</text:p>
        </text:list-item>
        <text:list-item>
          <text:p text:style-name="P27">✍️ Tipografia;</text:p>
        </text:list-item>
        <text:list-item>
          <text:p text:style-name="P27">📏 Escala de espaçamento;</text:p>
        </text:list-item>
        <text:list-item>
          <text:p text:style-name="P27">🔲 Raios de borda;</text:p>
        </text:list-item>
        <text:list-item>
          <text:p text:style-name="P27">🌑 Sombras;</text:p>
        </text:list-item>
        <text:list-item>
          <text:p text:style-name="P27">📐 Larguras máximas;</text:p>
        </text:list-item>
        <text:list-item>
          <text:p text:style-name="P27">📱 Breakpoints para responsividade;</text:p>
        </text:list-item>
        <text:list-item>
          <text:p text:style-name="P27">🎭 Estados de interação (hover, focus, active).</text:p>
        </text:list-item>
      </text:list>
      <text:p text:style-name="Text_20_body">Esses elementos serão registrados em <text:span text:style-name="Source_20_Text">variables.css</text:span> e servirão como base para todos os componentes e páginas.</text:p>
      <text:h text:style-name="Heading_20_2" text:outline-level="2">Por que isso é importante?</text:h>
      <text:p text:style-name="Text_20_body">Porque, se no futuro você quiser mudar a identidade visual da plataforma, bastará alterar os <text:span text:style-name="Strong_20_Emphasis">tokens de design</text:span>, sem precisar revisar centenas de linhas de CSS.</text:p>
      <text:p text:style-name="Text_20_body">Essa é uma prática comum em equipes que desenvolvem sistemas grandes e garante consistência visual em toda a aplicação.</text:p>
      <text:p text:style-name="Text_20_body">Se concordar, nossa próxima sprint será dedicada justamente à criação desse <text:span text:style-name="Strong_20_Emphasis">Design System</text:span>, antes de escrevermos qualquer estilo específico. É um investimento inicial que vai facilitar todo o restante do desenvolvimento.</text:p>
      <text:p text:style-name="Text_20_body">Concordo com essa decisão.</text:p>
      <text:p text:style-name="Text_20_body">Na verdade, faz mais sentido deixar o <text:span text:style-name="Strong_20_Emphasis">Design System</text:span> para a <text:span text:style-name="Strong_20_Emphasis">Fase 3 — Design da Interface</text:span>. Assim, nesta fase de Estruturação focamos apenas na arquitetura do projeto, sem misturar decisões visuais.</text:p>
      <text:p text:style-name="Text_20_body"><text:soft-page-break/>Então, consideramos a <text:span text:style-name="Strong_20_Emphasis">Sprint 2.3</text:span> concluída. ✅</text:p>
      <text:h text:style-name="Heading_20_3" text:outline-level="3">Checklist atualizado</text:h>
      <text:list text:style-name="L27">
        <text:list-item>
          <text:p text:style-name="P28">✅ Definir a estrutura definitiva das pastas.</text:p>
        </text:list-item>
        <text:list-item>
          <text:p text:style-name="P28">✅ Organizar os arquivos HTML.</text:p>
        </text:list-item>
        <text:list-item>
          <text:p text:style-name="P28">✅ Organizar os arquivos CSS.</text:p>
        </text:list-item>
        <text:list-item>
          <text:p text:style-name="P28">⏳ Organizar os arquivos JavaScript.</text:p>
        </text:list-item>
        <text:list-item>
          <text:p text:style-name="P28">⏳ Criar a estrutura inicial do <text:span text:style-name="Source_20_Text">livros.json</text:span>.</text:p>
        </text:list-item>
        <text:list-item>
          <text:p text:style-name="P28">⏳ Definir o padrão dos componentes reutilizáveis.</text:p>
        </text:list-item>
        <text:list-item>
          <text:p text:style-name="P28">⏳ Atualizar a documentação da arquitetura.</text:p>
        </text:list-item>
      </text:list>
      <text:p text:style-name="Horizontal_20_Line"/>
      <text:h text:style-name="Heading_20_1" text:outline-level="1">Sprint 2.4 — Organizar os Arquivos JavaScript</text:h>
      <text:p text:style-name="Text_20_body">Agora vamos definir a arquitetura da lógica da aplicação.</text:p>
      <text:p text:style-name="Text_20_body">Antes de escrever qualquer código, precisamos responder a uma pergunta:</text:p>
      <text:p text:style-name="Quotations"><text:span text:style-name="Strong_20_Emphasis">Como a informação vai percorrer a aplicação?</text:span></text:p>
      <text:p text:style-name="Text_20_body">Para responder isso, vamos desenhar o fluxo da aplicação.</text:p>
      <text:h text:style-name="Heading_20_2" text:outline-level="2">Fluxo da aplicação</text:h>
      <text:p text:style-name="Preformatted_20_Text"><text:span text:style-name="Source_20_Text">Usuário</text:span></text:p>
      <text:p text:style-name="Preformatted_20_Text"><text:span text:style-name="Source_20_Text"><text:s text:c="4"/>│</text:span></text:p>
      <text:p text:style-name="Preformatted_20_Text"><text:span text:style-name="Source_20_Text"><text:s text:c="4"/>▼</text:span></text:p>
      <text:p text:style-name="Preformatted_20_Text"><text:span text:style-name="Source_20_Text">Página HTML</text:span></text:p>
      <text:p text:style-name="Preformatted_20_Text"><text:span text:style-name="Source_20_Text"><text:s text:c="4"/>│</text:span></text:p>
      <text:p text:style-name="Preformatted_20_Text"><text:span text:style-name="Source_20_Text"><text:s text:c="4"/>▼</text:span></text:p>
      <text:p text:style-name="Preformatted_20_Text"><text:span text:style-name="Source_20_Text">JavaScript da Página</text:span></text:p>
      <text:p text:style-name="Preformatted_20_Text"><text:span text:style-name="Source_20_Text"><text:s text:c="4"/>│</text:span></text:p>
      <text:p text:style-name="Preformatted_20_Text"><text:span text:style-name="Source_20_Text"><text:s text:c="4"/>▼</text:span></text:p>
      <text:p text:style-name="Preformatted_20_Text"><text:span text:style-name="Source_20_Text">api.js</text:span></text:p>
      <text:p text:style-name="Preformatted_20_Text"><text:span text:style-name="Source_20_Text"><text:s text:c="4"/>│</text:span></text:p>
      <text:p text:style-name="Preformatted_20_Text"><text:span text:style-name="Source_20_Text"><text:s text:c="4"/>▼</text:span></text:p>
      <text:p text:style-name="Preformatted_20_Text"><text:span text:style-name="Source_20_Text">Arquivos JSON</text:span></text:p>
      <text:p text:style-name="Preformatted_20_Text"><text:span text:style-name="Source_20_Text"><text:s text:c="4"/>│</text:span></text:p>
      <text:p text:style-name="Preformatted_20_Text"><text:span text:style-name="Source_20_Text"><text:s text:c="4"/>▼</text:span></text:p>
      <text:p text:style-name="P1"><text:span text:style-name="Source_20_Text">Renderização da Interface</text:span></text:p>
      <text:p text:style-name="Text_20_body">Esse fluxo significa que <text:span text:style-name="Strong_20_Emphasis">nenhuma página acessará os arquivos JSON diretamente</text:span>. Toda leitura de dados será centralizada em um único módulo.</text:p>
      <text:p text:style-name="Horizontal_20_Line"/>
      <text:h text:style-name="Heading_20_2" text:outline-level="2"><text:soft-page-break/>Estrutura da pasta <text:span text:style-name="Source_20_Text">assets/js</text:span></text:h>
      <text:p text:style-name="Preformatted_20_Text"><text:span text:style-name="Source_20_Text">assets/</text:span></text:p>
      <text:p text:style-name="Preformatted_20_Text"><text:span text:style-name="Source_20_Text">└── js/</text:span></text:p>
      <text:p text:style-name="Preformatted_20_Text"><text:span text:style-name="Source_20_Text"><text:s text:c="4"/>├── app.js</text:span></text:p>
      <text:p text:style-name="Preformatted_20_Text"><text:span text:style-name="Source_20_Text"><text:s text:c="4"/>├── api.js</text:span></text:p>
      <text:p text:style-name="Preformatted_20_Text"><text:span text:style-name="Source_20_Text"><text:s text:c="4"/>├── biblioteca.js</text:span></text:p>
      <text:p text:style-name="Preformatted_20_Text"><text:span text:style-name="Source_20_Text"><text:s text:c="4"/>├── leitura.js</text:span></text:p>
      <text:p text:style-name="Preformatted_20_Text"><text:span text:style-name="Source_20_Text"><text:s text:c="4"/>├── pesquisa.js</text:span></text:p>
      <text:p text:style-name="Preformatted_20_Text"><text:span text:style-name="Source_20_Text"><text:s text:c="4"/>├── componentes.js</text:span></text:p>
      <text:p text:style-name="Preformatted_20_Text"><text:span text:style-name="Source_20_Text"><text:s text:c="4"/>├── favoritos.js</text:span></text:p>
      <text:p text:style-name="P1"><text:span text:style-name="Source_20_Text"><text:s text:c="4"/>└── utils.js</text:span></text:p>
      <text:p text:style-name="Text_20_body">Agora vamos definir a responsabilidade de cada arquivo.</text:p>
      <text:h text:style-name="Heading_20_3" text:outline-level="3"><text:span text:style-name="Source_20_Text">app.js</text:span></text:h>
      <text:p text:style-name="Text_20_body">É o ponto de entrada da aplicação.</text:p>
      <text:p text:style-name="Text_20_body">Responsabilidades:</text:p>
      <text:list text:style-name="L28">
        <text:list-item>
          <text:p text:style-name="P29">Inicializar scripts da página.</text:p>
        </text:list-item>
        <text:list-item>
          <text:p text:style-name="P29">Executar configurações globais.</text:p>
        </text:list-item>
        <text:list-item>
          <text:p text:style-name="P29">Coordenar os módulos quando necessário.</text:p>
        </text:list-item>
      </text:list>
      <text:p text:style-name="Text_20_body">Ele <text:span text:style-name="Strong_20_Emphasis">não</text:span> deve conter regras específicas da Biblioteca ou da Área de Leitura.</text:p>
      <text:p text:style-name="Horizontal_20_Line"/>
      <text:h text:style-name="Heading_20_3" text:outline-level="3"><text:span text:style-name="Source_20_Text">api.js</text:span></text:h>
      <text:p text:style-name="Text_20_body">Será o único responsável por carregar dados.</text:p>
      <text:p text:style-name="Text_20_body">Responsabilidades:</text:p>
      <text:list text:style-name="L29">
        <text:list-item>
          <text:p text:style-name="P30">Ler arquivos JSON.</text:p>
        </text:list-item>
        <text:list-item>
          <text:p text:style-name="P30">Tratar erros de carregamento.</text:p>
        </text:list-item>
        <text:list-item>
          <text:p text:style-name="P30">Fornecer os dados para outros módulos.</text:p>
        </text:list-item>
      </text:list>
      <text:p text:style-name="Text_20_body">No futuro, se os dados vierem de uma API ou banco de dados, apenas este arquivo precisará ser alterado.</text:p>
      <text:p text:style-name="Horizontal_20_Line"/>
      <text:h text:style-name="Heading_20_3" text:outline-level="3"><text:span text:style-name="Source_20_Text">biblioteca.js</text:span></text:h>
      <text:p text:style-name="Text_20_body">Responsável apenas pelo módulo Biblioteca.</text:p>
      <text:p text:style-name="Text_20_body">Funções futuras:</text:p>
      <text:list text:style-name="L30">
        <text:list-item>
          <text:p text:style-name="P31">Listar obras.</text:p>
        </text:list-item>
        <text:list-item>
          <text:p text:style-name="P31">Exibir cards.</text:p>
        </text:list-item>
        <text:list-item>
          <text:p text:style-name="P31">Atualizar a listagem após pesquisas e filtros.</text:p>
        </text:list-item>
      </text:list>
      <text:p text:style-name="Horizontal_20_Line"/>
      <text:h text:style-name="Heading_20_3" text:outline-level="3"><text:soft-page-break/><text:span text:style-name="Source_20_Text">leitura.js</text:span></text:h>
      <text:p text:style-name="Text_20_body">Responsável apenas pela Área de Estudo.</text:p>
      <text:p text:style-name="Text_20_body">Funções futuras:</text:p>
      <text:list text:style-name="L31">
        <text:list-item>
          <text:p text:style-name="P32">Identificar a obra pela URL.</text:p>
        </text:list-item>
        <text:list-item>
          <text:p text:style-name="P32">Carregar seu conteúdo.</text:p>
        </text:list-item>
        <text:list-item>
          <text:p text:style-name="P32">Exibir seções.</text:p>
        </text:list-item>
        <text:list-item>
          <text:p text:style-name="P32">Exibir comentários e exegeses.</text:p>
        </text:list-item>
        <text:list-item>
          <text:p text:style-name="P32">Navegar entre seções.</text:p>
        </text:list-item>
      </text:list>
      <text:p text:style-name="Horizontal_20_Line"/>
      <text:h text:style-name="Heading_20_3" text:outline-level="3"><text:span text:style-name="Source_20_Text">pesquisa.js</text:span></text:h>
      <text:p text:style-name="Text_20_body">Responsável pela busca e pelos filtros.</text:p>
      <text:p text:style-name="Text_20_body">Isso permite reutilizar a lógica em diferentes partes da plataforma.</text:p>
      <text:p text:style-name="Horizontal_20_Line"/>
      <text:h text:style-name="Heading_20_3" text:outline-level="3"><text:span text:style-name="Source_20_Text">componentes.js</text:span></text:h>
      <text:p text:style-name="Text_20_body">Responsável por carregar componentes reutilizáveis, como:</text:p>
      <text:list text:style-name="L32">
        <text:list-item>
          <text:p text:style-name="P33">Header</text:p>
        </text:list-item>
        <text:list-item>
          <text:p text:style-name="P33">Navbar</text:p>
        </text:list-item>
        <text:list-item>
          <text:p text:style-name="P33">Footer</text:p>
        </text:list-item>
      </text:list>
      <text:p text:style-name="Text_20_body">Assim evitamos repetir o mesmo HTML em todas as páginas.</text:p>
      <text:p text:style-name="Horizontal_20_Line"/>
      <text:h text:style-name="Heading_20_3" text:outline-level="3"><text:span text:style-name="Source_20_Text">favoritos.js</text:span></text:h>
      <text:p text:style-name="Text_20_body">Na versão 1.0, este arquivo pode existir como preparação para futuras funcionalidades, mas permanecerá sem implementação até chegarmos à Fase 8.</text:p>
      <text:p text:style-name="Horizontal_20_Line"/>
      <text:h text:style-name="Heading_20_3" text:outline-level="3"><text:span text:style-name="Source_20_Text">utils.js</text:span></text:h>
      <text:p text:style-name="Text_20_body">Contém funções auxiliares reutilizáveis.</text:p>
      <text:p text:style-name="Text_20_body">Exemplos futuros:</text:p>
      <text:list text:style-name="L33">
        <text:list-item>
          <text:p text:style-name="P34">Formatação de datas.</text:p>
        </text:list-item>
        <text:list-item>
          <text:p text:style-name="P34">Conversão de texto.</text:p>
        </text:list-item>
        <text:list-item>
          <text:p text:style-name="P34">Utilidades de manipulação da URL.</text:p>
        </text:list-item>
        <text:list-item>
          <text:p text:style-name="P34">Funções genéricas que não pertencem a um módulo específico.</text:p>
        </text:list-item>
      </text:list>
      <text:p text:style-name="Horizontal_20_Line"/>
      <text:h text:style-name="Heading_20_1" text:outline-level="1"><text:soft-page-break/>Regras para o JavaScript</text:h>
      <text:p text:style-name="Text_20_body">Durante todo o desenvolvimento, seguiremos estas regras:</text:p>
      <text:list text:style-name="L34">
        <text:list-item>
          <text:p text:style-name="P35">Cada arquivo terá <text:span text:style-name="Strong_20_Emphasis">uma única responsabilidade</text:span>.</text:p>
        </text:list-item>
        <text:list-item>
          <text:p text:style-name="P35">Nenhum arquivo poderá duplicar funções existentes em outro módulo.</text:p>
        </text:list-item>
        <text:list-item>
          <text:p text:style-name="P35">Os dados serão carregados exclusivamente por <text:span text:style-name="Source_20_Text">api.js</text:span>.</text:p>
        </text:list-item>
        <text:list-item>
          <text:p text:style-name="P35">As páginas HTML não conterão lógica JavaScript inline.</text:p>
        </text:list-item>
        <text:list-item>
          <text:p text:style-name="P35">As funções deverão ter nomes claros e descritivos.</text:p>
        </text:list-item>
      </text:list>
      <text:p text:style-name="Horizontal_20_Line"/>
      <text:h text:style-name="Heading_20_2" text:outline-level="2">Resultado da Sprint 2.4</text:h>
      <text:p text:style-name="Text_20_body">Ao final desta etapa, definimos a arquitetura da camada de lógica da aplicação.</text:p>
      <text:h text:style-name="Heading_20_3" text:outline-level="3">Checklist atualizado</text:h>
      <text:list text:style-name="L35">
        <text:list-item>
          <text:p text:style-name="P36">✅ Definir a estrutura definitiva das pastas.</text:p>
        </text:list-item>
        <text:list-item>
          <text:p text:style-name="P36">✅ Organizar os arquivos HTML.</text:p>
        </text:list-item>
        <text:list-item>
          <text:p text:style-name="P36">✅ Organizar os arquivos CSS.</text:p>
        </text:list-item>
        <text:list-item>
          <text:p text:style-name="P36">✅ Organizar os arquivos JavaScript.</text:p>
        </text:list-item>
        <text:list-item>
          <text:p text:style-name="P36">⏳ Criar a estrutura inicial do <text:span text:style-name="Source_20_Text">livros.json</text:span>.</text:p>
        </text:list-item>
        <text:list-item>
          <text:p text:style-name="P36">⏳ Definir o padrão dos componentes reutilizáveis.</text:p>
        </text:list-item>
        <text:list-item>
          <text:p text:style-name="P36">⏳ Atualizar a documentação da arquitetura.</text:p>
        </text:list-item>
      </text:list>
      <text:p text:style-name="Horizontal_20_Line"/>
      <text:p text:style-name="Text_20_body">A próxima sprint (<text:span text:style-name="Strong_20_Emphasis">2.5</text:span>) será uma das mais importantes do projeto: <text:span text:style-name="Strong_20_Emphasis">projetar a estrutura do </text:span><text:span text:style-name="Strong_20_Emphasis"><text:span text:style-name="Source_20_Text">livros.json</text:span></text:span>. Essa decisão vai determinar como todo o conteúdo da plataforma será organizado e consumido pela aplicação. Uma boa modelagem agora evitará muitos problemas no futuro.</text:p>
      <text:p text:style-name="Text_20_body">Perfeito. Esta é, na minha opinião, <text:span text:style-name="Strong_20_Emphasis">a sprint mais importante de toda a Fase 2</text:span>.</text:p>
      <text:p text:style-name="Text_20_body">O motivo é simples:</text:p>
      <text:p text:style-name="Quotations"><text:span text:style-name="Strong_20_Emphasis">Se modelarmos os dados corretamente agora, todo o restante do projeto ficará muito mais fácil.</text:span></text:p>
      <text:p text:style-name="Text_20_body">É exatamente por isso que, em equipes profissionais, a modelagem dos dados costuma acontecer antes do desenvolvimento das telas.</text:p>
      <text:p text:style-name="Horizontal_20_Line"/>
      <text:h text:style-name="Heading_20_1" text:outline-level="1"><text:soft-page-break/>Sprint 2.5 — Criar a estrutura inicial do <text:span text:style-name="Source_20_Text">livros.json</text:span></text:h>
      <text:h text:style-name="Heading_20_2" text:outline-level="2">Objetivo</text:h>
      <text:p text:style-name="Text_20_body">Definir como as informações das obras serão armazenadas para que a aplicação consiga:</text:p>
      <text:list text:style-name="L36">
        <text:list-item>
          <text:p text:style-name="P37">listar livros na biblioteca;</text:p>
        </text:list-item>
        <text:list-item>
          <text:p text:style-name="P37">pesquisar;</text:p>
        </text:list-item>
        <text:list-item>
          <text:p text:style-name="P37">filtrar;</text:p>
        </text:list-item>
        <text:list-item>
          <text:p text:style-name="P37">abrir uma obra;</text:p>
        </text:list-item>
        <text:list-item>
          <text:p text:style-name="P37">mostrar informações históricas;</text:p>
        </text:list-item>
        <text:list-item>
          <text:p text:style-name="P37">carregar o conteúdo da leitura.</text:p>
        </text:list-item>
      </text:list>
      <text:p text:style-name="Horizontal_20_Line"/>
      <text:h text:style-name="Heading_20_1" text:outline-level="1">Primeiro erro que quero evitar</text:h>
      <text:p text:style-name="Text_20_body">No planejamento inicial havia apenas um arquivo:</text:p>
      <text:p text:style-name="P1"><text:span text:style-name="Source_20_Text">livros.json</text:span></text:p>
      <text:p text:style-name="Text_20_body">A ideia era colocar tudo nele.</text:p>
      <text:p text:style-name="Text_20_body">Quando o projeto crescer, isso será um problema.</text:p>
      <text:p text:style-name="Text_20_body">Imagine:</text:p>
      <text:list text:style-name="L37">
        <text:list-item>
          <text:p text:style-name="P38">Evangelho de Tomé</text:p>
        </text:list-item>
        <text:list-item>
          <text:p text:style-name="P38">Evangelho de Maria</text:p>
        </text:list-item>
        <text:list-item>
          <text:p text:style-name="P38">Livro de Enoque</text:p>
        </text:list-item>
        <text:list-item>
          <text:p text:style-name="P38">Pistis Sophia</text:p>
        </text:list-item>
        <text:list-item>
          <text:p text:style-name="P38">Evangelho de Filipe</text:p>
        </text:list-item>
        <text:list-item>
          <text:p text:style-name="P38">Evangelho da Verdade</text:p>
        </text:list-item>
        <text:list-item>
          <text:p text:style-name="P38">Apócrifo de João</text:p>
        </text:list-item>
      </text:list>
      <text:p text:style-name="Text_20_body">Depois:</text:p>
      <text:list text:style-name="L38">
        <text:list-item>
          <text:p text:style-name="P39">Manuscritos do Mar Morto</text:p>
        </text:list-item>
      </text:list>
      <text:p text:style-name="Text_20_body">Depois:</text:p>
      <text:list text:style-name="L39">
        <text:list-item>
          <text:p text:style-name="P40">Nag Hammadi completo</text:p>
        </text:list-item>
      </text:list>
      <text:p text:style-name="Text_20_body">Depois:</text:p>
      <text:list text:style-name="L40">
        <text:list-item>
          <text:p text:style-name="P41"><text:soft-page-break/>Evangelhos da infância</text:p>
        </text:list-item>
      </text:list>
      <text:p text:style-name="Text_20_body">Depois:</text:p>
      <text:list text:style-name="L41">
        <text:list-item>
          <text:p text:style-name="P42">dezenas de comentários...</text:p>
        </text:list-item>
      </text:list>
      <text:p text:style-name="Text_20_body">O arquivo ficará enorme.</text:p>
      <text:p text:style-name="Horizontal_20_Line"/>
      <text:h text:style-name="Heading_20_1" text:outline-level="1">A solução</text:h>
      <text:p text:style-name="Text_20_body">Em vez disso, vamos separar <text:span text:style-name="Strong_20_Emphasis">catálogo</text:span> de <text:span text:style-name="Strong_20_Emphasis">conteúdo</text:span>.</text:p>
      <text:p text:style-name="Text_20_body">Nossa estrutura será:</text:p>
      <text:p text:style-name="Preformatted_20_Text"><text:span text:style-name="Source_20_Text">assets/</text:span></text:p>
      <text:p text:style-name="Preformatted_20_Text"><text:span text:style-name="Source_20_Text">└── dados/</text:span></text:p>
      <text:p text:style-name="Preformatted_20_Text"><text:span text:style-name="Source_20_Text"><text:s text:c="4"/>├── livros.json</text:span></text:p>
      <text:p text:style-name="Preformatted_20_Text"><text:span text:style-name="Source_20_Text"><text:s text:c="4"/>├── categorias.json</text:span></text:p>
      <text:p text:style-name="Preformatted_20_Text"><text:span text:style-name="Source_20_Text"><text:s text:c="4"/>├── autores.json</text:span></text:p>
      <text:p text:style-name="Preformatted_20_Text"><text:span text:style-name="Source_20_Text"><text:s text:c="4"/>└── livros/</text:span></text:p>
      <text:p text:style-name="Preformatted_20_Text"><text:span text:style-name="Source_20_Text"><text:s text:c="8"/>├── evangelho-tomas.json</text:span></text:p>
      <text:p text:style-name="Preformatted_20_Text"><text:span text:style-name="Source_20_Text"><text:s text:c="8"/>├── evangelho-maria.json</text:span></text:p>
      <text:p text:style-name="P1"><text:span text:style-name="Source_20_Text"><text:s text:c="8"/>├── livro-enoque.json</text:span></text:p>
      <text:p text:style-name="Text_20_body">Essa separação é usada em muitos sistemas de gerenciamento de conteúdo.</text:p>
      <text:p text:style-name="Horizontal_20_Line"/>
      <text:h text:style-name="Heading_20_1" text:outline-level="1">Responsabilidade de cada arquivo</text:h>
      <text:h text:style-name="Heading_20_2" text:outline-level="2"><text:span text:style-name="Source_20_Text">livros.json</text:span></text:h>
      <text:p text:style-name="Text_20_body">Será o catálogo.</text:p>
      <text:p text:style-name="Text_20_body">Ele responderá perguntas como:</text:p>
      <text:list text:style-name="L42">
        <text:list-item>
          <text:p text:style-name="P43">Quais livros existem?</text:p>
        </text:list-item>
        <text:list-item>
          <text:p text:style-name="P43">Qual é o título?</text:p>
        </text:list-item>
        <text:list-item>
          <text:p text:style-name="P43">Quem é o autor atribuído?</text:p>
        </text:list-item>
        <text:list-item>
          <text:p text:style-name="P43">Qual a categoria?</text:p>
        </text:list-item>
        <text:list-item>
          <text:p text:style-name="P43">Onde está o arquivo completo?</text:p>
        </text:list-item>
      </text:list>
      <text:p text:style-name="Text_20_body">Ele <text:span text:style-name="Strong_20_Emphasis">não</text:span> armazenará o texto da obra.</text:p>
      <text:p text:style-name="Horizontal_20_Line"/>
      <text:h text:style-name="Heading_20_2" text:outline-level="2"><text:span text:style-name="Source_20_Text">categorias.json</text:span></text:h>
      <text:p text:style-name="Text_20_body">Lista todas as categorias da biblioteca.</text:p>
      <text:p text:style-name="Text_20_body">Exemplo:</text:p>
      <text:list text:style-name="L43">
        <text:list-item>
          <text:p text:style-name="P44"><text:soft-page-break/>Nag Hammadi</text:p>
        </text:list-item>
        <text:list-item>
          <text:p text:style-name="P44">Evangelhos</text:p>
        </text:list-item>
        <text:list-item>
          <text:p text:style-name="P44">Apocalipses</text:p>
        </text:list-item>
        <text:list-item>
          <text:p text:style-name="P44">Atos</text:p>
        </text:list-item>
        <text:list-item>
          <text:p text:style-name="P44">Manuscritos do Mar Morto</text:p>
        </text:list-item>
      </text:list>
      <text:p text:style-name="Text_20_body">Assim evitamos repetir o nome da categoria em vários lugares.</text:p>
      <text:p text:style-name="Horizontal_20_Line"/>
      <text:h text:style-name="Heading_20_2" text:outline-level="2"><text:span text:style-name="Source_20_Text">autores.json</text:span></text:h>
      <text:p text:style-name="Text_20_body">Armazena informações sobre autores atribuídos ou tradicionais.</text:p>
      <text:p text:style-name="Text_20_body">Exemplo:</text:p>
      <text:list text:style-name="L44">
        <text:list-item>
          <text:p text:style-name="P45">Tomé</text:p>
        </text:list-item>
        <text:list-item>
          <text:p text:style-name="P45">Maria Madalena</text:p>
        </text:list-item>
        <text:list-item>
          <text:p text:style-name="P45">Enoque</text:p>
        </text:list-item>
      </text:list>
      <text:p text:style-name="Text_20_body">Com isso, futuramente podemos criar páginas específicas para cada autor.</text:p>
      <text:p text:style-name="Horizontal_20_Line"/>
      <text:h text:style-name="Heading_20_2" text:outline-level="2"><text:span text:style-name="Source_20_Text">livros/</text:span></text:h>
      <text:p text:style-name="Text_20_body">Cada obra terá seu próprio arquivo.</text:p>
      <text:p text:style-name="Text_20_body">Por exemplo:</text:p>
      <text:p text:style-name="Preformatted_20_Text"><text:span text:style-name="Source_20_Text">livros/</text:span></text:p>
      <text:p text:style-name="Preformatted_20_Text"/>
      <text:p text:style-name="P1"><text:span text:style-name="Source_20_Text">evangelho-tomas.json</text:span></text:p>
      <text:p text:style-name="Text_20_body">Esse arquivo conterá:</text:p>
      <text:list text:style-name="L45">
        <text:list-item>
          <text:p text:style-name="P46">introdução;</text:p>
        </text:list-item>
        <text:list-item>
          <text:p text:style-name="P46">contexto histórico;</text:p>
        </text:list-item>
        <text:list-item>
          <text:p text:style-name="P46">seções;</text:p>
        </text:list-item>
        <text:list-item>
          <text:p text:style-name="P46">comentários;</text:p>
        </text:list-item>
        <text:list-item>
          <text:p text:style-name="P46">referências.</text:p>
        </text:list-item>
      </text:list>
      <text:p text:style-name="Horizontal_20_Line"/>
      <text:h text:style-name="Heading_20_1" text:outline-level="1">Estrutura do catálogo</text:h>
      <text:p text:style-name="Text_20_body">O catálogo precisa conter apenas os metadados necessários para listar e localizar uma obra.</text:p>
      <text:p text:style-name="Text_20_body">Os campos que proponho são:</text:p>
      <table:table table:name="Tabela4" table:style-name="Tabela4">
        <table:table-column table:style-name="Tabela4.A"/>
        <table:table-column table:style-name="Tabela4.B"/>
        <table:table-header-rows>
          <text:soft-page-break/>
          <table:table-row>
            <table:table-cell table:style-name="Tabela4.A1" office:value-type="string">
              <text:p text:style-name="Table_20_Heading">Campo</text:p>
            </table:table-cell>
            <table:table-cell table:style-name="Tabela4.A1" office:value-type="string">
              <text:p text:style-name="Table_20_Heading">Finalidade</text:p>
            </table:table-cell>
          </table:table-row>
        </table:table-header-rows>
        <table:table-row>
          <table:table-cell table:style-name="Tabela4.A1" office:value-type="string">
            <text:p text:style-name="Table_20_Contents"><text:span text:style-name="Source_20_Text">id</text:span></text:p>
          </table:table-cell>
          <table:table-cell table:style-name="Tabela4.A1" office:value-type="string">
            <text:p text:style-name="Table_20_Contents">Identificador único da obra.</text:p>
          </table:table-cell>
        </table:table-row>
        <table:table-row>
          <table:table-cell table:style-name="Tabela4.A1" office:value-type="string">
            <text:p text:style-name="Table_20_Contents"><text:span text:style-name="Source_20_Text">slug</text:span></text:p>
          </table:table-cell>
          <table:table-cell table:style-name="Tabela4.A1" office:value-type="string">
            <text:p text:style-name="Table_20_Contents">Identificador usado na URL e no nome do arquivo.</text:p>
          </table:table-cell>
        </table:table-row>
        <table:table-row>
          <table:table-cell table:style-name="Tabela4.A1" office:value-type="string">
            <text:p text:style-name="Table_20_Contents"><text:span text:style-name="Source_20_Text">titulo</text:span></text:p>
          </table:table-cell>
          <table:table-cell table:style-name="Tabela4.A1" office:value-type="string">
            <text:p text:style-name="Table_20_Contents">Nome da obra.</text:p>
          </table:table-cell>
        </table:table-row>
        <table:table-row>
          <table:table-cell table:style-name="Tabela4.A1" office:value-type="string">
            <text:p text:style-name="Table_20_Contents"><text:span text:style-name="Source_20_Text">subtitulo</text:span></text:p>
          </table:table-cell>
          <table:table-cell table:style-name="Tabela4.A1" office:value-type="string">
            <text:p text:style-name="Table_20_Contents">Complemento do título (quando existir).</text:p>
          </table:table-cell>
        </table:table-row>
        <table:table-row>
          <table:table-cell table:style-name="Tabela4.A1" office:value-type="string">
            <text:p text:style-name="Table_20_Contents"><text:span text:style-name="Source_20_Text">autorId</text:span></text:p>
          </table:table-cell>
          <table:table-cell table:style-name="Tabela4.A1" office:value-type="string">
            <text:p text:style-name="Table_20_Contents">Referência ao autor em <text:span text:style-name="Source_20_Text">autores.json</text:span>.</text:p>
          </table:table-cell>
        </table:table-row>
        <table:table-row>
          <table:table-cell table:style-name="Tabela4.A1" office:value-type="string">
            <text:p text:style-name="Table_20_Contents"><text:span text:style-name="Source_20_Text">categoriaId</text:span></text:p>
          </table:table-cell>
          <table:table-cell table:style-name="Tabela4.A1" office:value-type="string">
            <text:p text:style-name="Table_20_Contents">Referência à categoria em <text:span text:style-name="Source_20_Text">categorias.json</text:span>.</text:p>
          </table:table-cell>
        </table:table-row>
        <table:table-row>
          <table:table-cell table:style-name="Tabela4.A1" office:value-type="string">
            <text:p text:style-name="Table_20_Contents"><text:span text:style-name="Source_20_Text">descricao</text:span></text:p>
          </table:table-cell>
          <table:table-cell table:style-name="Tabela4.A1" office:value-type="string">
            <text:p text:style-name="Table_20_Contents">Resumo da obra.</text:p>
          </table:table-cell>
        </table:table-row>
        <table:table-row>
          <table:table-cell table:style-name="Tabela4.A1" office:value-type="string">
            <text:p text:style-name="Table_20_Contents"><text:span text:style-name="Source_20_Text">tempoLeitura</text:span></text:p>
          </table:table-cell>
          <table:table-cell table:style-name="Tabela4.A1" office:value-type="string">
            <text:p text:style-name="Table_20_Contents">Tempo estimado de leitura.</text:p>
          </table:table-cell>
        </table:table-row>
        <table:table-row>
          <table:table-cell table:style-name="Tabela4.A1" office:value-type="string">
            <text:p text:style-name="Table_20_Contents"><text:span text:style-name="Source_20_Text">idiomaOriginal</text:span></text:p>
          </table:table-cell>
          <table:table-cell table:style-name="Tabela4.A1" office:value-type="string">
            <text:p text:style-name="Table_20_Contents">Idioma do manuscrito original.</text:p>
          </table:table-cell>
        </table:table-row>
        <table:table-row>
          <table:table-cell table:style-name="Tabela4.A1" office:value-type="string">
            <text:p text:style-name="Table_20_Contents"><text:span text:style-name="Source_20_Text">periodo</text:span></text:p>
          </table:table-cell>
          <table:table-cell table:style-name="Tabela4.A1" office:value-type="string">
            <text:p text:style-name="Table_20_Contents">Data ou período aproximado da obra.</text:p>
          </table:table-cell>
        </table:table-row>
        <table:table-row>
          <table:table-cell table:style-name="Tabela4.A1" office:value-type="string">
            <text:p text:style-name="Table_20_Contents"><text:span text:style-name="Source_20_Text">manuscrito</text:span></text:p>
          </table:table-cell>
          <table:table-cell table:style-name="Tabela4.A1" office:value-type="string">
            <text:p text:style-name="Table_20_Contents">Coleção ou manuscrito de origem.</text:p>
          </table:table-cell>
        </table:table-row>
        <table:table-row>
          <table:table-cell table:style-name="Tabela4.A1" office:value-type="string">
            <text:p text:style-name="Table_20_Contents"><text:span text:style-name="Source_20_Text">capa</text:span></text:p>
          </table:table-cell>
          <table:table-cell table:style-name="Tabela4.A1" office:value-type="string">
            <text:p text:style-name="Table_20_Contents">Caminho da imagem de capa.</text:p>
          </table:table-cell>
        </table:table-row>
        <table:table-row>
          <table:table-cell table:style-name="Tabela4.A1" office:value-type="string">
            <text:p text:style-name="Table_20_Contents"><text:span text:style-name="Source_20_Text">arquivo</text:span></text:p>
          </table:table-cell>
          <table:table-cell table:style-name="Tabela4.A1" office:value-type="string">
            <text:p text:style-name="Table_20_Contents">Nome do arquivo JSON da obra.</text:p>
          </table:table-cell>
        </table:table-row>
        <table:table-row>
          <table:table-cell table:style-name="Tabela4.A1" office:value-type="string">
            <text:p text:style-name="Table_20_Contents"><text:span text:style-name="Source_20_Text">destaque</text:span></text:p>
          </table:table-cell>
          <table:table-cell table:style-name="Tabela4.A1" office:value-type="string">
            <text:p text:style-name="Table_20_Contents">Indica se a obra aparece na página inicial.</text:p>
          </table:table-cell>
        </table:table-row>
      </table:table>
      <text:p text:style-name="Text_20_body">Perceba que <text:span text:style-name="Strong_20_Emphasis">nenhum desses campos contém o texto da obra</text:span>.</text:p>
      <text:p text:style-name="Horizontal_20_Line"/>
      <text:h text:style-name="Heading_20_1" text:outline-level="1">Estrutura de cada livro</text:h>
      <text:p text:style-name="Text_20_body">Cada arquivo da pasta <text:span text:style-name="Source_20_Text">livros/</text:span> representará <text:span text:style-name="Strong_20_Emphasis">uma única obra</text:span>.</text:p>
      <text:p text:style-name="Text_20_body">Ele poderá conter:</text:p>
      <text:list text:style-name="L46">
        <text:list-item>
          <text:p text:style-name="P47">informações completas da obra;</text:p>
        </text:list-item>
        <text:list-item>
          <text:p text:style-name="P47">introdução;</text:p>
        </text:list-item>
        <text:list-item>
          <text:p text:style-name="P47">contexto histórico;</text:p>
        </text:list-item>
        <text:list-item>
          <text:p text:style-name="P47">estrutura;</text:p>
        </text:list-item>
        <text:list-item>
          <text:p text:style-name="P47">seções;</text:p>
        </text:list-item>
        <text:list-item>
          <text:p text:style-name="P47">comentários;</text:p>
        </text:list-item>
        <text:list-item>
          <text:p text:style-name="P47">referências.</text:p>
        </text:list-item>
      </text:list>
      <text:p text:style-name="Text_20_body">Isso torna a aplicação muito mais organizada e preparada para crescer.</text:p>
      <text:p text:style-name="Horizontal_20_Line"/>
      <text:h text:style-name="Heading_20_1" text:outline-level="1">Uma decisão que fará diferença no futuro</text:h>
      <text:p text:style-name="Text_20_body">Gostaria de propor uma pequena melhoria em relação ao planejamento inicial.</text:p>
      <text:p text:style-name="Text_20_body">Em vez de identificar um livro por um número:</text:p>
      <text:p text:style-name="Preformatted_20_Text"><text:span text:style-name="Source_20_Text">1</text:span></text:p>
      <text:p text:style-name="Preformatted_20_Text"><text:span text:style-name="Source_20_Text">2</text:span></text:p>
      <text:p text:style-name="P1"><text:span text:style-name="Source_20_Text">3</text:span></text:p>
      <text:p text:style-name="Text_20_body"><text:soft-page-break/>podemos usar um identificador textual, por exemplo:</text:p>
      <text:p text:style-name="Preformatted_20_Text"><text:span text:style-name="Source_20_Text">evangelho-tomas</text:span></text:p>
      <text:p text:style-name="Preformatted_20_Text"/>
      <text:p text:style-name="Preformatted_20_Text"><text:span text:style-name="Source_20_Text">evangelho-maria</text:span></text:p>
      <text:p text:style-name="Preformatted_20_Text"/>
      <text:p text:style-name="P1"><text:span text:style-name="Source_20_Text">livro-enoque</text:span></text:p>
      <text:p text:style-name="Text_20_body">Esses identificadores (slugs) são mais legíveis, funcionam melhor nas URLs e evitam ambiguidades.</text:p>
      <text:p text:style-name="Text_20_body">Assim, uma URL ficaria:</text:p>
      <text:p text:style-name="P1"><text:span text:style-name="Source_20_Text">leitura.html?livro=evangelho-tomas</text:span></text:p>
      <text:p text:style-name="Text_20_body">em vez de:</text:p>
      <text:p text:style-name="P1"><text:span text:style-name="Source_20_Text">leitura.html?id=3</text:span></text:p>
      <text:p text:style-name="Text_20_body">Essa abordagem é muito comum em aplicações modernas porque facilita a manutenção, melhora a leitura das URLs e torna o código mais intuitivo.</text:p>
      <text:h text:style-name="Heading_20_2" text:outline-level="2">Minha recomendação</text:h>
      <text:p text:style-name="Text_20_body">Usar <text:span text:style-name="Strong_20_Emphasis">slugs</text:span> como identificadores principais da aplicação.</text:p>
      <text:p text:style-name="Text_20_body">É uma decisão simples agora, mas que trará benefícios durante todo o desenvolvimento do projeto.</text:p>
      <text:p text:style-name="Text_20_body">Excelente. Essa é uma decisão de arquitetura que dificilmente precisaremos mudar no futuro.</text:p>
      <text:p text:style-name="Text_20_body">Agora vamos finalizar a <text:span text:style-name="Strong_20_Emphasis">Sprint 2.5</text:span> definindo um padrão que será seguido por todo o projeto.</text:p>
      <text:p text:style-name="Horizontal_20_Line"/>
      <text:h text:style-name="Heading_20_1" text:outline-level="1">Decisão Arquitetural 03 — Organização dos Dados</text:h>
      <text:p text:style-name="Text_20_body">A Biblioteca Apócrifa utilizará uma arquitetura orientada a conteúdo.</text:p>
      <text:p text:style-name="Text_20_body">Isso significa que o projeto separará:</text:p>
      <text:list text:style-name="L47">
        <text:list-item>
          <text:p text:style-name="P48"><text:span text:style-name="Strong_20_Emphasis">metadados</text:span> das obras;</text:p>
        </text:list-item>
        <text:list-item>
          <text:p text:style-name="P48"><text:span text:style-name="Strong_20_Emphasis">conteúdo</text:span> das obras;</text:p>
        </text:list-item>
        <text:list-item>
          <text:p text:style-name="P48"><text:span text:style-name="Strong_20_Emphasis">autores</text:span>;</text:p>
        </text:list-item>
        <text:list-item>
          <text:p text:style-name="P48"><text:span text:style-name="Strong_20_Emphasis">categorias</text:span>.</text:p>
        </text:list-item>
      </text:list>
      <text:p text:style-name="Text_20_body">Cada informação terá seu próprio arquivo.</text:p>
      <text:p text:style-name="Text_20_body">A estrutura definitiva será:</text:p>
      <text:p text:style-name="Preformatted_20_Text"><text:span text:style-name="Source_20_Text">assets/</text:span></text:p>
      <text:p text:style-name="Preformatted_20_Text"><text:span text:style-name="Source_20_Text">└── dados/</text:span></text:p>
      <text:p text:style-name="Preformatted_20_Text"><text:span text:style-name="Source_20_Text"><text:s text:c="4"/>├── livros.json</text:span></text:p>
      <text:p text:style-name="Preformatted_20_Text"><text:span text:style-name="Source_20_Text"><text:s text:c="4"/>├── categorias.json</text:span></text:p>
      <text:p text:style-name="Preformatted_20_Text"><text:soft-page-break/><text:span text:style-name="Source_20_Text"><text:s text:c="4"/>├── autores.json</text:span></text:p>
      <text:p text:style-name="Preformatted_20_Text"><text:span text:style-name="Source_20_Text"><text:s text:c="4"/>└── livros/</text:span></text:p>
      <text:p text:style-name="Preformatted_20_Text"><text:span text:style-name="Source_20_Text"><text:s text:c="8"/>├── evangelho-tomas.json</text:span></text:p>
      <text:p text:style-name="Preformatted_20_Text"><text:span text:style-name="Source_20_Text"><text:s text:c="8"/>├── evangelho-maria.json</text:span></text:p>
      <text:p text:style-name="Preformatted_20_Text"><text:span text:style-name="Source_20_Text"><text:s text:c="8"/>├── livro-enoque.json</text:span></text:p>
      <text:p text:style-name="P1"><text:span text:style-name="Source_20_Text"><text:s text:c="8"/>└── ...</text:span></text:p>
      <text:p text:style-name="Horizontal_20_Line"/>
      <text:h text:style-name="Heading_20_1" text:outline-level="1">Responsabilidade de cada arquivo</text:h>
      <text:h text:style-name="Heading_20_2" text:outline-level="2"><text:span text:style-name="Source_20_Text">livros.json</text:span></text:h>
      <text:p text:style-name="Text_20_body">Será apenas o catálogo da plataforma.</text:p>
      <text:p text:style-name="Text_20_body">Ele responderá perguntas como:</text:p>
      <text:list text:style-name="L48">
        <text:list-item>
          <text:p text:style-name="P49">Quais livros existem?</text:p>
        </text:list-item>
        <text:list-item>
          <text:p text:style-name="P49">Qual o título?</text:p>
        </text:list-item>
        <text:list-item>
          <text:p text:style-name="P49">Qual a categoria?</text:p>
        </text:list-item>
        <text:list-item>
          <text:p text:style-name="P49">Qual o autor?</text:p>
        </text:list-item>
        <text:list-item>
          <text:p text:style-name="P49">Onde está o arquivo completo?</text:p>
        </text:list-item>
      </text:list>
      <text:p text:style-name="Text_20_body">Ele <text:span text:style-name="Strong_20_Emphasis">não armazenará o texto da obra</text:span>.</text:p>
      <text:p text:style-name="Horizontal_20_Line"/>
      <text:h text:style-name="Heading_20_2" text:outline-level="2"><text:span text:style-name="Source_20_Text">autores.json</text:span></text:h>
      <text:p text:style-name="Text_20_body">Armazenará informações dos autores atribuídos.</text:p>
      <text:p text:style-name="Text_20_body">Exemplo:</text:p>
      <text:list text:style-name="L49">
        <text:list-item>
          <text:p text:style-name="P50">nome</text:p>
        </text:list-item>
        <text:list-item>
          <text:p text:style-name="P50">descrição</text:p>
        </text:list-item>
        <text:list-item>
          <text:p text:style-name="P50">período histórico</text:p>
        </text:list-item>
      </text:list>
      <text:p text:style-name="Horizontal_20_Line"/>
      <text:h text:style-name="Heading_20_2" text:outline-level="2"><text:span text:style-name="Source_20_Text">categorias.json</text:span></text:h>
      <text:p text:style-name="Text_20_body">Lista todas as categorias da plataforma.</text:p>
      <text:p text:style-name="Text_20_body">Exemplo:</text:p>
      <text:list text:style-name="L50">
        <text:list-item>
          <text:p text:style-name="P51">Evangelhos</text:p>
        </text:list-item>
        <text:list-item>
          <text:p text:style-name="P51">Atos</text:p>
        </text:list-item>
        <text:list-item>
          <text:p text:style-name="P51">Apocalipses</text:p>
        </text:list-item>
        <text:list-item>
          <text:p text:style-name="P51">Nag Hammadi</text:p>
        </text:list-item>
        <text:list-item>
          <text:p text:style-name="P51"><text:soft-page-break/>Manuscritos do Mar Morto</text:p>
        </text:list-item>
      </text:list>
      <text:p text:style-name="Horizontal_20_Line"/>
      <text:h text:style-name="Heading_20_2" text:outline-level="2"><text:span text:style-name="Source_20_Text">livros/</text:span></text:h>
      <text:p text:style-name="Text_20_body">Cada arquivo representa uma única obra.</text:p>
      <text:p text:style-name="Text_20_body">Por exemplo:</text:p>
      <text:p text:style-name="Preformatted_20_Text"><text:span text:style-name="Source_20_Text">livros/</text:span></text:p>
      <text:p text:style-name="Preformatted_20_Text"/>
      <text:p text:style-name="P1"><text:span text:style-name="Source_20_Text">evangelho-tomas.json</text:span></text:p>
      <text:p text:style-name="Text_20_body">Esse arquivo conterá apenas informações daquela obra.</text:p>
      <text:p text:style-name="Horizontal_20_Line"/>
      <text:h text:style-name="Heading_20_1" text:outline-level="1">Identificador oficial da aplicação</text:h>
      <text:p text:style-name="Text_20_body">Outra decisão importante.</text:p>
      <text:p text:style-name="Text_20_body">A partir de hoje <text:span text:style-name="Strong_20_Emphasis">não utilizaremos IDs numéricos</text:span>.</text:p>
      <text:p text:style-name="Text_20_body">Todos os livros serão identificados por um <text:span text:style-name="Strong_20_Emphasis">slug</text:span>.</text:p>
      <text:p text:style-name="Text_20_body">Exemplos:</text:p>
      <text:p text:style-name="Preformatted_20_Text"><text:span text:style-name="Source_20_Text">evangelho-tomas</text:span></text:p>
      <text:p text:style-name="Preformatted_20_Text"/>
      <text:p text:style-name="Preformatted_20_Text"><text:span text:style-name="Source_20_Text">evangelho-maria</text:span></text:p>
      <text:p text:style-name="Preformatted_20_Text"/>
      <text:p text:style-name="Preformatted_20_Text"><text:span text:style-name="Source_20_Text">livro-enoque</text:span></text:p>
      <text:p text:style-name="Preformatted_20_Text"/>
      <text:p text:style-name="Preformatted_20_Text"><text:span text:style-name="Source_20_Text">pistis-sophia</text:span></text:p>
      <text:p text:style-name="Preformatted_20_Text"/>
      <text:p text:style-name="P1"><text:span text:style-name="Source_20_Text">evangelho-filipe</text:span></text:p>
      <text:p text:style-name="Text_20_body">Isso será utilizado:</text:p>
      <text:list text:style-name="L51">
        <text:list-item>
          <text:p text:style-name="P52">no JSON;</text:p>
        </text:list-item>
        <text:list-item>
          <text:p text:style-name="P52">nas URLs;</text:p>
        </text:list-item>
        <text:list-item>
          <text:p text:style-name="P52">nas pesquisas;</text:p>
        </text:list-item>
        <text:list-item>
          <text:p text:style-name="P52">nas imagens;</text:p>
        </text:list-item>
        <text:list-item>
          <text:p text:style-name="P52">nos arquivos.</text:p>
        </text:list-item>
      </text:list>
      <text:p text:style-name="Text_20_body">Exemplo:</text:p>
      <text:p text:style-name="P1"><text:span text:style-name="Source_20_Text">leitura.html?livro=evangelho-tomas</text:span></text:p>
      <text:p text:style-name="Text_20_body">Essa decisão deixa a aplicação mais legível e consistente.</text:p>
      <text:p text:style-name="Horizontal_20_Line"/>
      <text:h text:style-name="Heading_20_1" text:outline-level="1"><text:soft-page-break/>Convenções do projeto</text:h>
      <text:p text:style-name="Text_20_body">Para manter a organização, definimos algumas regras:</text:p>
      <text:h text:style-name="Heading_20_2" text:outline-level="2">Nomes de arquivos</text:h>
      <text:p text:style-name="Text_20_body">Todos em letras minúsculas.</text:p>
      <text:p text:style-name="P1"><text:span text:style-name="Source_20_Text">evangelho-tomas.json</text:span></text:p>
      <text:p text:style-name="Text_20_body">Nunca:</text:p>
      <text:p text:style-name="P1"><text:span text:style-name="Source_20_Text">EvangelhoTomás.JSON</text:span></text:p>
      <text:p text:style-name="Horizontal_20_Line"/>
      <text:h text:style-name="Heading_20_2" text:outline-level="2">Separador de palavras</text:h>
      <text:p text:style-name="Text_20_body">Sempre hífen (<text:span text:style-name="Source_20_Text">-</text:span>).</text:p>
      <text:p text:style-name="Text_20_body">Exemplo:</text:p>
      <text:p text:style-name="P1"><text:span text:style-name="Source_20_Text">livro-enoque.json</text:span></text:p>
      <text:p text:style-name="Text_20_body">Nunca:</text:p>
      <text:p text:style-name="P1"><text:span text:style-name="Source_20_Text">livro_enoque.json</text:span></text:p>
      <text:p text:style-name="Text_20_body">ou</text:p>
      <text:p text:style-name="P1"><text:span text:style-name="Source_20_Text">livroEnoque.json</text:span></text:p>
      <text:p text:style-name="Horizontal_20_Line"/>
      <text:h text:style-name="Heading_20_2" text:outline-level="2">Idioma</text:h>
      <text:p text:style-name="Text_20_body">Toda a estrutura da aplicação continuará em <text:span text:style-name="Strong_20_Emphasis">português</text:span>, pois o projeto é desenvolvido nesse idioma.</text:p>
      <text:p text:style-name="Text_20_body">Exemplos:</text:p>
      <text:p text:style-name="Preformatted_20_Text"><text:span text:style-name="Source_20_Text">livros.json</text:span></text:p>
      <text:p text:style-name="Preformatted_20_Text"/>
      <text:p text:style-name="Preformatted_20_Text"><text:span text:style-name="Source_20_Text">categorias.json</text:span></text:p>
      <text:p text:style-name="Preformatted_20_Text"/>
      <text:p text:style-name="Preformatted_20_Text"><text:span text:style-name="Source_20_Text">autores.json</text:span></text:p>
      <text:p text:style-name="Preformatted_20_Text"/>
      <text:p text:style-name="Preformatted_20_Text"><text:span text:style-name="Source_20_Text">biblioteca.html</text:span></text:p>
      <text:p text:style-name="Preformatted_20_Text"/>
      <text:p text:style-name="P1"><text:span text:style-name="Source_20_Text">leitura.html</text:span></text:p>
      <text:p text:style-name="Text_20_body">Isso torna a documentação e o código mais coerentes para quem contribuir com o projeto.</text:p>
      <text:p text:style-name="Horizontal_20_Line"/>
      <text:h text:style-name="Heading_20_1" text:outline-level="1"><text:soft-page-break/>Checklist atualizado</text:h>
      <text:p text:style-name="Text_20_body">Agora temos:</text:p>
      <text:list text:style-name="L52">
        <text:list-item>
          <text:p text:style-name="P53">✅ Definir a estrutura definitiva das pastas.</text:p>
        </text:list-item>
        <text:list-item>
          <text:p text:style-name="P53">✅ Organizar os arquivos HTML.</text:p>
        </text:list-item>
        <text:list-item>
          <text:p text:style-name="P53">✅ Organizar os arquivos CSS.</text:p>
        </text:list-item>
        <text:list-item>
          <text:p text:style-name="P53">✅ Organizar os arquivos JavaScript.</text:p>
        </text:list-item>
        <text:list-item>
          <text:p text:style-name="P53">✅ Criar a estrutura inicial do <text:span text:style-name="Source_20_Text">livros.json</text:span>.</text:p>
        </text:list-item>
        <text:list-item>
          <text:p text:style-name="P53">⏳ Definir o padrão dos componentes reutilizáveis.</text:p>
        </text:list-item>
        <text:list-item>
          <text:p text:style-name="P53">⏳ Atualizar a documentação da arquitetura.</text:p>
        </text:list-item>
      </text:list>
      <text:p text:style-name="Horizontal_20_Line"/>
      <text:h text:style-name="Heading_20_1" text:outline-level="1">Próxima Sprint — 2.6: Definir o padrão dos componentes reutilizáveis</text:h>
      <text:p text:style-name="Text_20_body">Esta será outra etapa importante.</text:p>
      <text:p text:style-name="Text_20_body">Até agora decidimos <text:span text:style-name="Strong_20_Emphasis">onde os componentes ficarão</text:span> (<text:span text:style-name="Source_20_Text">components/</text:span>).</text:p>
      <text:p text:style-name="Text_20_body">Agora vamos definir <text:span text:style-name="Strong_20_Emphasis">como eles serão construídos</text:span>.</text:p>
      <text:p text:style-name="Text_20_body">Vamos responder perguntas como:</text:p>
      <text:list text:style-name="L53">
        <text:list-item>
          <text:p text:style-name="P54">O que caracteriza um componente?</text:p>
        </text:list-item>
        <text:list-item>
          <text:p text:style-name="P54">Como nomear os arquivos?</text:p>
        </text:list-item>
        <text:list-item>
          <text:p text:style-name="P54">Como carregá-los nas páginas?</text:p>
        </text:list-item>
        <text:list-item>
          <text:p text:style-name="P54">Quais componentes são obrigatórios na versão 1.0?</text:p>
        </text:list-item>
        <text:list-item>
          <text:p text:style-name="P54">Como evitar duplicação de HTML?</text:p>
        </text:list-item>
      </text:list>
      <text:p text:style-name="Text_20_body">Essa definição garantirá consistência em toda a interface e facilitará a manutenção conforme a plataforma evoluir.</text:p>
      <text:p text:style-name="Text_20_body">Perfeito. Vamos continuar.</text:p>
      <text:p text:style-name="Text_20_body">Agora entramos na última parte de definição da arquitetura antes da documentação.</text:p>
      <text:h text:style-name="Heading_20_1" text:outline-level="1">Sprint 2.6 — Definir o padrão dos componentes reutilizáveis</text:h>
      <text:h text:style-name="Heading_20_2" text:outline-level="2">Objetivo</text:h>
      <text:p text:style-name="Text_20_body">Criar uma regra clara para os componentes da interface.</text:p>
      <text:p text:style-name="Text_20_body"><text:soft-page-break/>A ideia principal é:</text:p>
      <text:p text:style-name="Quotations">Se um elemento aparece em mais de uma página ou possui uma função independente, ele deve ser tratado como um componente.</text:p>
      <text:p text:style-name="Text_20_body">Isso evita copiar e colar HTML em vários arquivos.</text:p>
      <text:p text:style-name="Horizontal_20_Line"/>
      <text:h text:style-name="Heading_20_1" text:outline-level="1">Estrutura dos componentes</text:h>
      <text:p text:style-name="Text_20_body">Nossa pasta ficará assim:</text:p>
      <text:p text:style-name="Preformatted_20_Text"><text:span text:style-name="Source_20_Text">components/</text:span></text:p>
      <text:p text:style-name="Preformatted_20_Text"><text:span text:style-name="Source_20_Text">│</text:span></text:p>
      <text:p text:style-name="Preformatted_20_Text"><text:span text:style-name="Source_20_Text">├── header.html</text:span></text:p>
      <text:p text:style-name="Preformatted_20_Text"><text:span text:style-name="Source_20_Text">├── navbar.html</text:span></text:p>
      <text:p text:style-name="Preformatted_20_Text"><text:span text:style-name="Source_20_Text">├── footer.html</text:span></text:p>
      <text:p text:style-name="Preformatted_20_Text"><text:span text:style-name="Source_20_Text">├── book-card.html</text:span></text:p>
      <text:p text:style-name="Preformatted_20_Text"><text:span text:style-name="Source_20_Text">├── search-bar.html</text:span></text:p>
      <text:p text:style-name="P1"><text:span text:style-name="Source_20_Text">└── loading.html</text:span></text:p>
      <text:p text:style-name="Horizontal_20_Line"/>
      <text:h text:style-name="Heading_20_1" text:outline-level="1">Responsabilidade de cada componente</text:h>
      <text:h text:style-name="Heading_20_2" text:outline-level="2">1. <text:span text:style-name="Source_20_Text">header.html</text:span></text:h>
      <text:p text:style-name="Text_20_body">Responsável pela identidade visual da plataforma.</text:p>
      <text:p text:style-name="Text_20_body">Contém:</text:p>
      <text:list text:style-name="L54">
        <text:list-item>
          <text:p text:style-name="P55">logo/nome da Biblioteca Apócrifa;</text:p>
        </text:list-item>
        <text:list-item>
          <text:p text:style-name="P55">apresentação visual do topo;</text:p>
        </text:list-item>
        <text:list-item>
          <text:p text:style-name="P55">elementos institucionais.</text:p>
        </text:list-item>
      </text:list>
      <text:p text:style-name="Text_20_body">Exemplo de uso:</text:p>
      <text:p text:style-name="P1"><text:span text:style-name="Source_20_Text">Todas as páginas</text:span></text:p>
      <text:p text:style-name="Horizontal_20_Line"/>
      <text:h text:style-name="Heading_20_2" text:outline-level="2">2. <text:span text:style-name="Source_20_Text">navbar.html</text:span></text:h>
      <text:p text:style-name="Text_20_body">Responsável pela navegação principal.</text:p>
      <text:p text:style-name="Text_20_body">Links:</text:p>
      <text:p text:style-name="Preformatted_20_Text"><text:span text:style-name="Source_20_Text">Início</text:span></text:p>
      <text:p text:style-name="Preformatted_20_Text"/>
      <text:p text:style-name="Preformatted_20_Text"><text:span text:style-name="Source_20_Text">Biblioteca</text:span></text:p>
      <text:p text:style-name="Preformatted_20_Text"/>
      <text:p text:style-name="Preformatted_20_Text"><text:span text:style-name="Source_20_Text">Comunidade</text:span></text:p>
      <text:p text:style-name="Preformatted_20_Text"/>
      <text:p text:style-name="P1"><text:soft-page-break/><text:span text:style-name="Source_20_Text">Perfil</text:span></text:p>
      <text:p text:style-name="Text_20_body">A navegação deve existir em todas as páginas.</text:p>
      <text:p text:style-name="Horizontal_20_Line"/>
      <text:h text:style-name="Heading_20_2" text:outline-level="2">3. <text:span text:style-name="Source_20_Text">footer.html</text:span></text:h>
      <text:p text:style-name="Text_20_body">Responsável pelas informações finais.</text:p>
      <text:p text:style-name="Text_20_body">Pode conter:</text:p>
      <text:list text:style-name="L55">
        <text:list-item>
          <text:p text:style-name="P56">copyright;</text:p>
        </text:list-item>
        <text:list-item>
          <text:p text:style-name="P56">licença;</text:p>
        </text:list-item>
        <text:list-item>
          <text:p text:style-name="P56">finalidade acadêmica;</text:p>
        </text:list-item>
        <text:list-item>
          <text:p text:style-name="P56">links importantes.</text:p>
        </text:list-item>
      </text:list>
      <text:p text:style-name="Horizontal_20_Line"/>
      <text:h text:style-name="Heading_20_2" text:outline-level="2">4. <text:span text:style-name="Source_20_Text">book-card.html</text:span></text:h>
      <text:p text:style-name="Text_20_body">Este será um dos componentes mais importantes.</text:p>
      <text:p text:style-name="Text_20_body">Ele representa uma obra dentro da biblioteca.</text:p>
      <text:p text:style-name="Text_20_body">Responsável por exibir:</text:p>
      <text:list text:style-name="L56">
        <text:list-item>
          <text:p text:style-name="P57">capa;</text:p>
        </text:list-item>
        <text:list-item>
          <text:p text:style-name="P57">título;</text:p>
        </text:list-item>
        <text:list-item>
          <text:p text:style-name="P57">autor;</text:p>
        </text:list-item>
        <text:list-item>
          <text:p text:style-name="P57">categoria;</text:p>
        </text:list-item>
        <text:list-item>
          <text:p text:style-name="P57">descrição curta;</text:p>
        </text:list-item>
        <text:list-item>
          <text:p text:style-name="P57">botão "Estudar".</text:p>
        </text:list-item>
      </text:list>
      <text:p text:style-name="Text_20_body">Exemplo:</text:p>
      <text:p text:style-name="Preformatted_20_Text"><text:span text:style-name="Source_20_Text">Biblioteca</text:span></text:p>
      <text:p text:style-name="Preformatted_20_Text"/>
      <text:p text:style-name="Preformatted_20_Text"><text:span text:style-name="Source_20_Text">↓</text:span></text:p>
      <text:p text:style-name="Preformatted_20_Text"/>
      <text:p text:style-name="Preformatted_20_Text"><text:span text:style-name="Source_20_Text">Lista de livros</text:span></text:p>
      <text:p text:style-name="Preformatted_20_Text"/>
      <text:p text:style-name="Preformatted_20_Text"><text:span text:style-name="Source_20_Text">↓</text:span></text:p>
      <text:p text:style-name="Preformatted_20_Text"/>
      <text:p text:style-name="P1"><text:span text:style-name="Source_20_Text">Vários book-card</text:span></text:p>
      <text:p text:style-name="Horizontal_20_Line"/>
      <text:h text:style-name="Heading_20_2" text:outline-level="2">5. <text:span text:style-name="Source_20_Text">search-bar.html</text:span></text:h>
      <text:p text:style-name="Text_20_body">Responsável pelo campo de pesquisa.</text:p>
      <text:p text:style-name="Text_20_body"><text:soft-page-break/>Será utilizado inicialmente na Biblioteca.</text:p>
      <text:p text:style-name="Text_20_body">Futuramente poderá ser reutilizado em:</text:p>
      <text:list text:style-name="L57">
        <text:list-item>
          <text:p text:style-name="P58">pesquisa avançada;</text:p>
        </text:list-item>
        <text:list-item>
          <text:p text:style-name="P58">glossário;</text:p>
        </text:list-item>
        <text:list-item>
          <text:p text:style-name="P58">referências.</text:p>
        </text:list-item>
      </text:list>
      <text:p text:style-name="Horizontal_20_Line"/>
      <text:h text:style-name="Heading_20_2" text:outline-level="2">6. <text:span text:style-name="Source_20_Text">loading.html</text:span></text:h>
      <text:p text:style-name="Text_20_body">Responsável pelo estado de carregamento.</text:p>
      <text:p text:style-name="Text_20_body">Exemplo:</text:p>
      <text:p text:style-name="Text_20_body">Quando a aplicação estiver buscando:</text:p>
      <text:p text:style-name="P1"><text:span text:style-name="Source_20_Text">Carregando obras...</text:span></text:p>
      <text:p text:style-name="Text_20_body">Isso melhora a experiência do usuário.</text:p>
      <text:p text:style-name="Horizontal_20_Line"/>
      <text:h text:style-name="Heading_20_1" text:outline-level="1">Regra de nomenclatura</text:h>
      <text:p text:style-name="Text_20_body">Todos os componentes seguirão:</text:p>
      <text:list text:style-name="L58">
        <text:list-item>
          <text:p text:style-name="P59">letras minúsculas;</text:p>
        </text:list-item>
        <text:list-item>
          <text:p text:style-name="P59">palavras separadas por hífen.</text:p>
        </text:list-item>
      </text:list>
      <text:p text:style-name="Text_20_body">Correto:</text:p>
      <text:p text:style-name="Preformatted_20_Text"><text:span text:style-name="Source_20_Text">book-card.html</text:span></text:p>
      <text:p text:style-name="P1"><text:span text:style-name="Source_20_Text">search-bar.html</text:span></text:p>
      <text:p text:style-name="Text_20_body">Incorreto:</text:p>
      <text:p text:style-name="Preformatted_20_Text"><text:span text:style-name="Source_20_Text">BookCard.html</text:span></text:p>
      <text:p text:style-name="Preformatted_20_Text"/>
      <text:p text:style-name="P1"><text:span text:style-name="Source_20_Text">book_card.html</text:span></text:p>
      <text:p text:style-name="Horizontal_20_Line"/>
      <text:h text:style-name="Heading_20_1" text:outline-level="1">Estrutura interna dos componentes</text:h>
      <text:p text:style-name="Text_20_body">Todos os componentes devem conter apenas HTML.</text:p>
      <text:p text:style-name="Text_20_body">Exemplo conceitual:</text:p>
      <text:p text:style-name="Preformatted_20_Text"><text:span text:style-name="Source_20_Text">&lt;div class="book-card"&gt;</text:span></text:p>
      <text:p text:style-name="Preformatted_20_Text"/>
      <text:p text:style-name="Preformatted_20_Text"><text:span text:style-name="Source_20_Text"><text:s text:c="4"/>&lt;img&gt;</text:span></text:p>
      <text:p text:style-name="Preformatted_20_Text"/>
      <text:p text:style-name="Preformatted_20_Text"><text:span text:style-name="Source_20_Text"><text:s text:c="4"/>&lt;h3&gt;&lt;/h3&gt;</text:span></text:p>
      <text:p text:style-name="Preformatted_20_Text"><text:soft-page-break/></text:p>
      <text:p text:style-name="Preformatted_20_Text"><text:span text:style-name="Source_20_Text"><text:s text:c="4"/>&lt;p&gt;&lt;/p&gt;</text:span></text:p>
      <text:p text:style-name="Preformatted_20_Text"/>
      <text:p text:style-name="Preformatted_20_Text"><text:span text:style-name="Source_20_Text"><text:s text:c="4"/>&lt;a&gt;&lt;/a&gt;</text:span></text:p>
      <text:p text:style-name="Preformatted_20_Text"/>
      <text:p text:style-name="P1"><text:span text:style-name="Source_20_Text">&lt;/div&gt;</text:span></text:p>
      <text:p text:style-name="Text_20_body">Não colocaremos:</text:p>
      <text:p text:style-name="Text_20_body">❌ JavaScript dentro do componente.</text:p>
      <text:p text:style-name="Text_20_body">❌ CSS dentro do componente.</text:p>
      <text:p text:style-name="Text_20_body">❌ Estilos inline.</text:p>
      <text:p text:style-name="Horizontal_20_Line"/>
      <text:h text:style-name="Heading_20_1" text:outline-level="1">Onde fica o CSS dos componentes?</text:h>
      <text:p text:style-name="Text_20_body">Todos os estilos ficam centralizados:</text:p>
      <text:p text:style-name="P1"><text:span text:style-name="Source_20_Text">assets/css/components.css</text:span></text:p>
      <text:p text:style-name="Text_20_body">Exemplo:</text:p>
      <text:p text:style-name="Preformatted_20_Text"><text:span text:style-name="Source_20_Text">.book-card {}</text:span></text:p>
      <text:p text:style-name="Preformatted_20_Text"/>
      <text:p text:style-name="Preformatted_20_Text"><text:span text:style-name="Source_20_Text">.navbar {}</text:span></text:p>
      <text:p text:style-name="Preformatted_20_Text"/>
      <text:p text:style-name="P1"><text:span text:style-name="Source_20_Text">.footer {}</text:span></text:p>
      <text:p text:style-name="Text_20_body">Isso mantém uma separação clara:</text:p>
      <text:p text:style-name="Preformatted_20_Text"><text:span text:style-name="Source_20_Text">HTML</text:span></text:p>
      <text:p text:style-name="Preformatted_20_Text"><text:span text:style-name="Source_20_Text"><text:s/>↓</text:span></text:p>
      <text:p text:style-name="Preformatted_20_Text"><text:span text:style-name="Source_20_Text">components/</text:span></text:p>
      <text:p text:style-name="Preformatted_20_Text"/>
      <text:p text:style-name="Preformatted_20_Text"><text:span text:style-name="Source_20_Text">CSS</text:span></text:p>
      <text:p text:style-name="Preformatted_20_Text"><text:span text:style-name="Source_20_Text"><text:s/>↓</text:span></text:p>
      <text:p text:style-name="Preformatted_20_Text"><text:span text:style-name="Source_20_Text">assets/css/</text:span></text:p>
      <text:p text:style-name="Preformatted_20_Text"/>
      <text:p text:style-name="Preformatted_20_Text"><text:span text:style-name="Source_20_Text">JavaScript</text:span></text:p>
      <text:p text:style-name="Preformatted_20_Text"><text:span text:style-name="Source_20_Text"><text:s/>↓</text:span></text:p>
      <text:p text:style-name="P1"><text:span text:style-name="Source_20_Text">assets/js/</text:span></text:p>
      <text:p text:style-name="Horizontal_20_Line"/>
      <text:h text:style-name="Heading_20_1" text:outline-level="1">Como os componentes serão carregados?</text:h>
      <text:p text:style-name="Text_20_body">Na versão inicial, utilizaremos JavaScript para inserir os componentes.</text:p>
      <text:p text:style-name="Text_20_body">Fluxo:</text:p>
      <text:p text:style-name="Preformatted_20_Text"><text:span text:style-name="Source_20_Text">Página HTML</text:span></text:p>
      <text:p text:style-name="Preformatted_20_Text"/>
      <text:p text:style-name="Preformatted_20_Text"><text:span text:style-name="Source_20_Text">↓</text:span></text:p>
      <text:p text:style-name="Preformatted_20_Text"/>
      <text:p text:style-name="Preformatted_20_Text"><text:span text:style-name="Source_20_Text">componentes.js</text:span></text:p>
      <text:p text:style-name="Preformatted_20_Text"/>
      <text:p text:style-name="Preformatted_20_Text"><text:soft-page-break/><text:span text:style-name="Source_20_Text">↓</text:span></text:p>
      <text:p text:style-name="Preformatted_20_Text"/>
      <text:p text:style-name="Preformatted_20_Text"><text:span text:style-name="Source_20_Text">Busca arquivo HTML</text:span></text:p>
      <text:p text:style-name="Preformatted_20_Text"/>
      <text:p text:style-name="Preformatted_20_Text"><text:span text:style-name="Source_20_Text">↓</text:span></text:p>
      <text:p text:style-name="Preformatted_20_Text"/>
      <text:p text:style-name="P1"><text:span text:style-name="Source_20_Text">Insere no documento</text:span></text:p>
      <text:p text:style-name="Text_20_body">Exemplo:</text:p>
      <text:p text:style-name="Text_20_body">A página possui:</text:p>
      <text:p text:style-name="P1"><text:span text:style-name="Source_20_Text">&lt;div data-component="navbar"&gt;&lt;/div&gt;</text:span></text:p>
      <text:p text:style-name="Text_20_body">O JavaScript identifica:</text:p>
      <text:p text:style-name="P1"><text:span text:style-name="Source_20_Text">data-component="navbar"</text:span></text:p>
      <text:p text:style-name="Text_20_body">Busca:</text:p>
      <text:p text:style-name="P1"><text:span text:style-name="Source_20_Text">components/navbar.html</text:span></text:p>
      <text:p text:style-name="Text_20_body">E insere o conteúdo.</text:p>
      <text:p text:style-name="Horizontal_20_Line"/>
      <text:h text:style-name="Heading_20_1" text:outline-level="1">Componentes obrigatórios na versão 1.0</text:h>
      <text:p text:style-name="Text_20_body">Para a primeira versão funcional teremos:</text:p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Table_20_Heading">Componente</text:p>
            </table:table-cell>
            <table:table-cell table:style-name="Tabela5.A1" office:value-type="string">
              <text:p text:style-name="Table_20_Heading">Prioridade</text:p>
            </table:table-cell>
          </table:table-row>
        </table:table-header-rows>
        <table:table-row>
          <table:table-cell table:style-name="Tabela5.A1" office:value-type="string">
            <text:p text:style-name="Table_20_Contents">Navbar</text:p>
          </table:table-cell>
          <table:table-cell table:style-name="Tabela5.A1" office:value-type="string">
            <text:p text:style-name="Table_20_Contents">Alta</text:p>
          </table:table-cell>
        </table:table-row>
        <table:table-row>
          <table:table-cell table:style-name="Tabela5.A1" office:value-type="string">
            <text:p text:style-name="Table_20_Contents">Header</text:p>
          </table:table-cell>
          <table:table-cell table:style-name="Tabela5.A1" office:value-type="string">
            <text:p text:style-name="Table_20_Contents">Alta</text:p>
          </table:table-cell>
        </table:table-row>
        <table:table-row>
          <table:table-cell table:style-name="Tabela5.A1" office:value-type="string">
            <text:p text:style-name="Table_20_Contents">Footer</text:p>
          </table:table-cell>
          <table:table-cell table:style-name="Tabela5.A1" office:value-type="string">
            <text:p text:style-name="Table_20_Contents">Alta</text:p>
          </table:table-cell>
        </table:table-row>
        <table:table-row>
          <table:table-cell table:style-name="Tabela5.A1" office:value-type="string">
            <text:p text:style-name="Table_20_Contents">Book Card</text:p>
          </table:table-cell>
          <table:table-cell table:style-name="Tabela5.A1" office:value-type="string">
            <text:p text:style-name="Table_20_Contents">Alta</text:p>
          </table:table-cell>
        </table:table-row>
        <table:table-row>
          <table:table-cell table:style-name="Tabela5.A1" office:value-type="string">
            <text:p text:style-name="Table_20_Contents">Search Bar</text:p>
          </table:table-cell>
          <table:table-cell table:style-name="Tabela5.A1" office:value-type="string">
            <text:p text:style-name="Table_20_Contents">Média</text:p>
          </table:table-cell>
        </table:table-row>
        <table:table-row>
          <table:table-cell table:style-name="Tabela5.A1" office:value-type="string">
            <text:p text:style-name="Table_20_Contents">Loading</text:p>
          </table:table-cell>
          <table:table-cell table:style-name="Tabela5.A1" office:value-type="string">
            <text:p text:style-name="Table_20_Contents">Média</text:p>
          </table:table-cell>
        </table:table-row>
      </table:table>
      <text:p text:style-name="Horizontal_20_Line"/>
      <text:h text:style-name="Heading_20_1" text:outline-level="1">Componentes futuros</text:h>
      <text:p text:style-name="Text_20_body">Quando a plataforma crescer, poderemos adicionar:</text:p>
      <text:p text:style-name="Preformatted_20_Text"><text:span text:style-name="Source_20_Text">components/</text:span></text:p>
      <text:p text:style-name="Preformatted_20_Text"/>
      <text:p text:style-name="Preformatted_20_Text"><text:span text:style-name="Source_20_Text">├── reading-sidebar.html</text:span></text:p>
      <text:p text:style-name="Preformatted_20_Text"><text:span text:style-name="Source_20_Text">├── comment-box.html</text:span></text:p>
      <text:p text:style-name="Preformatted_20_Text"><text:span text:style-name="Source_20_Text">├── reference-card.html</text:span></text:p>
      <text:p text:style-name="Preformatted_20_Text"><text:span text:style-name="Source_20_Text">├── glossary-card.html</text:span></text:p>
      <text:p text:style-name="Preformatted_20_Text"><text:span text:style-name="Source_20_Text">├── timeline-item.html</text:span></text:p>
      <text:p text:style-name="P1"><text:span text:style-name="Source_20_Text">└── progress-bar.html</text:span></text:p>
      <text:p text:style-name="Text_20_body">Esses componentes estarão relacionados aos recursos avançados de estudo.</text:p>
      <text:p text:style-name="Horizontal_20_Line"/>
      <text:h text:style-name="Heading_20_1" text:outline-level="1"><text:soft-page-break/>Resultado da Sprint 2.6</text:h>
      <text:p text:style-name="Text_20_body">Agora definimos:</text:p>
      <text:list text:style-name="L59">
        <text:list-item>
          <text:p text:style-name="P60">✅ Onde ficam os componentes.</text:p>
        </text:list-item>
        <text:list-item>
          <text:p text:style-name="P60">✅ Como eles serão nomeados.</text:p>
        </text:list-item>
        <text:list-item>
          <text:p text:style-name="P60">✅ Qual a responsabilidade de cada um.</text:p>
        </text:list-item>
        <text:list-item>
          <text:p text:style-name="P60">✅ Como serão carregados.</text:p>
        </text:list-item>
        <text:list-item>
          <text:p text:style-name="P60">✅ Como será feita a separação entre HTML, CSS e JavaScript.</text:p>
        </text:list-item>
      </text:list>
      <text:p text:style-name="Horizontal_20_Line"/>
      <text:h text:style-name="Heading_20_2" text:outline-level="2">Checklist atualizado da Fase 2</text:h>
      <text:list text:style-name="L60">
        <text:list-item>
          <text:p text:style-name="P61">✅ Definir a estrutura definitiva das pastas.</text:p>
        </text:list-item>
        <text:list-item>
          <text:p text:style-name="P61">✅ Organizar os arquivos HTML.</text:p>
        </text:list-item>
        <text:list-item>
          <text:p text:style-name="P61">✅ Organizar os arquivos CSS.</text:p>
        </text:list-item>
        <text:list-item>
          <text:p text:style-name="P61">✅ Organizar os arquivos JavaScript.</text:p>
        </text:list-item>
        <text:list-item>
          <text:p text:style-name="P61">✅ Criar a estrutura inicial do <text:span text:style-name="Source_20_Text">livros.json</text:span>.</text:p>
        </text:list-item>
        <text:list-item>
          <text:p text:style-name="P61">✅ Definir o padrão dos componentes reutilizáveis.</text:p>
        </text:list-item>
        <text:list-item>
          <text:p text:style-name="P61">⏳ Atualizar a documentação da arquitetura.</text:p>
        </text:list-item>
      </text:list>
      <text:p text:style-name="Horizontal_20_Line"/>
      <text:p text:style-name="Text_20_body">A próxima etapa será a última da <text:span text:style-name="Strong_20_Emphasis">Fase 2 — Estruturação</text:span>:</text:p>
      <text:h text:style-name="Heading_20_1" text:outline-level="1">Sprint 2.7 — Atualizar a documentação da arquitetura</text:h>
      <text:p text:style-name="Text_20_body">Nesta etapa vamos transformar todas essas decisões em um documento oficial <text:span text:style-name="Source_20_Text">ARQUITETURA.md</text:span>, que será a "regra do projeto".</text:p>
      <text:p text:style-name="Text_20_body">Depois disso, teremos a Fase 2 concluída e poderemos avançar para a <text:span text:style-name="Strong_20_Emphasis">Fase 3 — Design da Interface</text:span>.</text:p>
      <text:p text:style-name="Text_20_body">Perfeito. Vamos finalizar a <text:span text:style-name="Strong_20_Emphasis">Fase 2 — Estruturação</text:span>.</text:p>
      <text:p text:style-name="Text_20_body">Agora vamos consolidar todas as decisões tomadas em um único documento: o <text:span text:style-name="Strong_20_Emphasis">ARQUITETURA.md</text:span>.</text:p>
      <text:p text:style-name="Text_20_body">A importância desta etapa é que, daqui para frente, qualquer alteração no projeto deverá respeitar essa arquitetura. Esse documento será como o "manual técnico" da Biblioteca Apócrifa.</text:p>
      <text:p text:style-name="Horizontal_20_Line"/>
      <text:h text:style-name="Heading_20_1" text:outline-level="1"><text:soft-page-break/>Sprint 2.7 — Atualizar a documentação da arquitetura</text:h>
      <text:h text:style-name="Heading_20_2" text:outline-level="2">Objetivo</text:h>
      <text:p text:style-name="Text_20_body">Registrar oficialmente:</text:p>
      <text:list text:style-name="L61">
        <text:list-item>
          <text:p text:style-name="P62">estrutura de pastas;</text:p>
        </text:list-item>
        <text:list-item>
          <text:p text:style-name="P62">responsabilidade dos arquivos;</text:p>
        </text:list-item>
        <text:list-item>
          <text:p text:style-name="P62">organização do HTML;</text:p>
        </text:list-item>
        <text:list-item>
          <text:p text:style-name="P62">organização do CSS;</text:p>
        </text:list-item>
        <text:list-item>
          <text:p text:style-name="P62">organização do JavaScript;</text:p>
        </text:list-item>
        <text:list-item>
          <text:p text:style-name="P62">estrutura dos dados;</text:p>
        </text:list-item>
        <text:list-item>
          <text:p text:style-name="P62">padrão dos componentes.</text:p>
        </text:list-item>
      </text:list>
      <text:p text:style-name="Horizontal_20_Line"/>
      <text:h text:style-name="Heading_20_1" text:outline-level="1">Arquitetura do Projeto — Biblioteca Apócrifa</text:h>
      <text:h text:style-name="Heading_20_2" text:outline-level="2">1. Visão Geral</text:h>
      <text:p text:style-name="Text_20_body">A Biblioteca Apócrifa é uma plataforma digital de estudo dedicada à organização, preservação e apresentação de textos apócrifos e gnósticos.</text:p>
      <text:p text:style-name="Text_20_body">A aplicação será desenvolvida utilizando:</text:p>
      <text:list text:style-name="L62">
        <text:list-item>
          <text:p text:style-name="P63">HTML5;</text:p>
        </text:list-item>
        <text:list-item>
          <text:p text:style-name="P63">CSS3;</text:p>
        </text:list-item>
        <text:list-item>
          <text:p text:style-name="P63">JavaScript ES6+.</text:p>
        </text:list-item>
      </text:list>
      <text:p text:style-name="Text_20_body">A arquitetura segue o princípio de separação de responsabilidades, dividindo:</text:p>
      <text:list text:style-name="L63">
        <text:list-item>
          <text:p text:style-name="P64">estrutura da interface;</text:p>
        </text:list-item>
        <text:list-item>
          <text:p text:style-name="P64">estilos;</text:p>
        </text:list-item>
        <text:list-item>
          <text:p text:style-name="P64">lógica da aplicação;</text:p>
        </text:list-item>
        <text:list-item>
          <text:p text:style-name="P64">dados;</text:p>
        </text:list-item>
        <text:list-item>
          <text:p text:style-name="P64">componentes reutilizáveis.</text:p>
        </text:list-item>
      </text:list>
      <text:p text:style-name="Horizontal_20_Line"/>
      <text:h text:style-name="Heading_20_1" text:outline-level="1"><text:soft-page-break/>2. Estrutura de Diretórios</text:h>
      <text:p text:style-name="Preformatted_20_Text"><text:span text:style-name="Source_20_Text">Biblioteca-Apocrifa/</text:span></text:p>
      <text:p text:style-name="Preformatted_20_Text"/>
      <text:p text:style-name="Preformatted_20_Text"><text:span text:style-name="Source_20_Text">├── index.html</text:span></text:p>
      <text:p text:style-name="Preformatted_20_Text"/>
      <text:p text:style-name="Preformatted_20_Text"><text:span text:style-name="Source_20_Text">├── README.md</text:span></text:p>
      <text:p text:style-name="Preformatted_20_Text"><text:span text:style-name="Source_20_Text">├── LICENSE</text:span></text:p>
      <text:p text:style-name="Preformatted_20_Text"><text:span text:style-name="Source_20_Text">├── PLANEJAMENTO.md</text:span></text:p>
      <text:p text:style-name="Preformatted_20_Text"><text:span text:style-name="Source_20_Text">├── ARQUITETURA.md</text:span></text:p>
      <text:p text:style-name="Preformatted_20_Text"/>
      <text:p text:style-name="Preformatted_20_Text"><text:span text:style-name="Source_20_Text">├── manifest.json</text:span></text:p>
      <text:p text:style-name="Preformatted_20_Text"><text:span text:style-name="Source_20_Text">├── sw.js</text:span></text:p>
      <text:p text:style-name="Preformatted_20_Text"/>
      <text:p text:style-name="Preformatted_20_Text"/>
      <text:p text:style-name="Preformatted_20_Text"><text:span text:style-name="Source_20_Text">├── paginas/</text:span></text:p>
      <text:p text:style-name="Preformatted_20_Text"/>
      <text:p text:style-name="Preformatted_20_Text"><text:span text:style-name="Source_20_Text">│ <text:s text:c="2"/>├── biblioteca.html</text:span></text:p>
      <text:p text:style-name="Preformatted_20_Text"><text:span text:style-name="Source_20_Text">│ <text:s text:c="2"/>├── leitura.html</text:span></text:p>
      <text:p text:style-name="Preformatted_20_Text"><text:span text:style-name="Source_20_Text">│ <text:s text:c="2"/>├── comunidade.html</text:span></text:p>
      <text:p text:style-name="Preformatted_20_Text"><text:span text:style-name="Source_20_Text">│ <text:s text:c="2"/>└── perfil.html</text:span></text:p>
      <text:p text:style-name="Preformatted_20_Text"/>
      <text:p text:style-name="Preformatted_20_Text"/>
      <text:p text:style-name="Preformatted_20_Text"><text:span text:style-name="Source_20_Text">├── assets/</text:span></text:p>
      <text:p text:style-name="Preformatted_20_Text"/>
      <text:p text:style-name="Preformatted_20_Text"><text:span text:style-name="Source_20_Text">│ <text:s text:c="2"/>├── css/</text:span></text:p>
      <text:p text:style-name="Preformatted_20_Text"/>
      <text:p text:style-name="Preformatted_20_Text"><text:span text:style-name="Source_20_Text">│ <text:s text:c="2"/>├── js/</text:span></text:p>
      <text:p text:style-name="Preformatted_20_Text"/>
      <text:p text:style-name="Preformatted_20_Text"><text:span text:style-name="Source_20_Text">│ <text:s text:c="2"/>├── dados/</text:span></text:p>
      <text:p text:style-name="Preformatted_20_Text"/>
      <text:p text:style-name="Preformatted_20_Text"><text:span text:style-name="Source_20_Text">│ <text:s text:c="2"/>├── imagens/</text:span></text:p>
      <text:p text:style-name="Preformatted_20_Text"/>
      <text:p text:style-name="Preformatted_20_Text"><text:span text:style-name="Source_20_Text">│ <text:s text:c="2"/>├── icones/</text:span></text:p>
      <text:p text:style-name="Preformatted_20_Text"/>
      <text:p text:style-name="Preformatted_20_Text"><text:span text:style-name="Source_20_Text">│ <text:s text:c="2"/>└── fonts/</text:span></text:p>
      <text:p text:style-name="Preformatted_20_Text"/>
      <text:p text:style-name="Preformatted_20_Text"/>
      <text:p text:style-name="Preformatted_20_Text"><text:span text:style-name="Source_20_Text">└── components/</text:span></text:p>
      <text:p text:style-name="Preformatted_20_Text"/>
      <text:p text:style-name="Preformatted_20_Text"><text:span text:style-name="Source_20_Text"><text:s text:c="4"/>├── header.html</text:span></text:p>
      <text:p text:style-name="Preformatted_20_Text"><text:span text:style-name="Source_20_Text"><text:s text:c="4"/>├── navbar.html</text:span></text:p>
      <text:p text:style-name="Preformatted_20_Text"><text:span text:style-name="Source_20_Text"><text:s text:c="4"/>├── footer.html</text:span></text:p>
      <text:p text:style-name="Preformatted_20_Text"><text:span text:style-name="Source_20_Text"><text:s text:c="4"/>├── book-card.html</text:span></text:p>
      <text:p text:style-name="Preformatted_20_Text"><text:span text:style-name="Source_20_Text"><text:s text:c="4"/>├── search-bar.html</text:span></text:p>
      <text:p text:style-name="P1"><text:span text:style-name="Source_20_Text"><text:s text:c="4"/>└── loading.html</text:span></text:p>
      <text:p text:style-name="Horizontal_20_Line"/>
      <text:h text:style-name="Heading_20_1" text:outline-level="1">3. Organização HTML</text:h>
      <text:h text:style-name="Heading_20_2" text:outline-level="2"><text:span text:style-name="Source_20_Text">index.html</text:span></text:h>
      <text:p text:style-name="Text_20_body">Responsabilidade:</text:p>
      <text:p text:style-name="Text_20_body">Página inicial da plataforma.</text:p>
      <text:p text:style-name="Text_20_body">Apresenta:</text:p>
      <text:list text:style-name="L64">
        <text:list-item>
          <text:p text:style-name="P65"><text:soft-page-break/>conceito do projeto;</text:p>
        </text:list-item>
        <text:list-item>
          <text:p text:style-name="P65">contexto histórico;</text:p>
        </text:list-item>
        <text:list-item>
          <text:p text:style-name="P65">obras em destaque;</text:p>
        </text:list-item>
        <text:list-item>
          <text:p text:style-name="P65">convite para explorar a biblioteca.</text:p>
        </text:list-item>
      </text:list>
      <text:p text:style-name="Horizontal_20_Line"/>
      <text:h text:style-name="Heading_20_2" text:outline-level="2"><text:span text:style-name="Source_20_Text">paginas/biblioteca.html</text:span></text:h>
      <text:p text:style-name="Text_20_body">Responsabilidade:</text:p>
      <text:p text:style-name="Text_20_body">Catálogo das obras disponíveis.</text:p>
      <text:p text:style-name="Text_20_body">Possui:</text:p>
      <text:list text:style-name="L65">
        <text:list-item>
          <text:p text:style-name="P66">pesquisa;</text:p>
        </text:list-item>
        <text:list-item>
          <text:p text:style-name="P66">filtros;</text:p>
        </text:list-item>
        <text:list-item>
          <text:p text:style-name="P66">lista dinâmica de livros.</text:p>
        </text:list-item>
      </text:list>
      <text:p text:style-name="Horizontal_20_Line"/>
      <text:h text:style-name="Heading_20_2" text:outline-level="2"><text:span text:style-name="Source_20_Text">paginas/leitura.html</text:span></text:h>
      <text:p text:style-name="Text_20_body">Responsabilidade:</text:p>
      <text:p text:style-name="Text_20_body">Ambiente principal de estudo.</text:p>
      <text:p text:style-name="Text_20_body">Possui:</text:p>
      <text:list text:style-name="L66">
        <text:list-item>
          <text:p text:style-name="P67">informações da obra;</text:p>
        </text:list-item>
        <text:list-item>
          <text:p text:style-name="P67">seções do texto;</text:p>
        </text:list-item>
        <text:list-item>
          <text:p text:style-name="P67">comentários;</text:p>
        </text:list-item>
        <text:list-item>
          <text:p text:style-name="P67">referências.</text:p>
        </text:list-item>
      </text:list>
      <text:p text:style-name="Text_20_body">A obra será carregada dinamicamente através do parâmetro:</text:p>
      <text:p text:style-name="P1"><text:span text:style-name="Source_20_Text">leitura.html?livro=evangelho-tomas</text:span></text:p>
      <text:p text:style-name="Horizontal_20_Line"/>
      <text:h text:style-name="Heading_20_2" text:outline-level="2"><text:span text:style-name="Source_20_Text">paginas/comunidade.html</text:span></text:h>
      <text:p text:style-name="Text_20_body">Responsabilidade:</text:p>
      <text:p text:style-name="Text_20_body">Área de interação entre leitores.</text:p>
      <text:p text:style-name="Text_20_body">Inicialmente será uma estrutura preparada para desenvolvimento futuro.</text:p>
      <text:p text:style-name="Horizontal_20_Line"/>
      <text:h text:style-name="Heading_20_2" text:outline-level="2"><text:soft-page-break/><text:span text:style-name="Source_20_Text">paginas/perfil.html</text:span></text:h>
      <text:p text:style-name="Text_20_body">Responsabilidade:</text:p>
      <text:p text:style-name="Text_20_body">Área personalizada do usuário.</text:p>
      <text:p text:style-name="Text_20_body">Futuramente incluirá:</text:p>
      <text:list text:style-name="L67">
        <text:list-item>
          <text:p text:style-name="P68">favoritos;</text:p>
        </text:list-item>
        <text:list-item>
          <text:p text:style-name="P68">progresso;</text:p>
        </text:list-item>
        <text:list-item>
          <text:p text:style-name="P68">preferências.</text:p>
        </text:list-item>
      </text:list>
      <text:p text:style-name="Horizontal_20_Line"/>
      <text:h text:style-name="Heading_20_1" text:outline-level="1">4. Arquitetura CSS</text:h>
      <text:p text:style-name="Text_20_body">Local:</text:p>
      <text:p text:style-name="P1"><text:span text:style-name="Source_20_Text">assets/css/</text:span></text:p>
      <text:p text:style-name="Text_20_body">Organização:</text:p>
      <text:p text:style-name="P1"><text:span text:style-name="Source_20_Text">variables.css</text:span></text:p>
      <text:p text:style-name="Text_20_body">Responsável por:</text:p>
      <text:list text:style-name="L68">
        <text:list-item>
          <text:p text:style-name="P69">cores;</text:p>
        </text:list-item>
        <text:list-item>
          <text:p text:style-name="P69">fontes;</text:p>
        </text:list-item>
        <text:list-item>
          <text:p text:style-name="P69">espaçamentos;</text:p>
        </text:list-item>
        <text:list-item>
          <text:p text:style-name="P69">tokens do design.</text:p>
        </text:list-item>
      </text:list>
      <text:p text:style-name="P1"><text:span text:style-name="Source_20_Text">base.css</text:span></text:p>
      <text:p text:style-name="Text_20_body">Responsável por:</text:p>
      <text:list text:style-name="L69">
        <text:list-item>
          <text:p text:style-name="P70">reset;</text:p>
        </text:list-item>
        <text:list-item>
          <text:p text:style-name="P70">elementos HTML globais.</text:p>
        </text:list-item>
      </text:list>
      <text:p text:style-name="P1"><text:span text:style-name="Source_20_Text">layout.css</text:span></text:p>
      <text:p text:style-name="Text_20_body">Responsável por:</text:p>
      <text:list text:style-name="L70">
        <text:list-item>
          <text:p text:style-name="P71">containers;</text:p>
        </text:list-item>
        <text:list-item>
          <text:p text:style-name="P71">grids;</text:p>
        </text:list-item>
        <text:list-item>
          <text:p text:style-name="P71">estruturas.</text:p>
        </text:list-item>
      </text:list>
      <text:p text:style-name="P1"><text:span text:style-name="Source_20_Text">components.css</text:span></text:p>
      <text:p text:style-name="Text_20_body">Responsável por:</text:p>
      <text:list text:style-name="L71">
        <text:list-item>
          <text:p text:style-name="P72">cards;</text:p>
        </text:list-item>
        <text:list-item>
          <text:p text:style-name="P72"><text:soft-page-break/>botões;</text:p>
        </text:list-item>
        <text:list-item>
          <text:p text:style-name="P72">navbar;</text:p>
        </text:list-item>
        <text:list-item>
          <text:p text:style-name="P72">componentes reutilizados.</text:p>
        </text:list-item>
      </text:list>
      <text:p text:style-name="Text_20_body">Arquivos específicos:</text:p>
      <text:p text:style-name="Preformatted_20_Text"><text:span text:style-name="Source_20_Text">home.css</text:span></text:p>
      <text:p text:style-name="Preformatted_20_Text"/>
      <text:p text:style-name="Preformatted_20_Text"><text:span text:style-name="Source_20_Text">biblioteca.css</text:span></text:p>
      <text:p text:style-name="Preformatted_20_Text"/>
      <text:p text:style-name="Preformatted_20_Text"><text:span text:style-name="Source_20_Text">leitura.css</text:span></text:p>
      <text:p text:style-name="Preformatted_20_Text"/>
      <text:p text:style-name="Preformatted_20_Text"><text:span text:style-name="Source_20_Text">comunidade.css</text:span></text:p>
      <text:p text:style-name="Preformatted_20_Text"/>
      <text:p text:style-name="P1"><text:span text:style-name="Source_20_Text">perfil.css</text:span></text:p>
      <text:p text:style-name="Text_20_body">Responsáveis apenas pelas páginas correspondentes.</text:p>
      <text:p text:style-name="Horizontal_20_Line"/>
      <text:h text:style-name="Heading_20_1" text:outline-level="1">5. Arquitetura JavaScript</text:h>
      <text:p text:style-name="Text_20_body">Local:</text:p>
      <text:p text:style-name="P1"><text:span text:style-name="Source_20_Text">assets/js/</text:span></text:p>
      <text:p text:style-name="Text_20_body">Estrutura:</text:p>
      <text:p text:style-name="P1"><text:span text:style-name="Source_20_Text">app.js</text:span></text:p>
      <text:p text:style-name="Text_20_body">Inicialização geral.</text:p>
      <text:p text:style-name="P1"><text:span text:style-name="Source_20_Text">api.js</text:span></text:p>
      <text:p text:style-name="Text_20_body">Responsável pelo acesso aos dados.</text:p>
      <text:p text:style-name="P1"><text:span text:style-name="Source_20_Text">biblioteca.js</text:span></text:p>
      <text:p text:style-name="Text_20_body">Controla o catálogo.</text:p>
      <text:p text:style-name="P1"><text:span text:style-name="Source_20_Text">leitura.js</text:span></text:p>
      <text:p text:style-name="Text_20_body">Controla o ambiente de estudo.</text:p>
      <text:p text:style-name="P1"><text:span text:style-name="Source_20_Text">pesquisa.js</text:span></text:p>
      <text:p text:style-name="Text_20_body">Controla busca e filtros.</text:p>
      <text:p text:style-name="P1"><text:span text:style-name="Source_20_Text">componentes.js</text:span></text:p>
      <text:p text:style-name="Text_20_body">Carrega componentes HTML.</text:p>
      <text:p text:style-name="P1"><text:span text:style-name="Source_20_Text">favoritos.js</text:span></text:p>
      <text:p text:style-name="Text_20_body">Preparado para funcionalidades futuras.</text:p>
      <text:p text:style-name="P1"><text:span text:style-name="Source_20_Text">utils.js</text:span></text:p>
      <text:p text:style-name="Text_20_body"><text:soft-page-break/>Funções auxiliares.</text:p>
      <text:p text:style-name="Horizontal_20_Line"/>
      <text:h text:style-name="Heading_20_1" text:outline-level="1">6. Arquitetura dos Dados</text:h>
      <text:p text:style-name="Text_20_body">Local:</text:p>
      <text:p text:style-name="P1"><text:span text:style-name="Source_20_Text">assets/dados/</text:span></text:p>
      <text:p text:style-name="Text_20_body">Estrutura:</text:p>
      <text:p text:style-name="Preformatted_20_Text"><text:span text:style-name="Source_20_Text">dados/</text:span></text:p>
      <text:p text:style-name="Preformatted_20_Text"/>
      <text:p text:style-name="Preformatted_20_Text"><text:span text:style-name="Source_20_Text">├── livros.json</text:span></text:p>
      <text:p text:style-name="Preformatted_20_Text"/>
      <text:p text:style-name="Preformatted_20_Text"><text:span text:style-name="Source_20_Text">├── categorias.json</text:span></text:p>
      <text:p text:style-name="Preformatted_20_Text"/>
      <text:p text:style-name="Preformatted_20_Text"><text:span text:style-name="Source_20_Text">├── autores.json</text:span></text:p>
      <text:p text:style-name="Preformatted_20_Text"/>
      <text:p text:style-name="Preformatted_20_Text"><text:span text:style-name="Source_20_Text">└── livros/</text:span></text:p>
      <text:p text:style-name="Preformatted_20_Text"/>
      <text:p text:style-name="Preformatted_20_Text"><text:span text:style-name="Source_20_Text"><text:s text:c="4"/>├── evangelho-tomas.json</text:span></text:p>
      <text:p text:style-name="Preformatted_20_Text"/>
      <text:p text:style-name="Preformatted_20_Text"><text:span text:style-name="Source_20_Text"><text:s text:c="4"/>├── evangelho-maria.json</text:span></text:p>
      <text:p text:style-name="Preformatted_20_Text"/>
      <text:p text:style-name="P1"><text:span text:style-name="Source_20_Text"><text:s text:c="4"/>└── livro-enoque.json</text:span></text:p>
      <text:p text:style-name="Horizontal_20_Line"/>
      <text:h text:style-name="Heading_20_2" text:outline-level="2">livros.json</text:h>
      <text:p text:style-name="Text_20_body">Responsável pelo catálogo.</text:p>
      <text:p text:style-name="Text_20_body">Contém:</text:p>
      <text:list text:style-name="L72">
        <text:list-item>
          <text:p text:style-name="P73">título;</text:p>
        </text:list-item>
        <text:list-item>
          <text:p text:style-name="P73">autor;</text:p>
        </text:list-item>
        <text:list-item>
          <text:p text:style-name="P73">categoria;</text:p>
        </text:list-item>
        <text:list-item>
          <text:p text:style-name="P73">descrição;</text:p>
        </text:list-item>
        <text:list-item>
          <text:p text:style-name="P73">imagem;</text:p>
        </text:list-item>
        <text:list-item>
          <text:p text:style-name="P73">localização do arquivo completo.</text:p>
        </text:list-item>
      </text:list>
      <text:p text:style-name="Text_20_body">Não contém o texto integral.</text:p>
      <text:p text:style-name="Horizontal_20_Line"/>
      <text:h text:style-name="Heading_20_2" text:outline-level="2">Arquivos individuais das obras</text:h>
      <text:p text:style-name="Text_20_body">Responsáveis por:</text:p>
      <text:list text:style-name="L73">
        <text:list-item>
          <text:p text:style-name="P74">introdução;</text:p>
        </text:list-item>
        <text:list-item>
          <text:p text:style-name="P74">contexto histórico;</text:p>
        </text:list-item>
        <text:list-item>
          <text:p text:style-name="P74"><text:soft-page-break/>seções;</text:p>
        </text:list-item>
        <text:list-item>
          <text:p text:style-name="P74">comentários;</text:p>
        </text:list-item>
        <text:list-item>
          <text:p text:style-name="P74">referências.</text:p>
        </text:list-item>
      </text:list>
      <text:p text:style-name="Horizontal_20_Line"/>
      <text:h text:style-name="Heading_20_1" text:outline-level="1">7. Componentes Reutilizáveis</text:h>
      <text:p text:style-name="Text_20_body">Local:</text:p>
      <text:p text:style-name="P1"><text:span text:style-name="Source_20_Text">components/</text:span></text:p>
      <text:p text:style-name="Text_20_body">Componentes definidos:</text:p>
      <table:table table:name="Tabela6" table:style-name="Tabela6">
        <table:table-column table:style-name="Tabela6.A"/>
        <table:table-column table:style-name="Tabela6.B"/>
        <table:table-header-rows>
          <table:table-row>
            <table:table-cell table:style-name="Tabela6.A1" office:value-type="string">
              <text:p text:style-name="Table_20_Heading">Componente</text:p>
            </table:table-cell>
            <table:table-cell table:style-name="Tabela6.A1" office:value-type="string">
              <text:p text:style-name="Table_20_Heading">Função</text:p>
            </table:table-cell>
          </table:table-row>
        </table:table-header-rows>
        <table:table-row>
          <table:table-cell table:style-name="Tabela6.A1" office:value-type="string">
            <text:p text:style-name="Table_20_Contents">header.html</text:p>
          </table:table-cell>
          <table:table-cell table:style-name="Tabela6.A1" office:value-type="string">
            <text:p text:style-name="Table_20_Contents">Identidade visual</text:p>
          </table:table-cell>
        </table:table-row>
        <table:table-row>
          <table:table-cell table:style-name="Tabela6.A1" office:value-type="string">
            <text:p text:style-name="Table_20_Contents">navbar.html</text:p>
          </table:table-cell>
          <table:table-cell table:style-name="Tabela6.A1" office:value-type="string">
            <text:p text:style-name="Table_20_Contents">Navegação</text:p>
          </table:table-cell>
        </table:table-row>
        <table:table-row>
          <table:table-cell table:style-name="Tabela6.A1" office:value-type="string">
            <text:p text:style-name="Table_20_Contents">footer.html</text:p>
          </table:table-cell>
          <table:table-cell table:style-name="Tabela6.A1" office:value-type="string">
            <text:p text:style-name="Table_20_Contents">Informações finais</text:p>
          </table:table-cell>
        </table:table-row>
        <table:table-row>
          <table:table-cell table:style-name="Tabela6.A1" office:value-type="string">
            <text:p text:style-name="Table_20_Contents">book-card.html</text:p>
          </table:table-cell>
          <table:table-cell table:style-name="Tabela6.A1" office:value-type="string">
            <text:p text:style-name="Table_20_Contents">Apresentação das obras</text:p>
          </table:table-cell>
        </table:table-row>
        <table:table-row>
          <table:table-cell table:style-name="Tabela6.A1" office:value-type="string">
            <text:p text:style-name="Table_20_Contents">search-bar.html</text:p>
          </table:table-cell>
          <table:table-cell table:style-name="Tabela6.A1" office:value-type="string">
            <text:p text:style-name="Table_20_Contents">Pesquisa</text:p>
          </table:table-cell>
        </table:table-row>
        <table:table-row>
          <table:table-cell table:style-name="Tabela6.A1" office:value-type="string">
            <text:p text:style-name="Table_20_Contents">loading.html</text:p>
          </table:table-cell>
          <table:table-cell table:style-name="Tabela6.A1" office:value-type="string">
            <text:p text:style-name="Table_20_Contents">Estado de carregamento</text:p>
          </table:table-cell>
        </table:table-row>
      </table:table>
      <text:p text:style-name="Horizontal_20_Line"/>
      <text:h text:style-name="Heading_20_1" text:outline-level="1">8. Regras de Desenvolvimento</text:h>
      <text:h text:style-name="Heading_20_2" text:outline-level="2">Organização</text:h>
      <text:p text:style-name="Text_20_body">Cada arquivo deve possuir uma única responsabilidade.</text:p>
      <text:p text:style-name="Horizontal_20_Line"/>
      <text:h text:style-name="Heading_20_2" text:outline-level="2">Dados</text:h>
      <text:p text:style-name="Text_20_body">Nenhum dado da biblioteca será escrito diretamente no JavaScript.</text:p>
      <text:p text:style-name="Text_20_body">A fonte oficial será sempre o JSON.</text:p>
      <text:p text:style-name="Horizontal_20_Line"/>
      <text:h text:style-name="Heading_20_2" text:outline-level="2">HTML</text:h>
      <text:p text:style-name="Text_20_body">Não utilizar:</text:p>
      <text:list text:style-name="L74">
        <text:list-item>
          <text:p text:style-name="P75">estilos inline;</text:p>
        </text:list-item>
        <text:list-item>
          <text:p text:style-name="P75">JavaScript inline;</text:p>
        </text:list-item>
        <text:list-item>
          <text:p text:style-name="P75">repetição desnecessária de estruturas.</text:p>
        </text:list-item>
      </text:list>
      <text:p text:style-name="Horizontal_20_Line"/>
      <text:h text:style-name="Heading_20_2" text:outline-level="2"><text:soft-page-break/>CSS</text:h>
      <text:p text:style-name="Text_20_body">Não criar estilos baseados em aparência.</text:p>
      <text:p text:style-name="Text_20_body">Exemplo:</text:p>
      <text:p text:style-name="Text_20_body">Evitar:</text:p>
      <text:p text:style-name="P1"><text:span text:style-name="Source_20_Text">.botao-azul</text:span></text:p>
      <text:p text:style-name="Text_20_body">Preferir:</text:p>
      <text:p text:style-name="P1"><text:span text:style-name="Source_20_Text">.button-primary</text:span></text:p>
      <text:p text:style-name="Horizontal_20_Line"/>
      <text:h text:style-name="Heading_20_2" text:outline-level="2">JavaScript</text:h>
      <text:p text:style-name="Text_20_body">Não misturar responsabilidades.</text:p>
      <text:p text:style-name="Text_20_body">Cada módulo deve controlar apenas sua funcionalidade.</text:p>
      <text:p text:style-name="Horizontal_20_Line"/>
      <text:h text:style-name="Heading_20_1" text:outline-level="1">9. Princípios Arquiteturais</text:h>
      <text:p text:style-name="Text_20_body">A Biblioteca Apócrifa seguirá:</text:p>
      <text:list text:style-name="L75">
        <text:list-item>
          <text:p text:style-name="P76">separação de responsabilidades;</text:p>
        </text:list-item>
        <text:list-item>
          <text:p text:style-name="P76">código modular;</text:p>
        </text:list-item>
        <text:list-item>
          <text:p text:style-name="P76">reutilização;</text:p>
        </text:list-item>
        <text:list-item>
          <text:p text:style-name="P76">escalabilidade;</text:p>
        </text:list-item>
        <text:list-item>
          <text:p text:style-name="P76">manutenção simples;</text:p>
        </text:list-item>
        <text:list-item>
          <text:p text:style-name="P76">arquitetura orientada a dados;</text:p>
        </text:list-item>
        <text:list-item>
          <text:p text:style-name="P76">documentação contínua.</text:p>
        </text:list-item>
      </text:list>
      <text:p text:style-name="Horizontal_20_Line"/>
      <text:h text:style-name="Heading_20_1" text:outline-level="1">Fase 2 — Estruturação concluída</text:h>
      <text:p text:style-name="Text_20_body">Checklist final:</text:p>
      <text:p text:style-name="Text_20_body">✅ Definir a estrutura definitiva das pastas.<text:line-break/>✅ Organizar os arquivos HTML.<text:line-break/>✅ Organizar os arquivos CSS.<text:line-break/>✅ Organizar os arquivos JavaScript.<text:line-break/>✅ Criar a estrutura inicial do <text:span text:style-name="Source_20_Text">livros.json</text:span>.<text:line-break/>✅ Definir o padrão dos componentes reutilizáveis.<text:line-break/>✅ Atualizar a documentação da arquitetura.</text:p>
      <text:p text:style-name="Horizontal_20_Line"><text:soft-page-break/></text:p>
      <text:h text:style-name="Heading_20_2" text:outline-level="2">Próxima fase</text:h>
      <text:p text:style-name="Text_20_body">Agora estamos prontos para avançar para:</text:p>
      <text:h text:style-name="Heading_20_1" text:outline-level="1">Fase 3 — Design da Interface</text:h>
      <text:p text:style-name="Text_20_body">Objetivo:</text:p>
      <text:p text:style-name="Text_20_body">Criar a identidade visual da Biblioteca Apócrifa.</text:p>
      <text:p text:style-name="Text_20_body">As próximas etapas serão:</text:p>
      <text:list text:style-name="L76">
        <text:list-item>
          <text:p text:style-name="P77">Wireframes.</text:p>
        </text:list-item>
        <text:list-item>
          <text:p text:style-name="P77">Design System.</text:p>
        </text:list-item>
        <text:list-item>
          <text:p text:style-name="P77">Identidade visual.</text:p>
        </text:list-item>
      </text:list>
      <text:p text:style-name="Text_20_body">Aqui vamos decidir:</text:p>
      <text:list text:style-name="L77">
        <text:list-item>
          <text:p text:style-name="P78">como a plataforma será visualmente organizada;</text:p>
        </text:list-item>
        <text:list-item>
          <text:p text:style-name="P78">cores;</text:p>
        </text:list-item>
        <text:list-item>
          <text:p text:style-name="P78">tipografia;</text:p>
        </text:list-item>
        <text:list-item>
          <text:p text:style-name="P78">estilo dos componentes;</text:p>
        </text:list-item>
        <text:list-item>
          <text:p text:style-name="P78">experiência de leitura.</text:p>
        </text:list-item>
      </text:list>
      <text:p text:style-name="Text_20_body">A base técnica está pronta. Agora vamos começar a construir a experiência do usuário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7-08T15:32:47.664794469</meta:creation-date>
    <dc:date>2026-07-08T17:40:06.702533619</dc:date>
    <dc:creator>João António</dc:creator>
    <meta:editing-duration>PT1H23M36S</meta:editing-duration>
    <meta:editing-cycles>14</meta:editing-cycles>
    <meta:generator>LibreOffice/26.2.4.2$Linux_X86_64 LibreOffice_project/620$Build-2</meta:generator>
    <meta:document-statistic meta:table-count="6" meta:image-count="0" meta:object-count="0" meta:page-count="44" meta:paragraph-count="1256" meta:word-count="5009" meta:character-count="33464" meta:non-whitespace-character-count="29424"/>
  </office:meta>
</office:document-meta>
</file>