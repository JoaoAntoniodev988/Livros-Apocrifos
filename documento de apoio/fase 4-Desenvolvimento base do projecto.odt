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⏳ Testar responsividade</text:p>
        </text:list-item>
        <text:list-item>
          <text:p text:style-name="P10">⏳ Ajustar detalhes visuais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08T23:11:31.759402887</dc:date>
    <dc:creator>João António</dc:creator>
    <meta:editing-duration>PT4H7M57S</meta:editing-duration>
    <meta:editing-cycles>7</meta:editing-cycles>
    <meta:generator>LibreOffice/26.2.4.2$Linux_X86_64 LibreOffice_project/620$Build-2</meta:generator>
    <meta:document-statistic meta:table-count="2" meta:image-count="0" meta:object-count="0" meta:page-count="39" meta:paragraph-count="1082" meta:word-count="3442" meta:character-count="30505" meta:non-whitespace-character-count="26621"/>
  </office:meta>
</office:document-meta>
</file>