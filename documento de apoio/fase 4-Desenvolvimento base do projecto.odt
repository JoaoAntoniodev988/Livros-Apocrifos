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6.006cm" table:align="left"/>
    </style:style>
    <style:style style:name="Tabela1.A" style:family="table-column">
      <style:table-column-properties style:column-width="3.769cm"/>
    </style:style>
    <style:style style:name="Tabela1.B" style:family="table-column">
      <style:table-column-properties style:column-width="12.236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063cm" table:align="left"/>
    </style:style>
    <style:style style:name="Tabela2.A" style:family="table-column">
      <style:table-column-properties style:column-width="3.769cm"/>
    </style:style>
    <style:style style:name="Tabela2.B" style:family="table-column">
      <style:table-column-properties style:column-width="7.294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orizontal_20_Line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</style:style>
    <style:style style:name="P8" style:family="paragraph" style:parent-style-name="Heading_20_3">
      <style:paragraph-properties fo:margin-top="0cm" fo:margin-bottom="0.247cm" style:contextual-spacing="false" fo:line-height="115%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Heading_20_1">
      <style:paragraph-properties fo:margin-top="0cm" fo:margin-bottom="0.247cm" style:contextual-spacing="false" fo:line-height="115%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Quotations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. Agora entramos realmente na <text:span text:style-name="Strong_20_Emphasis">Fase 4 — Desenvolvimento da Base</text:span>.</text:p>
      <text:p text:style-name="Text_20_body">Antes de mexer no código, quero reforçar uma decisão importante de engenharia:</text:p>
      <text:p text:style-name="Text_20_body">O seu <text:span text:style-name="Source_20_Text">index.html</text:span> atual <text:span text:style-name="Strong_20_Emphasis">já possui conteúdo valioso</text:span>, principalmente a parte histórica. Nós não vamos apagar isso. Vamos <text:span text:style-name="Strong_20_Emphasis">refatorar e adaptar para a nova arquitetura do projeto</text:span>.</text:p>
      <text:p text:style-name="Text_20_body">O objetivo desta primeira entrega é:</text:p>
      <text:h text:style-name="Heading_20_1" text:outline-level="1">Sprint 4.1 — Desenvolver a Página Inicial</text:h>
      <text:h text:style-name="Heading_20_2" text:outline-level="2">Meta</text:h>
      <text:p text:style-name="Text_20_body">Transformar o <text:span text:style-name="Source_20_Text">index.html</text:span> em uma página inicial de uma <text:span text:style-name="Strong_20_Emphasis">plataforma de estudo</text:span>, não apenas em um artigo histórico.</text:p>
      <text:p text:style-name="Text_20_body">Hoje ele funciona como uma página informativa. Precisamos transformar em:</text:p>
      <text:p text:style-name="Quotations">Uma porta de entrada para uma biblioteca digital de pesquisa e estudo.</text:p>
      <text:p text:style-name="Horizontal_20_Line"/>
      <text:h text:style-name="Heading_20_1" text:outline-level="1">Problemas atuais encontrados no index</text:h>
      <text:h text:style-name="Heading_20_2" text:outline-level="2">1. O conteúdo está misturado</text:h>
      <text:p text:style-name="Text_20_body">Hoje temos:</text:p>
      <text:list text:style-name="L1">
        <text:list-item>
          <text:p text:style-name="P1">estrutura da página;</text:p>
        </text:list-item>
        <text:list-item>
          <text:p text:style-name="P1">conteúdo histórico;</text:p>
        </text:list-item>
        <text:list-item>
          <text:p text:style-name="P1">navegação;</text:p>
        </text:list-item>
        <text:list-item>
          <text:p text:style-name="P1">rodapé;</text:p>
        </text:list-item>
      </text:list>
      <text:p text:style-name="Text_20_body">tudo dentro do mesmo arquivo.</text:p>
      <text:p text:style-name="Text_20_body">No futuro isso dificulta manutenção.</text:p>
      <text:p text:style-name="Horizontal_20_Line"/>
      <text:h text:style-name="Heading_20_2" text:outline-level="2">2. Falta uma hierarquia de página inicial</text:h>
      <text:p text:style-name="Text_20_body">Pelo wireframe definido, a Home precisa ter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Hero (apresentação)</text:span></text:p>
      <text:p text:style-name="Preformatted_20_Text"/>
      <text:p text:style-name="Preformatted_20_Text"><text:span text:style-name="Source_20_Text">Introdução histórica</text:span></text:p>
      <text:p text:style-name="Preformatted_20_Text"/>
      <text:p text:style-name="Preformatted_20_Text"><text:span text:style-name="Source_20_Text">Como funciona a plataforma</text:span></text:p>
      <text:p text:style-name="Preformatted_20_Text"/>
      <text:p text:style-name="Preformatted_20_Text"><text:span text:style-name="Source_20_Text">Obras em destaque</text:span></text:p>
      <text:p text:style-name="Preformatted_20_Text"><text:soft-page-break/></text:p>
      <text:p text:style-name="Preformatted_20_Text"><text:span text:style-name="Source_20_Text">Nota do editor</text:span></text:p>
      <text:p text:style-name="Preformatted_20_Text"/>
      <text:p text:style-name="P2"><text:span text:style-name="Source_20_Text">Footer</text:span></text:p>
      <text:p text:style-name="Text_20_body">Hoje temos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Texto gigante</text:span></text:p>
      <text:p text:style-name="Preformatted_20_Text"/>
      <text:p text:style-name="Preformatted_20_Text"><text:span text:style-name="Source_20_Text">Gnose</text:span></text:p>
      <text:p text:style-name="Preformatted_20_Text"/>
      <text:p text:style-name="Preformatted_20_Text"><text:span text:style-name="Source_20_Text">Nota</text:span></text:p>
      <text:p text:style-name="Preformatted_20_Text"/>
      <text:p text:style-name="P2"><text:span text:style-name="Source_20_Text">Footer</text:span></text:p>
      <text:p text:style-name="Horizontal_20_Line"/>
      <text:h text:style-name="Heading_20_2" text:outline-level="2">3. Conteúdo histórico precisa virar uma seção</text:h>
      <text:p text:style-name="Text_20_body">O conteúdo atual é excelente, mas ele deve ser organizado.</text:p>
      <text:p text:style-name="Text_20_body">Exemplo:</text:p>
      <text:p text:style-name="Text_20_body">Antes:</text:p>
      <text:p text:style-name="Preformatted_20_Text"><text:span text:style-name="Source_20_Text">&lt;h2&gt;A grande descoberta: Nag Hammadi&lt;/h2&gt;</text:span></text:p>
      <text:p text:style-name="Preformatted_20_Text"/>
      <text:p text:style-name="P2"><text:span text:style-name="Source_20_Text">&lt;p&gt;Texto...&lt;/p&gt;</text:span></text:p>
      <text:p text:style-name="Text_20_body">Depois:</text:p>
      <text:p text:style-name="Preformatted_20_Text"><text:span text:style-name="Source_20_Text">&lt;section class="history-section"&gt;</text:span></text:p>
      <text:p text:style-name="Preformatted_20_Text"/>
      <text:p text:style-name="Preformatted_20_Text"><text:span text:style-name="Source_20_Text">&lt;h2&gt;A grande descoberta: Nag Hammadi&lt;/h2&gt;</text:span></text:p>
      <text:p text:style-name="Preformatted_20_Text"/>
      <text:p text:style-name="Preformatted_20_Text"><text:span text:style-name="Source_20_Text">&lt;p&gt;</text:span></text:p>
      <text:p text:style-name="Preformatted_20_Text"><text:span text:style-name="Source_20_Text">Texto...</text:span></text:p>
      <text:p text:style-name="Preformatted_20_Text"><text:span text:style-name="Source_20_Text">&lt;/p&gt;</text:span></text:p>
      <text:p text:style-name="Preformatted_20_Text"/>
      <text:p text:style-name="P2"><text:span text:style-name="Source_20_Text">&lt;/section&gt;</text:span></text:p>
      <text:p text:style-name="Text_20_body">Isso facilita:</text:p>
      <text:list text:style-name="L2">
        <text:list-item>
          <text:p text:style-name="P3">CSS;</text:p>
        </text:list-item>
        <text:list-item>
          <text:p text:style-name="P3">leitura;</text:p>
        </text:list-item>
        <text:list-item>
          <text:p text:style-name="P3">responsividade;</text:p>
        </text:list-item>
        <text:list-item>
          <text:p text:style-name="P3">acessibilidade.</text:p>
        </text:list-item>
      </text:list>
      <text:p text:style-name="Horizontal_20_Line"/>
      <text:h text:style-name="Heading_20_1" text:outline-level="1">Nova estrutura planejada para o index.html</text:h>
      <text:p text:style-name="Text_20_body">A nova versão ficará assim:</text:p>
      <text:p text:style-name="Preformatted_20_Text"><text:span text:style-name="Source_20_Text">&lt;body&gt;</text:span></text:p>
      <text:p text:style-name="Preformatted_20_Text"><text:soft-page-break/></text:p>
      <text:p text:style-name="Preformatted_20_Text"><text:span text:style-name="Source_20_Text">&lt;header&gt;</text:span></text:p>
      <text:p text:style-name="Preformatted_20_Text"><text:span text:style-name="Source_20_Text"><text:s text:c="4"/>Navbar</text:span></text:p>
      <text:p text:style-name="Preformatted_20_Text"><text:span text:style-name="Source_20_Text">&lt;/header&gt;</text:span></text:p>
      <text:p text:style-name="Preformatted_20_Text"/>
      <text:p text:style-name="Preformatted_20_Text"/>
      <text:p text:style-name="Preformatted_20_Text"><text:span text:style-name="Source_20_Text">&lt;main&gt;</text:span></text:p>
      <text:p text:style-name="Preformatted_20_Text"/>
      <text:p text:style-name="Preformatted_20_Text"><text:span text:style-name="Source_20_Text">&lt;section class="hero"&gt;</text:span></text:p>
      <text:p text:style-name="Preformatted_20_Text"/>
      <text:p text:style-name="Preformatted_20_Text"><text:span text:style-name="Source_20_Text"><text:s text:c="4"/>Título da plataforma</text:span></text:p>
      <text:p text:style-name="Preformatted_20_Text"/>
      <text:p text:style-name="Preformatted_20_Text"><text:span text:style-name="Source_20_Text"><text:s text:c="4"/>Descrição</text:span></text:p>
      <text:p text:style-name="Preformatted_20_Text"/>
      <text:p text:style-name="Preformatted_20_Text"><text:span text:style-name="Source_20_Text"><text:s text:c="4"/>Botão explorar bibliotec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intro"&gt;</text:span></text:p>
      <text:p text:style-name="Preformatted_20_Text"/>
      <text:p text:style-name="Preformatted_20_Text"><text:span text:style-name="Source_20_Text"><text:s text:c="4"/>O que são textos apócrifos?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history"&gt;</text:span></text:p>
      <text:p text:style-name="Preformatted_20_Text"/>
      <text:p text:style-name="Preformatted_20_Text"><text:span text:style-name="Source_20_Text"><text:s text:c="4"/>Origem histórica</text:span></text:p>
      <text:p text:style-name="Preformatted_20_Text"/>
      <text:p text:style-name="Preformatted_20_Text"><text:span text:style-name="Source_20_Text"><text:s text:c="4"/>Nag Hammadi</text:span></text:p>
      <text:p text:style-name="Preformatted_20_Text"/>
      <text:p text:style-name="Preformatted_20_Text"><text:span text:style-name="Source_20_Text"><text:s text:c="4"/>Manuscritos do Mar Morto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platform"&gt;</text:span></text:p>
      <text:p text:style-name="Preformatted_20_Text"/>
      <text:p text:style-name="Preformatted_20_Text"><text:span text:style-name="Source_20_Text"><text:s text:c="4"/>Como funciona?</text:span></text:p>
      <text:p text:style-name="Preformatted_20_Text"/>
      <text:p text:style-name="Preformatted_20_Text"><text:span text:style-name="Source_20_Text"><text:s text:c="4"/>Biblioteca</text:span></text:p>
      <text:p text:style-name="Preformatted_20_Text"><text:span text:style-name="Source_20_Text"><text:s text:c="4"/>Leitura</text:span></text:p>
      <text:p text:style-name="Preformatted_20_Text"><text:span text:style-name="Source_20_Text"><text:s text:c="4"/>Pesquis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featured-books"&gt;</text:span></text:p>
      <text:p text:style-name="Preformatted_20_Text"/>
      <text:p text:style-name="Preformatted_20_Text"><text:span text:style-name="Source_20_Text"><text:s text:c="4"/>Obras em destaque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editor-note"&gt;</text:span></text:p>
      <text:p text:style-name="Preformatted_20_Text"/>
      <text:p text:style-name="Preformatted_20_Text"><text:span text:style-name="Source_20_Text"><text:s text:c="4"/>Nota do editor</text:span></text:p>
      <text:p text:style-name="Preformatted_20_Text"/>
      <text:p text:style-name="Preformatted_20_Text"><text:soft-page-break/><text:span text:style-name="Source_20_Text">&lt;/section&gt;</text:span></text:p>
      <text:p text:style-name="Preformatted_20_Text"/>
      <text:p text:style-name="Preformatted_20_Text"/>
      <text:p text:style-name="Preformatted_20_Text"><text:span text:style-name="Source_20_Text">&lt;/main&gt;</text:span></text:p>
      <text:p text:style-name="Preformatted_20_Text"/>
      <text:p text:style-name="Preformatted_20_Text"/>
      <text:p text:style-name="Preformatted_20_Text"><text:span text:style-name="Source_20_Text">&lt;footer&gt;</text:span></text:p>
      <text:p text:style-name="Preformatted_20_Text"/>
      <text:p text:style-name="Preformatted_20_Text"><text:span text:style-name="Source_20_Text">&lt;/footer&gt;</text:span></text:p>
      <text:p text:style-name="Preformatted_20_Text"/>
      <text:p text:style-name="Preformatted_20_Text"/>
      <text:p text:style-name="P2"><text:span text:style-name="Source_20_Text">&lt;/body&gt;</text:span></text:p>
      <text:p text:style-name="Horizontal_20_Line"/>
      <text:h text:style-name="Heading_20_1" text:outline-level="1">Alterações que faremos no seu conteúdo</text:h>
      <text:h text:style-name="Heading_20_2" text:outline-level="2">O texto inicial será transformado em Hero</text:h>
      <text:p text:style-name="Text_20_body">Atual:</text:p>
      <text:p text:style-name="Quotations">Início</text:p>
      <text:p text:style-name="Text_20_body">Será substituído por algo mais alinhado ao projeto:</text:p>
      <text:p text:style-name="Text_20_body">Exemplo:</text:p>
      <text:p text:style-name="Preformatted_20_Text"><text:span text:style-name="Source_20_Text">Biblioteca Apócrifa</text:span></text:p>
      <text:p text:style-name="Preformatted_20_Text"/>
      <text:p text:style-name="Preformatted_20_Text"><text:span text:style-name="Source_20_Text">Uma plataforma digital dedicada ao estudo,</text:span></text:p>
      <text:p text:style-name="Preformatted_20_Text"><text:span text:style-name="Source_20_Text">preservação e pesquisa de textos antigos.</text:span></text:p>
      <text:p text:style-name="Preformatted_20_Text"/>
      <text:p text:style-name="Preformatted_20_Text"><text:span text:style-name="Source_20_Text">Explore manuscritos, evangelhos apócrifos</text:span></text:p>
      <text:p text:style-name="Preformatted_20_Text"><text:span text:style-name="Source_20_Text">e literatura gnóstica em uma experiência</text:span></text:p>
      <text:p text:style-name="P2"><text:span text:style-name="Source_20_Text">organizada de leitura.</text:span></text:p>
      <text:p text:style-name="Horizontal_20_Line"/>
      <text:h text:style-name="Heading_20_1" text:outline-level="1">Nova seção: Como funciona</text:h>
      <text:p text:style-name="Text_20_body">Essa parte ainda não existe no seu código.</text:p>
      <text:p text:style-name="Text_20_body">Vamos adicionar:</text:p>
      <text:p text:style-name="Preformatted_20_Text"><text:span text:style-name="Source_20_Text">📚 Biblioteca</text:span></text:p>
      <text:p text:style-name="Preformatted_20_Text"/>
      <text:p text:style-name="Preformatted_20_Text"><text:span text:style-name="Source_20_Text">Encontre textos históricos organizados.</text:span></text:p>
      <text:p text:style-name="Preformatted_20_Text"/>
      <text:p text:style-name="Preformatted_20_Text"/>
      <text:p text:style-name="Preformatted_20_Text"><text:span text:style-name="Source_20_Text"> Área de leitura</text:span></text:p>
      <text:p text:style-name="Preformatted_20_Text"/>
      <text:p text:style-name="Preformatted_20_Text"><text:span text:style-name="Source_20_Text">Leia cada obra dividida por seções.</text:span></text:p>
      <text:p text:style-name="Preformatted_20_Text"/>
      <text:p text:style-name="Preformatted_20_Text"/>
      <text:p text:style-name="Preformatted_20_Text"><text:span text:style-name="Source_20_Text"> Pesquisa</text:span></text:p>
      <text:p text:style-name="Preformatted_20_Text"/>
      <text:p text:style-name="P2"><text:span text:style-name="Source_20_Text">Explore contexto histórico e comentários.</text:span></text:p>
      <text:p text:style-name="Text_20_body"><text:soft-page-break/>Isso conecta o usuário com a proposta da plataforma.</text:p>
      <text:p text:style-name="Horizontal_20_Line"/>
      <text:h text:style-name="Heading_20_1" text:outline-level="1">Nova seção: Obras em destaque</text:h>
      <text:p text:style-name="Text_20_body">Hoje existe:</text:p>
      <text:p text:style-name="Preformatted_20_Text"><text:span text:style-name="Source_20_Text">&lt;section class="livros-destaque"&gt;</text:span></text:p>
      <text:p text:style-name="Preformatted_20_Text"><text:span text:style-name="Source_20_Text">&lt;h2&gt;Gnose&lt;/h2&gt;</text:span></text:p>
      <text:p text:style-name="P2"><text:span text:style-name="Source_20_Text">&lt;/section&gt;</text:span></text:p>
      <text:p text:style-name="Text_20_body">Está muito vazio.</text:p>
      <text:p text:style-name="Text_20_body">Vamos preparar para receber futuramente dados do:</text:p>
      <text:p text:style-name="P2"><text:span text:style-name="Source_20_Text">assets/dados/livros.json</text:span></text:p>
      <text:p text:style-name="Text_20_body">Estrutura:</text:p>
      <text:p text:style-name="Preformatted_20_Text"><text:span text:style-name="Source_20_Text">Obras em destaque</text:span></text:p>
      <text:p text:style-name="Preformatted_20_Text"/>
      <text:p text:style-name="Preformatted_20_Text"><text:span text:style-name="Source_20_Text">[ Evangelho de Tomé ]</text:span></text:p>
      <text:p text:style-name="Preformatted_20_Text"/>
      <text:p text:style-name="Preformatted_20_Text"><text:span text:style-name="Source_20_Text">[ Evangelho de Maria ]</text:span></text:p>
      <text:p text:style-name="Preformatted_20_Text"/>
      <text:p text:style-name="P2"><text:span text:style-name="Source_20_Text">[ Apócrifo de João ]</text:span></text:p>
      <text:p text:style-name="Horizontal_20_Line"/>
      <text:h text:style-name="Heading_20_1" text:outline-level="1">O que NÃO vamos fazer agora</text:h>
      <text:p text:style-name="Text_20_body">Para manter o foco:</text:p>
      <text:p text:style-name="Text_20_body">❌ Não criar JavaScript ainda.</text:p>
      <text:p text:style-name="Text_20_body">❌ Não ligar JSON ainda.</text:p>
      <text:p text:style-name="Text_20_body">❌ Não criar cards dinâmicos ainda.</text:p>
      <text:p text:style-name="Text_20_body">❌ Não fazer PWA ainda.</text:p>
      <text:p text:style-name="Text_20_body">Primeiro:</text:p>
      <text:p text:style-name="Text_20_body">HTML sólido.</text:p>
      <text:p text:style-name="Horizontal_20_Line"/>
      <text:h text:style-name="Heading_20_1" text:outline-level="1">Próximo passo prático</text:h>
      <text:p text:style-name="Text_20_body">Vou fazer a primeira refatoração do seu <text:span text:style-name="Source_20_Text">index.html</text:span>.</text:p>
      <text:p text:style-name="Text_20_body">A entrega será:</text:p>
      <text:p text:style-name="Text_20_body">✅ HTML5 semântico.<text:line-break/>✅ Estrutura baseada no wireframe.<text:line-break/><text:soft-page-break/>✅ Conteúdo histórico preservado.<text:line-break/>✅ Classes preparadas para o CSS do Design System.<text:line-break/>✅ Compatível com a arquitetura definida.</text:p>
      <text:p text:style-name="Text_20_body">Depois dessa etapa validamos o HTML e só então avançamos para o CSS da Home (<text:span text:style-name="Source_20_Text">home.css</text:span>).</text:p>
      <text:p text:style-name="Text_20_body">Perfeito. Fiz a primeira refatoração do seu <text:span text:style-name="Source_20_Text">index.html</text:span> seguindo a arquitetura que definimos.</text:p>
      <text:p text:style-name="Text_20_body">Nesta versão eu mantive o conteúdo histórico como patrimônio do projeto, mas reorganizei para funcionar como <text:span text:style-name="Strong_20_Emphasis">página inicial de uma plataforma de estudo</text:span>.</text:p>
      <text:p text:style-name="Text_20_body">Principais mudanças:</text:p>
      <text:list text:style-name="L3">
        <text:list-item>
          <text:p text:style-name="P4">Removido o excesso de texto direto no <text:span text:style-name="Source_20_Text">&lt;main&gt;</text:span>.</text:p>
        </text:list-item>
        <text:list-item>
          <text:p text:style-name="P4">Criada uma seção <text:span text:style-name="Strong_20_Emphasis">Hero</text:span> para apresentar a plataforma.</text:p>
        </text:list-item>
        <text:list-item>
          <text:p text:style-name="P4">Conteúdo histórico organizado em blocos.</text:p>
        </text:list-item>
        <text:list-item>
          <text:p text:style-name="P4">Criada uma seção "Como funciona".</text:p>
        </text:list-item>
        <text:list-item>
          <text:p text:style-name="P4">Criada uma área preparada para livros em destaque.</text:p>
        </text:list-item>
        <text:list-item>
          <text:p text:style-name="P4">Mantida a navegação atual.</text:p>
        </text:list-item>
        <text:list-item>
          <text:p text:style-name="P4">Mantida a estrutura preparada para o nosso CSS (<text:span text:style-name="Source_20_Text">home.css</text:span>).</text:p>
        </text:list-item>
        <text:list-item>
          <text:p text:style-name="P4">Melhorada a semântica HTML.</text:p>
        </text:list-item>
      </text:list>
      <text:p text:style-name="P5"><text:span text:style-name="Source_20_Text">&lt;!DOCTYPE html&gt;</text:span></text:p>
      <text:p text:style-name="P5"><text:span text:style-name="Source_20_Text">&lt;html lang="pt-br"&gt;</text:span></text:p>
      <text:p text:style-name="P5"/>
      <text:p text:style-name="P5"><text:span text:style-name="Source_20_Text">&lt;head&gt;</text:span></text:p>
      <text:p text:style-name="P5"><text:span text:style-name="Source_20_Text"><text:s text:c="4"/>&lt;meta charset="UTF-8"&gt;</text:span></text:p>
      <text:p text:style-name="P5"><text:span text:style-name="Source_20_Text"><text:s text:c="4"/>&lt;meta name="viewport" content="width=device-width, initial-scale=1.0"&gt;</text:span></text:p>
      <text:p text:style-name="P5"/>
      <text:p text:style-name="P5"><text:span text:style-name="Source_20_Text"><text:s text:c="4"/>&lt;title&gt;Biblioteca Apócrifa | Plataforma de Estudo&lt;/title&gt;</text:span></text:p>
      <text:p text:style-name="P5"/>
      <text:p text:style-name="P5"><text:span text:style-name="Source_20_Text"><text:s text:c="4"/>&lt;!-- Google Fonts --&gt;</text:span></text:p>
      <text:p text:style-name="P5"><text:span text:style-name="Source_20_Text"><text:s text:c="4"/>&lt;link rel="preconnect" href="https://fonts.googleapis.com"&gt;</text:span></text:p>
      <text:p text:style-name="P5"><text:span text:style-name="Source_20_Text"><text:s text:c="4"/>&lt;link rel="preconnect" href="https://fonts.gstatic.com" crossorigin&gt;</text:span></text:p>
      <text:p text:style-name="P5"/>
      <text:p text:style-name="P5"><text:span text:style-name="Source_20_Text"><text:s text:c="4"/>&lt;link href="https://fonts.googleapis.com/css2?family=Merriweather:wght@300;400;700&amp;family=Open+Sans:wght@300;400;600;700&amp;display=swap" rel="stylesheet"&gt;</text:span></text:p>
      <text:p text:style-name="P5"/>
      <text:p text:style-name="P5"/>
      <text:p text:style-name="P5"><text:span text:style-name="Source_20_Text"><text:s text:c="4"/>&lt;!-- CSS Global --&gt;</text:span></text:p>
      <text:p text:style-name="P5"><text:span text:style-name="Source_20_Text"><text:s text:c="4"/>&lt;link rel="stylesheet" href="assets/css/variables.css"&gt;</text:span></text:p>
      <text:p text:style-name="P5"><text:soft-page-break/><text:span text:style-name="Source_20_Text"><text:s text:c="4"/>&lt;link rel="stylesheet" href="assets/css/base.css"&gt;</text:span></text:p>
      <text:p text:style-name="P5"><text:span text:style-name="Source_20_Text"><text:s text:c="4"/>&lt;link rel="stylesheet" href="assets/css/layout.css"&gt;</text:span></text:p>
      <text:p text:style-name="P5"><text:span text:style-name="Source_20_Text"><text:s text:c="4"/>&lt;link rel="stylesheet" href="assets/css/components.css"&gt;</text:span></text:p>
      <text:p text:style-name="P5"/>
      <text:p text:style-name="P5"><text:span text:style-name="Source_20_Text"><text:s text:c="4"/>&lt;!-- CSS da Página --&gt;</text:span></text:p>
      <text:p text:style-name="P5"><text:span text:style-name="Source_20_Text"><text:s text:c="4"/>&lt;link rel="stylesheet" href="assets/css/home.css"&gt;</text:span></text:p>
      <text:p text:style-name="P5"/>
      <text:p text:style-name="P5"><text:span text:style-name="Source_20_Text">&lt;/head&gt;</text:span></text:p>
      <text:p text:style-name="P5"/>
      <text:p text:style-name="P5"/>
      <text:p text:style-name="P5"><text:span text:style-name="Source_20_Text">&lt;body&gt;</text:span></text:p>
      <text:p text:style-name="P5"/>
      <text:p text:style-name="P5"/>
      <text:p text:style-name="P5"><text:span text:style-name="Source_20_Text">&lt;header class="app-header"&gt;</text:span></text:p>
      <text:p text:style-name="P5"/>
      <text:p text:style-name="P5"><text:span text:style-name="Source_20_Text"><text:s text:c="4"/>&lt;div class="container app-header__container"&gt;</text:span></text:p>
      <text:p text:style-name="P5"/>
      <text:p text:style-name="P5"><text:span text:style-name="Source_20_Text"><text:s text:c="8"/>&lt;a href="index.html" class="app-header__logo"&gt;</text:span></text:p>
      <text:p text:style-name="P5"><text:span text:style-name="Source_20_Text"><text:s text:c="12"/>Biblioteca Apócrifa</text:span></text:p>
      <text:p text:style-name="P5"><text:span text:style-name="Source_20_Text"><text:s text:c="8"/>&lt;/a&gt;</text:span></text:p>
      <text:p text:style-name="P5"/>
      <text:p text:style-name="P5"/>
      <text:p text:style-name="P5"><text:span text:style-name="Source_20_Text"><text:s text:c="8"/>&lt;nav class="app-header__nav"&gt;</text:span></text:p>
      <text:p text:style-name="P5"/>
      <text:p text:style-name="P5"><text:span text:style-name="Source_20_Text"><text:s text:c="12"/>&lt;a href="index.html"&gt;</text:span></text:p>
      <text:p text:style-name="P5"><text:span text:style-name="Source_20_Text"><text:s text:c="16"/>Início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biblioteca.html"&gt;</text:span></text:p>
      <text:p text:style-name="P5"><text:span text:style-name="Source_20_Text"><text:s text:c="16"/>Biblioteca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leitura.html"&gt;</text:span></text:p>
      <text:p text:style-name="P5"><text:span text:style-name="Source_20_Text"><text:s text:c="16"/>Área de Leitura</text:span></text:p>
      <text:p text:style-name="P5"><text:span text:style-name="Source_20_Text"><text:s text:c="12"/>&lt;/a&gt;</text:span></text:p>
      <text:p text:style-name="P5"/>
      <text:p text:style-name="P5"><text:soft-page-break/><text:span text:style-name="Source_20_Text"><text:s text:c="12"/>&lt;a href="paginas/comunidade.html"&gt;</text:span></text:p>
      <text:p text:style-name="P5"><text:span text:style-name="Source_20_Text"><text:s text:c="16"/>Comunidade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perfil.html"&gt;</text:span></text:p>
      <text:p text:style-name="P5"><text:span text:style-name="Source_20_Text"><text:s text:c="16"/>Perfil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8"/>&lt;/nav&gt;</text:span></text:p>
      <text:p text:style-name="P5"/>
      <text:p text:style-name="P5"/>
      <text:p text:style-name="P5"><text:span text:style-name="Source_20_Text"><text:s text:c="8"/>&lt;div class="app-header__actions"&gt;</text:span></text:p>
      <text:p text:style-name="P5"/>
      <text:p text:style-name="P5"><text:span text:style-name="Source_20_Text"><text:s text:c="12"/>&lt;button class="icon-button" aria-label="Pesquisar"&gt;</text:span></text:p>
      <text:p text:style-name="P5"><text:span text:style-name="Source_20_Text"><text:s text:c="16"/>🔍</text:span></text:p>
      <text:p text:style-name="P5"><text:span text:style-name="Source_20_Text"><text:s text:c="12"/>&lt;/button&gt;</text:span></text:p>
      <text:p text:style-name="P5"/>
      <text:p text:style-name="P5"/>
      <text:p text:style-name="P5"><text:span text:style-name="Source_20_Text"><text:s text:c="12"/>&lt;button class="icon-button" aria-label="Perfil"&gt;</text:span></text:p>
      <text:p text:style-name="P5"><text:span text:style-name="Source_20_Text"><text:s text:c="16"/>👤</text:span></text:p>
      <text:p text:style-name="P5"><text:span text:style-name="Source_20_Text"><text:s text:c="12"/>&lt;/button&gt;</text:span></text:p>
      <text:p text:style-name="P5"/>
      <text:p text:style-name="P5"><text:span text:style-name="Source_20_Text"><text:s text:c="8"/>&lt;/div&gt;</text:span></text:p>
      <text:p text:style-name="P5"/>
      <text:p text:style-name="P5"><text:span text:style-name="Source_20_Text"><text:s text:c="4"/>&lt;/div&gt;</text:span></text:p>
      <text:p text:style-name="P5"/>
      <text:p text:style-name="P5"><text:span text:style-name="Source_20_Text">&lt;/header&gt;</text:span></text:p>
      <text:p text:style-name="P5"/>
      <text:p text:style-name="P5"/>
      <text:p text:style-name="P5"/>
      <text:p text:style-name="P5"><text:span text:style-name="Source_20_Text">&lt;main&gt;</text:span></text:p>
      <text:p text:style-name="P5"/>
      <text:p text:style-name="P5"/>
      <text:p text:style-name="P5"><text:span text:style-name="Source_20_Text">&lt;!-- HERO --&gt;</text:span></text:p>
      <text:p text:style-name="P5"/>
      <text:p text:style-name="P5"><text:span text:style-name="Source_20_Text">&lt;section class="hero"&gt;</text:span></text:p>
      <text:p text:style-name="P5"><text:soft-page-break/></text:p>
      <text:p text:style-name="P5"><text:span text:style-name="Source_20_Text"><text:s text:c="4"/>&lt;div class="container"&gt;</text:span></text:p>
      <text:p text:style-name="P5"/>
      <text:p text:style-name="P5"><text:span text:style-name="Source_20_Text"><text:s text:c="8"/>&lt;h1&gt;</text:span></text:p>
      <text:p text:style-name="P5"><text:span text:style-name="Source_20_Text"><text:s text:c="12"/>Biblioteca Apócrifa</text:span></text:p>
      <text:p text:style-name="P5"><text:span text:style-name="Source_20_Text"><text:s text:c="8"/>&lt;/h1&gt;</text:span></text:p>
      <text:p text:style-name="P5"/>
      <text:p text:style-name="P5"/>
      <text:p text:style-name="P5"><text:span text:style-name="Source_20_Text"><text:s text:c="8"/>&lt;p&gt;</text:span></text:p>
      <text:p text:style-name="P5"><text:span text:style-name="Source_20_Text"><text:s text:c="12"/>Uma plataforma digital dedicada ao estudo,</text:span></text:p>
      <text:p text:style-name="P5"><text:span text:style-name="Source_20_Text"><text:s text:c="12"/>preservação e pesquisa de textos antigos,</text:span></text:p>
      <text:p text:style-name="P5"><text:span text:style-name="Source_20_Text"><text:s text:c="12"/>apócrifos e gnósticos.</text:span></text:p>
      <text:p text:style-name="P5"><text:span text:style-name="Source_20_Text"><text:s text:c="8"/>&lt;/p&gt;</text:span></text:p>
      <text:p text:style-name="P5"/>
      <text:p text:style-name="P5"/>
      <text:p text:style-name="P5"><text:span text:style-name="Source_20_Text"><text:s text:c="8"/>&lt;a href="paginas/biblioteca.html" class="button-primary"&gt;</text:span></text:p>
      <text:p text:style-name="P5"><text:span text:style-name="Source_20_Text"><text:s text:c="12"/>Explorar Biblioteca</text:span></text:p>
      <text:p text:style-name="P5"><text:span text:style-name="Source_20_Text"><text:s text:c="8"/>&lt;/a&gt;</text:span></text:p>
      <text:p text:style-name="P5"/>
      <text:p text:style-name="P5"><text:span text:style-name="Source_20_Text"><text:s text:c="4"/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><text:span text:style-name="Source_20_Text">&lt;!-- INTRODUÇÃO --&gt;</text:span></text:p>
      <text:p text:style-name="P5"/>
      <text:p text:style-name="P5"><text:span text:style-name="Source_20_Text">&lt;section class="intro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O que são textos apócrifos?</text:span></text:p>
      <text:p text:style-name="P5"><text:span text:style-name="Source_20_Text">&lt;/h2&gt;</text:span></text:p>
      <text:p text:style-name="P5"><text:soft-page-break/></text:p>
      <text:p text:style-name="P5"/>
      <text:p text:style-name="P5"><text:span text:style-name="Source_20_Text">&lt;p&gt;</text:span></text:p>
      <text:p text:style-name="P5"><text:span text:style-name="Source_20_Text">A palavra "apócrifo" origina-se do grego</text:span></text:p>
      <text:p text:style-name="P5"><text:span text:style-name="Source_20_Text">&lt;em&gt;apokryphos&lt;/em&gt;, que significa</text:span></text:p>
      <text:p text:style-name="P5"><text:span text:style-name="Source_20_Text">"oculto" ou "secreto"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Ao longo da história, diversos textos religiosos</text:span></text:p>
      <text:p text:style-name="P5"><text:span text:style-name="Source_20_Text">e literários ficaram fora dos cânones oficiais,</text:span></text:p>
      <text:p text:style-name="P5"><text:span text:style-name="Source_20_Text">mas continuam sendo importantes fontes para o</text:span></text:p>
      <text:p text:style-name="P5"><text:span text:style-name="Source_20_Text">estudo histórico, cultural e religioso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><text:span text:style-name="Source_20_Text">&lt;!-- HISTÓRIA --&gt;</text:span></text:p>
      <text:p text:style-name="P5"/>
      <text:p text:style-name="P5"><text:span text:style-name="Source_20_Text">&lt;section class="history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Contexto Histórico</text:span></text:p>
      <text:p text:style-name="P5"><text:span text:style-name="Source_20_Text">&lt;/h2&gt;</text:span></text:p>
      <text:p text:style-name="P5"/>
      <text:p text:style-name="P5"><text:soft-page-break/></text:p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Origem dos textos apócrifos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Os textos apócrifos surgiram principalmente entre</text:span></text:p>
      <text:p text:style-name="P5"><text:span text:style-name="Source_20_Text">os séculos III a.C. e I d.C., durante um período</text:span></text:p>
      <text:p text:style-name="P5"><text:span text:style-name="Source_20_Text">de grandes transformações culturais e religiosa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A descoberta de Nag Hammadi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Em 1945, a descoberta da Biblioteca de Nag Hammadi,</text:span></text:p>
      <text:p text:style-name="P5"><text:span text:style-name="Source_20_Text">no Egito, revelou uma coleção de textos gnósticos</text:span></text:p>
      <text:p text:style-name="P5"><text:span text:style-name="Source_20_Text">que trouxe novas informações sobre diferentes</text:span></text:p>
      <text:p text:style-name="P5"><text:span text:style-name="Source_20_Text">correntes do cristianismo primitivo.</text:span></text:p>
      <text:p text:style-name="P5"><text:span text:style-name="Source_20_Text">&lt;/p&gt;</text:span></text:p>
      <text:p text:style-name="P5"/>
      <text:p text:style-name="P5"/>
      <text:p text:style-name="P5"><text:soft-page-break/><text:span text:style-name="Source_20_Text">&lt;/article&gt;</text:span></text:p>
      <text:p text:style-name="P5"/>
      <text:p text:style-name="P5"/>
      <text:p text:style-name="P5"/>
      <text:p text:style-name="P5"/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Os Manuscritos do Mar Morto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Descobertos em 1947, os Manuscritos do Mar Morto</text:span></text:p>
      <text:p text:style-name="P5"><text:span text:style-name="Source_20_Text">ampliaram o conhecimento sobre comunidades judaicas</text:span></text:p>
      <text:p text:style-name="P5"><text:span text:style-name="Source_20_Text">antigas e seus textos religioso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COMO FUNCIONA --&gt;</text:span></text:p>
      <text:p text:style-name="P5"/>
      <text:p text:style-name="P5"><text:soft-page-break/><text:span text:style-name="Source_20_Text">&lt;section class="platform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Como funciona a plataforma?</text:span></text:p>
      <text:p text:style-name="P5"><text:span text:style-name="Source_20_Text">&lt;/h2&gt;</text:span></text:p>
      <text:p text:style-name="P5"/>
      <text:p text:style-name="P5"/>
      <text:p text:style-name="P5"/>
      <text:p text:style-name="P5"><text:span text:style-name="Source_20_Text">&lt;div class="platform-grid"&gt;</text:span></text:p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 Bibliotec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Explore obras organizadas por categoria,</text:span></text:p>
      <text:p text:style-name="P5"><text:span text:style-name="Source_20_Text">autor e contexto histórico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 Área de leitur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oft-page-break/><text:span text:style-name="Source_20_Text">Leia textos divididos por seções,</text:span></text:p>
      <text:p text:style-name="P5"><text:span text:style-name="Source_20_Text">acompanhados de comentários e análises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 Pesquis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Estude diferentes documentos históricos</text:span></text:p>
      <text:p text:style-name="P5"><text:span text:style-name="Source_20_Text">em uma experiência organizada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LIVROS EM DESTAQUE --&gt;</text:span></text:p>
      <text:p text:style-name="P5"><text:soft-page-break/></text:p>
      <text:p text:style-name="P5"><text:span text:style-name="Source_20_Text">&lt;section class="featured-books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Obras em destaque</text:span></text:p>
      <text:p text:style-name="P5"><text:span text:style-name="Source_20_Text">&lt;/h2&gt;</text:span></text:p>
      <text:p text:style-name="P5"/>
      <text:p text:style-name="P5"/>
      <text:p text:style-name="P5"><text:span text:style-name="Source_20_Text">&lt;div class="books-grid"&gt;</text:span></text:p>
      <text:p text:style-name="P5"/>
      <text:p text:style-name="P5"/>
      <text:p text:style-name="P5"><text:span text:style-name="Source_20_Text">&lt;!-- Futuramente renderizado pelo livros.json --&gt;</text:span></text:p>
      <text:p text:style-name="P5"/>
      <text:p text:style-name="P5"/>
      <text:p text:style-name="P5"><text:span text:style-name="Source_20_Text">&lt;article class="book-card"&gt;</text:span></text:p>
      <text:p text:style-name="P5"/>
      <text:p text:style-name="P5"><text:span text:style-name="Source_20_Text">&lt;h3&gt;</text:span></text:p>
      <text:p text:style-name="P5"><text:span text:style-name="Source_20_Text">Evangelho de Tomé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Texto gnóstico encontrado na Biblioteca de Nag Hammadi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a href="paginas/leitura.html"&gt;</text:span></text:p>
      <text:p text:style-name="P5"><text:span text:style-name="Source_20_Text">Começar estudo</text:span></text:p>
      <text:p text:style-name="P5"><text:span text:style-name="Source_20_Text">&lt;/a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><text:soft-page-break/><text:span text:style-name="Source_20_Text">&lt;/div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NOTA DO EDITOR --&gt;</text:span></text:p>
      <text:p text:style-name="P5"/>
      <text:p text:style-name="P5"><text:span text:style-name="Source_20_Text">&lt;section class="editor-note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Nota do Editor</text:span></text:p>
      <text:p text:style-name="P5"><text:span text:style-name="Source_20_Text">&lt;/h2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Este site possui fins puramente históricos,</text:span></text:p>
      <text:p text:style-name="P5"><text:span text:style-name="Source_20_Text">literários e académicos. O objetivo é preservar</text:span></text:p>
      <text:p text:style-name="P5"><text:span text:style-name="Source_20_Text">e disponibilizar o acesso à literatura antiga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><text:soft-page-break/></text:p>
      <text:p text:style-name="P5"/>
      <text:p text:style-name="P5"><text:span text:style-name="Source_20_Text">&lt;/mai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footer class="footer"&gt;</text:span></text:p>
      <text:p text:style-name="P5"/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© 2026 Biblioteca Apócrifa.</text:span></text:p>
      <text:p text:style-name="P5"><text:span text:style-name="Source_20_Text">Projeto desenvolvido para fins históricos,</text:span></text:p>
      <text:p text:style-name="P5"><text:span text:style-name="Source_20_Text">literários e académico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Autor:</text:span></text:p>
      <text:p text:style-name="P5"><text:span text:style-name="Source_20_Text">&lt;em&gt;João de Sousa António&lt;/em&gt;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footer&gt;</text:span></text:p>
      <text:p text:style-name="P5"/>
      <text:p text:style-name="P5"/>
      <text:p text:style-name="P5"/>
      <text:p text:style-name="P5"/>
      <text:p text:style-name="P5"><text:soft-page-break/><text:span text:style-name="Source_20_Text">&lt;/body&gt;</text:span></text:p>
      <text:p text:style-name="P5"/>
      <text:p text:style-name="P5"><text:span text:style-name="Source_20_Text">&lt;/html&gt;</text:span></text:p>
      <text:p text:style-name="P6"/>
      <text:h text:style-name="P7" text:outline-level="2">O que foi construído nesta etapa</text:h>
      <text:p text:style-name="Text_20_body">Agora o <text:span text:style-name="Source_20_Text">index.html</text:span> já está alinhado com o projeto:</text:p>
      <text:h text:style-name="P8" text:outline-level="3">Antes:</text:h>
      <text:p text:style-name="Text_20_body">Era uma página de texto histórico.</text:p>
      <text:h text:style-name="P8" text:outline-level="3">Agora:</text:h>
      <text:p text:style-name="Text_20_body">É uma <text:span text:style-name="Strong_20_Emphasis">landing page de uma plataforma de estudo</text:span>.</text:p>
      <text:p text:style-name="Text_20_body">A estrutura já conversa com:</text:p>
      <text:list text:style-name="L4">
        <text:list-item>
          <text:p text:style-name="P9">Design System;</text:p>
        </text:list-item>
        <text:list-item>
          <text:p text:style-name="P9">Wireframe;</text:p>
        </text:list-item>
        <text:list-item>
          <text:p text:style-name="P9">Arquitetura de componentes;</text:p>
        </text:list-item>
        <text:list-item>
          <text:p text:style-name="P9">Futuro consumo do <text:span text:style-name="Source_20_Text">livros.json</text:span>.</text:p>
        </text:list-item>
      </text:list>
      <text:p text:style-name="P6"/>
      <text:h text:style-name="P7" text:outline-level="2">Próximo passo da Fase 4.1</text:h>
      <text:p text:style-name="Text_20_body">Antes de avançarmos para outra página, precisamos fechar a Home.</text:p>
      <text:p text:style-name="Text_20_body">A sequência correta será:</text:p>
      <text:list text:style-name="L5">
        <text:list-item>
          <text:p text:style-name="P10">✅ Estrutura HTML da Home (concluído)</text:p>
        </text:list-item>
        <text:list-item>
          <text:p text:style-name="P10">⏳ Implementar o CSS da Home (<text:span text:style-name="Source_20_Text">home.css</text:span>)</text:p>
        </text:list-item>
        <text:list-item>
          <text:p text:style-name="P10"><text:bookmark-start text:name="__DdeLink__3366_829906918"/>⏳ Testar responsividade</text:p>
        </text:list-item>
        <text:list-item>
          <text:p text:style-name="P10">⏳ Ajustar detalhes visuais<text:bookmark-end text:name="__DdeLink__3366_829906918"/></text:p>
        </text:list-item>
      </text:list>
      <text:p text:style-name="Text_20_body">Só depois disso vamos para:</text:p>
      <text:p text:style-name="Text_20_body"><text:span text:style-name="Strong_20_Emphasis">Fase 4.2 — Desenvolver a Biblioteca (</text:span><text:span text:style-name="Strong_20_Emphasis"><text:span text:style-name="Source_20_Text">biblioteca.html</text:span></text:span><text:span text:style-name="Strong_20_Emphasis">)</text:span></text:p>
      <text:p text:style-name="Text_20_body">Então o próximo trabalho será transformar esse HTML em uma interface visual usando o nosso Design System.</text:p>
      <text:p text:style-name="Text_20_body">Perfeito. Esse é exatamente o fluxo que eu seguiria em um projeto profissional.</text:p>
      <text:p text:style-name="Text_20_body">A partir de agora, vamos seguir esta regra:</text:p>
      <text:list text:style-name="L6">
        <text:list-item>
          <text:p text:style-name="P11">Primeiro definimos o Design System (já concluído).</text:p>
        </text:list-item>
        <text:list-item>
          <text:p text:style-name="P11">Depois implementamos esse Design System em CSS.</text:p>
        </text:list-item>
        <text:list-item>
          <text:p text:style-name="P11">Só depois estilizamos as páginas (<text:span text:style-name="Source_20_Text">home.css</text:span>, <text:span text:style-name="Source_20_Text">biblioteca.css</text:span>, etc.).</text:p>
        </text:list-item>
      </text:list>
      <text:p text:style-name="Text_20_body"><text:soft-page-break/>Assim evitamos retrabalho.</text:p>
      <text:p text:style-name="P6"/>
      <text:h text:style-name="P12" text:outline-level="1">Objetivo do <text:span text:style-name="Source_20_Text">base.css</text:span></text:h>
      <text:p text:style-name="Text_20_body">O <text:span text:style-name="Source_20_Text">base.css</text:span> <text:span text:style-name="Strong_20_Emphasis">não é para criar componentes</text:span> nem definir cores específicas da Home. Ele é responsável apenas pelos estilos globais da aplicação.</text:p>
      <text:p text:style-name="Text_20_body">Sua responsabilidade será:</text:p>
      <text:list text:style-name="L7">
        <text:list-item>
          <text:p text:style-name="P13">Reset básico.</text:p>
        </text:list-item>
        <text:list-item>
          <text:p text:style-name="P13">Configuração do <text:span text:style-name="Source_20_Text">html</text:span> e <text:span text:style-name="Source_20_Text">body</text:span>.</text:p>
        </text:list-item>
        <text:list-item>
          <text:p text:style-name="P13">Tipografia global.</text:p>
        </text:list-item>
        <text:list-item>
          <text:p text:style-name="P13">Links.</text:p>
        </text:list-item>
        <text:list-item>
          <text:p text:style-name="P13">Imagens.</text:p>
        </text:list-item>
        <text:list-item>
          <text:p text:style-name="P13">Listas.</text:p>
        </text:list-item>
        <text:list-item>
          <text:p text:style-name="P13">Seleção de texto.</text:p>
        </text:list-item>
        <text:list-item>
          <text:p text:style-name="P13">Comportamentos padrão.</text:p>
        </text:list-item>
      </text:list>
      <text:p text:style-name="Text_20_body">Tudo que for botão, card, navbar, footer ou hero ficará em <text:span text:style-name="Source_20_Text">components.css</text:span>.</text:p>
      <text:p text:style-name="P6"/>
      <text:h text:style-name="P7" text:outline-level="2"><text:span text:style-name="Source_20_Text">assets/css/base.css</text:span></text:h>
      <text:p text:style-name="P5"><text:span text:style-name="Source_20_Text">/* ==========================================================</text:span></text:p>
      <text:p text:style-name="P5"><text:span text:style-name="Source_20_Text"><text:s text:c="3"/>RESET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*,</text:span></text:p>
      <text:p text:style-name="P5"><text:span text:style-name="Source_20_Text">*::before,</text:span></text:p>
      <text:p text:style-name="P5"><text:span text:style-name="Source_20_Text">*::after {</text:span></text:p>
      <text:p text:style-name="P5"><text:span text:style-name="Source_20_Text"><text:s text:c="4"/>margin: 0;</text:span></text:p>
      <text:p text:style-name="P5"><text:span text:style-name="Source_20_Text"><text:s text:c="4"/>padding: 0;</text:span></text:p>
      <text:p text:style-name="P5"><text:span text:style-name="Source_20_Text"><text:s text:c="4"/>box-sizing: border-box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DOCUMENTO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html {</text:span></text:p>
      <text:p text:style-name="P5"><text:soft-page-break/><text:span text:style-name="Source_20_Text"><text:s text:c="4"/>font-size: 100%;</text:span></text:p>
      <text:p text:style-name="P5"><text:span text:style-name="Source_20_Text"><text:s text:c="4"/>scroll-behavior: smooth;</text:span></text:p>
      <text:p text:style-name="P5"><text:span text:style-name="Source_20_Text">}</text:span></text:p>
      <text:p text:style-name="P5"/>
      <text:p text:style-name="P5"><text:span text:style-name="Source_20_Text">body {</text:span></text:p>
      <text:p text:style-name="P5"><text:span text:style-name="Source_20_Text"><text:s text:c="4"/>font-family: var(--font-interface);</text:span></text:p>
      <text:p text:style-name="P5"><text:span text:style-name="Source_20_Text"><text:s text:c="4"/>font-size: var(--font-size-body);</text:span></text:p>
      <text:p text:style-name="P5"><text:span text:style-name="Source_20_Text"><text:s text:c="4"/>line-height: 1.7;</text:span></text:p>
      <text:p text:style-name="P5"/>
      <text:p text:style-name="P5"><text:span text:style-name="Source_20_Text"><text:s text:c="4"/>color: var(--color-text);</text:span></text:p>
      <text:p text:style-name="P5"><text:span text:style-name="Source_20_Text"><text:s text:c="4"/>background-color: var(--color-background);</text:span></text:p>
      <text:p text:style-name="P5"/>
      <text:p text:style-name="P5"><text:span text:style-name="Source_20_Text"><text:s text:c="4"/>text-rendering: optimizeLegibility;</text:span></text:p>
      <text:p text:style-name="P5"><text:span text:style-name="Source_20_Text"><text:s text:c="4"/>-webkit-font-smoothing: antialiased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TIPOGRAFIA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h1,</text:span></text:p>
      <text:p text:style-name="P5"><text:span text:style-name="Source_20_Text">h2,</text:span></text:p>
      <text:p text:style-name="P5"><text:span text:style-name="Source_20_Text">h3,</text:span></text:p>
      <text:p text:style-name="P5"><text:span text:style-name="Source_20_Text">h4,</text:span></text:p>
      <text:p text:style-name="P5"><text:span text:style-name="Source_20_Text">h5,</text:span></text:p>
      <text:p text:style-name="P5"><text:span text:style-name="Source_20_Text">h6 {</text:span></text:p>
      <text:p text:style-name="P5"><text:span text:style-name="Source_20_Text"><text:s text:c="4"/>font-family: var(--font-reading);</text:span></text:p>
      <text:p text:style-name="P5"><text:span text:style-name="Source_20_Text"><text:s text:c="4"/>font-weight: 700;</text:span></text:p>
      <text:p text:style-name="P5"><text:span text:style-name="Source_20_Text"><text:s text:c="4"/>line-height: 1.3;</text:span></text:p>
      <text:p text:style-name="P5"><text:span text:style-name="Source_20_Text"><text:s text:c="4"/>color: var(--color-text);</text:span></text:p>
      <text:p text:style-name="P5"><text:span text:style-name="Source_20_Text">}</text:span></text:p>
      <text:p text:style-name="P5"/>
      <text:p text:style-name="P5"><text:span text:style-name="Source_20_Text">h1 {</text:span></text:p>
      <text:p text:style-name="P5"><text:span text:style-name="Source_20_Text"><text:s text:c="4"/>font-size: var(--font-size-h1);</text:span></text:p>
      <text:p text:style-name="P5"><text:span text:style-name="Source_20_Text">}</text:span></text:p>
      <text:p text:style-name="P5"/>
      <text:p text:style-name="P5"><text:soft-page-break/><text:span text:style-name="Source_20_Text">h2 {</text:span></text:p>
      <text:p text:style-name="P5"><text:span text:style-name="Source_20_Text"><text:s text:c="4"/>font-size: var(--font-size-h2);</text:span></text:p>
      <text:p text:style-name="P5"><text:span text:style-name="Source_20_Text">}</text:span></text:p>
      <text:p text:style-name="P5"/>
      <text:p text:style-name="P5"><text:span text:style-name="Source_20_Text">h3 {</text:span></text:p>
      <text:p text:style-name="P5"><text:span text:style-name="Source_20_Text"><text:s text:c="4"/>font-size: var(--font-size-h3);</text:span></text:p>
      <text:p text:style-name="P5"><text:span text:style-name="Source_20_Text">}</text:span></text:p>
      <text:p text:style-name="P5"/>
      <text:p text:style-name="P5"><text:span text:style-name="Source_20_Text">p {</text:span></text:p>
      <text:p text:style-name="P5"><text:span text:style-name="Source_20_Text"><text:s text:c="4"/>margin-bottom: var(--space-md);</text:span></text:p>
      <text:p text:style-name="P5"><text:span text:style-name="Source_20_Text">}</text:span></text:p>
      <text:p text:style-name="P5"/>
      <text:p text:style-name="P5"><text:span text:style-name="Source_20_Text">small {</text:span></text:p>
      <text:p text:style-name="P5"><text:span text:style-name="Source_20_Text"><text:s text:c="4"/>font-size: var(--font-size-small)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LINK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a {</text:span></text:p>
      <text:p text:style-name="P5"><text:span text:style-name="Source_20_Text"><text:s text:c="4"/>color: inherit;</text:span></text:p>
      <text:p text:style-name="P5"><text:span text:style-name="Source_20_Text"><text:s text:c="4"/>text-decoration: none;</text:span></text:p>
      <text:p text:style-name="P5"><text:span text:style-name="Source_20_Text"><text:s text:c="4"/>transition: color .3s ease;</text:span></text:p>
      <text:p text:style-name="P5"><text:span text:style-name="Source_20_Text">}</text:span></text:p>
      <text:p text:style-name="P5"/>
      <text:p text:style-name="P5"><text:span text:style-name="Source_20_Text">a:hover {</text:span></text:p>
      <text:p text:style-name="P5"><text:span text:style-name="Source_20_Text"><text:s text:c="4"/>color: var(--color-primary)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LISTA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ul,</text:span></text:p>
      <text:p text:style-name="P5"><text:span text:style-name="Source_20_Text">ol {</text:span></text:p>
      <text:p text:style-name="P5"><text:soft-page-break/><text:span text:style-name="Source_20_Text"><text:s text:c="4"/>list-style: none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IMAGEN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img {</text:span></text:p>
      <text:p text:style-name="P5"><text:span text:style-name="Source_20_Text"><text:s text:c="4"/>display: block;</text:span></text:p>
      <text:p text:style-name="P5"><text:span text:style-name="Source_20_Text"><text:s text:c="4"/>max-width: 100%;</text:span></text:p>
      <text:p text:style-name="P5"><text:span text:style-name="Source_20_Text"><text:s text:c="4"/>height: auto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FORMULÁRIO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button,</text:span></text:p>
      <text:p text:style-name="P5"><text:span text:style-name="Source_20_Text">input,</text:span></text:p>
      <text:p text:style-name="P5"><text:span text:style-name="Source_20_Text">textarea,</text:span></text:p>
      <text:p text:style-name="P5"><text:span text:style-name="Source_20_Text">select {</text:span></text:p>
      <text:p text:style-name="P5"><text:span text:style-name="Source_20_Text"><text:s text:c="4"/>font: inherit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SELEÇÃO DE TEXTO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::selection {</text:span></text:p>
      <text:p text:style-name="P5"><text:span text:style-name="Source_20_Text"><text:s text:c="4"/>background-color: var(--color-secondary);</text:span></text:p>
      <text:p text:style-name="P5"><text:span text:style-name="Source_20_Text"><text:s text:c="4"/>color: #ffffff;</text:span></text:p>
      <text:p text:style-name="P5"><text:span text:style-name="Source_20_Text">}</text:span></text:p>
      <text:p text:style-name="P6"/>
      <text:h text:style-name="P7" text:outline-level="2">O que este arquivo NÃO terá</text:h>
      <text:p text:style-name="Text_20_body">Não colocaremos aqui:</text:p>
      <text:list text:style-name="L8">
        <text:list-item>
          <text:p text:style-name="P14"><text:span text:style-name="Source_20_Text">.hero</text:span></text:p>
        </text:list-item>
        <text:list-item>
          <text:p text:style-name="P14"><text:soft-page-break/><text:span text:style-name="Source_20_Text">.button-primary</text:span></text:p>
        </text:list-item>
        <text:list-item>
          <text:p text:style-name="P14"><text:span text:style-name="Source_20_Text">.book-card</text:span></text:p>
        </text:list-item>
        <text:list-item>
          <text:p text:style-name="P14"><text:span text:style-name="Source_20_Text">.feature-card</text:span></text:p>
        </text:list-item>
        <text:list-item>
          <text:p text:style-name="P14"><text:span text:style-name="Source_20_Text">.footer</text:span></text:p>
        </text:list-item>
        <text:list-item>
          <text:p text:style-name="P14"><text:span text:style-name="Source_20_Text">.navbar</text:span></text:p>
        </text:list-item>
        <text:list-item>
          <text:p text:style-name="P14"><text:span text:style-name="Source_20_Text">.container</text:span></text:p>
        </text:list-item>
      </text:list>
      <text:p text:style-name="Text_20_body">Esses pertencem a outros arquivos da arquitetura.</text:p>
      <text:p text:style-name="P6"/>
      <text:h text:style-name="P8" text:outline-level="3">Próximo passo</text:h>
      <text:p text:style-name="Text_20_body">Depois do <text:span text:style-name="Source_20_Text">base.css</text:span>, minha sugestão é seguir esta ordem:</text:p>
      <text:list text:style-name="L9">
        <text:list-item>
          <text:p text:style-name="P15">✅ <text:span text:style-name="Source_20_Text">variables.css</text:span> (implementando todas as variáveis do Design System)</text:p>
        </text:list-item>
        <text:list-item>
          <text:p text:style-name="P15">✅ <text:span text:style-name="Source_20_Text">layout.css</text:span> (container, grids, seções)</text:p>
        </text:list-item>
        <text:list-item>
          <text:p text:style-name="P15">✅ <text:span text:style-name="Source_20_Text">components.css</text:span> (botões, cards, header, footer e componentes reutilizáveis)</text:p>
        </text:list-item>
        <text:list-item>
          <text:p text:style-name="P15">✅ <text:span text:style-name="Source_20_Text">home.css</text:span> (estilos exclusivos da página inicial)</text:p>
        </text:list-item>
      </text:list>
      <text:p text:style-name="Text_20_body">Essa sequência mantém a arquitetura limpa, escalável e fácil de evoluir conforme a plataforma crescer.</text:p>
      <text:p text:style-name="Text_20_body">Excelente. Agora vamos criar o arquivo mais importante do projeto: <text:span text:style-name="Strong_20_Emphasis"><text:span text:style-name="Source_20_Text">variables.css</text:span></text:span>.</text:p>
      <text:p text:style-name="Text_20_body">Ele será a base de todo o Design System. Nenhum outro arquivo CSS deverá possuir valores "mágicos" como <text:span text:style-name="Source_20_Text">#243447</text:span>, <text:span text:style-name="Source_20_Text">16px</text:span> ou <text:span text:style-name="Source_20_Text">1200px</text:span>. Tudo será consumido através das variáveis definidas aqui.</text:p>
      <text:p text:style-name="P6"/>
      <text:h text:style-name="P12" text:outline-level="1">Responsabilidade do <text:span text:style-name="Source_20_Text">variables.css</text:span></text:h>
      <text:p text:style-name="Text_20_body">Este arquivo armazenará apenas <text:span text:style-name="Strong_20_Emphasis">tokens de design</text:span>, ou seja:</text:p>
      <text:list text:style-name="L10">
        <text:list-item>
          <text:p text:style-name="P16">Cores</text:p>
        </text:list-item>
        <text:list-item>
          <text:p text:style-name="P16">Tipografia</text:p>
        </text:list-item>
        <text:list-item>
          <text:p text:style-name="P16">Tamanhos de fonte</text:p>
        </text:list-item>
        <text:list-item>
          <text:p text:style-name="P16">Espaçamentos</text:p>
        </text:list-item>
        <text:list-item>
          <text:p text:style-name="P16">Bordas</text:p>
        </text:list-item>
        <text:list-item>
          <text:p text:style-name="P16">Sombras</text:p>
        </text:list-item>
        <text:list-item>
          <text:p text:style-name="P16">Containers</text:p>
        </text:list-item>
        <text:list-item>
          <text:p text:style-name="P16">Breakpoints</text:p>
        </text:list-item>
        <text:list-item>
          <text:p text:style-name="P16">Transições</text:p>
        </text:list-item>
      </text:list>
      <text:p text:style-name="Text_20_body"><text:soft-page-break/>Ele <text:span text:style-name="Strong_20_Emphasis">não terá nenhuma classe CSS</text:span> (<text:span text:style-name="Source_20_Text">.button</text:span>, <text:span text:style-name="Source_20_Text">.card</text:span>, etc.).</text:p>
      <text:p text:style-name="P6"/>
      <text:h text:style-name="P7" text:outline-level="2"><text:span text:style-name="Source_20_Text">assets/css/variables.css</text:span></text:h>
      <text:p text:style-name="P5"><text:span text:style-name="Source_20_Text">/* ==========================================================</text:span></text:p>
      <text:p text:style-name="P5"><text:span text:style-name="Source_20_Text"><text:s text:c="3"/>DESIGN TOKENS</text:span></text:p>
      <text:p text:style-name="P5"><text:span text:style-name="Source_20_Text"><text:s text:c="3"/>Biblioteca Apócrifa - Design System v1.0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:root {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CORE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/* Cores principais */</text:span></text:p>
      <text:p text:style-name="P5"><text:span text:style-name="Source_20_Text"><text:s text:c="4"/>--color-primary: #243447;</text:span></text:p>
      <text:p text:style-name="P5"><text:span text:style-name="Source_20_Text"><text:s text:c="4"/>--color-secondary: #9A7B4F;</text:span></text:p>
      <text:p text:style-name="P5"/>
      <text:p text:style-name="P5"><text:span text:style-name="Source_20_Text"><text:s text:c="4"/>/* Fundos */</text:span></text:p>
      <text:p text:style-name="P5"><text:span text:style-name="Source_20_Text"><text:s text:c="4"/>--color-background: #F8F5EF;</text:span></text:p>
      <text:p text:style-name="P5"><text:span text:style-name="Source_20_Text"><text:s text:c="4"/>--color-reading-background: #FCFAF5;</text:span></text:p>
      <text:p text:style-name="P5"><text:span text:style-name="Source_20_Text"><text:s text:c="4"/>--color-surface: #FFFFFF;</text:span></text:p>
      <text:p text:style-name="P5"/>
      <text:p text:style-name="P5"><text:span text:style-name="Source_20_Text"><text:s text:c="4"/>/* Textos */</text:span></text:p>
      <text:p text:style-name="P5"><text:span text:style-name="Source_20_Text"><text:s text:c="4"/>--color-text: #2C2C2C;</text:span></text:p>
      <text:p text:style-name="P5"><text:span text:style-name="Source_20_Text"><text:s text:c="4"/>--color-text-muted: #6B6B6B;</text:span></text:p>
      <text:p text:style-name="P5"/>
      <text:p text:style-name="P5"><text:span text:style-name="Source_20_Text"><text:s text:c="4"/>/* Bordas */</text:span></text:p>
      <text:p text:style-name="P5"><text:span text:style-name="Source_20_Text"><text:s text:c="4"/>--color-border: #D8D2C8;</text:span></text:p>
      <text:p text:style-name="P5"/>
      <text:p text:style-name="P5"><text:span text:style-name="Source_20_Text"><text:s text:c="4"/>/* Estados */</text:span></text:p>
      <text:p text:style-name="P5"><text:span text:style-name="Source_20_Text"><text:s text:c="4"/>--color-success: #2E7D32;</text:span></text:p>
      <text:p text:style-name="P5"><text:span text:style-name="Source_20_Text"><text:s text:c="4"/>--color-warning: #ED6C02;</text:span></text:p>
      <text:p text:style-name="P5"><text:span text:style-name="Source_20_Text"><text:s text:c="4"/>--color-error: #C62828;</text:span></text:p>
      <text:p text:style-name="P5"><text:span text:style-name="Source_20_Text"><text:s text:c="4"/>--color-info: #1565C0;</text:span></text:p>
      <text:p text:style-name="P5"/>
      <text:p text:style-name="P5"><text:soft-page-break/><text:span text:style-name="Source_20_Text"><text:s text:c="4"/>/* ======================================================</text:span></text:p>
      <text:p text:style-name="P5"><text:span text:style-name="Source_20_Text"><text:s text:c="7"/>TIPOGRAFIA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/* Famílias */</text:span></text:p>
      <text:p text:style-name="P5"><text:span text:style-name="Source_20_Text"><text:s text:c="4"/>--font-interface: "Open Sans", sans-serif;</text:span></text:p>
      <text:p text:style-name="P5"><text:span text:style-name="Source_20_Text"><text:s text:c="4"/>--font-reading: "Merriweather", serif;</text:span></text:p>
      <text:p text:style-name="P5"/>
      <text:p text:style-name="P5"><text:span text:style-name="Source_20_Text"><text:s text:c="4"/>/* Escala tipográfica */</text:span></text:p>
      <text:p text:style-name="P5"><text:span text:style-name="Source_20_Text"><text:s text:c="4"/>--font-size-h1: 2.5rem;</text:span></text:p>
      <text:p text:style-name="P5"><text:span text:style-name="Source_20_Text"><text:s text:c="4"/>--font-size-h2: 2rem;</text:span></text:p>
      <text:p text:style-name="P5"><text:span text:style-name="Source_20_Text"><text:s text:c="4"/>--font-size-h3: 1.5rem;</text:span></text:p>
      <text:p text:style-name="P5"/>
      <text:p text:style-name="P5"><text:span text:style-name="Source_20_Text"><text:s text:c="4"/>--font-size-body: 1.125rem;</text:span></text:p>
      <text:p text:style-name="P5"><text:span text:style-name="Source_20_Text"><text:s text:c="4"/>--font-size-small: 0.875rem;</text:span></text:p>
      <text:p text:style-name="P5"/>
      <text:p text:style-name="P5"><text:span text:style-name="Source_20_Text"><text:s text:c="4"/>/* Pesos */</text:span></text:p>
      <text:p text:style-name="P5"><text:span text:style-name="Source_20_Text"><text:s text:c="4"/>--font-weight-regular: 400;</text:span></text:p>
      <text:p text:style-name="P5"><text:span text:style-name="Source_20_Text"><text:s text:c="4"/>--font-weight-semibold: 600;</text:span></text:p>
      <text:p text:style-name="P5"><text:span text:style-name="Source_20_Text"><text:s text:c="4"/>--font-weight-bold: 700;</text:span></text:p>
      <text:p text:style-name="P5"/>
      <text:p text:style-name="P5"><text:span text:style-name="Source_20_Text"><text:s text:c="4"/>/* Altura das linhas */</text:span></text:p>
      <text:p text:style-name="P5"><text:span text:style-name="Source_20_Text"><text:s text:c="4"/>--line-height-heading: 1.3;</text:span></text:p>
      <text:p text:style-name="P5"><text:span text:style-name="Source_20_Text"><text:s text:c="4"/>--line-height-body: 1.7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ESPAÇAMENTO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space-xs: .25rem;</text:span></text:p>
      <text:p text:style-name="P5"><text:span text:style-name="Source_20_Text"><text:s text:c="4"/>--space-sm: .5rem;</text:span></text:p>
      <text:p text:style-name="P5"><text:span text:style-name="Source_20_Text"><text:s text:c="4"/>--space-md: 1rem;</text:span></text:p>
      <text:p text:style-name="P5"><text:span text:style-name="Source_20_Text"><text:s text:c="4"/>--space-lg: 2rem;</text:span></text:p>
      <text:p text:style-name="P5"><text:span text:style-name="Source_20_Text"><text:s text:c="4"/>--space-xl: 4rem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oft-page-break/><text:span text:style-name="Source_20_Text"><text:s text:c="7"/>CONTAINER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container-width: 1200px;</text:span></text:p>
      <text:p text:style-name="P5"><text:span text:style-name="Source_20_Text"><text:s text:c="4"/>--reading-width: 750px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BORDA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radius-sm: 4px;</text:span></text:p>
      <text:p text:style-name="P5"><text:span text:style-name="Source_20_Text"><text:s text:c="4"/>--radius-md: 8px;</text:span></text:p>
      <text:p text:style-name="P5"><text:span text:style-name="Source_20_Text"><text:s text:c="4"/>--radius-lg: 16px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SOMBRA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shadow-sm: 0 2px 6px rgba(0, 0, 0, 0.08);</text:span></text:p>
      <text:p text:style-name="P5"><text:span text:style-name="Source_20_Text"><text:s text:c="4"/>--shadow-md: 0 6px 18px rgba(0, 0, 0, 0.12)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TRANSIÇÕE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transition-fast: .2s ease;</text:span></text:p>
      <text:p text:style-name="P5"><text:span text:style-name="Source_20_Text"><text:s text:c="4"/>--transition-normal: .3s ease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BREAKPOINT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breakpoint-mobile: 640px;</text:span></text:p>
      <text:p text:style-name="P5"><text:span text:style-name="Source_20_Text"><text:s text:c="4"/>--breakpoint-tablet: 1024px;</text:span></text:p>
      <text:p text:style-name="P5"><text:span text:style-name="Source_20_Text"><text:s text:c="4"/>--breakpoint-desktop: 1200px;</text:span></text:p>
      <text:p text:style-name="P5"/>
      <text:p text:style-name="P5"><text:soft-page-break/><text:span text:style-name="Source_20_Text">}</text:span></text:p>
      <text:p text:style-name="P6"/>
      <text:h text:style-name="P7" text:outline-level="2">Avaliação da arquitetura</text:h>
      <text:p text:style-name="Text_20_body">Esse arquivo ficou alinhado ao Design System que definimos. Ele também é escalável: se no futuro você quiser alterar a cor principal da plataforma ou aumentar o tamanho dos títulos, bastará mudar uma variável.</text:p>
      <text:h text:style-name="P8" text:outline-level="3">Uma sugestão de melhoria</text:h>
      <text:p text:style-name="Text_20_body">Pensando na <text:span text:style-name="Strong_20_Emphasis">Área de Leitura</text:span>, que será o núcleo da plataforma, eu acrescentaria mais dois tokens de tipografia:</text:p>
      <text:p text:style-name="P5"><text:span text:style-name="Source_20_Text">/* Largura ideal para leitura */</text:span></text:p>
      <text:p text:style-name="P5"><text:span text:style-name="Source_20_Text">--reading-line-height: 1.9;</text:span></text:p>
      <text:p text:style-name="P5"/>
      <text:p text:style-name="P5"><text:span text:style-name="Source_20_Text">/* Espaçamento entre parágrafos */</text:span></text:p>
      <text:p text:style-name="P5"><text:span text:style-name="Source_20_Text">--paragraph-spacing: 1.5rem;</text:span></text:p>
      <text:p text:style-name="Text_20_body"><text:span text:style-name="Strong_20_Emphasis">Por quê?</text:span></text:p>
      <text:p text:style-name="Text_20_body">A página de leitura terá capítulos longos, exegeses e comentários. Usar uma altura de linha um pouco maior e um espaçamento específico entre parágrafos melhora bastante a legibilidade sem afetar as outras páginas.</text:p>
      <text:p text:style-name="Text_20_body">Não é obrigatório adicionar agora, mas considero uma boa preparação para quando começarmos a desenvolver a <text:span text:style-name="Strong_20_Emphasis">Área de Leitura</text:span>.</text:p>
      <text:p text:style-name="Text_20_body"/>
      <text:p text:style-name="Text_20_body">Essa ideia vale a pena manter, mas neste projeto a memória está desativada, então não consigo guardá-la para conversas futuras.</text:p>
      <text:p text:style-name="Text_20_body">A melhor alternativa é registrá-la na documentação do projeto. Podemos criar um arquivo como <text:span text:style-name="Source_20_Text">DESIGN_SYSTEM.md</text:span> ou adicionar uma seção chamada <text:span text:style-name="Strong_20_Emphasis">"Decisões de Arquitetura"</text:span>, por exemplo:</text:p>
      <text:p text:style-name="Quotations"><text:span text:style-name="Strong_20_Emphasis">Área de Leitura</text:span></text:p>
      <text:p text:style-name="Quotations">Quando a página de leitura for implementada, utilizar:</text:p>
      <text:list text:style-name="L11">
        <text:list-item>
          <text:p text:style-name="P17"><text:span text:style-name="Source_20_Text">--reading-line-height: 1.9;</text:span></text:p>
        </text:list-item>
        <text:list-item>
          <text:p text:style-name="P17"><text:span text:style-name="Source_20_Text">--paragraph-spacing: 1.5rem;</text:span></text:p>
        </text:list-item>
      </text:list>
      <text:p text:style-name="Quotations"><text:span text:style-name="Strong_20_Emphasis">Justificativa:</text:span> melhorar a legibilidade de textos longos, comentários e exegeses.</text:p>
      <text:p text:style-name="Text_20_body">Assim essa decisão fica documentada e não depende da memória da conversa.</text:p>
      <text:p text:style-name="Horizontal_20_Line"/>
      <text:h text:style-name="Heading_20_1" text:outline-level="1"><text:soft-page-break/>Agora vamos para <text:span text:style-name="Source_20_Text">components.css</text:span></text:h>
      <text:h text:style-name="Heading_20_2" text:outline-level="2">Objetivo</text:h>
      <text:p text:style-name="Text_20_body">O <text:span text:style-name="Source_20_Text">components.css</text:span> conterá <text:span text:style-name="Strong_20_Emphasis">todos os componentes reutilizáveis</text:span> da plataforma.</text:p>
      <text:p text:style-name="Text_20_body">Ele <text:span text:style-name="Strong_20_Emphasis">não</text:span> deve conter estilos exclusivos da Home, Biblioteca ou Leitura. Esses ficam nos respectivos arquivos (<text:span text:style-name="Source_20_Text">home.css</text:span>, <text:span text:style-name="Source_20_Text">biblioteca.css</text:span>, <text:span text:style-name="Source_20_Text">leitura.css</text:span>).</text:p>
      <text:p text:style-name="Text_20_body">Nossa divisão será esta:</text:p>
      <text:p text:style-name="Preformatted_20_Text"><text:span text:style-name="Source_20_Text">components.css</text:span></text:p>
      <text:p text:style-name="Preformatted_20_Text"/>
      <text:p text:style-name="Preformatted_20_Text"><text:span text:style-name="Source_20_Text">• Botões</text:span></text:p>
      <text:p text:style-name="Preformatted_20_Text"><text:span text:style-name="Source_20_Text">• Cards</text:span></text:p>
      <text:p text:style-name="Preformatted_20_Text"><text:span text:style-name="Source_20_Text">• Cabeçalho (Header)</text:span></text:p>
      <text:p text:style-name="Preformatted_20_Text"><text:span text:style-name="Source_20_Text">• Navegação</text:span></text:p>
      <text:p text:style-name="Preformatted_20_Text"><text:span text:style-name="Source_20_Text">• Footer</text:span></text:p>
      <text:p text:style-name="Preformatted_20_Text"><text:span text:style-name="Source_20_Text">• Ícones</text:span></text:p>
      <text:p text:style-name="P2"><text:span text:style-name="Source_20_Text">• Section Header</text:span></text:p>
      <text:p text:style-name="Text_20_body">Perceba que <text:span text:style-name="Strong_20_Emphasis">Hero</text:span>, <text:span text:style-name="Strong_20_Emphasis">Intro</text:span>, <text:span text:style-name="Strong_20_Emphasis">History</text:span>, <text:span text:style-name="Strong_20_Emphasis">Platform</text:span> e <text:span text:style-name="Strong_20_Emphasis">Featured Books</text:span> <text:span text:style-name="Strong_20_Emphasis">não</text:span> entram aqui, porque são seções específicas da página inicial.</text:p>
      <text:p text:style-name="Horizontal_20_Line"/>
      <text:h text:style-name="Heading_20_2" text:outline-level="2"><text:span text:style-name="Source_20_Text">assets/css/components.css</text:span></text:h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ÕES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utton-primary {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padding: var(--space-sm) var(--space-lg);</text:span></text:p>
      <text:p text:style-name="Preformatted_20_Text"/>
      <text:p text:style-name="Preformatted_20_Text"><text:span text:style-name="Source_20_Text"><text:s text:c="4"/>font-family: var(--font-interface);</text:span></text:p>
      <text:p text:style-name="Preformatted_20_Text"><text:span text:style-name="Source_20_Text"><text:s text:c="4"/>font-weight: var(--font-weight-semibold);</text:span></text:p>
      <text:p text:style-name="Preformatted_20_Text"/>
      <text:p text:style-name="Preformatted_20_Text"><text:span text:style-name="Source_20_Text"><text:s text:c="4"/>color: var(--color-surface);</text:span></text:p>
      <text:p text:style-name="Preformatted_20_Text"><text:span text:style-name="Source_20_Text"><text:s text:c="4"/>background-color: var(--color-primary);</text:span></text:p>
      <text:p text:style-name="Preformatted_20_Text"/>
      <text:p text:style-name="Preformatted_20_Text"><text:span text:style-name="Source_20_Text"><text:s text:c="4"/>border: none;</text:span></text:p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cursor: pointer;</text:span></text:p>
      <text:p text:style-name="Preformatted_20_Text"/>
      <text:p text:style-name="Preformatted_20_Text"><text:span text:style-name="Source_20_Text"><text:s text:c="4"/>transition:</text:span></text:p>
      <text:p text:style-name="Preformatted_20_Text"><text:span text:style-name="Source_20_Text"><text:s text:c="8"/>background-color var(--transition-normal),</text:span></text:p>
      <text:p text:style-name="Preformatted_20_Text"><text:span text:style-name="Source_20_Text"><text:s text:c="8"/>transform var(--transition-fast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utton-primary:hover {</text:span></text:p>
      <text:p text:style-name="Preformatted_20_Text"><text:span text:style-name="Source_20_Text"><text:s text:c="4"/>background-color: var(--color-secondary);</text:span></text:p>
      <text:p text:style-name="Preformatted_20_Text"><text:span text:style-name="Source_20_Text"><text:s text:c="4"/>transform: translateY(-2px);</text:span></text:p>
      <text:p text:style-name="Preformatted_20_Text"><text:span text:style-name="Source_20_Text">}</text:span></text:p>
      <text:p text:style-name="Preformatted_20_Text"><text:soft-page-break/></text:p>
      <text:p text:style-name="Preformatted_20_Text"><text:span text:style-name="Source_20_Text">.button-primary:focus-visible {</text:span></text:p>
      <text:p text:style-name="Preformatted_20_Text"><text:span text:style-name="Source_20_Text"><text:s text:c="4"/>outline: 2px solid var(--color-secondary);</text:span></text:p>
      <text:p text:style-name="Preformatted_20_Text"><text:span text:style-name="Source_20_Text"><text:s text:c="4"/>outline-offset: 3px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ÃO SECUNDÁRI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utton-secondary {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padding: var(--space-sm) var(--space-lg);</text:span></text:p>
      <text:p text:style-name="Preformatted_20_Text"/>
      <text:p text:style-name="Preformatted_20_Text"><text:span text:style-name="Source_20_Text"><text:s text:c="4"/>color: var(--color-primary);</text:span></text:p>
      <text:p text:style-name="Preformatted_20_Text"/>
      <text:p text:style-name="Preformatted_20_Text"><text:span text:style-name="Source_20_Text"><text:s text:c="4"/>background: transparent;</text:span></text:p>
      <text:p text:style-name="Preformatted_20_Text"/>
      <text:p text:style-name="Preformatted_20_Text"><text:span text:style-name="Source_20_Text"><text:s text:c="4"/>border: 1px solid var(--color-primary);</text:span></text:p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transition: all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utton-secondary:hover {</text:span></text:p>
      <text:p text:style-name="Preformatted_20_Text"><text:span text:style-name="Source_20_Text"><text:s text:c="4"/>background: var(--color-primary);</text:span></text:p>
      <text:p text:style-name="Preformatted_20_Text"><text:span text:style-name="Source_20_Text"><text:s text:c="4"/>color: var(--color-surface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ÃO DE ÍCON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icon-button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width: 42px;</text:span></text:p>
      <text:p text:style-name="Preformatted_20_Text"><text:span text:style-name="Source_20_Text"><text:s text:c="4"/>height: 42px;</text:span></text:p>
      <text:p text:style-name="Preformatted_20_Text"/>
      <text:p text:style-name="Preformatted_20_Text"><text:span text:style-name="Source_20_Text"><text:s text:c="4"/>border: none;</text:span></text:p>
      <text:p text:style-name="Preformatted_20_Text"><text:span text:style-name="Source_20_Text"><text:s text:c="4"/>border-radius: 50%;</text:span></text:p>
      <text:p text:style-name="Preformatted_20_Text"/>
      <text:p text:style-name="Preformatted_20_Text"><text:span text:style-name="Source_20_Text"><text:s text:c="4"/>background: transparent;</text:span></text:p>
      <text:p text:style-name="Preformatted_20_Text"/>
      <text:p text:style-name="Preformatted_20_Text"><text:span text:style-name="Source_20_Text"><text:s text:c="4"/>cursor: pointer;</text:span></text:p>
      <text:p text:style-name="Preformatted_20_Text"/>
      <text:p text:style-name="Preformatted_20_Text"><text:span text:style-name="Source_20_Text"><text:s text:c="4"/>transition: background-color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icon-button:hover {</text:span></text:p>
      <text:p text:style-name="Preformatted_20_Text"><text:span text:style-name="Source_20_Text"><text:s text:c="4"/>background-color: rgba(0,0,0,.08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HEADER</text:span></text:p>
      <text:p text:style-name="Preformatted_20_Text"><text:span text:style-name="Source_20_Text">========================================================== */</text:span></text:p>
      <text:p text:style-name="Preformatted_20_Text"><text:soft-page-break/></text:p>
      <text:p text:style-name="Preformatted_20_Text"><text:span text:style-name="Source_20_Text">.app-header {</text:span></text:p>
      <text:p text:style-name="Preformatted_20_Text"><text:span text:style-name="Source_20_Text"><text:s text:c="4"/>background: var(--color-surface);</text:span></text:p>
      <text:p text:style-name="Preformatted_20_Text"><text:span text:style-name="Source_20_Text"><text:s text:c="4"/>border-bottom: 1px solid var(--color-border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container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space-between;</text:span></text:p>
      <text:p text:style-name="Preformatted_20_Text"/>
      <text:p text:style-name="Preformatted_20_Text"><text:span text:style-name="Source_20_Text"><text:s text:c="4"/>min-height: 80px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logo {</text:span></text:p>
      <text:p text:style-name="Preformatted_20_Text"><text:span text:style-name="Source_20_Text"><text:s text:c="4"/>font-family: var(--font-reading);</text:span></text:p>
      <text:p text:style-name="Preformatted_20_Text"><text:span text:style-name="Source_20_Text"><text:s text:c="4"/>font-size: 1.5rem;</text:span></text:p>
      <text:p text:style-name="Preformatted_20_Text"><text:span text:style-name="Source_20_Text"><text:s text:c="4"/>font-weight: var(--font-weight-bold);</text:span></text:p>
      <text:p text:style-name="Preformatted_20_Text"/>
      <text:p text:style-name="Preformatted_20_Text"><text:span text:style-name="Source_20_Text"><text:s text:c="4"/>color: var(--color-primary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nav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nav a {</text:span></text:p>
      <text:p text:style-name="Preformatted_20_Text"><text:span text:style-name="Source_20_Text"><text:s text:c="4"/>font-weight: var(--font-weight-semibol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actions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gap: var(--space-sm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ARD DO LIVR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ook-card {</text:span></text:p>
      <text:p text:style-name="Preformatted_20_Text"><text:span text:style-name="Source_20_Text"><text:s text:c="4"/>background: var(--color-surface);</text:span></text:p>
      <text:p text:style-name="Preformatted_20_Text"/>
      <text:p text:style-name="Preformatted_20_Text"><text:span text:style-name="Source_20_Text"><text:s text:c="4"/>border: 1px solid var(--color-border);</text:span></text:p>
      <text:p text:style-name="Preformatted_20_Text"/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padding: var(--space-lg);</text:span></text:p>
      <text:p text:style-name="Preformatted_20_Text"/>
      <text:p text:style-name="Preformatted_20_Text"><text:span text:style-name="Source_20_Text"><text:s text:c="4"/>box-shadow: var(--shadow-sm);</text:span></text:p>
      <text:p text:style-name="Preformatted_20_Text"/>
      <text:p text:style-name="Preformatted_20_Text"><text:span text:style-name="Source_20_Text"><text:s text:c="4"/>transition:</text:span></text:p>
      <text:p text:style-name="Preformatted_20_Text"><text:span text:style-name="Source_20_Text"><text:s text:c="8"/>transform var(--transition-fast),</text:span></text:p>
      <text:p text:style-name="Preformatted_20_Text"><text:span text:style-name="Source_20_Text"><text:s text:c="8"/>box-shadow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ok-card:hover {</text:span></text:p>
      <text:p text:style-name="Preformatted_20_Text"><text:span text:style-name="Source_20_Text"><text:s text:c="4"/>transform: translateY(-4px);</text:span></text:p>
      <text:p text:style-name="Preformatted_20_Text"><text:span text:style-name="Source_20_Text"><text:s text:c="4"/>box-shadow: var(--shadow-md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oft-page-break/><text:span text:style-name="Source_20_Text"><text:s text:c="3"/>CARD DE FUNCIONALIDAD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eature-card {</text:span></text:p>
      <text:p text:style-name="Preformatted_20_Text"><text:span text:style-name="Source_20_Text"><text:s text:c="4"/>padding: var(--space-lg);</text:span></text:p>
      <text:p text:style-name="Preformatted_20_Text"/>
      <text:p text:style-name="Preformatted_20_Text"><text:span text:style-name="Source_20_Text"><text:s text:c="4"/>background: var(--color-surface);</text:span></text:p>
      <text:p text:style-name="Preformatted_20_Text"/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border: 1px solid var(--color-border);</text:span></text:p>
      <text:p text:style-name="Preformatted_20_Text"/>
      <text:p text:style-name="Preformatted_20_Text"><text:span text:style-name="Source_20_Text"><text:s text:c="4"/>box-shadow: var(--shadow-sm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TÍTULO DAS SEÇÕES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section-header {</text:span></text:p>
      <text:p text:style-name="Preformatted_20_Text"><text:span text:style-name="Source_20_Text"><text:s text:c="4"/>margin-bottom: var(--space-lg);</text:span></text:p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RODAPÉ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ooter {</text:span></text:p>
      <text:p text:style-name="Preformatted_20_Text"><text:span text:style-name="Source_20_Text"><text:s text:c="4"/>margin-top: var(--space-xl);</text:span></text:p>
      <text:p text:style-name="Preformatted_20_Text"/>
      <text:p text:style-name="Preformatted_20_Text"><text:span text:style-name="Source_20_Text"><text:s text:c="4"/>border-top: 1px solid var(--color-border);</text:span></text:p>
      <text:p text:style-name="Preformatted_20_Text"/>
      <text:p text:style-name="Preformatted_20_Text"><text:span text:style-name="Source_20_Text"><text:s text:c="4"/>background: var(--color-surface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footer__content {</text:span></text:p>
      <text:p text:style-name="Preformatted_20_Text"><text:span text:style-name="Source_20_Text"><text:s text:c="4"/>padding: var(--space-lg) 0;</text:span></text:p>
      <text:p text:style-name="Preformatted_20_Text"/>
      <text:p text:style-name="Preformatted_20_Text"><text:span text:style-name="Source_20_Text"><text:s text:c="4"/>text-align: center;</text:span></text:p>
      <text:p text:style-name="P2"><text:span text:style-name="Source_20_Text">}</text:span></text:p>
      <text:p text:style-name="Horizontal_20_Line"/>
      <text:h text:style-name="Heading_20_3" text:outline-level="3">Avaliação</text:h>
      <text:p text:style-name="Text_20_body">Esse <text:span text:style-name="Source_20_Text">components.css</text:span> está totalmente compatível com o HTML que você construiu e com o nosso Design System.</text:p>
      <text:p text:style-name="Text_20_body">Ele também respeita a responsabilidade de cada arquivo:</text:p>
      <text:list text:style-name="L12">
        <text:list-item>
          <text:p text:style-name="P18">✅ <text:span text:style-name="Source_20_Text">variables.css</text:span> → apenas tokens.</text:p>
        </text:list-item>
        <text:list-item>
          <text:p text:style-name="P18">✅ <text:span text:style-name="Source_20_Text">base.css</text:span> → estilos globais.</text:p>
        </text:list-item>
        <text:list-item>
          <text:p text:style-name="P18">✅ <text:bookmark-start text:name="__DdeLink__3364_829906918"/><text:bookmark-start text:name="__DdeLink__3362_829906918"/><text:span text:style-name="Source_20_Text">layout.css</text:span> <text:bookmark-end text:name="__DdeLink__3364_829906918"/><text:bookmark-end text:name="__DdeLink__3362_829906918"/>→ estrutura e containers.</text:p>
        </text:list-item>
        <text:list-item>
          <text:p text:style-name="P18">✅ <text:span text:style-name="Source_20_Text">components.css</text:span> → componentes reutilizáveis.</text:p>
        </text:list-item>
        <text:list-item>
          <text:p text:style-name="P18">⏳ <text:span text:style-name="Source_20_Text">home.css</text:span> → apenas estilos específicos da página inicial.</text:p>
        </text:list-item>
      </text:list>
      <text:p text:style-name="Text_20_body"><text:soft-page-break/>Essa separação vai facilitar muito a manutenção conforme a plataforma crescer.</text:p>
      <text:p text:style-name="Standard">/* ==========================================================</text:p>
      <text:p text:style-name="Standard"><text:s text:c="3"/>CONTAINER</text:p>
      <text:p text:style-name="Standard">========================================================== */</text:p>
      <text:p text:style-name="Standard"/>
      <text:p text:style-name="Standard">.container {</text:p>
      <text:p text:style-name="Standard"><text:s text:c="4"/>width: min(100% - 2rem, var(--container-width));</text:p>
      <text:p text:style-name="Standard"><text:s text:c="4"/>margin-inline: auto;</text:p>
      <text:p text:style-name="Standard">}</text:p>
      <text:p text:style-name="Standard"/>
      <text:p text:style-name="Standard">/* ==========================================================</text:p>
      <text:p text:style-name="Standard"><text:s text:c="3"/>SEÇÕES</text:p>
      <text:p text:style-name="Standard">========================================================== */</text:p>
      <text:p text:style-name="Standard"/>
      <text:p text:style-name="Standard">section {</text:p>
      <text:p text:style-name="Standard"><text:s text:c="4"/>padding-block: var(--space-xl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ÁREA DE LEITURA</text:p>
      <text:p text:style-name="Standard">========================================================== */</text:p>
      <text:p text:style-name="Standard"/>
      <text:p text:style-name="Standard">.reading-container {</text:p>
      <text:p text:style-name="Standard"><text:s text:c="4"/>width: min(100% - 2rem, var(--reading-width));</text:p>
      <text:p text:style-name="Standard"><text:s text:c="4"/>margin-inline: auto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GENÉRICO</text:p>
      <text:p text:style-name="Standard">========================================================== */</text:p>
      <text:p text:style-name="Standard"/>
      <text:p text:style-name="Standard">.grid {</text:p>
      <text:p text:style-name="Standard"><text:s text:c="4"/>display: grid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DE 2 COLUNAS</text:p>
      <text:p text:style-name="Standard">========================================================== */</text:p>
      <text:p text:style-name="Standard"/>
      <text:p text:style-name="Standard">.grid-2 {</text:p>
      <text:p text:style-name="Standard"><text:s text:c="4"/>display: grid;</text:p>
      <text:p text:style-name="Standard"><text:s text:c="4"/>grid-template-columns: repeat(2, 1fr)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DE 3 COLUNAS</text:p>
      <text:p text:style-name="Standard">========================================================== */</text:p>
      <text:p text:style-name="Standard"/>
      <text:p text:style-name="Standard">.grid-3 {</text:p>
      <text:p text:style-name="Standard"><text:s text:c="4"/>display: grid;</text:p>
      <text:p text:style-name="Standard"><text:soft-page-break/><text:s text:c="4"/>grid-template-columns: repeat(3, 1fr)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FLEX GENÉRICO</text:p>
      <text:p text:style-name="Standard">========================================================== */</text:p>
      <text:p text:style-name="Standard"/>
      <text:p text:style-name="Standard">.flex {</text:p>
      <text:p text:style-name="Standard"><text:s text:c="4"/>display: flex;</text:p>
      <text:p text:style-name="Standard">}</text:p>
      <text:p text:style-name="Standard"/>
      <text:p text:style-name="Standard">.flex-center {</text:p>
      <text:p text:style-name="Standard"><text:s text:c="4"/>display: flex;</text:p>
      <text:p text:style-name="Standard"><text:s text:c="4"/>justify-content: center;</text:p>
      <text:p text:style-name="Standard"><text:s text:c="4"/>align-items: center;</text:p>
      <text:p text:style-name="Standard">}</text:p>
      <text:p text:style-name="Standard"/>
      <text:p text:style-name="Standard">.flex-between {</text:p>
      <text:p text:style-name="Standard"><text:s text:c="4"/>display: flex;</text:p>
      <text:p text:style-name="Standard"><text:s text:c="4"/>justify-content: space-between;</text:p>
      <text:p text:style-name="Standard"><text:s text:c="4"/>align-items: center;</text:p>
      <text:p text:style-name="Standard">}</text:p>
      <text:p text:style-name="Standard"/>
      <text:p text:style-name="Standard">/* ==========================================================</text:p>
      <text:p text:style-name="Standard"><text:s text:c="3"/>RESPONSIVIDADE</text:p>
      <text:p text:style-name="Standard">========================================================== */</text:p>
      <text:p text:style-name="Standard"/>
      <text:p text:style-name="Standard">@media (max-width: 1024px) {</text:p>
      <text:p text:style-name="Standard"/>
      <text:p text:style-name="Standard"><text:s text:c="4"/>.grid-3 {</text:p>
      <text:p text:style-name="Standard"><text:s text:c="8"/>grid-template-columns: repeat(2, 1fr);</text:p>
      <text:p text:style-name="Standard"><text:s text:c="4"/>}</text:p>
      <text:p text:style-name="Standard"/>
      <text:p text:style-name="Standard">}</text:p>
      <text:p text:style-name="Standard"/>
      <text:p text:style-name="Standard">@media (max-width: 640px) {</text:p>
      <text:p text:style-name="Standard"/>
      <text:p text:style-name="Standard"><text:s text:c="4"/>.grid-2,</text:p>
      <text:p text:style-name="Standard"><text:s text:c="4"/>.grid-3 {</text:p>
      <text:p text:style-name="Standard"><text:s text:c="8"/>grid-template-columns: 1fr;</text:p>
      <text:p text:style-name="Standard"><text:s text:c="4"/>}</text:p>
      <text:p text:style-name="Standard"/>
      <text:p text:style-name="Standard">}</text:p>
      <text:p text:style-name="Standard"/>
      <text:p text:style-name="Text_20_body">Sim. Para o <text:span text:style-name="Strong_20_Emphasis"><text:span text:style-name="Source_20_Text">index.html</text:span></text:span>, devem estar linkados apenas os arquivos necessários para a Home.</text:p>
      <text:p text:style-name="Text_20_body">Na ordem correta:</text:p>
      <text:p text:style-name="Preformatted_20_Text"><text:span text:style-name="Source_20_Text">&lt;!-- Google Fonts --&gt;</text:span></text:p>
      <text:p text:style-name="Preformatted_20_Text"><text:span text:style-name="Source_20_Text">&lt;link rel="preconnect" href="https://fonts.googleapis.com"&gt;</text:span></text:p>
      <text:p text:style-name="Preformatted_20_Text"><text:span text:style-name="Source_20_Text">&lt;link rel="preconnect" href="https://fonts.gstatic.com" crossorigin&gt;</text:span></text:p>
      <text:p text:style-name="Preformatted_20_Text"><text:soft-page-break/><text:span text:style-name="Source_20_Text">&lt;link href="https://fonts.googleapis.com/css2?family=Merriweather:wght@300;400;700&amp;family=Open+Sans:wght@300;400;600;700&amp;display=swap" rel="stylesheet"&gt;</text:span></text:p>
      <text:p text:style-name="Preformatted_20_Text"/>
      <text:p text:style-name="Preformatted_20_Text"><text:span text:style-name="Source_20_Text">&lt;!-- Design System --&gt;</text:span></text:p>
      <text:p text:style-name="Preformatted_20_Text"><text:span text:style-name="Source_20_Text">&lt;link rel="stylesheet" href="assets/css/variables.css"&gt;</text:span></text:p>
      <text:p text:style-name="Preformatted_20_Text"/>
      <text:p text:style-name="Preformatted_20_Text"><text:span text:style-name="Source_20_Text">&lt;!-- Estilos Globais --&gt;</text:span></text:p>
      <text:p text:style-name="Preformatted_20_Text"><text:span text:style-name="Source_20_Text">&lt;link rel="stylesheet" href="assets/css/base.css"&gt;</text:span></text:p>
      <text:p text:style-name="Preformatted_20_Text"/>
      <text:p text:style-name="Preformatted_20_Text"><text:span text:style-name="Source_20_Text">&lt;!-- Estrutura --&gt;</text:span></text:p>
      <text:p text:style-name="Preformatted_20_Text"><text:span text:style-name="Source_20_Text">&lt;link rel="stylesheet" href="assets/css/layout.css"&gt;</text:span></text:p>
      <text:p text:style-name="Preformatted_20_Text"/>
      <text:p text:style-name="Preformatted_20_Text"><text:span text:style-name="Source_20_Text">&lt;!-- Componentes Reutilizáveis --&gt;</text:span></text:p>
      <text:p text:style-name="Preformatted_20_Text"><text:span text:style-name="Source_20_Text">&lt;link rel="stylesheet" href="assets/css/components.css"&gt;</text:span></text:p>
      <text:p text:style-name="Preformatted_20_Text"/>
      <text:p text:style-name="Preformatted_20_Text"><text:span text:style-name="Source_20_Text">&lt;!-- Página Inicial --&gt;</text:span></text:p>
      <text:p text:style-name="P2"><text:span text:style-name="Source_20_Text">&lt;link rel="stylesheet" href="assets/css/home.css"&gt;</text:span></text:p>
      <text:p text:style-name="Horizontal_20_Line"/>
      <text:h text:style-name="Heading_20_2" text:outline-level="2">O que cada arquivo faz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Arquivo</text:p>
            </table:table-cell>
            <table:table-cell table:style-name="Tabela1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variables.css</text:span></text:p>
          </table:table-cell>
          <table:table-cell table:style-name="Tabela1.A1" office:value-type="string">
            <text:p text:style-name="Table_20_Contents">Variáveis do Design System (cores, fontes, espaçamentos, etc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base.css</text:span></text:p>
          </table:table-cell>
          <table:table-cell table:style-name="Tabela1.A1" office:value-type="string">
            <text:p text:style-name="Table_20_Contents">Reset e estilos globais (<text:span text:style-name="Source_20_Text">body</text:span>, títulos, links, imagens, listas..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layout.css</text:span></text:p>
          </table:table-cell>
          <table:table-cell table:style-name="Tabela1.A1" office:value-type="string">
            <text:p text:style-name="Table_20_Contents">Containers, grids, flex, estrutura e responsividade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omponents.css</text:span></text:p>
          </table:table-cell>
          <table:table-cell table:style-name="Tabela1.A1" office:value-type="string">
            <text:p text:style-name="Table_20_Contents">Componentes reutilizáveis (header, footer, botões, cards, navegação..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home.css</text:span></text:p>
          </table:table-cell>
          <table:table-cell table:style-name="Tabela1.A1" office:value-type="string">
            <text:p text:style-name="Table_20_Contents">Estilos exclusivos da página inicial</text:p>
          </table:table-cell>
        </table:table-row>
      </table:table>
      <text:p text:style-name="Horizontal_20_Line"/>
      <text:h text:style-name="Heading_20_2" text:outline-level="2">O que <text:span text:style-name="Strong_20_Emphasis">não</text:span> deve estar no <text:span text:style-name="Source_20_Text">index.html</text:span></text:h>
      <text:p text:style-name="Text_20_body">Por exemplo:</text:p>
      <text:p text:style-name="Preformatted_20_Text"><text:span text:style-name="Source_20_Text">biblioteca.css</text:span></text:p>
      <text:p text:style-name="Preformatted_20_Text"><text:span text:style-name="Source_20_Text">leitura.css</text:span></text:p>
      <text:p text:style-name="Preformatted_20_Text"><text:span text:style-name="Source_20_Text">perfil.css</text:span></text:p>
      <text:p text:style-name="P2"><text:span text:style-name="Source_20_Text">comunidade.css</text:span></text:p>
      <text:p text:style-name="Text_20_body">Esses arquivos devem ser carregados <text:span text:style-name="Strong_20_Emphasis">apenas</text:span> nas respectivas páginas.</text:p>
      <text:p text:style-name="Horizontal_20_Line"/>
      <text:h text:style-name="Heading_20_2" text:outline-level="2">Como ficará nas outras páginas</text:h>
      <text:h text:style-name="Heading_20_3" text:outline-level="3"><text:span text:style-name="Source_20_Text">biblioteca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biblioteca.css</text:span></text:p>
      <text:h text:style-name="Heading_20_3" text:outline-level="3"><text:soft-page-break/><text:span text:style-name="Source_20_Text">leitura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leitura.css</text:span></text:p>
      <text:h text:style-name="Heading_20_3" text:outline-level="3"><text:span text:style-name="Source_20_Text">comunidade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comunidade.css</text:span></text:p>
      <text:h text:style-name="Heading_20_3" text:outline-level="3"><text:span text:style-name="Source_20_Text">perfil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perfil.css</text:span></text:p>
      <text:p text:style-name="Horizontal_20_Line"/>
      <text:h text:style-name="Heading_20_3" text:outline-level="3">Uma observação importante</text:h>
      <text:p text:style-name="Text_20_body">A única exceção são as <text:span text:style-name="Strong_20_Emphasis">Google Fonts</text:span>. Como todas as páginas usam <text:span text:style-name="Strong_20_Emphasis">Open Sans</text:span> e <text:span text:style-name="Strong_20_Emphasis">Merriweather</text:span>, elas também devem ser incluídas em todas as páginas da aplicação (ou centralizadas futuramente, se o projeto evoluir para um template comum).</text:p>
      <text:p text:style-name="Text_20_body">Essa organização segue a arquitetura que planejamos e evita carregar CSS desnecessário em cada página.</text:p>
      <text:p text:style-name="Text_20_body">Perfeito. Agora sim faz sentido começar o <text:span text:style-name="Source_20_Text">home.css</text:span>.</text:p>
      <text:p text:style-name="Text_20_body">Mas quero estabelecer uma regra que seguiremos até o final do projeto.</text:p>
      <text:h text:style-name="Heading_20_2" text:outline-level="2">Regra da arquitetura</text:h>
      <text:p text:style-name="Text_20_body">Cada arquivo CSS terá apenas uma responsabilidade.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Arquivo</text:p>
            </table:table-cell>
            <table:table-cell table:style-name="Tabela2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variables.css</text:span></text:p>
          </table:table-cell>
          <table:table-cell table:style-name="Tabela2.A1" office:value-type="string">
            <text:p text:style-name="Table_20_Contents">Tokens (cores, fontes, espaçamentos...)</text:p>
          </table:table-cell>
        </table:table-row>
        <table:table-row>
          <table:table-cell table:style-name="Tabela2.A1" office:value-type="string">
            <text:p text:style-name="Table_20_Contents"><text:span text:style-name="Source_20_Text">base.css</text:span></text:p>
          </table:table-cell>
          <table:table-cell table:style-name="Tabela2.A1" office:value-type="string">
            <text:p text:style-name="Table_20_Contents">Estilos globai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layout.css</text:span></text:p>
          </table:table-cell>
          <table:table-cell table:style-name="Tabela2.A1" office:value-type="string">
            <text:p text:style-name="Table_20_Contents">Estrutura (container, grid, flex...)</text:p>
          </table:table-cell>
        </table:table-row>
        <table:table-row>
          <table:table-cell table:style-name="Tabela2.A1" office:value-type="string">
            <text:p text:style-name="Table_20_Contents"><text:span text:style-name="Source_20_Text">components.css</text:span></text:p>
          </table:table-cell>
          <table:table-cell table:style-name="Tabela2.A1" office:value-type="string">
            <text:p text:style-name="Table_20_Contents">Componentes reutilizávei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home.css</text:span></text:p>
          </table:table-cell>
          <table:table-cell table:style-name="Tabela2.A1" office:value-type="string">
            <text:p text:style-name="Table_20_Contents"><text:span text:style-name="Strong_20_Emphasis">Somente o layout e aparência da Home</text:span></text:p>
          </table:table-cell>
        </table:table-row>
      </table:table>
      <text:p text:style-name="Text_20_body">Isso significa que no <text:span text:style-name="Source_20_Text">home.css</text:span> <text:span text:style-name="Strong_20_Emphasis">não criaremos estilos para</text:span>:</text:p>
      <text:list text:style-name="L13">
        <text:list-item>
          <text:p text:style-name="P19"><text:span text:style-name="Source_20_Text">.container</text:span></text:p>
        </text:list-item>
        <text:list-item>
          <text:p text:style-name="P19"><text:span text:style-name="Source_20_Text">.button-primary</text:span></text:p>
        </text:list-item>
        <text:list-item>
          <text:p text:style-name="P19"><text:span text:style-name="Source_20_Text">.book-card</text:span></text:p>
        </text:list-item>
        <text:list-item>
          <text:p text:style-name="P19"><text:soft-page-break/><text:span text:style-name="Source_20_Text">.feature-card</text:span></text:p>
        </text:list-item>
        <text:list-item>
          <text:p text:style-name="P19"><text:span text:style-name="Source_20_Text">.app-header</text:span></text:p>
        </text:list-item>
        <text:list-item>
          <text:p text:style-name="P19"><text:span text:style-name="Source_20_Text">.footer</text:span></text:p>
        </text:list-item>
      </text:list>
      <text:p text:style-name="Text_20_body">Porque esses já existem em outros arquivos.</text:p>
      <text:p text:style-name="Horizontal_20_Line"/>
      <text:h text:style-name="Heading_20_1" text:outline-level="1">O que existe na Home?</text:h>
      <text:p text:style-name="Text_20_body">Analisando o seu HTML, a Home possui estas seções:</text:p>
      <text:p text:style-name="Preformatted_20_Text"><text:span text:style-name="Source_20_Text">Hero</text:span></text:p>
      <text:p text:style-name="Preformatted_20_Text"/>
      <text:p text:style-name="Preformatted_20_Text"><text:span text:style-name="Source_20_Text">Introdução</text:span></text:p>
      <text:p text:style-name="Preformatted_20_Text"/>
      <text:p text:style-name="Preformatted_20_Text"><text:span text:style-name="Source_20_Text">Contexto Histórico</text:span></text:p>
      <text:p text:style-name="Preformatted_20_Text"/>
      <text:p text:style-name="Preformatted_20_Text"><text:span text:style-name="Source_20_Text">History Section</text:span></text:p>
      <text:p text:style-name="Preformatted_20_Text"/>
      <text:p text:style-name="Preformatted_20_Text"><text:span text:style-name="Source_20_Text">Platform</text:span></text:p>
      <text:p text:style-name="Preformatted_20_Text"/>
      <text:p text:style-name="Preformatted_20_Text"><text:span text:style-name="Source_20_Text">Featured Books</text:span></text:p>
      <text:p text:style-name="Preformatted_20_Text"/>
      <text:p text:style-name="P2"><text:span text:style-name="Source_20_Text">Editor Note</text:span></text:p>
      <text:p text:style-name="Text_20_body">Então o <text:span text:style-name="Source_20_Text">home.css</text:span> será organizado exatamente nessa ordem.</text:p>
      <text:p text:style-name="Horizontal_20_Line"/>
      <text:h text:style-name="Heading_20_1" text:outline-level="1">assets/css/home.css</text:h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HER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hero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min-height: 80vh;</text:span></text:p>
      <text:p text:style-name="Preformatted_20_Text"/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__content,</text:span></text:p>
      <text:p text:style-name="Preformatted_20_Text"><text:span text:style-name="Source_20_Text">.hero_content {</text:span></text:p>
      <text:p text:style-name="Preformatted_20_Text"><text:span text:style-name="Source_20_Text"><text:s text:c="4"/>max-width: 760px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 h1 {</text:span></text:p>
      <text:p text:style-name="Preformatted_20_Text"><text:span text:style-name="Source_20_Text"><text:s text:c="4"/>margin-bottom: var(--space-m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 p {</text:span></text:p>
      <text:p text:style-name="Preformatted_20_Text"><text:span text:style-name="Source_20_Text"><text:s text:c="4"/>margin-bottom: var(--space-lg);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/* ==========================================================</text:span></text:p>
      <text:p text:style-name="Preformatted_20_Text"><text:span text:style-name="Source_20_Text"><text:s text:c="3"/>INTRODUÇÃ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intro__content {</text:span></text:p>
      <text:p text:style-name="Preformatted_20_Text"><text:span text:style-name="Source_20_Text"><text:s text:c="4"/>max-width: var(--reading-width)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ONTEXTO HISTÓRIC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history {</text:span></text:p>
      <text:p text:style-name="Preformatted_20_Text"><text:span text:style-name="Source_20_Text"><text:s text:c="4"/>padding-bottom: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article {</text:span></text:p>
      <text:p text:style-name="Preformatted_20_Text"><text:span text:style-name="Source_20_Text"><text:s text:c="4"/>max-width: var(--reading-width)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h3 {</text:span></text:p>
      <text:p text:style-name="Preformatted_20_Text"><text:span text:style-name="Source_20_Text"><text:s text:c="4"/>margin-bottom: var(--space-m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p:last-child {</text:span></text:p>
      <text:p text:style-name="Preformatted_20_Text"><text:span text:style-name="Source_20_Text"><text:s text:c="4"/>margin-bottom: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OMO FUNCIONA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platform__content {</text:span></text:p>
      <text:p text:style-name="Preformatted_20_Text"><text:span text:style-name="Source_20_Text"><text:s text:c="4"/>text-align: center;</text:span></text:p>
      <text:p text:style-name="Preformatted_20_Text"><text:span text:style-name="Source_20_Text"><text:s text:c="4"/>margin-bottom: var(--space-x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platform-grid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rid-template-columns: repeat(3, 1fr)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LIVROS EM DESTAQU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eatured-books h2 {</text:span></text:p>
      <text:p text:style-name="Preformatted_20_Text"><text:span text:style-name="Source_20_Text"><text:s text:c="4"/>text-align: center;</text:span></text:p>
      <text:p text:style-name="Preformatted_20_Text"><text:span text:style-name="Source_20_Text"><text:s text:c="4"/>margin-bottom: var(--space-x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oks-grid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rid-template-columns: repeat(auto-fit, minmax(280px, 1fr))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NOTA DO EDITOR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oft-page-break/><text:span text:style-name="Source_20_Text">.editor-note {</text:span></text:p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editor-note p {</text:span></text:p>
      <text:p text:style-name="Preformatted_20_Text"><text:span text:style-name="Source_20_Text"><text:s text:c="4"/>max-width: 700px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RESPONSIVIDAD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@media (max-width: 1024px) {</text:span></text:p>
      <text:p text:style-name="Preformatted_20_Text"/>
      <text:p text:style-name="Preformatted_20_Text"><text:span text:style-name="Source_20_Text"><text:s text:c="4"/>.platform-grid {</text:span></text:p>
      <text:p text:style-name="Preformatted_20_Text"><text:span text:style-name="Source_20_Text"><text:s text:c="8"/>grid-template-columns: repeat(2, 1fr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}</text:span></text:p>
      <text:p text:style-name="Preformatted_20_Text"/>
      <text:p text:style-name="Preformatted_20_Text"><text:span text:style-name="Source_20_Text">@media (max-width: 640px) {</text:span></text:p>
      <text:p text:style-name="Preformatted_20_Text"/>
      <text:p text:style-name="Preformatted_20_Text"><text:span text:style-name="Source_20_Text"><text:s text:c="4"/>.hero {</text:span></text:p>
      <text:p text:style-name="Preformatted_20_Text"><text:span text:style-name="Source_20_Text"><text:s text:c="8"/>min-height: 60vh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.platform-grid,</text:span></text:p>
      <text:p text:style-name="Preformatted_20_Text"><text:span text:style-name="Source_20_Text"><text:s text:c="4"/>.books-grid {</text:span></text:p>
      <text:p text:style-name="Preformatted_20_Text"><text:span text:style-name="Source_20_Text"><text:s text:c="8"/>grid-template-columns: 1fr;</text:span></text:p>
      <text:p text:style-name="Preformatted_20_Text"><text:span text:style-name="Source_20_Text"><text:s text:c="4"/>}</text:span></text:p>
      <text:p text:style-name="Preformatted_20_Text"/>
      <text:p text:style-name="P2"><text:span text:style-name="Source_20_Text">}</text:span></text:p>
      <text:p text:style-name="Horizontal_20_Line"/>
      <text:h text:style-name="Heading_20_1" text:outline-level="1">Agora quero fazer uma observação importante</text:h>
      <text:p text:style-name="Text_20_body">Analisando todo o projeto, percebi um padrão que pode deixá-lo ainda mais profissional.</text:p>
      <text:p text:style-name="Text_20_body">Você começou a usar classes como:</text:p>
      <text:p text:style-name="Preformatted_20_Text"><text:span text:style-name="Source_20_Text">hero_content</text:span></text:p>
      <text:p text:style-name="Preformatted_20_Text"/>
      <text:p text:style-name="Preformatted_20_Text"><text:span text:style-name="Source_20_Text">intro__content</text:span></text:p>
      <text:p text:style-name="Preformatted_20_Text"/>
      <text:p text:style-name="Preformatted_20_Text"><text:span text:style-name="Source_20_Text">platform__content</text:span></text:p>
      <text:p text:style-name="Preformatted_20_Text"/>
      <text:p text:style-name="Preformatted_20_Text"><text:span text:style-name="Source_20_Text">featured-books__content</text:span></text:p>
      <text:p text:style-name="Preformatted_20_Text"/>
      <text:p text:style-name="P2"><text:span text:style-name="Source_20_Text">footer__content</text:span></text:p>
      <text:p text:style-name="Text_20_body">Há uma inconsistência aí:</text:p>
      <text:list text:style-name="L14">
        <text:list-item>
          <text:p text:style-name="P20"><text:span text:style-name="Source_20_Text">hero_content</text:span> usa um único <text:span text:style-name="Source_20_Text">_</text:span>.</text:p>
        </text:list-item>
        <text:list-item>
          <text:p text:style-name="P20"><text:span text:style-name="Source_20_Text">intro__content</text:span> usa dois <text:span text:style-name="Source_20_Text">__</text:span>.</text:p>
        </text:list-item>
        <text:list-item>
          <text:p text:style-name="P20"><text:span text:style-name="Source_20_Text">platform__content</text:span> usa dois <text:span text:style-name="Source_20_Text">__</text:span>.</text:p>
        </text:list-item>
      </text:list>
      <text:p text:style-name="Text_20_body">Se decidirmos usar a metodologia <text:span text:style-name="Strong_20_Emphasis">BEM</text:span>, devemos ser consistentes.</text:p>
      <text:p text:style-name="Text_20_body"><text:soft-page-break/>O correto seria:</text:p>
      <text:p text:style-name="P2"><text:span text:style-name="Source_20_Text">hero__content</text:span></text:p>
      <text:p text:style-name="Text_20_body">em vez de</text:p>
      <text:p text:style-name="P2"><text:span text:style-name="Source_20_Text">hero_content</text:span></text:p>
      <text:p text:style-name="Text_20_body">Assim, todos os blocos seguem o mesmo padrão:</text:p>
      <text:p text:style-name="Preformatted_20_Text"><text:span text:style-name="Source_20_Text">hero__content</text:span></text:p>
      <text:p text:style-name="Preformatted_20_Text"/>
      <text:p text:style-name="Preformatted_20_Text"><text:span text:style-name="Source_20_Text">intro__content</text:span></text:p>
      <text:p text:style-name="Preformatted_20_Text"/>
      <text:p text:style-name="Preformatted_20_Text"><text:span text:style-name="Source_20_Text">platform__content</text:span></text:p>
      <text:p text:style-name="Preformatted_20_Text"/>
      <text:p text:style-name="Preformatted_20_Text"><text:span text:style-name="Source_20_Text">featured-books__content</text:span></text:p>
      <text:p text:style-name="Preformatted_20_Text"/>
      <text:p text:style-name="P2"><text:span text:style-name="Source_20_Text">footer__content</text:span></text:p>
      <text:h text:style-name="Heading_20_2" text:outline-level="2">Minha recomendação</text:h>
      <text:p text:style-name="Text_20_body">Antes de continuarmos construindo as outras páginas, eu faria essa pequena correção no HTML para adotar <text:span text:style-name="Strong_20_Emphasis">BEM</text:span> de forma consistente. É uma alteração simples agora e evita inconsistências quando o projeto crescer. Depois disso, manteremos esse padrão em toda a Biblioteca Apócrifa.</text:p>
      <text:p text:style-name="Text_20_body">Perfeito. Concluímos a etapa dos <text:span text:style-name="Strong_20_Emphasis">componentes reutilizáveis</text:span> da arquitetura.</text:p>
      <text:p text:style-name="Text_20_body">Agora entramos no próximo ponto da Fase 4:</text:p>
      <text:h text:style-name="Heading_20_1" text:outline-level="1">Desenvolvimento JavaScript — Sistema de componentes</text:h>
      <text:p text:style-name="Text_20_body">Objetivo:</text:p>
      <text:p text:style-name="Text_20_body">Criar o mecanismo que vai carregar automaticamente:</text:p>
      <text:list text:style-name="L15">
        <text:list-item>
          <text:p text:style-name="P21"><text:span text:style-name="Source_20_Text">header.html</text:span></text:p>
        </text:list-item>
        <text:list-item>
          <text:p text:style-name="P21"><text:span text:style-name="Source_20_Text">navbar.html</text:span></text:p>
        </text:list-item>
        <text:list-item>
          <text:p text:style-name="P21"><text:span text:style-name="Source_20_Text">footer.html</text:span></text:p>
        </text:list-item>
        <text:list-item>
          <text:p text:style-name="P21"><text:span text:style-name="Source_20_Text">book-card.html</text:span></text:p>
        </text:list-item>
        <text:list-item>
          <text:p text:style-name="P21"><text:span text:style-name="Source_20_Text">loading.html</text:span></text:p>
        </text:list-item>
        <text:list-item>
          <text:p text:style-name="P21"><text:span text:style-name="Source_20_Text">reading-section.html</text:span></text:p>
        </text:list-item>
        <text:list-item>
          <text:p text:style-name="P21"><text:span text:style-name="Source_20_Text">search.html</text:span></text:p>
        </text:list-item>
        <text:list-item>
          <text:p text:style-name="P21"><text:span text:style-name="Source_20_Text">sidebar.html</text:span></text:p>
        </text:list-item>
      </text:list>
      <text:p text:style-name="Text_20_body">Sem precisar copiar e colar código em todas as páginas.</text:p>
      <text:p text:style-name="Horizontal_20_Line"/>
      <text:h text:style-name="Heading_20_2" text:outline-level="2"><text:soft-page-break/>Estrutura JavaScript</text:h>
      <text:p text:style-name="Text_20_body">Vamos criar:</text:p>
      <text:p text:style-name="Preformatted_20_Text"><text:span text:style-name="Source_20_Text">assets/</text:span></text:p>
      <text:p text:style-name="Preformatted_20_Text"><text:span text:style-name="Source_20_Text">│</text:span></text:p>
      <text:p text:style-name="Preformatted_20_Text"><text:span text:style-name="Source_20_Text">└── js/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├── components.js</text:span></text:p>
      <text:p text:style-name="Preformatted_20_Text"><text:span text:style-name="Source_20_Text"><text:s text:c="4"/>├── main.js</text:span></text:p>
      <text:p text:style-name="P2"><text:span text:style-name="Source_20_Text"><text:s text:c="4"/>└── library.js</text:span></text:p>
      <text:p text:style-name="Text_20_body">Primeiro vamos trabalhar apenas com:</text:p>
      <text:p text:style-name="P2"><text:span text:style-name="Source_20_Text">components.js</text:span></text:p>
      <text:p text:style-name="Text_20_body">Responsabilidade:</text:p>
      <text:list text:style-name="L16">
        <text:list-item>
          <text:p text:style-name="P22">localizar elementos reservados para componentes;</text:p>
        </text:list-item>
        <text:list-item>
          <text:p text:style-name="P22">buscar o arquivo HTML;</text:p>
        </text:list-item>
        <text:list-item>
          <text:p text:style-name="P22">inserir o conteúdo automaticamente.</text:p>
        </text:list-item>
      </text:list>
      <text:p text:style-name="Horizontal_20_Line"/>
      <text:h text:style-name="Heading_20_2" text:outline-level="2">Arquivo:</text:h>
      <text:p text:style-name="P2"><text:span text:style-name="Source_20_Text">assets/js/components.js</text:span></text:p>
      <text:p text:style-name="Preformatted_20_Text"><text:span text:style-name="Source_20_Text">/**</text:span></text:p>
      <text:p text:style-name="Preformatted_20_Text"><text:span text:style-name="Source_20_Text"><text:s/>* Sistema de Componentes</text:span></text:p>
      <text:p text:style-name="Preformatted_20_Text"><text:span text:style-name="Source_20_Text"><text:s/>* Biblioteca Apócrifa</text:span></text:p>
      <text:p text:style-name="Preformatted_20_Text"><text:span text:style-name="Source_20_Text"><text:s/>*</text:span></text:p>
      <text:p text:style-name="Preformatted_20_Text"><text:span text:style-name="Source_20_Text"><text:s/>* Responsável por carregar componentes HTML reutilizáveis.</text:span></text:p>
      <text:p text:style-name="Preformatted_20_Text"><text:span text:style-name="Source_20_Text"><text:s/>*/</text:span></text:p>
      <text:p text:style-name="Preformatted_20_Text"/>
      <text:p text:style-name="Preformatted_20_Text"/>
      <text:p text:style-name="Preformatted_20_Text"><text:span text:style-name="Source_20_Text">async function loadComponent(selector, file) {</text:span></text:p>
      <text:p text:style-name="Preformatted_20_Text"/>
      <text:p text:style-name="Preformatted_20_Text"><text:span text:style-name="Source_20_Text"><text:s text:c="4"/>const element = document.querySelector(selector);</text:span></text:p>
      <text:p text:style-name="Preformatted_20_Text"/>
      <text:p text:style-name="Preformatted_20_Text"/>
      <text:p text:style-name="Preformatted_20_Text"><text:span text:style-name="Source_20_Text"><text:s text:c="4"/>if (!element) {</text:span></text:p>
      <text:p text:style-name="Preformatted_20_Text"><text:span text:style-name="Source_20_Text"><text:s text:c="8"/>return;</text:span></text:p>
      <text:p text:style-name="Preformatted_20_Text"><text:span text:style-name="Source_20_Text"><text:s text:c="4"/>}</text:span></text:p>
      <text:p text:style-name="Preformatted_20_Text"/>
      <text:p text:style-name="Preformatted_20_Text"/>
      <text:p text:style-name="Preformatted_20_Text"><text:span text:style-name="Source_20_Text"><text:s text:c="4"/>try {</text:span></text:p>
      <text:p text:style-name="Preformatted_20_Text"/>
      <text:p text:style-name="Preformatted_20_Text"><text:span text:style-name="Source_20_Text"><text:s text:c="8"/>const response = await fetch(file);</text:span></text:p>
      <text:p text:style-name="Preformatted_20_Text"/>
      <text:p text:style-name="Preformatted_20_Text"/>
      <text:p text:style-name="Preformatted_20_Text"><text:span text:style-name="Source_20_Text"><text:s text:c="8"/>if (!response.ok) {</text:span></text:p>
      <text:p text:style-name="Preformatted_20_Text"/>
      <text:p text:style-name="Preformatted_20_Text"><text:span text:style-name="Source_20_Text"><text:s text:c="12"/>throw new Error(</text:span></text:p>
      <text:p text:style-name="Preformatted_20_Text"><text:span text:style-name="Source_20_Text"><text:s text:c="16"/>`Erro ao carregar componente: ${file}`</text:span></text:p>
      <text:p text:style-name="Preformatted_20_Text"><text:span text:style-name="Source_20_Text"><text:s text:c="12"/>);</text:span></text:p>
      <text:p text:style-name="Preformatted_20_Text"/>
      <text:p text:style-name="Preformatted_20_Text"><text:span text:style-name="Source_20_Text"><text:s text:c="8"/>}</text:span></text:p>
      <text:p text:style-name="Preformatted_20_Text"/>
      <text:p text:style-name="Preformatted_20_Text"><text:soft-page-break/></text:p>
      <text:p text:style-name="Preformatted_20_Text"><text:span text:style-name="Source_20_Text"><text:s text:c="8"/>const html = await response.text();</text:span></text:p>
      <text:p text:style-name="Preformatted_20_Text"/>
      <text:p text:style-name="Preformatted_20_Text"/>
      <text:p text:style-name="Preformatted_20_Text"><text:span text:style-name="Source_20_Text"><text:s text:c="8"/>element.innerHTML = html;</text:span></text:p>
      <text:p text:style-name="Preformatted_20_Text"/>
      <text:p text:style-name="Preformatted_20_Text"/>
      <text:p text:style-name="Preformatted_20_Text"><text:span text:style-name="Source_20_Text"><text:s text:c="4"/>} catch(error) {</text:span></text:p>
      <text:p text:style-name="Preformatted_20_Text"/>
      <text:p text:style-name="Preformatted_20_Text"><text:span text:style-name="Source_20_Text"><text:s text:c="8"/>console.error(error);</text:span></text:p>
      <text:p text:style-name="Preformatted_20_Text"/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</text:span></text:p>
      <text:p text:style-name="Preformatted_20_Text"><text:span text:style-name="Source_20_Text"><text:s text:c="4"/>Componentes globais</text:span></text:p>
      <text:p text:style-name="Preformatted_20_Text"><text:span text:style-name="Source_20_Text">*/</text:span></text:p>
      <text:p text:style-name="Preformatted_20_Text"/>
      <text:p text:style-name="Preformatted_20_Text"><text:span text:style-name="Source_20_Text">document.addEventListener("DOMContentLoaded", () =&gt; {</text:span></text:p>
      <text:p text:style-name="Preformatted_20_Text"/>
      <text:p text:style-name="Preformatted_20_Text"/>
      <text:p text:style-name="Preformatted_20_Text"><text:span text:style-name="Source_20_Text"><text:s text:c="4"/>loadComponent(</text:span></text:p>
      <text:p text:style-name="Preformatted_20_Text"><text:span text:style-name="Source_20_Text"><text:s text:c="8"/>"[data-component='header']",</text:span></text:p>
      <text:p text:style-name="Preformatted_20_Text"><text:span text:style-name="Source_20_Text"><text:s text:c="8"/>"../assets/components/header.html"</text:span></text:p>
      <text:p text:style-name="Preformatted_20_Text"><text:span text:style-name="Source_20_Text"><text:s text:c="4"/>);</text:span></text:p>
      <text:p text:style-name="Preformatted_20_Text"/>
      <text:p text:style-name="Preformatted_20_Text"/>
      <text:p text:style-name="Preformatted_20_Text"><text:span text:style-name="Source_20_Text"><text:s text:c="4"/>loadComponent(</text:span></text:p>
      <text:p text:style-name="Preformatted_20_Text"><text:span text:style-name="Source_20_Text"><text:s text:c="8"/>"[data-component='footer']",</text:span></text:p>
      <text:p text:style-name="Preformatted_20_Text"><text:span text:style-name="Source_20_Text"><text:s text:c="8"/>"../assets/components/footer.html"</text:span></text:p>
      <text:p text:style-name="Preformatted_20_Text"><text:span text:style-name="Source_20_Text"><text:s text:c="4"/>);</text:span></text:p>
      <text:p text:style-name="Preformatted_20_Text"/>
      <text:p text:style-name="Preformatted_20_Text"/>
      <text:p text:style-name="P2"><text:span text:style-name="Source_20_Text">});</text:span></text:p>
      <text:p text:style-name="Horizontal_20_Line"/>
      <text:h text:style-name="Heading_20_2" text:outline-level="2">Como vamos usar nas páginas</text:h>
      <text:p text:style-name="Text_20_body">Agora o HTML deixa de ter:</text:p>
      <text:p text:style-name="Preformatted_20_Text"><text:span text:style-name="Source_20_Text">&lt;header class="app-header"&gt;</text:span></text:p>
      <text:p text:style-name="Preformatted_20_Text"><text:span text:style-name="Source_20_Text">...</text:span></text:p>
      <text:p text:style-name="P2"><text:span text:style-name="Source_20_Text">&lt;/header&gt;</text:span></text:p>
      <text:p text:style-name="Text_20_body">e passa a ter:</text:p>
      <text:p text:style-name="P2"><text:span text:style-name="Source_20_Text">&lt;div data-component="header"&gt;&lt;/div&gt;</text:span></text:p>
      <text:p text:style-name="Text_20_body">O JavaScript coloca o conteúdo automaticamente.</text:p>
      <text:p text:style-name="Horizontal_20_Line"/>
      <text:p text:style-name="Text_20_body">No footer:</text:p>
      <text:p text:style-name="Text_20_body">Antes:</text:p>
      <text:p text:style-name="Preformatted_20_Text"><text:span text:style-name="Source_20_Text">&lt;footer class="footer"&gt;</text:span></text:p>
      <text:p text:style-name="Preformatted_20_Text"><text:span text:style-name="Source_20_Text">...</text:span></text:p>
      <text:p text:style-name="P2"><text:span text:style-name="Source_20_Text">&lt;/footer&gt;</text:span></text:p>
      <text:p text:style-name="Text_20_body"><text:soft-page-break/>Agora:</text:p>
      <text:p text:style-name="P2"><text:span text:style-name="Source_20_Text">&lt;div data-component="footer"&gt;&lt;/div&gt;</text:span></text:p>
      <text:p text:style-name="Horizontal_20_Line"/>
      <text:h text:style-name="Heading_20_2" text:outline-level="2">Ligação nas páginas</text:h>
      <text:p text:style-name="Text_20_body">Todas as páginas terão:</text:p>
      <text:p text:style-name="P2"><text:span text:style-name="Source_20_Text">&lt;script src="../assets/js/components.js"&gt;&lt;/script&gt;</text:span></text:p>
      <text:p text:style-name="Text_20_body">ou no <text:span text:style-name="Source_20_Text">index.html</text:span>:</text:p>
      <text:p text:style-name="P2"><text:span text:style-name="Source_20_Text">&lt;script src="assets/js/components.js"&gt;&lt;/script&gt;</text:span></text:p>
      <text:p text:style-name="Horizontal_20_Line"/>
      <text:p text:style-name="Text_20_body">Próxima etapa depois deste arquivo:</text:p>
      <text:list text:style-name="L17">
        <text:list-item>
          <text:p text:style-name="P23">Ajustar os caminhos dos componentes (<text:span text:style-name="Source_20_Text">index</text:span> e páginas internas);</text:p>
        </text:list-item>
        <text:list-item>
          <text:p text:style-name="P23">Criar <text:span text:style-name="Source_20_Text">main.js</text:span>;</text:p>
        </text:list-item>
        <text:list-item>
          <text:p text:style-name="P23">Criar carregamento dinâmico dos <text:span text:style-name="Source_20_Text">book-card</text:span>;</text:p>
        </text:list-item>
        <text:list-item>
          <text:p text:style-name="P23">Conectar o <text:span text:style-name="Source_20_Text">livros.json</text:span> com a biblioteca.</text:p>
        </text:list-item>
      </text:list>
      <text:p text:style-name="Text_20_body">Agora a arquitetura começa realmente a funcionar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7-08T19:03:34.568484422</meta:creation-date>
    <dc:date>2026-07-09T01:23:03.430930667</dc:date>
    <dc:creator>João António</dc:creator>
    <meta:editing-duration>PT6H8M36S</meta:editing-duration>
    <meta:editing-cycles>8</meta:editing-cycles>
    <meta:generator>LibreOffice/26.2.4.2$Linux_X86_64 LibreOffice_project/620$Build-2</meta:generator>
    <meta:document-statistic meta:table-count="2" meta:image-count="0" meta:object-count="0" meta:page-count="42" meta:paragraph-count="1176" meta:word-count="3709" meta:character-count="32749" meta:non-whitespace-character-count="28513"/>
  </office:meta>
</office:document-meta>
</file>