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Vou preparar a nova versão do <text:span text:style-name="Source_20_Text">index.html</text:span> na próxima mensage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08T19:03:37.834077700</dc:date>
    <dc:creator>João António</dc:creator>
    <meta:editing-duration>PT5S</meta:editing-duration>
    <meta:editing-cycles>1</meta:editing-cycles>
    <meta:document-statistic meta:table-count="0" meta:image-count="0" meta:object-count="0" meta:page-count="6" meta:paragraph-count="136" meta:word-count="528" meta:character-count="3552" meta:non-whitespace-character-count="3110"/>
    <meta:generator>LibreOffice/26.2.4.2$Linux_X86_64 LibreOffice_project/620$Build-2</meta:generator>
  </office:meta>
</office:document-meta>
</file>