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1c0b" officeooo:paragraph-rsid="000c3ca8"/>
    </style:style>
    <style:style style:name="P2" style:family="paragraph" style:parent-style-name="Standard">
      <style:text-properties officeooo:rsid="00161c0b" officeooo:paragraph-rsid="00161c0b"/>
    </style:style>
    <style:style style:name="P3" style:family="paragraph" style:parent-style-name="Standard">
      <style:text-properties officeooo:rsid="00161c0b" officeooo:paragraph-rsid="00211029"/>
    </style:style>
    <style:style style:name="P4" style:family="paragraph" style:parent-style-name="Standard">
      <style:text-properties officeooo:rsid="00161c0b" officeooo:paragraph-rsid="001b30cc"/>
    </style:style>
    <style:style style:name="P5" style:family="paragraph" style:parent-style-name="Standard">
      <style:text-properties officeooo:rsid="00161c0b" officeooo:paragraph-rsid="0019c49f"/>
    </style:style>
    <style:style style:name="T1" style:family="text">
      <style:text-properties officeooo:rsid="00211029"/>
    </style:style>
    <style:style style:name="T2" style:family="text">
      <style:text-properties officeooo:rsid="001b30cc"/>
    </style:style>
    <style:style style:name="T3" style:family="text">
      <style:text-properties officeooo:rsid="0019c4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bookmark-start text:name="__DdeLink__16_394047450"/><text:bookmark-start text:name="__DdeLink__18_394047450"/>1. <text:bookmark-start text:name="__DdeLink__20_394047450"/>Ideia do projeto<text:bookmark-end text:name="__DdeLink__20_394047450"/></text:p>
      <text:p text:style-name="P2"/>
      <text:p text:style-name="P2">2. <text:bookmark-start text:name="__DdeLink__22_394047450"/>Requisitos<text:bookmark-end text:name="__DdeLink__22_394047450"/></text:p>
      <text:p text:style-name="P2"/>
      <text:p text:style-name="P2"><text:span text:style-name="T1">3</text:span>. <text:bookmark-start text:name="__DdeLink__253_394047450"/>Arquitetura das pastas <text:bookmark-end text:name="__DdeLink__253_394047450"/></text:p>
      <text:p text:style-name="P2"/>
      <text:p text:style-name="P3"><text:span text:style-name="T1">4</text:span>. <text:bookmark-start text:name="__DdeLink__24_394047450"/>Roadmap<text:bookmark-end text:name="__DdeLink__24_394047450"/></text:p>
      <text:p text:style-name="P2"/>
      <text:p text:style-name="P2">5. <text:span text:style-name="T2">Criação de Arquivos e delegação de </text:span>Responsabilidade.</text:p>
      <text:p text:style-name="P2"/>
      <text:p text:style-name="P4">6. Wireframe</text:p>
      <text:p text:style-name="P4"/>
      <text:p text:style-name="P4">7. Identidade visual</text:p>
      <text:p text:style-name="P5"/>
      <text:p text:style-name="P4">8. Design System</text:p>
      <text:p text:style-name="P4"/>
      <text:p text:style-name="P4">9. <text:bookmark-start text:name="__DdeLink__255_394047450"/>README inicial<text:bookmark-end text:name="__DdeLink__255_394047450"/></text:p>
      <text:p text:style-name="P2"/>
      <text:p text:style-name="P2">10. Estrutura HTML <text:span text:style-name="T3">(Organização de todo conteúdo)</text:span></text:p>
      <text:p text:style-name="P2"/>
      <text:p text:style-name="P2">11. <text:span text:style-name="T1">Estrutura </text:span>CSS</text:p>
      <text:p text:style-name="P2"/>
      <text:p text:style-name="P2">12. JavaScript e lógica</text:p>
      <text:p text:style-name="P2"/>
      <text:p text:style-name="P2">13. Integrações</text:p>
      <text:p text:style-name="P2"/>
      <text:p text:style-name="P2">14. Testes</text:p>
      <text:p text:style-name="P2"/>
      <text:p text:style-name="P2">15. Refatoração</text:p>
      <text:p text:style-name="P2"/>
      <text:p text:style-name="P2">16. Publicação</text:p>
      <text:p text:style-name="P2"/>
      <text:p text:style-name="P2">17. <text:span text:style-name="T2">Reame</text:span> final<text:bookmark-end text:name="__DdeLink__18_394047450"/></text:p>
      <text:p text:style-name="P2"/>
      <text:p text:style-name="P2">Planejar → Estruturar → Projetar → Construir → Testar → Melhorar → Publicar.<text:bookmark-end text:name="__DdeLink__16_3940474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0:56:31.041666774</meta:creation-date>
    <dc:date>2026-07-09T13:19:47.891971517</dc:date>
    <dc:creator>João António</dc:creator>
    <meta:editing-duration>PT4H17M11S</meta:editing-duration>
    <meta:editing-cycles>8</meta:editing-cycles>
    <meta:generator>LibreOffice/26.2.4.2$Linux_X86_64 LibreOffice_project/620$Build-2</meta:generator>
    <meta:document-statistic meta:table-count="0" meta:image-count="0" meta:object-count="0" meta:page-count="1" meta:paragraph-count="18" meta:word-count="69" meta:character-count="422" meta:non-whitespace-character-count="370"/>
  </office:meta>
</office:document-meta>
</file>