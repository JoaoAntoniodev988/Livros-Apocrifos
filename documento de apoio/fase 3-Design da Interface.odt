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6.466cm" table:align="left"/>
    </style:style>
    <style:style style:name="Tabela1.A" style:family="table-column">
      <style:table-column-properties style:column-width="3.11cm"/>
    </style:style>
    <style:style style:name="Tabela1.B" style:family="table-column">
      <style:table-column-properties style:column-width="3.35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Entramos agora na <text:span text:style-name="Strong_20_Emphasis">Fase 3 — Design da Interface</text:span>.</text:p>
      <text:p text:style-name="Text_20_body">Esta fase é onde vamos transformar a arquitetura técnica em uma experiência visual coerente.</text:p>
      <text:p text:style-name="Text_20_body">Um ponto importante: <text:span text:style-name="Strong_20_Emphasis">não vamos começar escolhendo cores aleatórias ou criando telas bonitas sem propósito</text:span>. O design precisa nascer da identidade da plataforma.</text:p>
      <text:p text:style-name="Text_20_body">A Biblioteca Apócrifa não é um site comum. Ela é uma plataforma de estudo de textos antigos, então o design deve transmitir:</text:p>
      <text:list text:style-name="L1">
        <text:list-item>
          <text:p text:style-name="P1">conhecimento;</text:p>
        </text:list-item>
        <text:list-item>
          <text:p text:style-name="P1">confiança;</text:p>
        </text:list-item>
        <text:list-item>
          <text:p text:style-name="P1">profundidade histórica;</text:p>
        </text:list-item>
        <text:list-item>
          <text:p text:style-name="P1">conforto para leitura prolongada;</text:p>
        </text:list-item>
        <text:list-item>
          <text:p text:style-name="P1">organização acadêmica.</text:p>
        </text:list-item>
      </text:list>
      <text:p text:style-name="Text_20_body">Vamos seguir a ordem do roadmap.</text:p>
      <text:p text:style-name="Horizontal_20_Line"/>
      <text:h text:style-name="Heading_20_1" text:outline-level="1">Fase 3 — Design da Interface</text:h>
      <text:h text:style-name="Heading_20_2" text:outline-level="2">Objetivo</text:h>
      <text:p text:style-name="Text_20_body">Criar uma identidade visual consistente para a Biblioteca Apócrifa, estabelecendo princípios visuais que serão aplicados em todas as páginas, componentes e futuras funcionalidades.</text:p>
      <text:p text:style-name="Horizontal_20_Line"/>
      <text:h text:style-name="Heading_20_1" text:outline-level="1">Sprint 3.1 — Definir a Identidade Visual</text:h>
      <text:h text:style-name="Heading_20_2" text:outline-level="2">Conceito visual</text:h>
      <text:p text:style-name="Text_20_body">A identidade da Biblioteca Apócrifa será baseada na ideia de:</text:p>
      <text:p text:style-name="Quotations"><text:span text:style-name="Strong_20_Emphasis">"Uma biblioteca histórica digital onde antigos manuscritos encontram uma experiência moderna de estudo."</text:span></text:p>
      <text:p text:style-name="Text_20_body">O design deve unir dois mundos:</text:p>
      <text:h text:style-name="Heading_20_3" text:outline-level="3">O passado</text:h>
      <text:p text:style-name="Text_20_body">Representado por:</text:p>
      <text:list text:style-name="L2">
        <text:list-item>
          <text:p text:style-name="P2">manuscritos antigos;</text:p>
        </text:list-item>
        <text:list-item>
          <text:p text:style-name="P2">pergaminhos;</text:p>
        </text:list-item>
        <text:list-item>
          <text:p text:style-name="P2">bibliotecas históricas;</text:p>
        </text:list-item>
        <text:list-item>
          <text:p text:style-name="P2">conhecimento preservado;</text:p>
        </text:list-item>
        <text:list-item>
          <text:p text:style-name="P2"><text:soft-page-break/>tradição literária.</text:p>
        </text:list-item>
      </text:list>
      <text:h text:style-name="Heading_20_3" text:outline-level="3">O presente</text:h>
      <text:p text:style-name="Text_20_body">Representado por:</text:p>
      <text:list text:style-name="L3">
        <text:list-item>
          <text:p text:style-name="P3">interface limpa;</text:p>
        </text:list-item>
        <text:list-item>
          <text:p text:style-name="P3">acessibilidade;</text:p>
        </text:list-item>
        <text:list-item>
          <text:p text:style-name="P3">navegação simples;</text:p>
        </text:list-item>
        <text:list-item>
          <text:p text:style-name="P3">experiência digital moderna.</text:p>
        </text:list-item>
      </text:list>
      <text:p text:style-name="Horizontal_20_Line"/>
      <text:h text:style-name="Heading_20_1" text:outline-level="1">Direção estética</text:h>
      <text:h text:style-name="Heading_20_2" text:outline-level="2">Estilo escolhido:</text:h>
      <text:p text:style-name="Text_20_body"><text:span text:style-name="Strong_20_Emphasis">Biblioteca acadêmica contemporânea com inspiração histórica.</text:span></text:p>
      <text:p text:style-name="Text_20_body">Não queremos criar uma aparência de "site religioso antigo".</text:p>
      <text:p text:style-name="Text_20_body">O foco é:</text:p>
      <text:list text:style-name="L4">
        <text:list-item>
          <text:p text:style-name="P4">histórico;</text:p>
        </text:list-item>
        <text:list-item>
          <text:p text:style-name="P4">literário;</text:p>
        </text:list-item>
        <text:list-item>
          <text:p text:style-name="P4">acadêmico.</text:p>
        </text:list-item>
      </text:list>
      <text:p text:style-name="Horizontal_20_Line"/>
      <text:h text:style-name="Heading_20_1" text:outline-level="1">Sensação que o usuário deve ter</text:h>
      <text:p text:style-name="Text_20_body">Ao entrar na plataforma, o usuário deve sentir:</text:p>
      <text:p text:style-name="Text_20_body">📚 "Estou entrando em um ambiente de pesquisa."</text:p>
      <text:p text:style-name="Text_20_body">📝 "Consigo estudar este conteúdo com tranquilidade."</text:p>
      <text:p text:style-name="Text_20_body">🔎 "Consigo encontrar informações organizadas."</text:p>
      <text:p text:style-name="Horizontal_20_Line"/>
      <text:h text:style-name="Heading_20_1" text:outline-level="1">Elementos visuais principais</text:h>
      <text:h text:style-name="Heading_20_2" text:outline-level="2">1. Atmosfera</text:h>
      <text:p text:style-name="Text_20_body">Referências:</text:p>
      <text:list text:style-name="L5">
        <text:list-item>
          <text:p text:style-name="P5">bibliotecas antigas;</text:p>
        </text:list-item>
        <text:list-item>
          <text:p text:style-name="P5">papel envelhecido;</text:p>
        </text:list-item>
        <text:list-item>
          <text:p text:style-name="P5"><text:soft-page-break/>arquivos históricos;</text:p>
        </text:list-item>
        <text:list-item>
          <text:p text:style-name="P5">salas de estudo.</text:p>
        </text:list-item>
      </text:list>
      <text:p text:style-name="Horizontal_20_Line"/>
      <text:h text:style-name="Heading_20_2" text:outline-level="2">2. Interface</text:h>
      <text:p text:style-name="Text_20_body">A interface deve ser:</text:p>
      <text:list text:style-name="L6">
        <text:list-item>
          <text:p text:style-name="P6">limpa;</text:p>
        </text:list-item>
        <text:list-item>
          <text:p text:style-name="P6">espaçosa;</text:p>
        </text:list-item>
        <text:list-item>
          <text:p text:style-name="P6">sem excesso de elementos;</text:p>
        </text:list-item>
        <text:list-item>
          <text:p text:style-name="P6">focada no conteúdo.</text:p>
        </text:list-item>
      </text:list>
      <text:p text:style-name="Horizontal_20_Line"/>
      <text:h text:style-name="Heading_20_2" text:outline-level="2">3. Leitura</text:h>
      <text:p text:style-name="Text_20_body">A página de leitura será o centro da plataforma.</text:p>
      <text:p text:style-name="Text_20_body">Portanto:</text:p>
      <text:list text:style-name="L7">
        <text:list-item>
          <text:p text:style-name="P7">largura confortável de texto;</text:p>
        </text:list-item>
        <text:list-item>
          <text:p text:style-name="P7">espaçamento generoso;</text:p>
        </text:list-item>
        <text:list-item>
          <text:p text:style-name="P7">contraste adequado;</text:p>
        </text:list-item>
        <text:list-item>
          <text:p text:style-name="P7">poucos elementos distraindo o leitor.</text:p>
        </text:list-item>
      </text:list>
      <text:p text:style-name="Horizontal_20_Line"/>
      <text:h text:style-name="Heading_20_1" text:outline-level="1">Logo e símbolo (conceito)</text:h>
      <text:p text:style-name="Text_20_body">Para a identidade visual, podemos trabalhar com símbolos como:</text:p>
      <text:h text:style-name="Heading_20_2" text:outline-level="2">Opção A — Livro + Manuscrito</text:h>
      <text:p text:style-name="Text_20_body">Representa:</text:p>
      <text:list text:style-name="L8">
        <text:list-item>
          <text:p text:style-name="P8">preservação;</text:p>
        </text:list-item>
        <text:list-item>
          <text:p text:style-name="P8">estudo;</text:p>
        </text:list-item>
        <text:list-item>
          <text:p text:style-name="P8">conhecimento.</text:p>
        </text:list-item>
      </text:list>
      <text:p text:style-name="Horizontal_20_Line"/>
      <text:h text:style-name="Heading_20_2" text:outline-level="2">Opção B — Pergaminho + Luz</text:h>
      <text:p text:style-name="Text_20_body">Representa:</text:p>
      <text:list text:style-name="L9">
        <text:list-item>
          <text:p text:style-name="P9">textos antigos;</text:p>
        </text:list-item>
        <text:list-item>
          <text:p text:style-name="P9"><text:soft-page-break/>descoberta;</text:p>
        </text:list-item>
        <text:list-item>
          <text:p text:style-name="P9">pesquisa.</text:p>
        </text:list-item>
      </text:list>
      <text:p text:style-name="Horizontal_20_Line"/>
      <text:h text:style-name="Heading_20_2" text:outline-level="2">Opção C — Biblioteca + Arquivo</text:h>
      <text:p text:style-name="Text_20_body">Representa:</text:p>
      <text:list text:style-name="L10">
        <text:list-item>
          <text:p text:style-name="P10">organização;</text:p>
        </text:list-item>
        <text:list-item>
          <text:p text:style-name="P10">coleção;</text:p>
        </text:list-item>
        <text:list-item>
          <text:p text:style-name="P10">conhecimento.</text:p>
        </text:list-item>
      </text:list>
      <text:p text:style-name="Horizontal_20_Line"/>
      <text:p text:style-name="Text_20_body">Minha recomendação:</text:p>
      <text:p text:style-name="Text_20_body">Usar algo baseado em:</text:p>
      <text:p text:style-name="Text_20_body"><text:span text:style-name="Strong_20_Emphasis">Livro aberto + detalhe de manuscrito antigo</text:span></text:p>
      <text:p text:style-name="Text_20_body">Porque conecta diretamente:</text:p>
      <text:p text:style-name="Text_20_body">Biblioteca + estudo + textos históricos.</text:p>
      <text:p text:style-name="Horizontal_20_Line"/>
      <text:h text:style-name="Heading_20_1" text:outline-level="1">Tom visual</text:h>
      <text:p text:style-name="Text_20_body">A plataforma deve evitar:</text:p>
      <text:p text:style-name="Text_20_body">❌ aparência de fórum religioso.</text:p>
      <text:p text:style-name="Text_20_body">❌ excesso de dourado ou símbolos místicos.</text:p>
      <text:p text:style-name="Text_20_body">❌ aparência medieval exagerada.</text:p>
      <text:p text:style-name="Text_20_body">Porque isso poderia afastar o público acadêmico.</text:p>
      <text:p text:style-name="Text_20_body">Devemos transmitir:</text:p>
      <text:p text:style-name="Text_20_body">✅ neutralidade.</text:p>
      <text:p text:style-name="Text_20_body">✅ pesquisa.</text:p>
      <text:p text:style-name="Text_20_body">✅ conhecimento.</text:p>
      <text:p text:style-name="Horizontal_20_Line"/>
      <text:h text:style-name="Heading_20_1" text:outline-level="1">Diretrizes de design</text:h>
      <text:h text:style-name="Heading_20_2" text:outline-level="2">Espaço</text:h>
      <text:p text:style-name="Text_20_body">Usar bastante espaço vazio.</text:p>
      <text:p text:style-name="Text_20_body"><text:soft-page-break/>Por quê?</text:p>
      <text:p text:style-name="Text_20_body">Porque leitura exige conforto visual.</text:p>
      <text:p text:style-name="Horizontal_20_Line"/>
      <text:h text:style-name="Heading_20_2" text:outline-level="2">Hierarquia</text:h>
      <text:p text:style-name="Text_20_body">Os elementos mais importantes devem ser:</text:p>
      <text:list text:style-name="L11">
        <text:list-item>
          <text:p text:style-name="P11">Título da obra.</text:p>
        </text:list-item>
        <text:list-item>
          <text:p text:style-name="P11">Conteúdo.</text:p>
        </text:list-item>
        <text:list-item>
          <text:p text:style-name="P11">Contexto histórico.</text:p>
        </text:list-item>
        <text:list-item>
          <text:p text:style-name="P11">Comentários.</text:p>
        </text:list-item>
      </text:list>
      <text:p text:style-name="Horizontal_20_Line"/>
      <text:h text:style-name="Heading_20_2" text:outline-level="2">Consistência</text:h>
      <text:p text:style-name="Text_20_body">Todos os componentes devem seguir o mesmo padrão:</text:p>
      <text:list text:style-name="L12">
        <text:list-item>
          <text:p text:style-name="P12">botões;</text:p>
        </text:list-item>
        <text:list-item>
          <text:p text:style-name="P12">cards;</text:p>
        </text:list-item>
        <text:list-item>
          <text:p text:style-name="P12">menus;</text:p>
        </text:list-item>
        <text:list-item>
          <text:p text:style-name="P12">caixas de informação;</text:p>
        </text:list-item>
        <text:list-item>
          <text:p text:style-name="P12">áreas de comentário.</text:p>
        </text:list-item>
      </text:list>
      <text:p text:style-name="Horizontal_20_Line"/>
      <text:h text:style-name="Heading_20_1" text:outline-level="1">Documento da Identidade Visual (primeira versão)</text:h>
      <text:h text:style-name="Heading_20_2" text:outline-level="2">Nome</text:h>
      <text:p text:style-name="Text_20_body">Biblioteca Apócrifa</text:p>
      <text:h text:style-name="Heading_20_2" text:outline-level="2">Personalidade</text:h>
      <text:list text:style-name="L13">
        <text:list-item>
          <text:p text:style-name="P13">Acadêmica.</text:p>
        </text:list-item>
        <text:list-item>
          <text:p text:style-name="P13">Histórica.</text:p>
        </text:list-item>
        <text:list-item>
          <text:p text:style-name="P13">Contemplativa.</text:p>
        </text:list-item>
        <text:list-item>
          <text:p text:style-name="P13">Confiável.</text:p>
        </text:list-item>
        <text:list-item>
          <text:p text:style-name="P13">Educativa.</text:p>
        </text:list-item>
      </text:list>
      <text:h text:style-name="Heading_20_2" text:outline-level="2"><text:soft-page-break/>Público</text:h>
      <text:p text:style-name="Text_20_body">Estudantes, pesquisadores e leitores interessados em literatura antiga.</text:p>
      <text:h text:style-name="Heading_20_2" text:outline-level="2">Estilo</text:h>
      <text:p text:style-name="Text_20_body">Biblioteca acadêmica contemporânea.</text:p>
      <text:h text:style-name="Heading_20_2" text:outline-level="2">Inspiração</text:h>
      <text:p text:style-name="Text_20_body">Manuscritos antigos + plataformas modernas de conhecimento.</text:p>
      <text:p text:style-name="Horizontal_20_Line"/>
      <text:h text:style-name="Heading_20_1" text:outline-level="1">Checklist da Fase 3</text:h>
      <text:list text:style-name="L14">
        <text:list-item>
          <text:p text:style-name="P14">✅ Definir a identidade visual.</text:p>
        </text:list-item>
        <text:list-item>
          <text:p text:style-name="P14">⏳ Criar a paleta de cores.</text:p>
        </text:list-item>
        <text:list-item>
          <text:p text:style-name="P14">⏳ Definir a tipografia.</text:p>
        </text:list-item>
        <text:list-item>
          <text:p text:style-name="P14">⏳ Criar os componentes visuais.</text:p>
        </text:list-item>
        <text:list-item>
          <text:p text:style-name="P14">⏳ Elaborar o Design System.</text:p>
        </text:list-item>
        <text:list-item>
          <text:p text:style-name="P14">⏳ Produzir os wireframes das principais páginas.</text:p>
        </text:list-item>
      </text:list>
      <text:p text:style-name="Horizontal_20_Line"/>
      <text:h text:style-name="Heading_20_2" text:outline-level="2">Próximo Sprint: 3.2 — Criar a Paleta de Cores</text:h>
      <text:p text:style-name="Text_20_body">Agora vamos transformar essa identidade em decisões visuais concretas:</text:p>
      <text:p text:style-name="Text_20_body">Vamos definir:</text:p>
      <text:list text:style-name="L15">
        <text:list-item>
          <text:p text:style-name="P15">cor principal;</text:p>
        </text:list-item>
        <text:list-item>
          <text:p text:style-name="P15">cor secundária;</text:p>
        </text:list-item>
        <text:list-item>
          <text:p text:style-name="P15">cores neutras;</text:p>
        </text:list-item>
        <text:list-item>
          <text:p text:style-name="P15">cor de destaque;</text:p>
        </text:list-item>
        <text:list-item>
          <text:p text:style-name="P15">fundo da leitura;</text:p>
        </text:list-item>
        <text:list-item>
          <text:p text:style-name="P15">estados de interação;</text:p>
        </text:list-item>
        <text:list-item>
          <text:p text:style-name="P15">modo escuro (planejamento futuro).</text:p>
        </text:list-item>
      </text:list>
      <text:p text:style-name="Text_20_body">A paleta será criada pensando principalmente em <text:span text:style-name="Strong_20_Emphasis">conforto de leitura e credibilidade acadêmica</text:span>.</text:p>
      <text:p text:style-name="Text_20_body">Perfeito. Vamos avançar para a próxima etapa da Fase 3.</text:p>
      <text:h text:style-name="Heading_20_1" text:outline-level="1"><text:soft-page-break/>Sprint 3.2 — Criar a Paleta de Cores</text:h>
      <text:h text:style-name="Heading_20_2" text:outline-level="2">Objetivo</text:h>
      <text:p text:style-name="Text_20_body">Definir uma paleta visual que represente a identidade da Biblioteca Apócrifa e que funcione bem em uma plataforma focada em <text:span text:style-name="Strong_20_Emphasis">leitura, estudo e pesquisa</text:span>.</text:p>
      <text:p text:style-name="Text_20_body">A escolha das cores não será apenas estética. Cada cor terá uma função dentro da interface.</text:p>
      <text:p text:style-name="Horizontal_20_Line"/>
      <text:h text:style-name="Heading_20_1" text:outline-level="1">Princípios da paleta</text:h>
      <text:p text:style-name="Text_20_body">A Biblioteca Apócrifa precisa transmitir:</text:p>
      <text:list text:style-name="L16">
        <text:list-item>
          <text:p text:style-name="P16">📚 conhecimento;</text:p>
        </text:list-item>
        <text:list-item>
          <text:p text:style-name="P16">🏛️ história;</text:p>
        </text:list-item>
        <text:list-item>
          <text:p text:style-name="P16">🔎 pesquisa;</text:p>
        </text:list-item>
        <text:list-item>
          <text:p text:style-name="P16">✍️ leitura confortável;</text:p>
        </text:list-item>
        <text:list-item>
          <text:p text:style-name="P16">⚖️ neutralidade acadêmica.</text:p>
        </text:list-item>
      </text:list>
      <text:p text:style-name="Text_20_body">Por isso, vamos evitar:</text:p>
      <text:p text:style-name="Text_20_body">❌ cores muito vibrantes;<text:line-break/>❌ excesso de dourado;<text:line-break/>❌ fundos escuros pesados;<text:line-break/>❌ aparência de aplicativo religioso.</text:p>
      <text:p text:style-name="Horizontal_20_Line"/>
      <text:h text:style-name="Heading_20_1" text:outline-level="1">Paleta principal proposta</text:h>
      <text:h text:style-name="Heading_20_2" text:outline-level="2">1. Cor Primária — Azul Profundo</text:h>
      <text:p text:style-name="P17"><text:span text:style-name="Source_20_Text">--color-primary: #243447;</text:span></text:p>
      <text:h text:style-name="Heading_20_3" text:outline-level="3">Representa:</text:h>
      <text:list text:style-name="L17">
        <text:list-item>
          <text:p text:style-name="P18">conhecimento;</text:p>
        </text:list-item>
        <text:list-item>
          <text:p text:style-name="P18">confiança;</text:p>
        </text:list-item>
        <text:list-item>
          <text:p text:style-name="P18">estabilidade;</text:p>
        </text:list-item>
        <text:list-item>
          <text:p text:style-name="P18">pesquisa.</text:p>
        </text:list-item>
      </text:list>
      <text:p text:style-name="Text_20_body">Uso:</text:p>
      <text:list text:style-name="L18">
        <text:list-item>
          <text:p text:style-name="P19">navbar;</text:p>
        </text:list-item>
        <text:list-item>
          <text:p text:style-name="P19"><text:soft-page-break/>botões principais;</text:p>
        </text:list-item>
        <text:list-item>
          <text:p text:style-name="P19">títulos importantes;</text:p>
        </text:list-item>
        <text:list-item>
          <text:p text:style-name="P19">elementos de navegação.</text:p>
        </text:list-item>
      </text:list>
      <text:p text:style-name="Horizontal_20_Line"/>
      <text:h text:style-name="Heading_20_2" text:outline-level="2">2. Cor Secundária — Bronze Antigo</text:h>
      <text:p text:style-name="P17"><text:span text:style-name="Source_20_Text">--color-secondary: #9A7B4F;</text:span></text:p>
      <text:h text:style-name="Heading_20_3" text:outline-level="3">Representa:</text:h>
      <text:list text:style-name="L19">
        <text:list-item>
          <text:p text:style-name="P20">manuscritos;</text:p>
        </text:list-item>
        <text:list-item>
          <text:p text:style-name="P20">história;</text:p>
        </text:list-item>
        <text:list-item>
          <text:p text:style-name="P20">preservação.</text:p>
        </text:list-item>
      </text:list>
      <text:p text:style-name="Text_20_body">Uso:</text:p>
      <text:list text:style-name="L20">
        <text:list-item>
          <text:p text:style-name="P21">detalhes;</text:p>
        </text:list-item>
        <text:list-item>
          <text:p text:style-name="P21">ícones;</text:p>
        </text:list-item>
        <text:list-item>
          <text:p text:style-name="P21">destaques;</text:p>
        </text:list-item>
        <text:list-item>
          <text:p text:style-name="P21">elementos decorativos.</text:p>
        </text:list-item>
      </text:list>
      <text:p text:style-name="Text_20_body">Importante:</text:p>
      <text:p text:style-name="Text_20_body">Será uma cor de apoio, não dominante.</text:p>
      <text:p text:style-name="Horizontal_20_Line"/>
      <text:h text:style-name="Heading_20_2" text:outline-level="2">3. Cor de Fundo Principal — Marfim</text:h>
      <text:p text:style-name="P17"><text:span text:style-name="Source_20_Text">--color-background: #F8F5EF;</text:span></text:p>
      <text:h text:style-name="Heading_20_3" text:outline-level="3">Representa:</text:h>
      <text:list text:style-name="L21">
        <text:list-item>
          <text:p text:style-name="P22">papel antigo;</text:p>
        </text:list-item>
        <text:list-item>
          <text:p text:style-name="P22">conforto visual;</text:p>
        </text:list-item>
        <text:list-item>
          <text:p text:style-name="P22">leitura prolongada.</text:p>
        </text:list-item>
      </text:list>
      <text:p text:style-name="Text_20_body">Uso:</text:p>
      <text:list text:style-name="L22">
        <text:list-item>
          <text:p text:style-name="P23">fundo geral da aplicação.</text:p>
        </text:list-item>
      </text:list>
      <text:p text:style-name="Horizontal_20_Line"/>
      <text:h text:style-name="Heading_20_2" text:outline-level="2">4. Cor da Área de Leitura</text:h>
      <text:p text:style-name="P17"><text:span text:style-name="Source_20_Text">--color-reading-bg: #FCFAF5;</text:span></text:p>
      <text:p text:style-name="Text_20_body"><text:soft-page-break/>Motivo:</text:p>
      <text:p text:style-name="Text_20_body">A leitura de textos longos precisa de uma tonalidade ainda mais suave.</text:p>
      <text:p text:style-name="Text_20_body">Uso:</text:p>
      <text:list text:style-name="L23">
        <text:list-item>
          <text:p text:style-name="P24">página de leitura;</text:p>
        </text:list-item>
        <text:list-item>
          <text:p text:style-name="P24">blocos de texto;</text:p>
        </text:list-item>
        <text:list-item>
          <text:p text:style-name="P24">citações.</text:p>
        </text:list-item>
      </text:list>
      <text:p text:style-name="Horizontal_20_Line"/>
      <text:h text:style-name="Heading_20_2" text:outline-level="2">5. Cor de Texto Principal</text:h>
      <text:p text:style-name="P17"><text:span text:style-name="Source_20_Text">--color-text: #2C2C2C;</text:span></text:p>
      <text:p text:style-name="Text_20_body">Uso:</text:p>
      <text:list text:style-name="L24">
        <text:list-item>
          <text:p text:style-name="P25">textos;</text:p>
        </text:list-item>
        <text:list-item>
          <text:p text:style-name="P25">parágrafos;</text:p>
        </text:list-item>
        <text:list-item>
          <text:p text:style-name="P25">descrições.</text:p>
        </text:list-item>
      </text:list>
      <text:p text:style-name="Text_20_body">Não usaremos preto puro (<text:span text:style-name="Source_20_Text">#000000</text:span>) porque aumenta o cansaço visual.</text:p>
      <text:p text:style-name="Horizontal_20_Line"/>
      <text:h text:style-name="Heading_20_2" text:outline-level="2">6. Texto Secundário</text:h>
      <text:p text:style-name="P17"><text:span text:style-name="Source_20_Text">--color-text-muted: #6B6B6B;</text:span></text:p>
      <text:p text:style-name="Text_20_body">Uso:</text:p>
      <text:list text:style-name="L25">
        <text:list-item>
          <text:p text:style-name="P26">informações auxiliares;</text:p>
        </text:list-item>
        <text:list-item>
          <text:p text:style-name="P26">datas;</text:p>
        </text:list-item>
        <text:list-item>
          <text:p text:style-name="P26">categorias;</text:p>
        </text:list-item>
        <text:list-item>
          <text:p text:style-name="P26">metadados.</text:p>
        </text:list-item>
      </text:list>
      <text:p text:style-name="Horizontal_20_Line"/>
      <text:h text:style-name="Heading_20_1" text:outline-level="1">Cores de Interface</text:h>
      <text:h text:style-name="Heading_20_2" text:outline-level="2">Sucesso</text:h>
      <text:p text:style-name="P17"><text:span text:style-name="Source_20_Text">--color-success: #3F6B4F;</text:span></text:p>
      <text:p text:style-name="Text_20_body">Uso:</text:p>
      <text:list text:style-name="L26">
        <text:list-item>
          <text:p text:style-name="P27">mensagens positivas;</text:p>
        </text:list-item>
        <text:list-item>
          <text:p text:style-name="P27">confirmação.</text:p>
        </text:list-item>
      </text:list>
      <text:p text:style-name="Horizontal_20_Line"><text:soft-page-break/></text:p>
      <text:h text:style-name="Heading_20_2" text:outline-level="2">Erro</text:h>
      <text:p text:style-name="P17"><text:span text:style-name="Source_20_Text">--color-error: #8B3A3A;</text:span></text:p>
      <text:p text:style-name="Text_20_body">Uso:</text:p>
      <text:list text:style-name="L27">
        <text:list-item>
          <text:p text:style-name="P28">erros;</text:p>
        </text:list-item>
        <text:list-item>
          <text:p text:style-name="P28">alertas.</text:p>
        </text:list-item>
      </text:list>
      <text:p text:style-name="Horizontal_20_Line"/>
      <text:h text:style-name="Heading_20_2" text:outline-level="2">Informação</text:h>
      <text:p text:style-name="P17"><text:span text:style-name="Source_20_Text">--color-info: #355C7D;</text:span></text:p>
      <text:p text:style-name="Text_20_body">Uso:</text:p>
      <text:list text:style-name="L28">
        <text:list-item>
          <text:p text:style-name="P29">caixas explicativas;</text:p>
        </text:list-item>
        <text:list-item>
          <text:p text:style-name="P29">notas históricas.</text:p>
        </text:list-item>
      </text:list>
      <text:p text:style-name="Horizontal_20_Line"/>
      <text:h text:style-name="Heading_20_1" text:outline-level="1">Resumo da paleta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Função</text:p>
            </table:table-cell>
            <table:table-cell table:style-name="Tabela1.A1" office:value-type="string">
              <text:p text:style-name="Table_20_Heading">Cor</text:p>
            </table:table-cell>
          </table:table-row>
        </table:table-header-rows>
        <table:table-row>
          <table:table-cell table:style-name="Tabela1.A1" office:value-type="string">
            <text:p text:style-name="Table_20_Contents">Primária</text:p>
          </table:table-cell>
          <table:table-cell table:style-name="Tabela1.A1" office:value-type="string">
            <text:p text:style-name="Table_20_Contents">Azul profundo</text:p>
          </table:table-cell>
        </table:table-row>
        <table:table-row>
          <table:table-cell table:style-name="Tabela1.A1" office:value-type="string">
            <text:p text:style-name="Table_20_Contents">Secundária</text:p>
          </table:table-cell>
          <table:table-cell table:style-name="Tabela1.A1" office:value-type="string">
            <text:p text:style-name="Table_20_Contents">Bronze antigo</text:p>
          </table:table-cell>
        </table:table-row>
        <table:table-row>
          <table:table-cell table:style-name="Tabela1.A1" office:value-type="string">
            <text:p text:style-name="Table_20_Contents">Fundo</text:p>
          </table:table-cell>
          <table:table-cell table:style-name="Tabela1.A1" office:value-type="string">
            <text:p text:style-name="Table_20_Contents">Marfim</text:p>
          </table:table-cell>
        </table:table-row>
        <table:table-row>
          <table:table-cell table:style-name="Tabela1.A1" office:value-type="string">
            <text:p text:style-name="Table_20_Contents">Área de leitura</text:p>
          </table:table-cell>
          <table:table-cell table:style-name="Tabela1.A1" office:value-type="string">
            <text:p text:style-name="Table_20_Contents">Marfim claro</text:p>
          </table:table-cell>
        </table:table-row>
        <table:table-row>
          <table:table-cell table:style-name="Tabela1.A1" office:value-type="string">
            <text:p text:style-name="Table_20_Contents">Texto principal</text:p>
          </table:table-cell>
          <table:table-cell table:style-name="Tabela1.A1" office:value-type="string">
            <text:p text:style-name="Table_20_Contents">Cinza escuro</text:p>
          </table:table-cell>
        </table:table-row>
        <table:table-row>
          <table:table-cell table:style-name="Tabela1.A1" office:value-type="string">
            <text:p text:style-name="Table_20_Contents">Texto secundário</text:p>
          </table:table-cell>
          <table:table-cell table:style-name="Tabela1.A1" office:value-type="string">
            <text:p text:style-name="Table_20_Contents">Cinza médio</text:p>
          </table:table-cell>
        </table:table-row>
        <table:table-row>
          <table:table-cell table:style-name="Tabela1.A1" office:value-type="string">
            <text:p text:style-name="Table_20_Contents">Sucesso</text:p>
          </table:table-cell>
          <table:table-cell table:style-name="Tabela1.A1" office:value-type="string">
            <text:p text:style-name="Table_20_Contents">Verde histórico</text:p>
          </table:table-cell>
        </table:table-row>
        <table:table-row>
          <table:table-cell table:style-name="Tabela1.A1" office:value-type="string">
            <text:p text:style-name="Table_20_Contents">Erro</text:p>
          </table:table-cell>
          <table:table-cell table:style-name="Tabela1.A1" office:value-type="string">
            <text:p text:style-name="Table_20_Contents">Vermelho discreto</text:p>
          </table:table-cell>
        </table:table-row>
        <table:table-row>
          <table:table-cell table:style-name="Tabela1.A1" office:value-type="string">
            <text:p text:style-name="Table_20_Contents">Informação</text:p>
          </table:table-cell>
          <table:table-cell table:style-name="Tabela1.A1" office:value-type="string">
            <text:p text:style-name="Table_20_Contents">Azul acadêmico</text:p>
          </table:table-cell>
        </table:table-row>
      </table:table>
      <text:p text:style-name="Horizontal_20_Line"/>
      <text:h text:style-name="Heading_20_1" text:outline-level="1">Aplicação visual esperada</text:h>
      <text:p text:style-name="Text_20_body">Exemplo da página inicial:</text:p>
      <text:p text:style-name="Preformatted_20_Text"><text:span text:style-name="Source_20_Text">--------------------------------</text:span></text:p>
      <text:p text:style-name="Preformatted_20_Text"><text:span text:style-name="Source_20_Text">Navbar</text:span></text:p>
      <text:p text:style-name="Preformatted_20_Text"><text:span text:style-name="Source_20_Text">Azul profundo</text:span></text:p>
      <text:p text:style-name="Preformatted_20_Text"/>
      <text:p text:style-name="Preformatted_20_Text"><text:span text:style-name="Source_20_Text">--------------------------------</text:span></text:p>
      <text:p text:style-name="Preformatted_20_Text"/>
      <text:p text:style-name="Preformatted_20_Text"><text:span text:style-name="Source_20_Text">Título principal</text:span></text:p>
      <text:p text:style-name="Preformatted_20_Text"><text:span text:style-name="Source_20_Text">Texto escuro</text:span></text:p>
      <text:p text:style-name="Preformatted_20_Text"><text:soft-page-break/></text:p>
      <text:p text:style-name="Preformatted_20_Text"><text:span text:style-name="Source_20_Text">Botão principal</text:span></text:p>
      <text:p text:style-name="Preformatted_20_Text"><text:span text:style-name="Source_20_Text">Azul profundo</text:span></text:p>
      <text:p text:style-name="Preformatted_20_Text"/>
      <text:p text:style-name="Preformatted_20_Text"><text:span text:style-name="Source_20_Text">Detalhes decorativos</text:span></text:p>
      <text:p text:style-name="Preformatted_20_Text"><text:span text:style-name="Source_20_Text">Bronze antigo</text:span></text:p>
      <text:p text:style-name="Preformatted_20_Text"/>
      <text:p text:style-name="Preformatted_20_Text"><text:span text:style-name="Source_20_Text">Fundo geral</text:span></text:p>
      <text:p text:style-name="Preformatted_20_Text"><text:span text:style-name="Source_20_Text">Marfim</text:span></text:p>
      <text:p text:style-name="Preformatted_20_Text"/>
      <text:p text:style-name="P17"><text:span text:style-name="Source_20_Text">--------------------------------</text:span></text:p>
      <text:p text:style-name="Horizontal_20_Line"/>
      <text:h text:style-name="Heading_20_1" text:outline-level="1">Página de leitura</text:h>
      <text:p text:style-name="Text_20_body">A prioridade será o texto:</text:p>
      <text:p text:style-name="Preformatted_20_Text"><text:span text:style-name="Source_20_Text">--------------------------------</text:span></text:p>
      <text:p text:style-name="Preformatted_20_Text"/>
      <text:p text:style-name="Preformatted_20_Text"><text:span text:style-name="Source_20_Text">Título da obra</text:span></text:p>
      <text:p text:style-name="Preformatted_20_Text"/>
      <text:p text:style-name="Preformatted_20_Text"><text:span text:style-name="Source_20_Text">Contexto histórico</text:span></text:p>
      <text:p text:style-name="Preformatted_20_Text"/>
      <text:p text:style-name="Preformatted_20_Text"><text:span text:style-name="Source_20_Text">--------------------------------</text:span></text:p>
      <text:p text:style-name="Preformatted_20_Text"/>
      <text:p text:style-name="Preformatted_20_Text"><text:span text:style-name="Source_20_Text">Texto do manuscrito</text:span></text:p>
      <text:p text:style-name="Preformatted_20_Text"/>
      <text:p text:style-name="Preformatted_20_Text"><text:span text:style-name="Source_20_Text">Fundo marfim claro</text:span></text:p>
      <text:p text:style-name="Preformatted_20_Text"/>
      <text:p text:style-name="Preformatted_20_Text"><text:span text:style-name="Source_20_Text">Texto confortável</text:span></text:p>
      <text:p text:style-name="Preformatted_20_Text"/>
      <text:p text:style-name="Preformatted_20_Text"><text:span text:style-name="Source_20_Text">--------------------------------</text:span></text:p>
      <text:p text:style-name="Preformatted_20_Text"/>
      <text:p text:style-name="Preformatted_20_Text"><text:span text:style-name="Source_20_Text">Comentário / Exegese</text:span></text:p>
      <text:p text:style-name="Preformatted_20_Text"/>
      <text:p text:style-name="Preformatted_20_Text"><text:span text:style-name="Source_20_Text">Bloco informativo</text:span></text:p>
      <text:p text:style-name="Preformatted_20_Text"/>
      <text:p text:style-name="P17"><text:span text:style-name="Source_20_Text">--------------------------------</text:span></text:p>
      <text:p text:style-name="Horizontal_20_Line"/>
      <text:h text:style-name="Heading_20_1" text:outline-level="1">Decisão importante: modo escuro</text:h>
      <text:p text:style-name="Text_20_body">Como será uma plataforma de leitura, futuramente podemos implementar:</text:p>
      <text:list text:style-name="L29">
        <text:list-item>
          <text:p text:style-name="P30">modo claro (padrão);</text:p>
        </text:list-item>
        <text:list-item>
          <text:p text:style-name="P30">modo noturno;</text:p>
        </text:list-item>
        <text:list-item>
          <text:p text:style-name="P30">modo sepia.</text:p>
        </text:list-item>
      </text:list>
      <text:p text:style-name="Text_20_body">Mas não vamos incluir agora para evitar complexidade.</text:p>
      <text:p text:style-name="Text_20_body">Primeiro vamos construir uma base sólida.</text:p>
      <text:p text:style-name="Horizontal_20_Line"/>
      <text:h text:style-name="Heading_20_1" text:outline-level="1"><text:soft-page-break/>Resultado da Sprint 3.2</text:h>
      <text:p text:style-name="Text_20_body">Definimos:</text:p>
      <text:p text:style-name="Text_20_body">✅ Cor principal.<text:line-break/>✅ Cor secundária.<text:line-break/>✅ Fundos.<text:line-break/>✅ Cores de texto.<text:line-break/>✅ Estados da interface.<text:line-break/>✅ Direção visual da plataforma.</text:p>
      <text:p text:style-name="Horizontal_20_Line"/>
      <text:h text:style-name="Heading_20_1" text:outline-level="1">Checklist da Fase 3</text:h>
      <text:list text:style-name="L30">
        <text:list-item>
          <text:p text:style-name="P31">✅ Definir a identidade visual.</text:p>
        </text:list-item>
        <text:list-item>
          <text:p text:style-name="P31">✅ Criar a paleta de cores.</text:p>
        </text:list-item>
        <text:list-item>
          <text:p text:style-name="P31">⏳ Definir a tipografia.</text:p>
        </text:list-item>
        <text:list-item>
          <text:p text:style-name="P31">⏳ Criar os componentes visuais.</text:p>
        </text:list-item>
        <text:list-item>
          <text:p text:style-name="P31">⏳ Elaborar o Design System.</text:p>
        </text:list-item>
        <text:list-item>
          <text:p text:style-name="P31">⏳ Produzir os wireframes das principais páginas.</text:p>
        </text:list-item>
      </text:list>
      <text:p text:style-name="Horizontal_20_Line"/>
      <text:h text:style-name="Heading_20_2" text:outline-level="2">Próxima Sprint — 3.3 Definir a Tipografia</text:h>
      <text:p text:style-name="Text_20_body">Aqui vamos decidir:</text:p>
      <text:list text:style-name="L31">
        <text:list-item>
          <text:p text:style-name="P32">fonte dos textos longos;</text:p>
        </text:list-item>
        <text:list-item>
          <text:p text:style-name="P32">fonte dos títulos;</text:p>
        </text:list-item>
        <text:list-item>
          <text:p text:style-name="P32">tamanhos;</text:p>
        </text:list-item>
        <text:list-item>
          <text:p text:style-name="P32">pesos;</text:p>
        </text:list-item>
        <text:list-item>
          <text:p text:style-name="P32">hierarquia visual;</text:p>
        </text:list-item>
        <text:list-item>
          <text:p text:style-name="P32">espaçamento entre linhas.</text:p>
        </text:list-item>
      </text:list>
      <text:p text:style-name="Text_20_body">Como a Biblioteca tem foco em leitura, a tipografia será uma das decisões mais importantes do projet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7:50:36.267051405</meta:creation-date>
    <dc:date>2026-07-08T17:59:27.854148483</dc:date>
    <dc:creator>João António</dc:creator>
    <meta:editing-duration>PT8M52S</meta:editing-duration>
    <meta:editing-cycles>2</meta:editing-cycles>
    <meta:generator>LibreOffice/26.2.4.2$Linux_X86_64 LibreOffice_project/620$Build-2</meta:generator>
    <meta:document-statistic meta:table-count="1" meta:image-count="0" meta:object-count="0" meta:page-count="12" meta:paragraph-count="308" meta:word-count="1170" meta:character-count="7556" meta:non-whitespace-character-count="6811"/>
  </office:meta>
</office:document-meta>
</file>