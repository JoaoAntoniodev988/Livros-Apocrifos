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6.466cm" table:align="left"/>
    </style:style>
    <style:style style:name="Tabela1.A" style:family="table-column">
      <style:table-column-properties style:column-width="3.11cm"/>
    </style:style>
    <style:style style:name="Tabela1.B" style:family="table-column">
      <style:table-column-properties style:column-width="3.35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3.896cm" table:align="left"/>
    </style:style>
    <style:style style:name="Tabela2.A" style:family="table-column">
      <style:table-column-properties style:column-width="1.93cm"/>
    </style:style>
    <style:style style:name="Tabela2.B" style:family="table-column">
      <style:table-column-properties style:column-width="1.967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Entramos agora na <text:span text:style-name="Strong_20_Emphasis">Fase 3 — Design da Interface</text:span>.</text:p>
      <text:p text:style-name="Text_20_body">Esta fase é onde vamos transformar a arquitetura técnica em uma experiência visual coerente.</text:p>
      <text:p text:style-name="Text_20_body">Um ponto importante: <text:span text:style-name="Strong_20_Emphasis">não vamos começar escolhendo cores aleatórias ou criando telas bonitas sem propósito</text:span>. O design precisa nascer da identidade da plataforma.</text:p>
      <text:p text:style-name="Text_20_body">A Biblioteca Apócrifa não é um site comum. Ela é uma plataforma de estudo de textos antigos, então o design deve transmitir:</text:p>
      <text:list text:style-name="L1">
        <text:list-item>
          <text:p text:style-name="P1">conhecimento;</text:p>
        </text:list-item>
        <text:list-item>
          <text:p text:style-name="P1">confiança;</text:p>
        </text:list-item>
        <text:list-item>
          <text:p text:style-name="P1">profundidade histórica;</text:p>
        </text:list-item>
        <text:list-item>
          <text:p text:style-name="P1">conforto para leitura prolongada;</text:p>
        </text:list-item>
        <text:list-item>
          <text:p text:style-name="P1">organização acadêmica.</text:p>
        </text:list-item>
      </text:list>
      <text:p text:style-name="Text_20_body">Vamos seguir a ordem do roadmap.</text:p>
      <text:p text:style-name="Horizontal_20_Line"/>
      <text:h text:style-name="Heading_20_1" text:outline-level="1">Fase 3 — Design da Interface</text:h>
      <text:h text:style-name="Heading_20_2" text:outline-level="2">Objetivo</text:h>
      <text:p text:style-name="Text_20_body">Criar uma identidade visual consistente para a Biblioteca Apócrifa, estabelecendo princípios visuais que serão aplicados em todas as páginas, componentes e futuras funcionalidades.</text:p>
      <text:p text:style-name="Horizontal_20_Line"/>
      <text:h text:style-name="Heading_20_1" text:outline-level="1">Sprint 3.1 — Definir a Identidade Visual</text:h>
      <text:h text:style-name="Heading_20_2" text:outline-level="2">Conceito visual</text:h>
      <text:p text:style-name="Text_20_body">A identidade da Biblioteca Apócrifa será baseada na ideia de:</text:p>
      <text:p text:style-name="Quotations"><text:span text:style-name="Strong_20_Emphasis">"Uma biblioteca histórica digital onde antigos manuscritos encontram uma experiência moderna de estudo."</text:span></text:p>
      <text:p text:style-name="Text_20_body">O design deve unir dois mundos:</text:p>
      <text:h text:style-name="Heading_20_3" text:outline-level="3">O passado</text:h>
      <text:p text:style-name="Text_20_body">Representado por:</text:p>
      <text:list text:style-name="L2">
        <text:list-item>
          <text:p text:style-name="P2">manuscritos antigos;</text:p>
        </text:list-item>
        <text:list-item>
          <text:p text:style-name="P2">pergaminhos;</text:p>
        </text:list-item>
        <text:list-item>
          <text:p text:style-name="P2">bibliotecas históricas;</text:p>
        </text:list-item>
        <text:list-item>
          <text:p text:style-name="P2">conhecimento preservado;</text:p>
        </text:list-item>
        <text:list-item>
          <text:p text:style-name="P2"><text:soft-page-break/>tradição literária.</text:p>
        </text:list-item>
      </text:list>
      <text:h text:style-name="Heading_20_3" text:outline-level="3">O presente</text:h>
      <text:p text:style-name="Text_20_body">Representado por:</text:p>
      <text:list text:style-name="L3">
        <text:list-item>
          <text:p text:style-name="P3">interface limpa;</text:p>
        </text:list-item>
        <text:list-item>
          <text:p text:style-name="P3">acessibilidade;</text:p>
        </text:list-item>
        <text:list-item>
          <text:p text:style-name="P3">navegação simples;</text:p>
        </text:list-item>
        <text:list-item>
          <text:p text:style-name="P3">experiência digital moderna.</text:p>
        </text:list-item>
      </text:list>
      <text:p text:style-name="Horizontal_20_Line"/>
      <text:h text:style-name="Heading_20_1" text:outline-level="1">Direção estética</text:h>
      <text:h text:style-name="Heading_20_2" text:outline-level="2">Estilo escolhido:</text:h>
      <text:p text:style-name="Text_20_body"><text:span text:style-name="Strong_20_Emphasis">Biblioteca acadêmica contemporânea com inspiração histórica.</text:span></text:p>
      <text:p text:style-name="Text_20_body">Não queremos criar uma aparência de "site religioso antigo".</text:p>
      <text:p text:style-name="Text_20_body">O foco é:</text:p>
      <text:list text:style-name="L4">
        <text:list-item>
          <text:p text:style-name="P4">histórico;</text:p>
        </text:list-item>
        <text:list-item>
          <text:p text:style-name="P4">literário;</text:p>
        </text:list-item>
        <text:list-item>
          <text:p text:style-name="P4">acadêmico.</text:p>
        </text:list-item>
      </text:list>
      <text:p text:style-name="Horizontal_20_Line"/>
      <text:h text:style-name="Heading_20_1" text:outline-level="1">Sensação que o usuário deve ter</text:h>
      <text:p text:style-name="Text_20_body">Ao entrar na plataforma, o usuário deve sentir:</text:p>
      <text:p text:style-name="Text_20_body">📚 "Estou entrando em um ambiente de pesquisa."</text:p>
      <text:p text:style-name="Text_20_body">📝 "Consigo estudar este conteúdo com tranquilidade."</text:p>
      <text:p text:style-name="Text_20_body">🔎 "Consigo encontrar informações organizadas."</text:p>
      <text:p text:style-name="Horizontal_20_Line"/>
      <text:h text:style-name="Heading_20_1" text:outline-level="1">Elementos visuais principais</text:h>
      <text:h text:style-name="Heading_20_2" text:outline-level="2">1. Atmosfera</text:h>
      <text:p text:style-name="Text_20_body">Referências:</text:p>
      <text:list text:style-name="L5">
        <text:list-item>
          <text:p text:style-name="P5">bibliotecas antigas;</text:p>
        </text:list-item>
        <text:list-item>
          <text:p text:style-name="P5">papel envelhecido;</text:p>
        </text:list-item>
        <text:list-item>
          <text:p text:style-name="P5"><text:soft-page-break/>arquivos históricos;</text:p>
        </text:list-item>
        <text:list-item>
          <text:p text:style-name="P5">salas de estudo.</text:p>
        </text:list-item>
      </text:list>
      <text:p text:style-name="Horizontal_20_Line"/>
      <text:h text:style-name="Heading_20_2" text:outline-level="2">2. Interface</text:h>
      <text:p text:style-name="Text_20_body">A interface deve ser:</text:p>
      <text:list text:style-name="L6">
        <text:list-item>
          <text:p text:style-name="P6">limpa;</text:p>
        </text:list-item>
        <text:list-item>
          <text:p text:style-name="P6">espaçosa;</text:p>
        </text:list-item>
        <text:list-item>
          <text:p text:style-name="P6">sem excesso de elementos;</text:p>
        </text:list-item>
        <text:list-item>
          <text:p text:style-name="P6">focada no conteúdo.</text:p>
        </text:list-item>
      </text:list>
      <text:p text:style-name="Horizontal_20_Line"/>
      <text:h text:style-name="Heading_20_2" text:outline-level="2">3. Leitura</text:h>
      <text:p text:style-name="Text_20_body">A página de leitura será o centro da plataforma.</text:p>
      <text:p text:style-name="Text_20_body">Portanto:</text:p>
      <text:list text:style-name="L7">
        <text:list-item>
          <text:p text:style-name="P7">largura confortável de texto;</text:p>
        </text:list-item>
        <text:list-item>
          <text:p text:style-name="P7">espaçamento generoso;</text:p>
        </text:list-item>
        <text:list-item>
          <text:p text:style-name="P7">contraste adequado;</text:p>
        </text:list-item>
        <text:list-item>
          <text:p text:style-name="P7">poucos elementos distraindo o leitor.</text:p>
        </text:list-item>
      </text:list>
      <text:p text:style-name="Horizontal_20_Line"/>
      <text:h text:style-name="Heading_20_1" text:outline-level="1">Logo e símbolo (conceito)</text:h>
      <text:p text:style-name="Text_20_body">Para a identidade visual, podemos trabalhar com símbolos como:</text:p>
      <text:h text:style-name="Heading_20_2" text:outline-level="2">Opção A — Livro + Manuscrito</text:h>
      <text:p text:style-name="Text_20_body">Representa:</text:p>
      <text:list text:style-name="L8">
        <text:list-item>
          <text:p text:style-name="P8">preservação;</text:p>
        </text:list-item>
        <text:list-item>
          <text:p text:style-name="P8">estudo;</text:p>
        </text:list-item>
        <text:list-item>
          <text:p text:style-name="P8">conhecimento.</text:p>
        </text:list-item>
      </text:list>
      <text:p text:style-name="Horizontal_20_Line"/>
      <text:h text:style-name="Heading_20_2" text:outline-level="2">Opção B — Pergaminho + Luz</text:h>
      <text:p text:style-name="Text_20_body">Representa:</text:p>
      <text:list text:style-name="L9">
        <text:list-item>
          <text:p text:style-name="P9">textos antigos;</text:p>
        </text:list-item>
        <text:list-item>
          <text:p text:style-name="P9"><text:soft-page-break/>descoberta;</text:p>
        </text:list-item>
        <text:list-item>
          <text:p text:style-name="P9">pesquisa.</text:p>
        </text:list-item>
      </text:list>
      <text:p text:style-name="Horizontal_20_Line"/>
      <text:h text:style-name="Heading_20_2" text:outline-level="2">Opção C — Biblioteca + Arquivo</text:h>
      <text:p text:style-name="Text_20_body">Representa:</text:p>
      <text:list text:style-name="L10">
        <text:list-item>
          <text:p text:style-name="P10">organização;</text:p>
        </text:list-item>
        <text:list-item>
          <text:p text:style-name="P10">coleção;</text:p>
        </text:list-item>
        <text:list-item>
          <text:p text:style-name="P10">conhecimento.</text:p>
        </text:list-item>
      </text:list>
      <text:p text:style-name="Horizontal_20_Line"/>
      <text:p text:style-name="Text_20_body">Minha recomendação:</text:p>
      <text:p text:style-name="Text_20_body">Usar algo baseado em:</text:p>
      <text:p text:style-name="Text_20_body"><text:span text:style-name="Strong_20_Emphasis">Livro aberto + detalhe de manuscrito antigo</text:span></text:p>
      <text:p text:style-name="Text_20_body">Porque conecta diretamente:</text:p>
      <text:p text:style-name="Text_20_body">Biblioteca + estudo + textos históricos.</text:p>
      <text:p text:style-name="Horizontal_20_Line"/>
      <text:h text:style-name="Heading_20_1" text:outline-level="1">Tom visual</text:h>
      <text:p text:style-name="Text_20_body">A plataforma deve evitar:</text:p>
      <text:p text:style-name="Text_20_body">❌ aparência de fórum religioso.</text:p>
      <text:p text:style-name="Text_20_body">❌ excesso de dourado ou símbolos místicos.</text:p>
      <text:p text:style-name="Text_20_body">❌ aparência medieval exagerada.</text:p>
      <text:p text:style-name="Text_20_body">Porque isso poderia afastar o público acadêmico.</text:p>
      <text:p text:style-name="Text_20_body">Devemos transmitir:</text:p>
      <text:p text:style-name="Text_20_body">✅ neutralidade.</text:p>
      <text:p text:style-name="Text_20_body">✅ pesquisa.</text:p>
      <text:p text:style-name="Text_20_body">✅ conhecimento.</text:p>
      <text:p text:style-name="Horizontal_20_Line"/>
      <text:h text:style-name="Heading_20_1" text:outline-level="1">Diretrizes de design</text:h>
      <text:h text:style-name="Heading_20_2" text:outline-level="2">Espaço</text:h>
      <text:p text:style-name="Text_20_body">Usar bastante espaço vazio.</text:p>
      <text:p text:style-name="Text_20_body"><text:soft-page-break/>Por quê?</text:p>
      <text:p text:style-name="Text_20_body">Porque leitura exige conforto visual.</text:p>
      <text:p text:style-name="Horizontal_20_Line"/>
      <text:h text:style-name="Heading_20_2" text:outline-level="2">Hierarquia</text:h>
      <text:p text:style-name="Text_20_body">Os elementos mais importantes devem ser:</text:p>
      <text:list text:style-name="L11">
        <text:list-item>
          <text:p text:style-name="P11">Título da obra.</text:p>
        </text:list-item>
        <text:list-item>
          <text:p text:style-name="P11">Conteúdo.</text:p>
        </text:list-item>
        <text:list-item>
          <text:p text:style-name="P11">Contexto histórico.</text:p>
        </text:list-item>
        <text:list-item>
          <text:p text:style-name="P11">Comentários.</text:p>
        </text:list-item>
      </text:list>
      <text:p text:style-name="Horizontal_20_Line"/>
      <text:h text:style-name="Heading_20_2" text:outline-level="2">Consistência</text:h>
      <text:p text:style-name="Text_20_body">Todos os componentes devem seguir o mesmo padrão:</text:p>
      <text:list text:style-name="L12">
        <text:list-item>
          <text:p text:style-name="P12">botões;</text:p>
        </text:list-item>
        <text:list-item>
          <text:p text:style-name="P12">cards;</text:p>
        </text:list-item>
        <text:list-item>
          <text:p text:style-name="P12">menus;</text:p>
        </text:list-item>
        <text:list-item>
          <text:p text:style-name="P12">caixas de informação;</text:p>
        </text:list-item>
        <text:list-item>
          <text:p text:style-name="P12">áreas de comentário.</text:p>
        </text:list-item>
      </text:list>
      <text:p text:style-name="Horizontal_20_Line"/>
      <text:h text:style-name="Heading_20_1" text:outline-level="1">Documento da Identidade Visual (primeira versão)</text:h>
      <text:h text:style-name="Heading_20_2" text:outline-level="2">Nome</text:h>
      <text:p text:style-name="Text_20_body">Biblioteca Apócrifa</text:p>
      <text:h text:style-name="Heading_20_2" text:outline-level="2">Personalidade</text:h>
      <text:list text:style-name="L13">
        <text:list-item>
          <text:p text:style-name="P13">Acadêmica.</text:p>
        </text:list-item>
        <text:list-item>
          <text:p text:style-name="P13">Histórica.</text:p>
        </text:list-item>
        <text:list-item>
          <text:p text:style-name="P13">Contemplativa.</text:p>
        </text:list-item>
        <text:list-item>
          <text:p text:style-name="P13">Confiável.</text:p>
        </text:list-item>
        <text:list-item>
          <text:p text:style-name="P13">Educativa.</text:p>
        </text:list-item>
      </text:list>
      <text:h text:style-name="Heading_20_2" text:outline-level="2"><text:soft-page-break/>Público</text:h>
      <text:p text:style-name="Text_20_body">Estudantes, pesquisadores e leitores interessados em literatura antiga.</text:p>
      <text:h text:style-name="Heading_20_2" text:outline-level="2">Estilo</text:h>
      <text:p text:style-name="Text_20_body">Biblioteca acadêmica contemporânea.</text:p>
      <text:h text:style-name="Heading_20_2" text:outline-level="2">Inspiração</text:h>
      <text:p text:style-name="Text_20_body">Manuscritos antigos + plataformas modernas de conhecimento.</text:p>
      <text:p text:style-name="Horizontal_20_Line"/>
      <text:h text:style-name="Heading_20_1" text:outline-level="1">Checklist da Fase 3</text:h>
      <text:list text:style-name="L14">
        <text:list-item>
          <text:p text:style-name="P14">✅ Definir a identidade visual.</text:p>
        </text:list-item>
        <text:list-item>
          <text:p text:style-name="P14">⏳ Criar a paleta de cores.</text:p>
        </text:list-item>
        <text:list-item>
          <text:p text:style-name="P14">⏳ Definir a tipografia.</text:p>
        </text:list-item>
        <text:list-item>
          <text:p text:style-name="P14">⏳ Criar os componentes visuais.</text:p>
        </text:list-item>
        <text:list-item>
          <text:p text:style-name="P14">⏳ Elaborar o Design System.</text:p>
        </text:list-item>
        <text:list-item>
          <text:p text:style-name="P14">⏳ Produzir os wireframes das principais páginas.</text:p>
        </text:list-item>
      </text:list>
      <text:p text:style-name="Horizontal_20_Line"/>
      <text:h text:style-name="Heading_20_2" text:outline-level="2">Próximo Sprint: 3.2 — Criar a Paleta de Cores</text:h>
      <text:p text:style-name="Text_20_body">Agora vamos transformar essa identidade em decisões visuais concretas:</text:p>
      <text:p text:style-name="Text_20_body">Vamos definir:</text:p>
      <text:list text:style-name="L15">
        <text:list-item>
          <text:p text:style-name="P15">cor principal;</text:p>
        </text:list-item>
        <text:list-item>
          <text:p text:style-name="P15">cor secundária;</text:p>
        </text:list-item>
        <text:list-item>
          <text:p text:style-name="P15">cores neutras;</text:p>
        </text:list-item>
        <text:list-item>
          <text:p text:style-name="P15">cor de destaque;</text:p>
        </text:list-item>
        <text:list-item>
          <text:p text:style-name="P15">fundo da leitura;</text:p>
        </text:list-item>
        <text:list-item>
          <text:p text:style-name="P15">estados de interação;</text:p>
        </text:list-item>
        <text:list-item>
          <text:p text:style-name="P15">modo escuro (planejamento futuro).</text:p>
        </text:list-item>
      </text:list>
      <text:p text:style-name="Text_20_body">A paleta será criada pensando principalmente em <text:span text:style-name="Strong_20_Emphasis">conforto de leitura e credibilidade acadêmica</text:span>.</text:p>
      <text:p text:style-name="Text_20_body">Perfeito. Vamos avançar para a próxima etapa da Fase 3.</text:p>
      <text:h text:style-name="Heading_20_1" text:outline-level="1"><text:soft-page-break/>Sprint 3.2 — Criar a Paleta de Cores</text:h>
      <text:h text:style-name="Heading_20_2" text:outline-level="2">Objetivo</text:h>
      <text:p text:style-name="Text_20_body">Definir uma paleta visual que represente a identidade da Biblioteca Apócrifa e que funcione bem em uma plataforma focada em <text:span text:style-name="Strong_20_Emphasis">leitura, estudo e pesquisa</text:span>.</text:p>
      <text:p text:style-name="Text_20_body">A escolha das cores não será apenas estética. Cada cor terá uma função dentro da interface.</text:p>
      <text:p text:style-name="Horizontal_20_Line"/>
      <text:h text:style-name="Heading_20_1" text:outline-level="1">Princípios da paleta</text:h>
      <text:p text:style-name="Text_20_body">A Biblioteca Apócrifa precisa transmitir:</text:p>
      <text:list text:style-name="L16">
        <text:list-item>
          <text:p text:style-name="P16">📚 conhecimento;</text:p>
        </text:list-item>
        <text:list-item>
          <text:p text:style-name="P16">🏛️ história;</text:p>
        </text:list-item>
        <text:list-item>
          <text:p text:style-name="P16">🔎 pesquisa;</text:p>
        </text:list-item>
        <text:list-item>
          <text:p text:style-name="P16">✍️ leitura confortável;</text:p>
        </text:list-item>
        <text:list-item>
          <text:p text:style-name="P16">⚖️ neutralidade acadêmica.</text:p>
        </text:list-item>
      </text:list>
      <text:p text:style-name="Text_20_body">Por isso, vamos evitar:</text:p>
      <text:p text:style-name="Text_20_body">❌ cores muito vibrantes;<text:line-break/>❌ excesso de dourado;<text:line-break/>❌ fundos escuros pesados;<text:line-break/>❌ aparência de aplicativo religioso.</text:p>
      <text:p text:style-name="Horizontal_20_Line"/>
      <text:h text:style-name="Heading_20_1" text:outline-level="1">Paleta principal proposta</text:h>
      <text:h text:style-name="Heading_20_2" text:outline-level="2">1. Cor Primária — Azul Profundo</text:h>
      <text:p text:style-name="P17"><text:span text:style-name="Source_20_Text">--color-primary: #243447;</text:span></text:p>
      <text:h text:style-name="Heading_20_3" text:outline-level="3">Representa:</text:h>
      <text:list text:style-name="L17">
        <text:list-item>
          <text:p text:style-name="P18">conhecimento;</text:p>
        </text:list-item>
        <text:list-item>
          <text:p text:style-name="P18">confiança;</text:p>
        </text:list-item>
        <text:list-item>
          <text:p text:style-name="P18">estabilidade;</text:p>
        </text:list-item>
        <text:list-item>
          <text:p text:style-name="P18">pesquisa.</text:p>
        </text:list-item>
      </text:list>
      <text:p text:style-name="Text_20_body">Uso:</text:p>
      <text:list text:style-name="L18">
        <text:list-item>
          <text:p text:style-name="P19">navbar;</text:p>
        </text:list-item>
        <text:list-item>
          <text:p text:style-name="P19"><text:soft-page-break/>botões principais;</text:p>
        </text:list-item>
        <text:list-item>
          <text:p text:style-name="P19">títulos importantes;</text:p>
        </text:list-item>
        <text:list-item>
          <text:p text:style-name="P19">elementos de navegação.</text:p>
        </text:list-item>
      </text:list>
      <text:p text:style-name="Horizontal_20_Line"/>
      <text:h text:style-name="Heading_20_2" text:outline-level="2">2. Cor Secundária — Bronze Antigo</text:h>
      <text:p text:style-name="P17"><text:span text:style-name="Source_20_Text">--color-secondary: #9A7B4F;</text:span></text:p>
      <text:h text:style-name="Heading_20_3" text:outline-level="3">Representa:</text:h>
      <text:list text:style-name="L19">
        <text:list-item>
          <text:p text:style-name="P20">manuscritos;</text:p>
        </text:list-item>
        <text:list-item>
          <text:p text:style-name="P20">história;</text:p>
        </text:list-item>
        <text:list-item>
          <text:p text:style-name="P20">preservação.</text:p>
        </text:list-item>
      </text:list>
      <text:p text:style-name="Text_20_body">Uso:</text:p>
      <text:list text:style-name="L20">
        <text:list-item>
          <text:p text:style-name="P21">detalhes;</text:p>
        </text:list-item>
        <text:list-item>
          <text:p text:style-name="P21">ícones;</text:p>
        </text:list-item>
        <text:list-item>
          <text:p text:style-name="P21">destaques;</text:p>
        </text:list-item>
        <text:list-item>
          <text:p text:style-name="P21">elementos decorativos.</text:p>
        </text:list-item>
      </text:list>
      <text:p text:style-name="Text_20_body">Importante:</text:p>
      <text:p text:style-name="Text_20_body">Será uma cor de apoio, não dominante.</text:p>
      <text:p text:style-name="Horizontal_20_Line"/>
      <text:h text:style-name="Heading_20_2" text:outline-level="2">3. Cor de Fundo Principal — Marfim</text:h>
      <text:p text:style-name="P17"><text:span text:style-name="Source_20_Text">--color-background: #F8F5EF;</text:span></text:p>
      <text:h text:style-name="Heading_20_3" text:outline-level="3">Representa:</text:h>
      <text:list text:style-name="L21">
        <text:list-item>
          <text:p text:style-name="P22">papel antigo;</text:p>
        </text:list-item>
        <text:list-item>
          <text:p text:style-name="P22">conforto visual;</text:p>
        </text:list-item>
        <text:list-item>
          <text:p text:style-name="P22">leitura prolongada.</text:p>
        </text:list-item>
      </text:list>
      <text:p text:style-name="Text_20_body">Uso:</text:p>
      <text:list text:style-name="L22">
        <text:list-item>
          <text:p text:style-name="P23">fundo geral da aplicação.</text:p>
        </text:list-item>
      </text:list>
      <text:p text:style-name="Horizontal_20_Line"/>
      <text:h text:style-name="Heading_20_2" text:outline-level="2">4. Cor da Área de Leitura</text:h>
      <text:p text:style-name="P17"><text:span text:style-name="Source_20_Text">--color-reading-bg: #FCFAF5;</text:span></text:p>
      <text:p text:style-name="Text_20_body"><text:soft-page-break/>Motivo:</text:p>
      <text:p text:style-name="Text_20_body">A leitura de textos longos precisa de uma tonalidade ainda mais suave.</text:p>
      <text:p text:style-name="Text_20_body">Uso:</text:p>
      <text:list text:style-name="L23">
        <text:list-item>
          <text:p text:style-name="P24">página de leitura;</text:p>
        </text:list-item>
        <text:list-item>
          <text:p text:style-name="P24">blocos de texto;</text:p>
        </text:list-item>
        <text:list-item>
          <text:p text:style-name="P24">citações.</text:p>
        </text:list-item>
      </text:list>
      <text:p text:style-name="Horizontal_20_Line"/>
      <text:h text:style-name="Heading_20_2" text:outline-level="2">5. Cor de Texto Principal</text:h>
      <text:p text:style-name="P17"><text:span text:style-name="Source_20_Text">--color-text: #2C2C2C;</text:span></text:p>
      <text:p text:style-name="Text_20_body">Uso:</text:p>
      <text:list text:style-name="L24">
        <text:list-item>
          <text:p text:style-name="P25">textos;</text:p>
        </text:list-item>
        <text:list-item>
          <text:p text:style-name="P25">parágrafos;</text:p>
        </text:list-item>
        <text:list-item>
          <text:p text:style-name="P25">descrições.</text:p>
        </text:list-item>
      </text:list>
      <text:p text:style-name="Text_20_body">Não usaremos preto puro (<text:span text:style-name="Source_20_Text">#000000</text:span>) porque aumenta o cansaço visual.</text:p>
      <text:p text:style-name="Horizontal_20_Line"/>
      <text:h text:style-name="Heading_20_2" text:outline-level="2">6. Texto Secundário</text:h>
      <text:p text:style-name="P17"><text:span text:style-name="Source_20_Text">--color-text-muted: #6B6B6B;</text:span></text:p>
      <text:p text:style-name="Text_20_body">Uso:</text:p>
      <text:list text:style-name="L25">
        <text:list-item>
          <text:p text:style-name="P26">informações auxiliares;</text:p>
        </text:list-item>
        <text:list-item>
          <text:p text:style-name="P26">datas;</text:p>
        </text:list-item>
        <text:list-item>
          <text:p text:style-name="P26">categorias;</text:p>
        </text:list-item>
        <text:list-item>
          <text:p text:style-name="P26">metadados.</text:p>
        </text:list-item>
      </text:list>
      <text:p text:style-name="Horizontal_20_Line"/>
      <text:h text:style-name="Heading_20_1" text:outline-level="1">Cores de Interface</text:h>
      <text:h text:style-name="Heading_20_2" text:outline-level="2">Sucesso</text:h>
      <text:p text:style-name="P17"><text:span text:style-name="Source_20_Text">--color-success: #3F6B4F;</text:span></text:p>
      <text:p text:style-name="Text_20_body">Uso:</text:p>
      <text:list text:style-name="L26">
        <text:list-item>
          <text:p text:style-name="P27">mensagens positivas;</text:p>
        </text:list-item>
        <text:list-item>
          <text:p text:style-name="P27">confirmação.</text:p>
        </text:list-item>
      </text:list>
      <text:p text:style-name="Horizontal_20_Line"><text:soft-page-break/></text:p>
      <text:h text:style-name="Heading_20_2" text:outline-level="2">Erro</text:h>
      <text:p text:style-name="P17"><text:span text:style-name="Source_20_Text">--color-error: #8B3A3A;</text:span></text:p>
      <text:p text:style-name="Text_20_body">Uso:</text:p>
      <text:list text:style-name="L27">
        <text:list-item>
          <text:p text:style-name="P28">erros;</text:p>
        </text:list-item>
        <text:list-item>
          <text:p text:style-name="P28">alertas.</text:p>
        </text:list-item>
      </text:list>
      <text:p text:style-name="Horizontal_20_Line"/>
      <text:h text:style-name="Heading_20_2" text:outline-level="2">Informação</text:h>
      <text:p text:style-name="P17"><text:span text:style-name="Source_20_Text">--color-info: #355C7D;</text:span></text:p>
      <text:p text:style-name="Text_20_body">Uso:</text:p>
      <text:list text:style-name="L28">
        <text:list-item>
          <text:p text:style-name="P29">caixas explicativas;</text:p>
        </text:list-item>
        <text:list-item>
          <text:p text:style-name="P29">notas históricas.</text:p>
        </text:list-item>
      </text:list>
      <text:p text:style-name="Horizontal_20_Line"/>
      <text:h text:style-name="Heading_20_1" text:outline-level="1">Resumo da paleta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Função</text:p>
            </table:table-cell>
            <table:table-cell table:style-name="Tabela1.A1" office:value-type="string">
              <text:p text:style-name="Table_20_Heading">Cor</text:p>
            </table:table-cell>
          </table:table-row>
        </table:table-header-rows>
        <table:table-row>
          <table:table-cell table:style-name="Tabela1.A1" office:value-type="string">
            <text:p text:style-name="Table_20_Contents">Primária</text:p>
          </table:table-cell>
          <table:table-cell table:style-name="Tabela1.A1" office:value-type="string">
            <text:p text:style-name="Table_20_Contents">Azul profundo</text:p>
          </table:table-cell>
        </table:table-row>
        <table:table-row>
          <table:table-cell table:style-name="Tabela1.A1" office:value-type="string">
            <text:p text:style-name="Table_20_Contents">Secundária</text:p>
          </table:table-cell>
          <table:table-cell table:style-name="Tabela1.A1" office:value-type="string">
            <text:p text:style-name="Table_20_Contents">Bronze antigo</text:p>
          </table:table-cell>
        </table:table-row>
        <table:table-row>
          <table:table-cell table:style-name="Tabela1.A1" office:value-type="string">
            <text:p text:style-name="Table_20_Contents">Fundo</text:p>
          </table:table-cell>
          <table:table-cell table:style-name="Tabela1.A1" office:value-type="string">
            <text:p text:style-name="Table_20_Contents">Marfim</text:p>
          </table:table-cell>
        </table:table-row>
        <table:table-row>
          <table:table-cell table:style-name="Tabela1.A1" office:value-type="string">
            <text:p text:style-name="Table_20_Contents">Área de leitura</text:p>
          </table:table-cell>
          <table:table-cell table:style-name="Tabela1.A1" office:value-type="string">
            <text:p text:style-name="Table_20_Contents">Marfim claro</text:p>
          </table:table-cell>
        </table:table-row>
        <table:table-row>
          <table:table-cell table:style-name="Tabela1.A1" office:value-type="string">
            <text:p text:style-name="Table_20_Contents">Texto principal</text:p>
          </table:table-cell>
          <table:table-cell table:style-name="Tabela1.A1" office:value-type="string">
            <text:p text:style-name="Table_20_Contents">Cinza escuro</text:p>
          </table:table-cell>
        </table:table-row>
        <table:table-row>
          <table:table-cell table:style-name="Tabela1.A1" office:value-type="string">
            <text:p text:style-name="Table_20_Contents">Texto secundário</text:p>
          </table:table-cell>
          <table:table-cell table:style-name="Tabela1.A1" office:value-type="string">
            <text:p text:style-name="Table_20_Contents">Cinza médio</text:p>
          </table:table-cell>
        </table:table-row>
        <table:table-row>
          <table:table-cell table:style-name="Tabela1.A1" office:value-type="string">
            <text:p text:style-name="Table_20_Contents">Sucesso</text:p>
          </table:table-cell>
          <table:table-cell table:style-name="Tabela1.A1" office:value-type="string">
            <text:p text:style-name="Table_20_Contents">Verde histórico</text:p>
          </table:table-cell>
        </table:table-row>
        <table:table-row>
          <table:table-cell table:style-name="Tabela1.A1" office:value-type="string">
            <text:p text:style-name="Table_20_Contents">Erro</text:p>
          </table:table-cell>
          <table:table-cell table:style-name="Tabela1.A1" office:value-type="string">
            <text:p text:style-name="Table_20_Contents">Vermelho discreto</text:p>
          </table:table-cell>
        </table:table-row>
        <table:table-row>
          <table:table-cell table:style-name="Tabela1.A1" office:value-type="string">
            <text:p text:style-name="Table_20_Contents">Informação</text:p>
          </table:table-cell>
          <table:table-cell table:style-name="Tabela1.A1" office:value-type="string">
            <text:p text:style-name="Table_20_Contents">Azul acadêmico</text:p>
          </table:table-cell>
        </table:table-row>
      </table:table>
      <text:p text:style-name="Horizontal_20_Line"/>
      <text:h text:style-name="Heading_20_1" text:outline-level="1">Aplicação visual esperada</text:h>
      <text:p text:style-name="Text_20_body">Exemplo da página inicial:</text:p>
      <text:p text:style-name="Preformatted_20_Text"><text:span text:style-name="Source_20_Text">--------------------------------</text:span></text:p>
      <text:p text:style-name="Preformatted_20_Text"><text:span text:style-name="Source_20_Text">Navbar</text:span></text:p>
      <text:p text:style-name="Preformatted_20_Text"><text:span text:style-name="Source_20_Text">Azul profundo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ítulo principal</text:span></text:p>
      <text:p text:style-name="Preformatted_20_Text"><text:span text:style-name="Source_20_Text">Texto escuro</text:span></text:p>
      <text:p text:style-name="Preformatted_20_Text"><text:soft-page-break/></text:p>
      <text:p text:style-name="Preformatted_20_Text"><text:span text:style-name="Source_20_Text">Botão principal</text:span></text:p>
      <text:p text:style-name="Preformatted_20_Text"><text:span text:style-name="Source_20_Text">Azul profundo</text:span></text:p>
      <text:p text:style-name="Preformatted_20_Text"/>
      <text:p text:style-name="Preformatted_20_Text"><text:span text:style-name="Source_20_Text">Detalhes decorativos</text:span></text:p>
      <text:p text:style-name="Preformatted_20_Text"><text:span text:style-name="Source_20_Text">Bronze antigo</text:span></text:p>
      <text:p text:style-name="Preformatted_20_Text"/>
      <text:p text:style-name="Preformatted_20_Text"><text:span text:style-name="Source_20_Text">Fundo geral</text:span></text:p>
      <text:p text:style-name="Preformatted_20_Text"><text:span text:style-name="Source_20_Text">Marfim</text:span></text:p>
      <text:p text:style-name="Preformatted_20_Text"/>
      <text:p text:style-name="P17"><text:span text:style-name="Source_20_Text">--------------------------------</text:span></text:p>
      <text:p text:style-name="Horizontal_20_Line"/>
      <text:h text:style-name="Heading_20_1" text:outline-level="1">Página de leitura</text:h>
      <text:p text:style-name="Text_20_body">A prioridade será o texto:</text:p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ítulo da obra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exto do manuscrito</text:span></text:p>
      <text:p text:style-name="Preformatted_20_Text"/>
      <text:p text:style-name="Preformatted_20_Text"><text:span text:style-name="Source_20_Text">Fundo marfim claro</text:span></text:p>
      <text:p text:style-name="Preformatted_20_Text"/>
      <text:p text:style-name="Preformatted_20_Text"><text:span text:style-name="Source_20_Text">Texto confortável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Comentário / Exegese</text:span></text:p>
      <text:p text:style-name="Preformatted_20_Text"/>
      <text:p text:style-name="Preformatted_20_Text"><text:span text:style-name="Source_20_Text">Bloco informativo</text:span></text:p>
      <text:p text:style-name="Preformatted_20_Text"/>
      <text:p text:style-name="P17"><text:span text:style-name="Source_20_Text">--------------------------------</text:span></text:p>
      <text:p text:style-name="Horizontal_20_Line"/>
      <text:h text:style-name="Heading_20_1" text:outline-level="1">Decisão importante: modo escuro</text:h>
      <text:p text:style-name="Text_20_body">Como será uma plataforma de leitura, futuramente podemos implementar:</text:p>
      <text:list text:style-name="L29">
        <text:list-item>
          <text:p text:style-name="P30">modo claro (padrão);</text:p>
        </text:list-item>
        <text:list-item>
          <text:p text:style-name="P30">modo noturno;</text:p>
        </text:list-item>
        <text:list-item>
          <text:p text:style-name="P30">modo sepia.</text:p>
        </text:list-item>
      </text:list>
      <text:p text:style-name="Text_20_body">Mas não vamos incluir agora para evitar complexidade.</text:p>
      <text:p text:style-name="Text_20_body">Primeiro vamos construir uma base sólida.</text:p>
      <text:p text:style-name="Horizontal_20_Line"/>
      <text:h text:style-name="Heading_20_1" text:outline-level="1"><text:soft-page-break/>Resultado da Sprint 3.2</text:h>
      <text:p text:style-name="Text_20_body">Definimos:</text:p>
      <text:p text:style-name="Text_20_body">✅ Cor principal.<text:line-break/>✅ Cor secundária.<text:line-break/>✅ Fundos.<text:line-break/>✅ Cores de texto.<text:line-break/>✅ Estados da interface.<text:line-break/>✅ Direção visual da plataforma.</text:p>
      <text:p text:style-name="Horizontal_20_Line"/>
      <text:h text:style-name="Heading_20_1" text:outline-level="1">Checklist da Fase 3</text:h>
      <text:list text:style-name="L30">
        <text:list-item>
          <text:p text:style-name="P31">✅ Definir a identidade visual.</text:p>
        </text:list-item>
        <text:list-item>
          <text:p text:style-name="P31">✅ Criar a paleta de cores.</text:p>
        </text:list-item>
        <text:list-item>
          <text:p text:style-name="P31">⏳ Definir a tipografia.</text:p>
        </text:list-item>
        <text:list-item>
          <text:p text:style-name="P31">⏳ Criar os componentes visuais.</text:p>
        </text:list-item>
        <text:list-item>
          <text:p text:style-name="P31">⏳ Elaborar o Design System.</text:p>
        </text:list-item>
        <text:list-item>
          <text:p text:style-name="P31">⏳ Produzir os wireframes das principais páginas.</text:p>
        </text:list-item>
      </text:list>
      <text:p text:style-name="Horizontal_20_Line"/>
      <text:h text:style-name="Heading_20_2" text:outline-level="2">Próxima Sprint — 3.3 Definir a Tipografia</text:h>
      <text:p text:style-name="Text_20_body">Aqui vamos decidir:</text:p>
      <text:list text:style-name="L31">
        <text:list-item>
          <text:p text:style-name="P32">fonte dos textos longos;</text:p>
        </text:list-item>
        <text:list-item>
          <text:p text:style-name="P32">fonte dos títulos;</text:p>
        </text:list-item>
        <text:list-item>
          <text:p text:style-name="P32">tamanhos;</text:p>
        </text:list-item>
        <text:list-item>
          <text:p text:style-name="P32">pesos;</text:p>
        </text:list-item>
        <text:list-item>
          <text:p text:style-name="P32">hierarquia visual;</text:p>
        </text:list-item>
        <text:list-item>
          <text:p text:style-name="P32">espaçamento entre linhas.</text:p>
        </text:list-item>
      </text:list>
      <text:p text:style-name="Text_20_body">Como a Biblioteca tem foco em leitura, a tipografia será uma das decisões mais importantes do projeto.</text:p>
      <text:p text:style-name="Text_20_body">Perfeito. Continuamos na Fase 3.</text:p>
      <text:p text:style-name="Text_20_body">Agora vamos trabalhar em uma das decisões mais importantes para uma plataforma de estudo: <text:span text:style-name="Strong_20_Emphasis">a tipografia</text:span>.</text:p>
      <text:p text:style-name="Text_20_body">Em uma biblioteca digital, a fonte não é apenas uma questão estética. Ela influencia diretamente:</text:p>
      <text:list text:style-name="L32">
        <text:list-item>
          <text:p text:style-name="P33">conforto durante longas leituras;</text:p>
        </text:list-item>
        <text:list-item>
          <text:p text:style-name="P33"><text:soft-page-break/>compreensão do conteúdo;</text:p>
        </text:list-item>
        <text:list-item>
          <text:p text:style-name="P33">percepção de qualidade;</text:p>
        </text:list-item>
        <text:list-item>
          <text:p text:style-name="P33">acessibilidade.</text:p>
        </text:list-item>
      </text:list>
      <text:p text:style-name="Horizontal_20_Line"/>
      <text:h text:style-name="Heading_20_1" text:outline-level="1">Sprint 3.3 — Definir a Tipografia</text:h>
      <text:h text:style-name="Heading_20_2" text:outline-level="2">Objetivo</text:h>
      <text:p text:style-name="Text_20_body">Criar uma hierarquia tipográfica consistente para toda a plataforma.</text:p>
      <text:p text:style-name="Text_20_body">A Biblioteca Apócrifa terá dois ambientes principais:</text:p>
      <text:list text:style-name="L33">
        <text:list-item>
          <text:p text:style-name="P34"><text:span text:style-name="Strong_20_Emphasis">Navegação e descoberta</text:span></text:p>
          <text:list>
            <text:list-item>
              <text:p text:style-name="P34">biblioteca;</text:p>
            </text:list-item>
            <text:list-item>
              <text:p text:style-name="P34">pesquisa;</text:p>
            </text:list-item>
            <text:list-item>
              <text:p text:style-name="P34">catálogo;</text:p>
            </text:list-item>
            <text:list-item>
              <text:p text:style-name="P34">perfil.</text:p>
            </text:list-item>
          </text:list>
        </text:list-item>
        <text:list-item>
          <text:p text:style-name="P34"><text:span text:style-name="Strong_20_Emphasis">Estudo e leitura</text:span></text:p>
          <text:list>
            <text:list-item>
              <text:p text:style-name="P34">textos antigos;</text:p>
            </text:list-item>
            <text:list-item>
              <text:p text:style-name="P34">comentários;</text:p>
            </text:list-item>
            <text:list-item>
              <text:p text:style-name="P34">referências.</text:p>
            </text:list-item>
          </text:list>
        </text:list-item>
      </text:list>
      <text:p text:style-name="Text_20_body">Cada ambiente possui necessidades diferentes.</text:p>
      <text:p text:style-name="Horizontal_20_Line"/>
      <text:h text:style-name="Heading_20_1" text:outline-level="1">Decisão tipográfica</text:h>
      <text:p text:style-name="Text_20_body">Vamos utilizar uma combinação de duas famílias:</text:p>
      <text:h text:style-name="Heading_20_2" text:outline-level="2">1. Fonte de leitura — Merriweather</text:h>
      <text:p text:style-name="Text_20_body">Uso:</text:p>
      <text:list text:style-name="L34">
        <text:list-item>
          <text:p text:style-name="P35">textos das obras;</text:p>
        </text:list-item>
        <text:list-item>
          <text:p text:style-name="P35">comentários;</text:p>
        </text:list-item>
        <text:list-item>
          <text:p text:style-name="P35">artigos;</text:p>
        </text:list-item>
        <text:list-item>
          <text:p text:style-name="P35">conteúdos históricos.</text:p>
        </text:list-item>
      </text:list>
      <text:p text:style-name="Text_20_body">Exemplo:</text:p>
      <text:p text:style-name="P17"><text:span text:style-name="Source_20_Text">font-family: "Merriweather", serif;</text:span></text:p>
      <text:h text:style-name="Heading_20_3" text:outline-level="3"><text:soft-page-break/>Por que uma fonte serifada?</text:h>
      <text:p text:style-name="Text_20_body">Textos longos tradicionalmente utilizam fontes serifadas porque:</text:p>
      <text:list text:style-name="L35">
        <text:list-item>
          <text:p text:style-name="P36">possuem formas mais confortáveis para leitura contínua;</text:p>
        </text:list-item>
        <text:list-item>
          <text:p text:style-name="P36">criam uma sensação de publicação acadêmica;</text:p>
        </text:list-item>
        <text:list-item>
          <text:p text:style-name="P36">aproximam a experiência de livros físicos.</text:p>
        </text:list-item>
      </text:list>
      <text:p text:style-name="Text_20_body">A escolha combina com a proposta de uma biblioteca.</text:p>
      <text:p text:style-name="Horizontal_20_Line"/>
      <text:h text:style-name="Heading_20_2" text:outline-level="2">2. Fonte de interface — Open Sans</text:h>
      <text:p text:style-name="Text_20_body">Uso:</text:p>
      <text:list text:style-name="L36">
        <text:list-item>
          <text:p text:style-name="P37">menus;</text:p>
        </text:list-item>
        <text:list-item>
          <text:p text:style-name="P37">botões;</text:p>
        </text:list-item>
        <text:list-item>
          <text:p text:style-name="P37">filtros;</text:p>
        </text:list-item>
        <text:list-item>
          <text:p text:style-name="P37">formulários;</text:p>
        </text:list-item>
        <text:list-item>
          <text:p text:style-name="P37">informações pequenas.</text:p>
        </text:list-item>
      </text:list>
      <text:p text:style-name="Text_20_body">Exemplo:</text:p>
      <text:p text:style-name="P17"><text:span text:style-name="Source_20_Text">font-family: "Open Sans", sans-serif;</text:span></text:p>
      <text:h text:style-name="Heading_20_3" text:outline-level="3">Por que uma fonte sem serifa?</text:h>
      <text:p text:style-name="Text_20_body">Interfaces digitais precisam de clareza.</text:p>
      <text:p text:style-name="Text_20_body">Ela funciona melhor para:</text:p>
      <text:list text:style-name="L37">
        <text:list-item>
          <text:p text:style-name="P38">navegação;</text:p>
        </text:list-item>
        <text:list-item>
          <text:p text:style-name="P38">botões;</text:p>
        </text:list-item>
        <text:list-item>
          <text:p text:style-name="P38">componentes pequenos;</text:p>
        </text:list-item>
        <text:list-item>
          <text:p text:style-name="P38">telas responsivas.</text:p>
        </text:list-item>
      </text:list>
      <text:p text:style-name="Horizontal_20_Line"/>
      <text:h text:style-name="Heading_20_1" text:outline-level="1">Sistema tipográfico</text:h>
      <text:p text:style-name="Text_20_body">Agora vamos criar uma escala.</text:p>
      <text:h text:style-name="Heading_20_2" text:outline-level="2">Títulos principais</text:h>
      <text:h text:style-name="Heading_20_3" text:outline-level="3">H1</text:h>
      <text:p text:style-name="Text_20_body">Uso:</text:p>
      <text:list text:style-name="L38">
        <text:list-item>
          <text:p text:style-name="P39"><text:soft-page-break/>título da página;</text:p>
        </text:list-item>
        <text:list-item>
          <text:p text:style-name="P39">título da obra.</text:p>
        </text:list-item>
      </text:list>
      <text:p text:style-name="Preformatted_20_Text"><text:span text:style-name="Source_20_Text">font-size: 2.5rem;</text:span></text:p>
      <text:p text:style-name="P17"><text:span text:style-name="Source_20_Text">font-weight: 700;</text:span></text:p>
      <text:p text:style-name="Text_20_body">Exemplo:</text:p>
      <text:p text:style-name="Quotations">Evangelho de Tomé</text:p>
      <text:p text:style-name="Horizontal_20_Line"/>
      <text:h text:style-name="Heading_20_2" text:outline-level="2">H2</text:h>
      <text:p text:style-name="Text_20_body">Uso:</text:p>
      <text:list text:style-name="L39">
        <text:list-item>
          <text:p text:style-name="P40">grandes seções.</text:p>
        </text:list-item>
      </text:list>
      <text:p text:style-name="Preformatted_20_Text"><text:span text:style-name="Source_20_Text">font-size: 2rem;</text:span></text:p>
      <text:p text:style-name="P17"><text:span text:style-name="Source_20_Text">font-weight: 700;</text:span></text:p>
      <text:p text:style-name="Text_20_body">Exemplo:</text:p>
      <text:p text:style-name="Quotations">Contexto Histórico</text:p>
      <text:p text:style-name="Horizontal_20_Line"/>
      <text:h text:style-name="Heading_20_2" text:outline-level="2">H3</text:h>
      <text:p text:style-name="Text_20_body">Uso:</text:p>
      <text:list text:style-name="L40">
        <text:list-item>
          <text:p text:style-name="P41">subtítulos;</text:p>
        </text:list-item>
        <text:list-item>
          <text:p text:style-name="P41">cards;</text:p>
        </text:list-item>
        <text:list-item>
          <text:p text:style-name="P41">blocos de informação.</text:p>
        </text:list-item>
      </text:list>
      <text:p text:style-name="Preformatted_20_Text"><text:span text:style-name="Source_20_Text">font-size: 1.5rem;</text:span></text:p>
      <text:p text:style-name="P17"><text:span text:style-name="Source_20_Text">font-weight: 600;</text:span></text:p>
      <text:p text:style-name="Horizontal_20_Line"/>
      <text:h text:style-name="Heading_20_1" text:outline-level="1">Texto principal</text:h>
      <text:p text:style-name="Text_20_body">O conteúdo de estudo será a prioridade.</text:p>
      <text:p text:style-name="Text_20_body">Configuração inicial:</text:p>
      <text:p text:style-name="Preformatted_20_Text"><text:span text:style-name="Source_20_Text">font-size: 1.125rem;</text:span></text:p>
      <text:p text:style-name="P17"><text:span text:style-name="Source_20_Text">line-height: 1.8;</text:span></text:p>
      <text:p text:style-name="Text_20_body">Por quê?</text:p>
      <text:p text:style-name="Text_20_body">Porque textos históricos precisam de:</text:p>
      <text:list text:style-name="L41">
        <text:list-item>
          <text:p text:style-name="P42">espaço entre linhas;</text:p>
        </text:list-item>
        <text:list-item>
          <text:p text:style-name="P42"><text:soft-page-break/>leitura confortável;</text:p>
        </text:list-item>
        <text:list-item>
          <text:p text:style-name="P42">menos fadiga visual.</text:p>
        </text:list-item>
      </text:list>
      <text:p text:style-name="Horizontal_20_Line"/>
      <text:h text:style-name="Heading_20_1" text:outline-level="1">Texto secundário</text:h>
      <text:p text:style-name="Text_20_body">Uso:</text:p>
      <text:list text:style-name="L42">
        <text:list-item>
          <text:p text:style-name="P43">categorias;</text:p>
        </text:list-item>
        <text:list-item>
          <text:p text:style-name="P43">datas;</text:p>
        </text:list-item>
        <text:list-item>
          <text:p text:style-name="P43">metadados.</text:p>
        </text:list-item>
      </text:list>
      <text:p text:style-name="Preformatted_20_Text"><text:span text:style-name="Source_20_Text">font-size: 0.875rem;</text:span></text:p>
      <text:p text:style-name="P17"><text:span text:style-name="Source_20_Text">line-height: 1.5;</text:span></text:p>
      <text:p text:style-name="Horizontal_20_Line"/>
      <text:h text:style-name="Heading_20_1" text:outline-level="1">Botões e elementos de interface</text:h>
      <text:p text:style-name="Text_20_body">Usaremos Open Sans.</text:p>
      <text:p text:style-name="Text_20_body">Exemplo:</text:p>
      <text:p text:style-name="Preformatted_20_Text"><text:span text:style-name="Source_20_Text">font-size: 1rem;</text:span></text:p>
      <text:p text:style-name="P17"><text:span text:style-name="Source_20_Text">font-weight: 600;</text:span></text:p>
      <text:p text:style-name="Text_20_body">Objetivo:</text:p>
      <text:list text:style-name="L43">
        <text:list-item>
          <text:p text:style-name="P44">fácil leitura;</text:p>
        </text:list-item>
        <text:list-item>
          <text:p text:style-name="P44">ação clara.</text:p>
        </text:list-item>
      </text:list>
      <text:p text:style-name="Horizontal_20_Line"/>
      <text:h text:style-name="Heading_20_1" text:outline-level="1">Hierarquia visual definida</text:h>
      <text:p text:style-name="Text_20_body">A estrutura será:</text:p>
      <text:p text:style-name="Preformatted_20_Text"><text:span text:style-name="Source_20_Text">Título da página</text:span></text:p>
      <text:p text:style-name="Preformatted_20_Text"><text:span text:style-name="Source_20_Text"><text:s text:c="8"/>↓</text:span></text:p>
      <text:p text:style-name="Preformatted_20_Text"><text:span text:style-name="Source_20_Text">Subtítulo</text:span></text:p>
      <text:p text:style-name="Preformatted_20_Text"><text:span text:style-name="Source_20_Text"><text:s text:c="8"/>↓</text:span></text:p>
      <text:p text:style-name="Preformatted_20_Text"><text:span text:style-name="Source_20_Text">Texto introdutório</text:span></text:p>
      <text:p text:style-name="Preformatted_20_Text"><text:span text:style-name="Source_20_Text"><text:s text:c="8"/>↓</text:span></text:p>
      <text:p text:style-name="Preformatted_20_Text"><text:span text:style-name="Source_20_Text">Conteúdo principal</text:span></text:p>
      <text:p text:style-name="Preformatted_20_Text"><text:span text:style-name="Source_20_Text"><text:s text:c="8"/>↓</text:span></text:p>
      <text:p text:style-name="P17"><text:span text:style-name="Source_20_Text">Informações auxiliares</text:span></text:p>
      <text:p text:style-name="Horizontal_20_Line"/>
      <text:h text:style-name="Heading_20_1" text:outline-level="1"><text:soft-page-break/>Configuração das fontes no projeto</text:h>
      <text:p text:style-name="Text_20_body">Como já definido anteriormente, utilizaremos Google Fonts.</text:p>
      <text:p text:style-name="Text_20_body">A configuração inicial:</text:p>
      <text:p text:style-name="P17"><text:span text:style-name="Source_20_Text">&lt;link href="https://fonts.googleapis.com/css2?family=Merriweather:wght@400;700&amp;family=Open+Sans:wght@400;600;700&amp;display=swap" rel="stylesheet"&gt;</text:span></text:p>
      <text:p text:style-name="Horizontal_20_Line"/>
      <text:h text:style-name="Heading_20_1" text:outline-level="1">Tokens tipográficos futuros</text:h>
      <text:p text:style-name="Text_20_body">Quando chegarmos ao <text:span text:style-name="Source_20_Text">variables.css</text:span>, teremos algo semelhante:</text:p>
      <text:p text:style-name="Preformatted_20_Text"><text:span text:style-name="Source_20_Text">:root {</text:span></text:p>
      <text:p text:style-name="Preformatted_20_Text"/>
      <text:p text:style-name="Preformatted_20_Text"><text:span text:style-name="Source_20_Text"><text:s text:c="4"/>--font-heading: "Open Sans", sans-serif;</text:span></text:p>
      <text:p text:style-name="Preformatted_20_Text"/>
      <text:p text:style-name="Preformatted_20_Text"><text:span text:style-name="Source_20_Text"><text:s text:c="4"/>--font-body: "Merriweather", serif;</text:span></text:p>
      <text:p text:style-name="Preformatted_20_Text"/>
      <text:p text:style-name="Preformatted_20_Text"><text:span text:style-name="Source_20_Text"><text:s text:c="4"/>--font-size-base: 1rem;</text:span></text:p>
      <text:p text:style-name="Preformatted_20_Text"/>
      <text:p text:style-name="Preformatted_20_Text"><text:span text:style-name="Source_20_Text"><text:s text:c="4"/>--line-height-reading: 1.8;</text:span></text:p>
      <text:p text:style-name="Preformatted_20_Text"/>
      <text:p text:style-name="P17"><text:span text:style-name="Source_20_Text">}</text:span></text:p>
      <text:p text:style-name="Horizontal_20_Line"/>
      <text:h text:style-name="Heading_20_1" text:outline-level="1">Decisão sobre acessibilidade</text:h>
      <text:p text:style-name="Text_20_body">A tipografia seguirá algumas regras:</text:p>
      <text:p text:style-name="Text_20_body">✅ contraste adequado.</text:p>
      <text:p text:style-name="Text_20_body">✅ tamanho mínimo confortável.</text:p>
      <text:p text:style-name="Text_20_body">✅ espaçamento generoso.</text:p>
      <text:p text:style-name="Text_20_body">✅ textos longos com largura limitada.</text:p>
      <text:p text:style-name="Text_20_body">Exemplo:</text:p>
      <text:p text:style-name="Text_20_body">A área de leitura não ocupará toda a tela:</text:p>
      <text:p text:style-name="P17"><text:span text:style-name="Source_20_Text">max-width: 750px;</text:span></text:p>
      <text:p text:style-name="Text_20_body">Porque linhas muito longas dificultam a leitura.</text:p>
      <text:p text:style-name="Horizontal_20_Line"/>
      <text:h text:style-name="Heading_20_1" text:outline-level="1">Resultado da Sprint 3.3</text:h>
      <text:p text:style-name="Text_20_body">Definimos:</text:p>
      <text:p text:style-name="Text_20_body"><text:soft-page-break/>✅ Fonte de leitura.<text:line-break/>✅ Fonte da interface.<text:line-break/>✅ Hierarquia de títulos.<text:line-break/>✅ Tamanho dos textos.<text:line-break/>✅ Espaçamento de leitura.<text:line-break/>✅ Regras de acessibilidade tipográfica.</text:p>
      <text:p text:style-name="Horizontal_20_Line"/>
      <text:h text:style-name="Heading_20_1" text:outline-level="1">Checklist da Fase 3</text:h>
      <text:list text:style-name="L44">
        <text:list-item>
          <text:p text:style-name="P45">✅ Definir a identidade visual.</text:p>
        </text:list-item>
        <text:list-item>
          <text:p text:style-name="P45">✅ Criar a paleta de cores.</text:p>
        </text:list-item>
        <text:list-item>
          <text:p text:style-name="P45">✅ Definir a tipografia.</text:p>
        </text:list-item>
        <text:list-item>
          <text:p text:style-name="P45">⏳ Criar os componentes visuais.</text:p>
        </text:list-item>
        <text:list-item>
          <text:p text:style-name="P45">⏳ Elaborar o Design System.</text:p>
        </text:list-item>
        <text:list-item>
          <text:p text:style-name="P45">⏳ Produzir os wireframes das principais páginas.</text:p>
        </text:list-item>
      </text:list>
      <text:p text:style-name="Horizontal_20_Line"/>
      <text:h text:style-name="Heading_20_2" text:outline-level="2">Próxima Sprint — 3.4 Criar os Componentes Visuais</text:h>
      <text:p text:style-name="Text_20_body">Agora vamos transformar a identidade visual em peças reais da interface:</text:p>
      <text:p text:style-name="Text_20_body">Vamos definir:</text:p>
      <text:list text:style-name="L45">
        <text:list-item>
          <text:p text:style-name="P46">Navbar;</text:p>
        </text:list-item>
        <text:list-item>
          <text:p text:style-name="P46">Header;</text:p>
        </text:list-item>
        <text:list-item>
          <text:p text:style-name="P46">Footer;</text:p>
        </text:list-item>
        <text:list-item>
          <text:p text:style-name="P46">Cards de livros;</text:p>
        </text:list-item>
        <text:list-item>
          <text:p text:style-name="P46">Botões;</text:p>
        </text:list-item>
        <text:list-item>
          <text:p text:style-name="P46">Campos de pesquisa;</text:p>
        </text:list-item>
        <text:list-item>
          <text:p text:style-name="P46">Blocos de informação;</text:p>
        </text:list-item>
        <text:list-item>
          <text:p text:style-name="P46">Área de leitura.</text:p>
        </text:list-item>
      </text:list>
      <text:p text:style-name="Text_20_body">Esta etapa será a ponte entre o conceito visual e a implementação em HTML/CSS.</text:p>
      <text:p text:style-name="Text_20_body">Perfeito. Agora vamos transformar as decisões de identidade visual em elementos concretos da interface.</text:p>
      <text:p text:style-name="Text_20_body">Entramos na:</text:p>
      <text:h text:style-name="Heading_20_1" text:outline-level="1"><text:soft-page-break/>Sprint 3.4 — Criar os Componentes Visuais</text:h>
      <text:h text:style-name="Heading_20_2" text:outline-level="2">Objetivo</text:h>
      <text:p text:style-name="Text_20_body">Definir os componentes visuais principais da Biblioteca Apócrifa antes da implementação.</text:p>
      <text:p text:style-name="Text_20_body">A regra continua a mesma:</text:p>
      <text:p text:style-name="Quotations">Um componente deve resolver uma necessidade específica e ser reutilizável.</text:p>
      <text:p text:style-name="Text_20_body">Nesta etapa não vamos escrever CSS ainda. Vamos definir <text:span text:style-name="Strong_20_Emphasis">estrutura, função e comportamento visual</text:span>.</text:p>
      <text:p text:style-name="Horizontal_20_Line"/>
      <text:h text:style-name="Heading_20_1" text:outline-level="1">1. Componente: Navbar</text:h>
      <text:p text:style-name="Text_20_body">Arquivo:</text:p>
      <text:p text:style-name="P17"><text:span text:style-name="Source_20_Text">components/navbar.html</text:span></text:p>
      <text:h text:style-name="Heading_20_2" text:outline-level="2">Objetivo</text:h>
      <text:p text:style-name="Text_20_body">Permitir que o usuário navegue pela plataforma.</text:p>
      <text:p text:style-name="Text_20_body">Estrutura:</text:p>
      <text:p text:style-name="Preformatted_20_Text"><text:span text:style-name="Source_20_Text">------------------------------------------------</text:span></text:p>
      <text:p text:style-name="Preformatted_20_Text"/>
      <text:p text:style-name="Preformatted_20_Text"><text:span text:style-name="Source_20_Text"> Biblioteca Apócrifa</text:span></text:p>
      <text:p text:style-name="Preformatted_20_Text"/>
      <text:p text:style-name="Preformatted_20_Text"><text:span text:style-name="Source_20_Text">Início | Biblioteca | Comunidade | Perfil</text:span></text:p>
      <text:p text:style-name="Preformatted_20_Text"/>
      <text:p text:style-name="P17"><text:span text:style-name="Source_20_Text">------------------------------------------------</text:span></text:p>
      <text:p text:style-name="Horizontal_20_Line"/>
      <text:h text:style-name="Heading_20_2" text:outline-level="2">Elementos</text:h>
      <text:list text:style-name="L46">
        <text:list-item>
          <text:p text:style-name="P47">Logo/nome da plataforma.</text:p>
        </text:list-item>
        <text:list-item>
          <text:p text:style-name="P47">Links principais.</text:p>
        </text:list-item>
        <text:list-item>
          <text:p text:style-name="P47">Estado ativo da página.</text:p>
        </text:list-item>
      </text:list>
      <text:p text:style-name="Text_20_body">Exemplo:</text:p>
      <text:p text:style-name="Text_20_body">Na página Biblioteca:</text:p>
      <text:p text:style-name="P17"><text:span text:style-name="Source_20_Text">Biblioteca ← ativo</text:span></text:p>
      <text:p text:style-name="Horizontal_20_Line"/>
      <text:h text:style-name="Heading_20_2" text:outline-level="2"><text:soft-page-break/>Características visuais</text:h>
      <text:list text:style-name="L47">
        <text:list-item>
          <text:p text:style-name="P48">Fundo azul profundo.</text:p>
        </text:list-item>
        <text:list-item>
          <text:p text:style-name="P48">Texto claro.</text:p>
        </text:list-item>
        <text:list-item>
          <text:p text:style-name="P48">Espaçamento confortável.</text:p>
        </text:list-item>
        <text:list-item>
          <text:p text:style-name="P48">Fixo no topo (decisão futura).</text:p>
        </text:list-item>
      </text:list>
      <text:p text:style-name="Horizontal_20_Line"/>
      <text:h text:style-name="Heading_20_1" text:outline-level="1">2. Componente: Header</text:h>
      <text:p text:style-name="Text_20_body">Arquivo:</text:p>
      <text:p text:style-name="P17"><text:span text:style-name="Source_20_Text">components/header.html</text:span></text:p>
      <text:h text:style-name="Heading_20_2" text:outline-level="2">Objetivo</text:h>
      <text:p text:style-name="Text_20_body">Apresentar a identidade da plataforma.</text:p>
      <text:p text:style-name="Text_20_body">Principalmente utilizado na página inicial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e estudo</text:span></text:p>
      <text:p text:style-name="Preformatted_20_Text"><text:span text:style-name="Source_20_Text">sobre textos antigos</text:span></text:p>
      <text:p text:style-name="Preformatted_20_Text"/>
      <text:p text:style-name="Preformatted_20_Text"><text:span text:style-name="Source_20_Text">[Explorar Biblioteca]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Elementos</text:h>
      <text:list text:style-name="L48">
        <text:list-item>
          <text:p text:style-name="P49">Título principal.</text:p>
        </text:list-item>
        <text:list-item>
          <text:p text:style-name="P49">Descrição.</text:p>
        </text:list-item>
        <text:list-item>
          <text:p text:style-name="P49">Botão de ação.</text:p>
        </text:list-item>
      </text:list>
      <text:p text:style-name="Horizontal_20_Line"/>
      <text:h text:style-name="Heading_20_2" text:outline-level="2">Características visuais</text:h>
      <text:list text:style-name="L49">
        <text:list-item>
          <text:p text:style-name="P50">Grande espaço.</text:p>
        </text:list-item>
        <text:list-item>
          <text:p text:style-name="P50">Destaque para o propósito.</text:p>
        </text:list-item>
        <text:list-item>
          <text:p text:style-name="P50">Uso moderado da cor secundária.</text:p>
        </text:list-item>
      </text:list>
      <text:p text:style-name="Horizontal_20_Line"/>
      <text:h text:style-name="Heading_20_1" text:outline-level="1"><text:soft-page-break/>3. Componente: Footer</text:h>
      <text:p text:style-name="Text_20_body">Arquivo:</text:p>
      <text:p text:style-name="P17"><text:span text:style-name="Source_20_Text">components/footer.html</text:span></text:p>
      <text:h text:style-name="Heading_20_2" text:outline-level="2">Objetivo</text:h>
      <text:p text:style-name="Text_20_body">Finalizar a experiência com informações importantes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Projeto histórico, literário</text:span></text:p>
      <text:p text:style-name="Preformatted_20_Text"><text:span text:style-name="Source_20_Text">e acadêmico.</text:span></text:p>
      <text:p text:style-name="Preformatted_20_Text"/>
      <text:p text:style-name="Preformatted_20_Text"><text:span text:style-name="Source_20_Text">© 2026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Elementos futuros:</text:h>
      <text:list text:style-name="L50">
        <text:list-item>
          <text:p text:style-name="P51">GitHub.</text:p>
        </text:list-item>
        <text:list-item>
          <text:p text:style-name="P51">Referências.</text:p>
        </text:list-item>
        <text:list-item>
          <text:p text:style-name="P51">Licença.</text:p>
        </text:list-item>
        <text:list-item>
          <text:p text:style-name="P51">Política de privacidade.</text:p>
        </text:list-item>
      </text:list>
      <text:p text:style-name="Horizontal_20_Line"/>
      <text:h text:style-name="Heading_20_1" text:outline-level="1">4. Componente: Book Card</text:h>
      <text:p text:style-name="Text_20_body">Arquivo:</text:p>
      <text:p text:style-name="P17"><text:span text:style-name="Source_20_Text">components/book-card.html</text:span></text:p>
      <text:p text:style-name="Text_20_body">Este será um dos componentes mais importantes.</text:p>
      <text:h text:style-name="Heading_20_2" text:outline-level="2">Objetivo</text:h>
      <text:p text:style-name="Text_20_body">Representar uma obra no catálogo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[Imagem da capa]</text:span></text:p>
      <text:p text:style-name="Preformatted_20_Text"/>
      <text:p text:style-name="Preformatted_20_Text"><text:span text:style-name="Source_20_Text">Evangelho de Tomé</text:span></text:p>
      <text:p text:style-name="Preformatted_20_Text"><text:soft-page-break/></text:p>
      <text:p text:style-name="Preformatted_20_Text"><text:span text:style-name="Source_20_Text">Nag Hammadi</text:span></text:p>
      <text:p text:style-name="Preformatted_20_Text"/>
      <text:p text:style-name="Preformatted_20_Text"><text:span text:style-name="Source_20_Text">Texto gnóstico do século II</text:span></text:p>
      <text:p text:style-name="Preformatted_20_Text"/>
      <text:p text:style-name="Preformatted_20_Text"><text:span text:style-name="Source_20_Text">Tempo: 30 minutos</text:span></text:p>
      <text:p text:style-name="Preformatted_20_Text"/>
      <text:p text:style-name="Preformatted_20_Text"><text:span text:style-name="Source_20_Text">[Estudar]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Informações exibidas</text:h>
      <text:list text:style-name="L51">
        <text:list-item>
          <text:p text:style-name="P52">Capa.</text:p>
        </text:list-item>
        <text:list-item>
          <text:p text:style-name="P52">Título.</text:p>
        </text:list-item>
        <text:list-item>
          <text:p text:style-name="P52">Categoria.</text:p>
        </text:list-item>
        <text:list-item>
          <text:p text:style-name="P52">Autor.</text:p>
        </text:list-item>
        <text:list-item>
          <text:p text:style-name="P52">Pequena descrição.</text:p>
        </text:list-item>
        <text:list-item>
          <text:p text:style-name="P52">Tempo de leitura.</text:p>
        </text:list-item>
        <text:list-item>
          <text:p text:style-name="P52">Botão.</text:p>
        </text:list-item>
      </text:list>
      <text:p text:style-name="Horizontal_20_Line"/>
      <text:h text:style-name="Heading_20_2" text:outline-level="2">Por que este componente é importante?</text:h>
      <text:p text:style-name="Text_20_body">Porque ele aparecerá em:</text:p>
      <text:list text:style-name="L52">
        <text:list-item>
          <text:p text:style-name="P53">Biblioteca.</text:p>
        </text:list-item>
        <text:list-item>
          <text:p text:style-name="P53">Página inicial.</text:p>
        </text:list-item>
        <text:list-item>
          <text:p text:style-name="P53">Resultados de pesquisa.</text:p>
        </text:list-item>
      </text:list>
      <text:p text:style-name="Text_20_body">Um único componente poderá alimentar vários lugares.</text:p>
      <text:p text:style-name="Horizontal_20_Line"/>
      <text:h text:style-name="Heading_20_1" text:outline-level="1">5. Componente: Search Bar</text:h>
      <text:p text:style-name="Text_20_body">Arquivo:</text:p>
      <text:p text:style-name="P17"><text:span text:style-name="Source_20_Text">components/search-bar.html</text:span></text:p>
      <text:h text:style-name="Heading_20_2" text:outline-level="2">Objetivo</text:h>
      <text:p text:style-name="Text_20_body">Permitir encontrar obras rapidamente.</text:p>
      <text:p text:style-name="Text_20_body">Estrutura:</text:p>
      <text:p text:style-name="Preformatted_20_Text"><text:span text:style-name="Source_20_Text">---------------------------------</text:span></text:p>
      <text:p text:style-name="Preformatted_20_Text"><text:soft-page-break/></text:p>
      <text:p text:style-name="Preformatted_20_Text"><text:span text:style-name="Source_20_Text"> Pesquisar livros...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Futuramente:</text:h>
      <text:p text:style-name="Text_20_body">Poderá receber:</text:p>
      <text:list text:style-name="L53">
        <text:list-item>
          <text:p text:style-name="P54">filtros;</text:p>
        </text:list-item>
        <text:list-item>
          <text:p text:style-name="P54">categorias;</text:p>
        </text:list-item>
        <text:list-item>
          <text:p text:style-name="P54">período histórico.</text:p>
        </text:list-item>
      </text:list>
      <text:p text:style-name="Horizontal_20_Line"/>
      <text:h text:style-name="Heading_20_1" text:outline-level="1">6. Componente: Loading</text:h>
      <text:p text:style-name="Text_20_body">Arquivo:</text:p>
      <text:p text:style-name="P17"><text:span text:style-name="Source_20_Text">components/loading.html</text:span></text:p>
      <text:h text:style-name="Heading_20_2" text:outline-level="2">Objetivo</text:h>
      <text:p text:style-name="Text_20_body">Informar ao usuário que algo está sendo carregado.</text:p>
      <text:p text:style-name="Text_20_body">Exemplo:</text:p>
      <text:p text:style-name="Preformatted_20_Text"><text:span text:style-name="Source_20_Text">-------------------</text:span></text:p>
      <text:p text:style-name="Preformatted_20_Text"/>
      <text:p text:style-name="Preformatted_20_Text"><text:span text:style-name="Source_20_Text">Carregando biblioteca...</text:span></text:p>
      <text:p text:style-name="Preformatted_20_Text"/>
      <text:p text:style-name="Preformatted_20_Text"><text:span text:style-name="Source_20_Text"></text:span></text:p>
      <text:p text:style-name="Preformatted_20_Text"/>
      <text:p text:style-name="P17"><text:span text:style-name="Source_20_Text">-------------------</text:span></text:p>
      <text:p text:style-name="Horizontal_20_Line"/>
      <text:h text:style-name="Heading_20_1" text:outline-level="1">7. Novo componente importante: Reading Section</text:h>
      <text:p text:style-name="Text_20_body">Durante a definição da Área de Leitura, percebemos que falta um componente.</text:p>
      <text:p text:style-name="Text_20_body">Vamos adicionar:</text:p>
      <text:p text:style-name="P17"><text:span text:style-name="Source_20_Text">components/</text:span><text:bookmark-start text:name="__DdeLink__4974_394047450"/><text:span text:style-name="Source_20_Text">reading-section.html</text:span><text:bookmark-end text:name="__DdeLink__4974_394047450"/></text:p>
      <text:h text:style-name="Heading_20_2" text:outline-level="2">Objetivo</text:h>
      <text:p text:style-name="Text_20_body">Representar uma seção da obra.</text:p>
      <text:p text:style-name="Text_20_body"><text:soft-page-break/>Exemplo:</text:p>
      <text:p text:style-name="Preformatted_20_Text"><text:span text:style-name="Source_20_Text">---------------------------------</text:span></text:p>
      <text:p text:style-name="Preformatted_20_Text"/>
      <text:p text:style-name="Preformatted_20_Text"><text:span text:style-name="Source_20_Text">Capítulo 1</text:span></text:p>
      <text:p text:style-name="Preformatted_20_Text"/>
      <text:p text:style-name="Preformatted_20_Text"><text:span text:style-name="Source_20_Text">Texto original:</text:span></text:p>
      <text:p text:style-name="Preformatted_20_Text"/>
      <text:p text:style-name="Preformatted_20_Text"><text:span text:style-name="Source_20_Text">"..."</text:span></text:p>
      <text:p text:style-name="Preformatted_20_Text"/>
      <text:p text:style-name="Preformatted_20_Text"/>
      <text:p text:style-name="Preformatted_20_Text"><text:span text:style-name="Source_20_Text">Comentário:</text:span></text:p>
      <text:p text:style-name="Preformatted_20_Text"/>
      <text:p text:style-name="Preformatted_20_Text"><text:span text:style-name="Source_20_Text">Análise histórica...</text:span></text:p>
      <text:p text:style-name="Preformatted_20_Text"/>
      <text:p text:style-name="P17"><text:span text:style-name="Source_20_Text">---------------------------------</text:span></text:p>
      <text:p text:style-name="Horizontal_20_Line"/>
      <text:h text:style-name="Heading_20_2" text:outline-level="2">Por que adicionar agora?</text:h>
      <text:p text:style-name="Text_20_body">Porque a página <text:span text:style-name="Source_20_Text">leitura.html</text:span> será o núcleo da plataforma.</text:p>
      <text:p text:style-name="Text_20_body">Ela precisará repetir esse padrão várias vezes:</text:p>
      <text:list text:style-name="L54">
        <text:list-item>
          <text:p text:style-name="P55">seção 1;</text:p>
        </text:list-item>
        <text:list-item>
          <text:p text:style-name="P55">seção 2;</text:p>
        </text:list-item>
        <text:list-item>
          <text:p text:style-name="P55">seção 3.</text:p>
        </text:list-item>
      </text:list>
      <text:p text:style-name="Text_20_body">Um componente evita duplicação.</text:p>
      <text:p text:style-name="Horizontal_20_Line"/>
      <text:h text:style-name="Heading_20_1" text:outline-level="1">Estrutura atualizada dos componentes</text:h>
      <text:p text:style-name="Preformatted_20_Text"><text:span text:style-name="Source_20_Text">components/</text:span></text:p>
      <text:p text:style-name="Preformatted_20_Text"/>
      <text:p text:style-name="Preformatted_20_Text"><text:span text:style-name="Source_20_Text">├── header.html</text:span></text:p>
      <text:p text:style-name="Preformatted_20_Text"><text:span text:style-name="Source_20_Text">├── navbar.html</text:span></text:p>
      <text:p text:style-name="Preformatted_20_Text"><text:span text:style-name="Source_20_Text">├── footer.html</text:span></text:p>
      <text:p text:style-name="Preformatted_20_Text"><text:span text:style-name="Source_20_Text">├── book-card.html</text:span></text:p>
      <text:p text:style-name="Preformatted_20_Text"><text:span text:style-name="Source_20_Text">├── search-bar.html</text:span></text:p>
      <text:p text:style-name="Preformatted_20_Text"><text:span text:style-name="Source_20_Text">├── loading.html</text:span></text:p>
      <text:p text:style-name="P17"><text:span text:style-name="Source_20_Text">└── reading-section.html</text:span></text:p>
      <text:p text:style-name="Horizontal_20_Line"/>
      <text:h text:style-name="Heading_20_1" text:outline-level="1">Padrão visual dos componentes</text:h>
      <text:p text:style-name="Text_20_body">Todos seguirão:</text:p>
      <text:h text:style-name="Heading_20_2" text:outline-level="2">Bordas</text:h>
      <text:list text:style-name="L55">
        <text:list-item>
          <text:p text:style-name="P56">suaves;</text:p>
        </text:list-item>
        <text:list-item>
          <text:p text:style-name="P56"><text:soft-page-break/>discretas.</text:p>
        </text:list-item>
      </text:list>
      <text:p text:style-name="Text_20_body">Exemplo:</text:p>
      <text:p text:style-name="P17"><text:span text:style-name="Source_20_Text">border-radius: médio</text:span></text:p>
      <text:p text:style-name="Horizontal_20_Line"/>
      <text:h text:style-name="Heading_20_2" text:outline-level="2">Sombras</text:h>
      <text:p text:style-name="Text_20_body">Usaremos sombras leves.</text:p>
      <text:p text:style-name="Text_20_body">Objetivo:</text:p>
      <text:p text:style-name="Text_20_body">Criar profundidade sem parecer um aplicativo comercial.</text:p>
      <text:p text:style-name="Horizontal_20_Line"/>
      <text:h text:style-name="Heading_20_2" text:outline-level="2">Espaçamento</text:h>
      <text:p text:style-name="Text_20_body">Sempre respeitar a escala definida no Design System.</text:p>
      <text:p text:style-name="Text_20_body">Nada de valores aleatórios.</text:p>
      <text:p text:style-name="Text_20_body">Evitar:</text:p>
      <text:p text:style-name="P17"><text:span text:style-name="Source_20_Text">margin: 37px;</text:span></text:p>
      <text:p text:style-name="Text_20_body">Preferir:</text:p>
      <text:p text:style-name="P17"><text:span text:style-name="Source_20_Text">margin: var(--spacing-lg);</text:span></text:p>
      <text:p text:style-name="Horizontal_20_Line"/>
      <text:h text:style-name="Heading_20_1" text:outline-level="1">Resultado da Sprint 3.4</text:h>
      <text:p text:style-name="Text_20_body">Definimos:</text:p>
      <text:p text:style-name="Text_20_body">✅ Navbar.<text:line-break/>✅ Header.<text:line-break/>✅ Footer.<text:line-break/>✅ Card de livros.<text:line-break/>✅ Barra de pesquisa.<text:line-break/>✅ Loading.<text:line-break/>✅ Seção de leitura.</text:p>
      <text:p text:style-name="Text_20_body">Também identificamos um componente essencial para o objetivo principal da plataforma.</text:p>
      <text:p text:style-name="Horizontal_20_Line"/>
      <text:h text:style-name="Heading_20_1" text:outline-level="1">Checklist da Fase 3</text:h>
      <text:list text:style-name="L56">
        <text:list-item>
          <text:p text:style-name="P57">✅ Definir a identidade visual.</text:p>
        </text:list-item>
        <text:list-item>
          <text:p text:style-name="P57"><text:soft-page-break/>✅ Criar a paleta de cores.</text:p>
        </text:list-item>
        <text:list-item>
          <text:p text:style-name="P57">✅ Definir a tipografia.</text:p>
        </text:list-item>
        <text:list-item>
          <text:p text:style-name="P57">✅ Criar os componentes visuais.</text:p>
        </text:list-item>
        <text:list-item>
          <text:p text:style-name="P57">⏳ Elaborar o Design System.</text:p>
        </text:list-item>
        <text:list-item>
          <text:p text:style-name="P57">⏳ Produzir os wireframes das principais páginas.</text:p>
        </text:list-item>
      </text:list>
      <text:p text:style-name="Horizontal_20_Line"/>
      <text:h text:style-name="Heading_20_2" text:outline-level="2">Próxima Sprint — 3.5 Elaborar o Design System</text:h>
      <text:p text:style-name="Text_20_body">Agora vamos juntar tudo que definimos:</text:p>
      <text:list text:style-name="L57">
        <text:list-item>
          <text:p text:style-name="P58">cores;</text:p>
        </text:list-item>
        <text:list-item>
          <text:p text:style-name="P58">tipografia;</text:p>
        </text:list-item>
        <text:list-item>
          <text:p text:style-name="P58">espaçamentos;</text:p>
        </text:list-item>
        <text:list-item>
          <text:p text:style-name="P58">componentes;</text:p>
        </text:list-item>
        <text:list-item>
          <text:p text:style-name="P58">regras de uso.</text:p>
        </text:list-item>
      </text:list>
      <text:p text:style-name="Text_20_body">O resultado será o documento que guiará toda a implementação visual do projeto.</text:p>
      <text:p text:style-name="Text_20_body">Perfeito. Agora vamos consolidar todas as decisões visuais em um documento único.</text:p>
      <text:p text:style-name="Text_20_body">Entramos na:</text:p>
      <text:h text:style-name="Heading_20_1" text:outline-level="1">Sprint 3.5 — Elaborar o Design System</text:h>
      <text:h text:style-name="Heading_20_2" text:outline-level="2">Objetivo</text:h>
      <text:p text:style-name="Text_20_body">Criar um conjunto de regras visuais que garantirá que toda a Biblioteca Apócrifa tenha uma aparência consistente.</text:p>
      <text:p text:style-name="Text_20_body">O Design System será a ponte entre:</text:p>
      <text:p text:style-name="Text_20_body"><text:span text:style-name="Strong_20_Emphasis">Identidade visual → Código CSS → Interface final</text:span></text:p>
      <text:p text:style-name="Text_20_body">Ele será futuramente implementado principalmente em:</text:p>
      <text:p text:style-name="Preformatted_20_Text"><text:span text:style-name="Source_20_Text">assets/css/variables.css</text:span></text:p>
      <text:p text:style-name="P17"><text:span text:style-name="Source_20_Text">assets/css/components.css</text:span></text:p>
      <text:p text:style-name="Horizontal_20_Line"/>
      <text:h text:style-name="Heading_20_1" text:outline-level="1">Design System — Biblioteca Apócrifa (Versão 1.0)</text:h>
      <text:p text:style-name="Horizontal_20_Line"/>
      <text:h text:style-name="Heading_20_1" text:outline-level="1"><text:soft-page-break/>1. Princípios de Design</text:h>
      <text:p text:style-name="Text_20_body">A interface deve seguir cinco princípios:</text:p>
      <text:h text:style-name="Heading_20_2" text:outline-level="2">1. Clareza</text:h>
      <text:p text:style-name="Text_20_body">O usuário deve encontrar facilmente:</text:p>
      <text:list text:style-name="L58">
        <text:list-item>
          <text:p text:style-name="P59">livros;</text:p>
        </text:list-item>
        <text:list-item>
          <text:p text:style-name="P59">informações históricas;</text:p>
        </text:list-item>
        <text:list-item>
          <text:p text:style-name="P59">ferramentas de estudo.</text:p>
        </text:list-item>
      </text:list>
      <text:p text:style-name="Horizontal_20_Line"/>
      <text:h text:style-name="Heading_20_2" text:outline-level="2">2. Leitura confortável</text:h>
      <text:p text:style-name="Text_20_body">O conteúdo é o elemento principal.</text:p>
      <text:p text:style-name="Text_20_body">Prioridades:</text:p>
      <text:list text:style-name="L59">
        <text:list-item>
          <text:p text:style-name="P60">boa tipografia;</text:p>
        </text:list-item>
        <text:list-item>
          <text:p text:style-name="P60">espaçamento;</text:p>
        </text:list-item>
        <text:list-item>
          <text:p text:style-name="P60">contraste;</text:p>
        </text:list-item>
        <text:list-item>
          <text:p text:style-name="P60">ausência de distrações.</text:p>
        </text:list-item>
      </text:list>
      <text:p text:style-name="Horizontal_20_Line"/>
      <text:h text:style-name="Heading_20_2" text:outline-level="2">3. Organização acadêmica</text:h>
      <text:p text:style-name="Text_20_body">A plataforma deve parecer:</text:p>
      <text:list text:style-name="L60">
        <text:list-item>
          <text:p text:style-name="P61">uma biblioteca;</text:p>
        </text:list-item>
        <text:list-item>
          <text:p text:style-name="P61">um arquivo histórico;</text:p>
        </text:list-item>
        <text:list-item>
          <text:p text:style-name="P61">uma ferramenta de pesquisa.</text:p>
        </text:list-item>
      </text:list>
      <text:p text:style-name="Text_20_body">Não deve parecer:</text:p>
      <text:list text:style-name="L61">
        <text:list-item>
          <text:p text:style-name="P62">uma rede social;</text:p>
        </text:list-item>
        <text:list-item>
          <text:p text:style-name="P62">um blog comum;</text:p>
        </text:list-item>
        <text:list-item>
          <text:p text:style-name="P62">um site promocional.</text:p>
        </text:list-item>
      </text:list>
      <text:p text:style-name="Horizontal_20_Line"/>
      <text:h text:style-name="Heading_20_2" text:outline-level="2">4. Consistência</text:h>
      <text:p text:style-name="Text_20_body">Componentes iguais devem parecer iguais em qualquer página.</text:p>
      <text:p text:style-name="Text_20_body">Exemplo:</text:p>
      <text:p text:style-name="Text_20_body"><text:soft-page-break/>Um botão de ação deve manter:</text:p>
      <text:list text:style-name="L62">
        <text:list-item>
          <text:p text:style-name="P63">mesma cor;</text:p>
        </text:list-item>
        <text:list-item>
          <text:p text:style-name="P63">mesmo formato;</text:p>
        </text:list-item>
        <text:list-item>
          <text:p text:style-name="P63">mesmo comportamento.</text:p>
        </text:list-item>
      </text:list>
      <text:p text:style-name="Horizontal_20_Line"/>
      <text:h text:style-name="Heading_20_2" text:outline-level="2">5. Acessibilidade</text:h>
      <text:p text:style-name="Text_20_body">A interface deve considerar:</text:p>
      <text:list text:style-name="L63">
        <text:list-item>
          <text:p text:style-name="P64">contraste;</text:p>
        </text:list-item>
        <text:list-item>
          <text:p text:style-name="P64">tamanho das fontes;</text:p>
        </text:list-item>
        <text:list-item>
          <text:p text:style-name="P64">navegação clara;</text:p>
        </text:list-item>
        <text:list-item>
          <text:p text:style-name="P64">leitura em dispositivos móveis.</text:p>
        </text:list-item>
      </text:list>
      <text:p text:style-name="Horizontal_20_Line"/>
      <text:h text:style-name="Heading_20_1" text:outline-level="1">2. Sistema de Cores</text:h>
      <text:h text:style-name="Heading_20_2" text:outline-level="2">Cores principais</text:h>
      <text:h text:style-name="Heading_20_3" text:outline-level="3">Primária</text:h>
      <text:p text:style-name="P17"><text:span text:style-name="Source_20_Text">--color-primary: #243447;</text:span></text:p>
      <text:p text:style-name="Text_20_body">Uso:</text:p>
      <text:list text:style-name="L64">
        <text:list-item>
          <text:p text:style-name="P65">navegação;</text:p>
        </text:list-item>
        <text:list-item>
          <text:p text:style-name="P65">botões principais;</text:p>
        </text:list-item>
        <text:list-item>
          <text:p text:style-name="P65">elementos de destaque.</text:p>
        </text:list-item>
      </text:list>
      <text:p text:style-name="Horizontal_20_Line"/>
      <text:h text:style-name="Heading_20_3" text:outline-level="3">Secundária</text:h>
      <text:p text:style-name="P17"><text:span text:style-name="Source_20_Text">--color-secondary: #9A7B4F;</text:span></text:p>
      <text:p text:style-name="Text_20_body">Uso:</text:p>
      <text:list text:style-name="L65">
        <text:list-item>
          <text:p text:style-name="P66">detalhes;</text:p>
        </text:list-item>
        <text:list-item>
          <text:p text:style-name="P66">ícones;</text:p>
        </text:list-item>
        <text:list-item>
          <text:p text:style-name="P66">elementos históricos.</text:p>
        </text:list-item>
      </text:list>
      <text:p text:style-name="Horizontal_20_Line"/>
      <text:h text:style-name="Heading_20_2" text:outline-level="2"><text:soft-page-break/>Cores de fundo</text:h>
      <text:p text:style-name="P17"><text:span text:style-name="Source_20_Text">--color-background: #F8F5EF;</text:span></text:p>
      <text:p text:style-name="Text_20_body">Uso:</text:p>
      <text:list text:style-name="L66">
        <text:list-item>
          <text:p text:style-name="P67">fundo geral.</text:p>
        </text:list-item>
      </text:list>
      <text:p text:style-name="Horizontal_20_Line"/>
      <text:p text:style-name="P17"><text:span text:style-name="Source_20_Text">--color-reading-background: #FCFAF5;</text:span></text:p>
      <text:p text:style-name="Text_20_body">Uso:</text:p>
      <text:list text:style-name="L67">
        <text:list-item>
          <text:p text:style-name="P68">área de leitura.</text:p>
        </text:list-item>
      </text:list>
      <text:p text:style-name="Horizontal_20_Line"/>
      <text:h text:style-name="Heading_20_2" text:outline-level="2">Textos</text:h>
      <text:p text:style-name="P17"><text:span text:style-name="Source_20_Text">--color-text: #2C2C2C;</text:span></text:p>
      <text:p text:style-name="Text_20_body">Texto principal.</text:p>
      <text:p text:style-name="P17"><text:span text:style-name="Source_20_Text">--color-text-muted: #6B6B6B;</text:span></text:p>
      <text:p text:style-name="Text_20_body">Texto secundário.</text:p>
      <text:p text:style-name="Horizontal_20_Line"/>
      <text:h text:style-name="Heading_20_1" text:outline-level="1">3. Sistema Tipográfico</text:h>
      <text:h text:style-name="Heading_20_2" text:outline-level="2">Fontes</text:h>
      <text:h text:style-name="Heading_20_3" text:outline-level="3">Interface</text:h>
      <text:p text:style-name="P17"><text:span text:style-name="Source_20_Text">--font-interface: "Open Sans", sans-serif;</text:span></text:p>
      <text:p text:style-name="Text_20_body">Uso:</text:p>
      <text:list text:style-name="L68">
        <text:list-item>
          <text:p text:style-name="P69">menus;</text:p>
        </text:list-item>
        <text:list-item>
          <text:p text:style-name="P69">botões;</text:p>
        </text:list-item>
        <text:list-item>
          <text:p text:style-name="P69">controles.</text:p>
        </text:list-item>
      </text:list>
      <text:p text:style-name="Horizontal_20_Line"/>
      <text:h text:style-name="Heading_20_3" text:outline-level="3">Conteúdo</text:h>
      <text:p text:style-name="P17"><text:span text:style-name="Source_20_Text">--font-reading: "Merriweather", serif;</text:span></text:p>
      <text:p text:style-name="Text_20_body">Uso:</text:p>
      <text:list text:style-name="L69">
        <text:list-item>
          <text:p text:style-name="P70">textos históricos;</text:p>
        </text:list-item>
        <text:list-item>
          <text:p text:style-name="P70"><text:soft-page-break/>comentários;</text:p>
        </text:list-item>
        <text:list-item>
          <text:p text:style-name="P70">artigos.</text:p>
        </text:list-item>
      </text:list>
      <text:p text:style-name="Horizontal_20_Line"/>
      <text:h text:style-name="Heading_20_1" text:outline-level="1">Escala tipográfica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Elemento</text:p>
            </table:table-cell>
            <table:table-cell table:style-name="Tabela2.A1" office:value-type="string">
              <text:p text:style-name="Table_20_Heading">Tamanho</text:p>
            </table:table-cell>
          </table:table-row>
        </table:table-header-rows>
        <table:table-row>
          <table:table-cell table:style-name="Tabela2.A1" office:value-type="string">
            <text:p text:style-name="Table_20_Contents">H1</text:p>
          </table:table-cell>
          <table:table-cell table:style-name="Tabela2.A1" office:value-type="string">
            <text:p text:style-name="Table_20_Contents">2.5rem</text:p>
          </table:table-cell>
        </table:table-row>
        <table:table-row>
          <table:table-cell table:style-name="Tabela2.A1" office:value-type="string">
            <text:p text:style-name="Table_20_Contents">H2</text:p>
          </table:table-cell>
          <table:table-cell table:style-name="Tabela2.A1" office:value-type="string">
            <text:p text:style-name="Table_20_Contents">2rem</text:p>
          </table:table-cell>
        </table:table-row>
        <table:table-row>
          <table:table-cell table:style-name="Tabela2.A1" office:value-type="string">
            <text:p text:style-name="Table_20_Contents">H3</text:p>
          </table:table-cell>
          <table:table-cell table:style-name="Tabela2.A1" office:value-type="string">
            <text:p text:style-name="Table_20_Contents">1.5rem</text:p>
          </table:table-cell>
        </table:table-row>
        <table:table-row>
          <table:table-cell table:style-name="Tabela2.A1" office:value-type="string">
            <text:p text:style-name="Table_20_Contents">Texto</text:p>
          </table:table-cell>
          <table:table-cell table:style-name="Tabela2.A1" office:value-type="string">
            <text:p text:style-name="Table_20_Contents">1.125rem</text:p>
          </table:table-cell>
        </table:table-row>
        <table:table-row>
          <table:table-cell table:style-name="Tabela2.A1" office:value-type="string">
            <text:p text:style-name="Table_20_Contents">Pequeno</text:p>
          </table:table-cell>
          <table:table-cell table:style-name="Tabela2.A1" office:value-type="string">
            <text:p text:style-name="Table_20_Contents">0.875rem</text:p>
          </table:table-cell>
        </table:table-row>
      </table:table>
      <text:p text:style-name="Horizontal_20_Line"/>
      <text:h text:style-name="Heading_20_1" text:outline-level="1">4. Sistema de Espaçamento</text:h>
      <text:p text:style-name="Text_20_body">Não utilizaremos valores aleatórios.</text:p>
      <text:p text:style-name="Text_20_body">Teremos uma escala:</text:p>
      <text:p text:style-name="Preformatted_20_Text"><text:span text:style-name="Source_20_Text">--space-xs: 0.25rem;</text:span></text:p>
      <text:p text:style-name="Preformatted_20_Text"/>
      <text:p text:style-name="Preformatted_20_Text"><text:span text:style-name="Source_20_Text">--space-sm: 0.5rem;</text:span></text:p>
      <text:p text:style-name="Preformatted_20_Text"/>
      <text:p text:style-name="Preformatted_20_Text"><text:span text:style-name="Source_20_Text">--space-md: 1rem;</text:span></text:p>
      <text:p text:style-name="Preformatted_20_Text"/>
      <text:p text:style-name="Preformatted_20_Text"><text:span text:style-name="Source_20_Text">--space-lg: 2rem;</text:span></text:p>
      <text:p text:style-name="Preformatted_20_Text"/>
      <text:p text:style-name="P17"><text:span text:style-name="Source_20_Text">--space-xl: 4rem;</text:span></text:p>
      <text:p text:style-name="Horizontal_20_Line"/>
      <text:p text:style-name="Text_20_body">Uso:</text:p>
      <text:p text:style-name="Preformatted_20_Text"><text:span text:style-name="Source_20_Text">xs</text:span></text:p>
      <text:p text:style-name="Preformatted_20_Text"><text:span text:style-name="Source_20_Text">Pequenos detalhes</text:span></text:p>
      <text:p text:style-name="Preformatted_20_Text"/>
      <text:p text:style-name="Preformatted_20_Text"><text:span text:style-name="Source_20_Text">sm</text:span></text:p>
      <text:p text:style-name="Preformatted_20_Text"><text:span text:style-name="Source_20_Text">Elementos próximos</text:span></text:p>
      <text:p text:style-name="Preformatted_20_Text"/>
      <text:p text:style-name="Preformatted_20_Text"><text:span text:style-name="Source_20_Text">md</text:span></text:p>
      <text:p text:style-name="Preformatted_20_Text"><text:span text:style-name="Source_20_Text">Espaçamento padrão</text:span></text:p>
      <text:p text:style-name="Preformatted_20_Text"/>
      <text:p text:style-name="Preformatted_20_Text"><text:span text:style-name="Source_20_Text">lg</text:span></text:p>
      <text:p text:style-name="Preformatted_20_Text"><text:span text:style-name="Source_20_Text">Separação de seções</text:span></text:p>
      <text:p text:style-name="Preformatted_20_Text"/>
      <text:p text:style-name="Preformatted_20_Text"><text:span text:style-name="Source_20_Text">xl</text:span></text:p>
      <text:p text:style-name="P17"><text:span text:style-name="Source_20_Text">Grandes áreas</text:span></text:p>
      <text:p text:style-name="Horizontal_20_Line"/>
      <text:h text:style-name="Heading_20_1" text:outline-level="1"><text:soft-page-break/>5. Sistema de Containers</text:h>
      <text:p text:style-name="Text_20_body">A aplicação terá uma largura máxima para manter conforto visual.</text:p>
      <text:p text:style-name="P17"><text:span text:style-name="Source_20_Text">--container-width: 1200px;</text:span></text:p>
      <text:p text:style-name="Horizontal_20_Line"/>
      <text:p text:style-name="Text_20_body">Área de leitura:</text:p>
      <text:p text:style-name="P17"><text:span text:style-name="Source_20_Text">--reading-width: 750px;</text:span></text:p>
      <text:p text:style-name="Text_20_body">Motivo:</text:p>
      <text:p text:style-name="Text_20_body">Linhas muito longas prejudicam a compreensão.</text:p>
      <text:p text:style-name="Horizontal_20_Line"/>
      <text:h text:style-name="Heading_20_1" text:outline-level="1">6. Botões</text:h>
      <text:p text:style-name="Text_20_body">Teremos três tipos principais.</text:p>
      <text:p text:style-name="Horizontal_20_Line"/>
      <text:h text:style-name="Heading_20_2" text:outline-level="2">Botão Primário</text:h>
      <text:p text:style-name="Text_20_body">Uso:</text:p>
      <text:p text:style-name="Text_20_body">Ações principais.</text:p>
      <text:p text:style-name="Text_20_body">Exemplo:</text:p>
      <text:p text:style-name="P17"><text:span text:style-name="Source_20_Text">Explorar Biblioteca</text:span></text:p>
      <text:p text:style-name="Text_20_body">Características:</text:p>
      <text:list text:style-name="L70">
        <text:list-item>
          <text:p text:style-name="P71">fundo azul profundo;</text:p>
        </text:list-item>
        <text:list-item>
          <text:p text:style-name="P71">texto claro;</text:p>
        </text:list-item>
        <text:list-item>
          <text:p text:style-name="P71">destaque.</text:p>
        </text:list-item>
      </text:list>
      <text:p text:style-name="Horizontal_20_Line"/>
      <text:h text:style-name="Heading_20_2" text:outline-level="2">Botão Secundário</text:h>
      <text:p text:style-name="Text_20_body">Uso:</text:p>
      <text:p text:style-name="Text_20_body">Ações alternativas.</text:p>
      <text:p text:style-name="Text_20_body">Exemplo:</text:p>
      <text:p text:style-name="P17"><text:span text:style-name="Source_20_Text">Ver detalhes</text:span></text:p>
      <text:p text:style-name="Text_20_body">Características:</text:p>
      <text:list text:style-name="L71">
        <text:list-item>
          <text:p text:style-name="P72">menos destaque;</text:p>
        </text:list-item>
        <text:list-item>
          <text:p text:style-name="P72"><text:soft-page-break/>borda ou fundo suave.</text:p>
        </text:list-item>
      </text:list>
      <text:p text:style-name="Horizontal_20_Line"/>
      <text:h text:style-name="Heading_20_2" text:outline-level="2">Botão de Texto</text:h>
      <text:p text:style-name="Text_20_body">Uso:</text:p>
      <text:p text:style-name="Text_20_body">Ações pequenas.</text:p>
      <text:p text:style-name="Text_20_body">Exemplo:</text:p>
      <text:p text:style-name="P17"><text:span text:style-name="Source_20_Text">Ler mais</text:span></text:p>
      <text:p text:style-name="Horizontal_20_Line"/>
      <text:h text:style-name="Heading_20_1" text:outline-level="1">7. Cards</text:h>
      <text:h text:style-name="Heading_20_2" text:outline-level="2">Book Card</text:h>
      <text:p text:style-name="Text_20_body">Características:</text:p>
      <text:list text:style-name="L72">
        <text:list-item>
          <text:p text:style-name="P73">imagem;</text:p>
        </text:list-item>
        <text:list-item>
          <text:p text:style-name="P73">título;</text:p>
        </text:list-item>
        <text:list-item>
          <text:p text:style-name="P73">informações;</text:p>
        </text:list-item>
        <text:list-item>
          <text:p text:style-name="P73">ação.</text:p>
        </text:list-item>
      </text:list>
      <text:p text:style-name="Text_20_body">Visual:</text:p>
      <text:p text:style-name="Preformatted_20_Text"><text:span text:style-name="Source_20_Text">---------------------</text:span></text:p>
      <text:p text:style-name="Preformatted_20_Text"/>
      <text:p text:style-name="Preformatted_20_Text"><text:span text:style-name="Source_20_Text">Imagem</text:span></text:p>
      <text:p text:style-name="Preformatted_20_Text"/>
      <text:p text:style-name="Preformatted_20_Text"><text:span text:style-name="Source_20_Text">Título</text:span></text:p>
      <text:p text:style-name="Preformatted_20_Text"/>
      <text:p text:style-name="Preformatted_20_Text"><text:span text:style-name="Source_20_Text">Categoria</text:span></text:p>
      <text:p text:style-name="Preformatted_20_Text"/>
      <text:p text:style-name="Preformatted_20_Text"><text:span text:style-name="Source_20_Text">Descrição</text:span></text:p>
      <text:p text:style-name="Preformatted_20_Text"/>
      <text:p text:style-name="Preformatted_20_Text"><text:span text:style-name="Source_20_Text">Botão</text:span></text:p>
      <text:p text:style-name="Preformatted_20_Text"/>
      <text:p text:style-name="P17"><text:span text:style-name="Source_20_Text">---------------------</text:span></text:p>
      <text:p text:style-name="Horizontal_20_Line"/>
      <text:h text:style-name="Heading_20_2" text:outline-level="2">Informação Histórica</text:h>
      <text:p text:style-name="Text_20_body">Novo padrão:</text:p>
      <text:p text:style-name="Preformatted_20_Text"><text:span text:style-name="Source_20_Text">┌─────────────────┐</text:span></text:p>
      <text:p text:style-name="Preformatted_20_Text"><text:span text:style-name="Source_20_Text">│ Contexto <text:s text:c="7"/>│</text:span></text:p>
      <text:p text:style-name="Preformatted_20_Text"><text:span text:style-name="Source_20_Text">│ histórico <text:s text:c="6"/>│</text:span></text:p>
      <text:p text:style-name="Preformatted_20_Text"><text:span text:style-name="Source_20_Text">│ <text:s text:c="16"/>│</text:span></text:p>
      <text:p text:style-name="Preformatted_20_Text"><text:span text:style-name="Source_20_Text">│ Informação <text:s text:c="5"/>│</text:span></text:p>
      <text:p text:style-name="P17"><text:span text:style-name="Source_20_Text">└─────────────────┘</text:span></text:p>
      <text:p text:style-name="Text_20_body"><text:soft-page-break/>Uso:</text:p>
      <text:list text:style-name="L73">
        <text:list-item>
          <text:p text:style-name="P74">datas;</text:p>
        </text:list-item>
        <text:list-item>
          <text:p text:style-name="P74">manuscritos;</text:p>
        </text:list-item>
        <text:list-item>
          <text:p text:style-name="P74">observações.</text:p>
        </text:list-item>
      </text:list>
      <text:p text:style-name="Horizontal_20_Line"/>
      <text:h text:style-name="Heading_20_1" text:outline-level="1">8. Bordas e Sombras</text:h>
      <text:h text:style-name="Heading_20_2" text:outline-level="2">Bordas</text:h>
      <text:p text:style-name="Preformatted_20_Text"><text:span text:style-name="Source_20_Text">--radius-sm: 4px;</text:span></text:p>
      <text:p text:style-name="Preformatted_20_Text"/>
      <text:p text:style-name="Preformatted_20_Text"><text:span text:style-name="Source_20_Text">--radius-md: 8px;</text:span></text:p>
      <text:p text:style-name="Preformatted_20_Text"/>
      <text:p text:style-name="P17"><text:span text:style-name="Source_20_Text">--radius-lg: 16px;</text:span></text:p>
      <text:p text:style-name="Horizontal_20_Line"/>
      <text:h text:style-name="Heading_20_2" text:outline-level="2">Sombras</text:h>
      <text:p text:style-name="Text_20_body">Usaremos sombras discretas.</text:p>
      <text:p text:style-name="Text_20_body">Objetivo:</text:p>
      <text:list text:style-name="L74">
        <text:list-item>
          <text:p text:style-name="P75">separar elementos;</text:p>
        </text:list-item>
        <text:list-item>
          <text:p text:style-name="P75">não criar efeito exagerado.</text:p>
        </text:list-item>
      </text:list>
      <text:p text:style-name="Horizontal_20_Line"/>
      <text:h text:style-name="Heading_20_1" text:outline-level="1">9. Responsividade</text:h>
      <text:p text:style-name="Text_20_body">A plataforma será criada com abordagem:</text:p>
      <text:p text:style-name="Text_20_body"><text:span text:style-name="Strong_20_Emphasis">Mobile First</text:span></text:p>
      <text:p text:style-name="Text_20_body">Ou seja:</text:p>
      <text:p text:style-name="Text_20_body">Primeiro:</text:p>
      <text:p text:style-name="Text_20_body">📱 celular</text:p>
      <text:p text:style-name="Text_20_body">Depois:</text:p>
      <text:p text:style-name="Text_20_body">💻 desktop</text:p>
      <text:p text:style-name="Horizontal_20_Line"/>
      <text:p text:style-name="Text_20_body">Breakpoints iniciais:</text:p>
      <text:p text:style-name="Preformatted_20_Text"><text:span text:style-name="Source_20_Text">Mobile</text:span></text:p>
      <text:p text:style-name="Preformatted_20_Text"><text:span text:style-name="Source_20_Text">até 640px</text:span></text:p>
      <text:p text:style-name="Preformatted_20_Text"/>
      <text:p text:style-name="Preformatted_20_Text"><text:soft-page-break/></text:p>
      <text:p text:style-name="Preformatted_20_Text"><text:span text:style-name="Source_20_Text">Tablet</text:span></text:p>
      <text:p text:style-name="Preformatted_20_Text"><text:span text:style-name="Source_20_Text">641px - 1024px</text:span></text:p>
      <text:p text:style-name="Preformatted_20_Text"/>
      <text:p text:style-name="Preformatted_20_Text"/>
      <text:p text:style-name="Preformatted_20_Text"><text:span text:style-name="Source_20_Text">Desktop</text:span></text:p>
      <text:p text:style-name="P17"><text:span text:style-name="Source_20_Text">acima de 1024px</text:span></text:p>
      <text:p text:style-name="Horizontal_20_Line"/>
      <text:h text:style-name="Heading_20_1" text:outline-level="1">10. Estados dos Componentes</text:h>
      <text:p text:style-name="Text_20_body">Todos os componentes devem possuir estados.</text:p>
      <text:p text:style-name="Text_20_body">Exemplo botão:</text:p>
      <text:p text:style-name="Text_20_body">Normal:</text:p>
      <text:p text:style-name="P17"><text:span text:style-name="Source_20_Text">[Explorar]</text:span></text:p>
      <text:p text:style-name="Text_20_body">Hover:</text:p>
      <text:p text:style-name="Preformatted_20_Text"><text:span text:style-name="Source_20_Text">[Explorar]</text:span></text:p>
      <text:p text:style-name="P17"><text:span text:style-name="Source_20_Text"><text:s text:c="5"/>↑</text:span></text:p>
      <text:p text:style-name="Text_20_body">Focus:</text:p>
      <text:p text:style-name="Text_20_body">Para acessibilidade com teclado.</text:p>
      <text:p text:style-name="Horizontal_20_Line"/>
      <text:h text:style-name="Heading_20_1" text:outline-level="1">Resultado da Sprint 3.5</text:h>
      <text:p text:style-name="Text_20_body">Agora temos definido:</text:p>
      <text:p text:style-name="Text_20_body">✅ Princípios visuais.<text:line-break/>✅ Cores.<text:line-break/>✅ Tipografia.<text:line-break/>✅ Espaçamentos.<text:line-break/>✅ Containers.<text:line-break/>✅ Botões.<text:line-break/>✅ Cards.<text:line-break/>✅ Responsividade.<text:line-break/>✅ Regras de acessibilidade.</text:p>
      <text:p text:style-name="Text_20_body">O projeto agora possui um sistema visual consistente.</text:p>
      <text:p text:style-name="Horizontal_20_Line"/>
      <text:h text:style-name="Heading_20_1" text:outline-level="1">Checklist da Fase 3</text:h>
      <text:list text:style-name="L75">
        <text:list-item>
          <text:p text:style-name="P76">✅ Definir a identidade visual.</text:p>
        </text:list-item>
        <text:list-item>
          <text:p text:style-name="P76">✅ Criar a paleta de cores.</text:p>
        </text:list-item>
        <text:list-item>
          <text:p text:style-name="P76"><text:soft-page-break/>✅ Definir a tipografia.</text:p>
        </text:list-item>
        <text:list-item>
          <text:p text:style-name="P76">✅ Criar os componentes visuais.</text:p>
        </text:list-item>
        <text:list-item>
          <text:p text:style-name="P76">✅ Elaborar o Design System.</text:p>
        </text:list-item>
        <text:list-item>
          <text:p text:style-name="P76">⏳ Produzir os wireframes das principais páginas.</text:p>
        </text:list-item>
      </text:list>
      <text:p text:style-name="Horizontal_20_Line"/>
      <text:h text:style-name="Heading_20_2" text:outline-level="2">Próxima Sprint — 3.6 Produzir os Wireframes das Principais Páginas</text:h>
      <text:p text:style-name="Text_20_body">Agora vamos desenhar a estrutura das telas:</text:p>
      <text:list text:style-name="L76">
        <text:list-item>
          <text:p text:style-name="P77">Página inicial (<text:span text:style-name="Source_20_Text">index.html</text:span>)</text:p>
        </text:list-item>
        <text:list-item>
          <text:p text:style-name="P77">Biblioteca (<text:span text:style-name="Source_20_Text">biblioteca.html</text:span>)</text:p>
        </text:list-item>
        <text:list-item>
          <text:p text:style-name="P77">Área de leitura (<text:span text:style-name="Source_20_Text">leitura.html</text:span>)</text:p>
        </text:list-item>
        <text:list-item>
          <text:p text:style-name="P77">Comunidade (<text:span text:style-name="Source_20_Text">comunidade.html</text:span>)</text:p>
        </text:list-item>
        <text:list-item>
          <text:p text:style-name="P77">Perfil (<text:span text:style-name="Source_20_Text">perfil.html</text:span>)</text:p>
        </text:list-item>
      </text:list>
      <text:p text:style-name="Text_20_body">Vamos definir:</text:p>
      <text:list text:style-name="L77">
        <text:list-item>
          <text:p text:style-name="P78">posição dos elementos;</text:p>
        </text:list-item>
        <text:list-item>
          <text:p text:style-name="P78">hierarquia da informação;</text:p>
        </text:list-item>
        <text:list-item>
          <text:p text:style-name="P78">fluxo do usuário;</text:p>
        </text:list-item>
        <text:list-item>
          <text:p text:style-name="P78">organização das seções.</text:p>
        </text:list-item>
      </text:list>
      <text:p text:style-name="Text_20_body">Depois dos wireframes, estaremos prontos para iniciar a construção real da interface.</text:p>
      <text:p text:style-name="Text_20_body">Perfeito. Agora vamos concluir a última etapa da <text:span text:style-name="Strong_20_Emphasis">Fase 3 — Design da Interface</text:span>.</text:p>
      <text:p text:style-name="Text_20_body">Entramos na:</text:p>
      <text:h text:style-name="Heading_20_1" text:outline-level="1">Sprint 3.6 — Produzir os Wireframes das Principais Páginas</text:h>
      <text:h text:style-name="Heading_20_2" text:outline-level="2">Objetivo</text:h>
      <text:p text:style-name="Text_20_body">Criar a estrutura visual das páginas antes de escrever HTML e CSS.</text:p>
      <text:p text:style-name="Text_20_body">O wireframe não define cores ou detalhes visuais. Ele responde:</text:p>
      <text:list text:style-name="L78">
        <text:list-item>
          <text:p text:style-name="P79">O que aparece primeiro?</text:p>
        </text:list-item>
        <text:list-item>
          <text:p text:style-name="P79">Qual informação é mais importante?</text:p>
        </text:list-item>
        <text:list-item>
          <text:p text:style-name="P79">Como o usuário navega?</text:p>
        </text:list-item>
        <text:list-item>
          <text:p text:style-name="P79"><text:soft-page-break/>Qual é o caminho principal da experiência?</text:p>
        </text:list-item>
      </text:list>
      <text:p text:style-name="Text_20_body">A regra que vamos seguir:</text:p>
      <text:p text:style-name="Quotations">Primeiro organizamos a informação, depois aplicamos o design.</text:p>
      <text:p text:style-name="Horizontal_20_Line"/>
      <text:h text:style-name="Heading_20_1" text:outline-level="1">1. Wireframe — Página Inicial (<text:span text:style-name="Source_20_Text">index.html</text:span>)</text:h>
      <text:h text:style-name="Heading_20_2" text:outline-level="2">Objetivo da página</text:h>
      <text:p text:style-name="Text_20_body">Apresentar a plataforma e conduzir o usuário para o estudo.</text:p>
      <text:p text:style-name="Text_20_body">Fluxo:</text:p>
      <text:p text:style-name="Preformatted_20_Text"><text:span text:style-name="Source_20_Text">Conhecer a plataforma</text:span></text:p>
      <text:p text:style-name="Preformatted_20_Text"><text:span text:style-name="Source_20_Text"><text:s text:c="10"/>↓</text:span></text:p>
      <text:p text:style-name="Preformatted_20_Text"><text:span text:style-name="Source_20_Text">Entender o propósito</text:span></text:p>
      <text:p text:style-name="Preformatted_20_Text"><text:span text:style-name="Source_20_Text"><text:s text:c="10"/>↓</text:span></text:p>
      <text:p text:style-name="Preformatted_20_Text"><text:span text:style-name="Source_20_Text">Explorar obras</text:span></text:p>
      <text:p text:style-name="Preformatted_20_Text"><text:span text:style-name="Source_20_Text"><text:s text:c="10"/>↓</text:span></text:p>
      <text:p text:style-name="P17"><text:span text:style-name="Source_20_Text">Começar um estudo</text:span></text:p>
      <text:p text:style-name="Horizontal_20_Line"/>
      <text:h text:style-name="Heading_20_2" text:outline-level="2">Estrutura</text:h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9"/>NAVBAR <text:s text:c="12"/>│</text:span></text:p>
      <text:p text:style-name="Preformatted_20_Text"><text:span text:style-name="Source_20_Text">│ Logo | Biblioteca | Perfil <text:s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28"/>│</text:span></text:p>
      <text:p text:style-name="Preformatted_20_Text"><text:span text:style-name="Source_20_Text">│ <text:s text:c="4"/>Biblioteca Apócrifa <text:s text:c="4"/>│</text:span></text:p>
      <text:p text:style-name="Preformatted_20_Text"><text:span text:style-name="Source_20_Text">│ <text:s text:c="28"/>│</text:span></text:p>
      <text:p text:style-name="Preformatted_20_Text"><text:span text:style-name="Source_20_Text">│ Plataforma de estudo de <text:s text:c="4"/>│</text:span></text:p>
      <text:p text:style-name="Preformatted_20_Text"><text:span text:style-name="Source_20_Text">│ textos antigos <text:s text:c="13"/>│</text:span></text:p>
      <text:p text:style-name="Preformatted_20_Text"><text:span text:style-name="Source_20_Text">│ <text:s text:c="28"/>│</text:span></text:p>
      <text:p text:style-name="Preformatted_20_Text"><text:span text:style-name="Source_20_Text">│ [Explorar Biblioteca] <text:s text:c="6"/>│</text:span></text:p>
      <text:p text:style-name="Preformatted_20_Text"><text:span text:style-name="Source_20_Text">│ <text:s text:c="28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O que são textos apócrifos? │</text:span></text:p>
      <text:p text:style-name="Preformatted_20_Text"><text:span text:style-name="Source_20_Text">│ <text:s text:c="28"/>│</text:span></text:p>
      <text:p text:style-name="Preformatted_20_Text"><text:span text:style-name="Source_20_Text">│ Texto introdutório <text:s text:c="9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Obras em destaque <text:s text:c="10"/>│</text:span></text:p>
      <text:p text:style-name="Preformatted_20_Text"><text:span text:style-name="Source_20_Text">│ <text:s text:c="28"/>│</text:span></text:p>
      <text:p text:style-name="Preformatted_20_Text"><text:span text:style-name="Source_20_Text">│ [Livro] [Livro] [Livro] <text:s text:c="4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><text:soft-page-break/></text:p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Como funciona? <text:s text:c="13"/>│</text:span></text:p>
      <text:p text:style-name="Preformatted_20_Text"><text:span text:style-name="Source_20_Text">│ <text:s text:c="28"/>│</text:span></text:p>
      <text:p text:style-name="Preformatted_20_Text"><text:span text:style-name="Source_20_Text">│ Biblioteca → Leitura → <text:s text:c="5"/>│</text:span></text:p>
      <text:p text:style-name="Preformatted_20_Text"><text:span text:style-name="Source_20_Text">│ Estudo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9"/>FOOTER <text:s text:c="12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2. Wireframe — Biblioteca (<text:span text:style-name="Source_20_Text">biblioteca.html</text:span>)</text:h>
      <text:h text:style-name="Heading_20_2" text:outline-level="2">Objetivo</text:h>
      <text:p text:style-name="Text_20_body">Encontrar uma obra para estudar.</text:p>
      <text:p text:style-name="Text_20_body">Fluxo:</text:p>
      <text:p text:style-name="Preformatted_20_Text"><text:span text:style-name="Source_20_Text">Pesquisar</text:span></text:p>
      <text:p text:style-name="Preformatted_20_Text"><text:span text:style-name="Source_20_Text"><text:s text:c="4"/>↓</text:span></text:p>
      <text:p text:style-name="Preformatted_20_Text"><text:span text:style-name="Source_20_Text">Filtrar</text:span></text:p>
      <text:p text:style-name="Preformatted_20_Text"><text:span text:style-name="Source_20_Text"><text:s text:c="4"/>↓</text:span></text:p>
      <text:p text:style-name="Preformatted_20_Text"><text:span text:style-name="Source_20_Text">Escolher obra</text:span></text:p>
      <text:p text:style-name="Preformatted_20_Text"><text:span text:style-name="Source_20_Text"><text:s text:c="4"/>↓</text:span></text:p>
      <text:p text:style-name="P17"><text:span text:style-name="Source_20_Text">Abrir leitura</text:span></text:p>
      <text:p text:style-name="Horizontal_20_Line"/>
      <text:h text:style-name="Heading_20_2" text:outline-level="2">Estrutura</text:h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NAVBAR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Biblioteca <text:s text:c="17"/>│</text:span></text:p>
      <text:p text:style-name="Preformatted_20_Text"><text:span text:style-name="Source_20_Text">│ <text:s text:c="28"/>│</text:span></text:p>
      <text:p text:style-name="Preformatted_20_Text"><text:span text:style-name="Source_20_Text">│ Explore os textos disponíveis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🔎 Pesquisar livros <text:s text:c="8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┐</text:span></text:p>
      <text:p text:style-name="Preformatted_20_Text"><text:span text:style-name="Source_20_Text">│ Filtros <text:s text:c="6"/>│</text:span></text:p>
      <text:p text:style-name="Preformatted_20_Text"><text:span text:style-name="Source_20_Text">│ <text:s text:c="14"/>│</text:span></text:p>
      <text:p text:style-name="Preformatted_20_Text"><text:span text:style-name="Source_20_Text">│ Categoria <text:s text:c="4"/>│</text:span></text:p>
      <text:p text:style-name="Preformatted_20_Text"><text:soft-page-break/><text:span text:style-name="Source_20_Text">│ Autor <text:s text:c="8"/>│</text:span></text:p>
      <text:p text:style-name="Preformatted_20_Text"><text:span text:style-name="Source_20_Text">│ Período <text:s text:c="6"/>│</text:span></text:p>
      <text:p text:style-name="Preformatted_20_Text"><text:span text:style-name="Source_20_Text">└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28"/>│</text:span></text:p>
      <text:p text:style-name="Preformatted_20_Text"><text:span text:style-name="Source_20_Text">│ [Book Card] [Book Card] <text:s text:c="4"/>│</text:span></text:p>
      <text:p text:style-name="Preformatted_20_Text"><text:span text:style-name="Source_20_Text">│ <text:s text:c="28"/>│</text:span></text:p>
      <text:p text:style-name="Preformatted_20_Text"><text:span text:style-name="Source_20_Text">│ [Book Card] [Book Card] <text:s text:c="4"/>│</text:span></text:p>
      <text:p text:style-name="Preformatted_20_Text"><text:span text:style-name="Source_20_Text">│ <text:s text:c="28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FOOTER <text:s text:c="21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3. Wireframe — Área de Leitura (<text:span text:style-name="Source_20_Text">leitura.html</text:span>)</text:h>
      <text:p text:style-name="Text_20_body">Esta é a página mais importante da plataforma.</text:p>
      <text:p text:style-name="Text_20_body">O objetivo não é apenas ler.</text:p>
      <text:p text:style-name="Text_20_body">É estudar.</text:p>
      <text:p text:style-name="Horizontal_20_Line"/>
      <text:h text:style-name="Heading_20_2" text:outline-level="2">Estrutura</text:h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NAVBAR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Evangelho de Tomé <text:s text:c="10"/>│</text:span></text:p>
      <text:p text:style-name="Preformatted_20_Text"><text:span text:style-name="Source_20_Text">│ <text:s text:c="28"/>│</text:span></text:p>
      <text:p text:style-name="Preformatted_20_Text"><text:span text:style-name="Source_20_Text">│ Autor | Categoria | Período 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┐ ┌────────────┐</text:span></text:p>
      <text:p text:style-name="Preformatted_20_Text"><text:span text:style-name="Source_20_Text">│ Índice <text:s text:c="6"/>│ │ Conteúdo <text:s text:c="2"/>│</text:span></text:p>
      <text:p text:style-name="Preformatted_20_Text"><text:span text:style-name="Source_20_Text">│ <text:s text:c="13"/>│ │ <text:s text:c="11"/>│</text:span></text:p>
      <text:p text:style-name="Preformatted_20_Text"><text:span text:style-name="Source_20_Text">│ Seção 1 <text:s text:c="5"/>│ │ Título <text:s text:c="4"/>│</text:span></text:p>
      <text:p text:style-name="Preformatted_20_Text"><text:span text:style-name="Source_20_Text">│ Seção 2 <text:s text:c="5"/>│ │ <text:s text:c="11"/>│</text:span></text:p>
      <text:p text:style-name="Preformatted_20_Text"><text:span text:style-name="Source_20_Text">│ Seção 3 <text:s text:c="5"/>│ │ Texto <text:s text:c="5"/>│</text:span></text:p>
      <text:p text:style-name="Preformatted_20_Text"><text:span text:style-name="Source_20_Text">│ <text:s text:c="13"/>│ │ <text:s text:c="11"/>│</text:span></text:p>
      <text:p text:style-name="Preformatted_20_Text"><text:span text:style-name="Source_20_Text">│ <text:s text:c="13"/>│ │ Comentário │</text:span></text:p>
      <text:p text:style-name="Preformatted_20_Text"><text:span text:style-name="Source_20_Text">└──────────────┘ └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Referências <text:s text:c="16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><text:soft-page-break/></text:p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FOOTER <text:s text:c="21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Decisão importante para leitura</text:h>
      <text:p text:style-name="Text_20_body">No desktop:</text:p>
      <text:p text:style-name="Text_20_body">Teremos duas colunas:</text:p>
      <text:p text:style-name="P17"><text:span text:style-name="Source_20_Text">Índice <text:s text:c="7"/>Texto + Comentário</text:span></text:p>
      <text:p text:style-name="Text_20_body">No celular:</text:p>
      <text:p text:style-name="Text_20_body">A ordem muda:</text:p>
      <text:p text:style-name="Preformatted_20_Text"><text:span text:style-name="Source_20_Text">Títul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Índice recolhível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Text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7"><text:span text:style-name="Source_20_Text">Comentário</text:span></text:p>
      <text:p text:style-name="Text_20_body">Essa decisão será importante para responsividade.</text:p>
      <text:p text:style-name="Horizontal_20_Line"/>
      <text:h text:style-name="Heading_20_1" text:outline-level="1">4. Wireframe — Comunidade (<text:span text:style-name="Source_20_Text">comunidade.html</text:span>)</text:h>
      <text:h text:style-name="Heading_20_2" text:outline-level="2">Objetivo</text:h>
      <text:p text:style-name="Text_20_body">Preparar espaço de discussão.</text:p>
      <text:p text:style-name="Text_20_body">Versão inicial:</text:p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Comunidade <text:s text:c="17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<text:s text:c="28"/>│</text:span></text:p>
      <text:p text:style-name="Preformatted_20_Text"><text:span text:style-name="Source_20_Text">│ Em desenvolvimento <text:s text:c="9"/>│</text:span></text:p>
      <text:p text:style-name="Preformatted_20_Text"><text:span text:style-name="Source_20_Text">│ <text:s text:c="28"/>│</text:span></text:p>
      <text:p text:style-name="Preformatted_20_Text"><text:soft-page-break/><text:span text:style-name="Source_20_Text">│ Futuramente leitores <text:s text:c="7"/>│</text:span></text:p>
      <text:p text:style-name="Preformatted_20_Text"><text:span text:style-name="Source_20_Text">│ poderão discutir textos <text:s text:c="4"/>│</text:span></text:p>
      <text:p text:style-name="Preformatted_20_Text"><text:span text:style-name="Source_20_Text">│ <text:s text:c="28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5. Wireframe — Perfil (<text:span text:style-name="Source_20_Text">perfil.html</text:span>)</text:h>
      <text:h text:style-name="Heading_20_2" text:outline-level="2">Objetivo</text:h>
      <text:p text:style-name="Text_20_body">Área pessoal do usuário.</text:p>
      <text:p text:style-name="Text_20_body">Versão inicial:</text:p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Perfil <text:s text:c="21"/>│</text:span></text:p>
      <text:p text:style-name="Preformatted_20_Text"><text:span text:style-name="Source_20_Text">└─────────────────────────────┘</text:span></text:p>
      <text:p text:style-name="Preformatted_20_Text"/>
      <text:p text:style-name="Preformatted_20_Text"/>
      <text:p text:style-name="Preformatted_20_Text"><text:span text:style-name="Source_20_Text">┌─────────────────────────────┐</text:span></text:p>
      <text:p text:style-name="Preformatted_20_Text"><text:span text:style-name="Source_20_Text">│ Usuário <text:s text:c="20"/>│</text:span></text:p>
      <text:p text:style-name="Preformatted_20_Text"><text:span text:style-name="Source_20_Text">│ <text:s text:c="28"/>│</text:span></text:p>
      <text:p text:style-name="Preformatted_20_Text"><text:span text:style-name="Source_20_Text">│ Progresso de leitura <text:s text:c="7"/>│</text:span></text:p>
      <text:p text:style-name="Preformatted_20_Text"><text:span text:style-name="Source_20_Text">│ <text:s text:c="28"/>│</text:span></text:p>
      <text:p text:style-name="Preformatted_20_Text"><text:span text:style-name="Source_20_Text">│ Favoritos <text:s text:c="17"/>│</text:span></text:p>
      <text:p text:style-name="Preformatted_20_Text"><text:span text:style-name="Source_20_Text">│ <text:s text:c="28"/>│</text:span></text:p>
      <text:p text:style-name="P17"><text:span text:style-name="Source_20_Text">└─────────────────────────────┘</text:span></text:p>
      <text:p text:style-name="Horizontal_20_Line"/>
      <text:h text:style-name="Heading_20_1" text:outline-level="1">Fluxo principal da experiência</text:h>
      <text:p text:style-name="Text_20_body">Agora temos o caminho principal:</text:p>
      <text:p text:style-name="Preformatted_20_Text"><text:span text:style-name="Source_20_Text"><text:s text:c="20"/>Início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reformatted_20_Text"><text:span text:style-name="Source_20_Text"><text:s text:c="16"/>Biblioteca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reformatted_20_Text"><text:span text:style-name="Source_20_Text"><text:s text:c="17"/>Escolher obra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reformatted_20_Text"><text:span text:style-name="Source_20_Text"><text:s text:c="18"/>Leitura</text:span></text:p>
      <text:p text:style-name="Preformatted_20_Text"/>
      <text:p text:style-name="Preformatted_20_Text"><text:span text:style-name="Source_20_Text"><text:s text:c="22"/>↓</text:span></text:p>
      <text:p text:style-name="Preformatted_20_Text"/>
      <text:p text:style-name="P17"><text:span text:style-name="Source_20_Text"><text:s text:c="18"/>Estudo</text:span></text:p>
      <text:p text:style-name="Text_20_body">Esse fluxo define toda a experiência da plataforma.</text:p>
      <text:p text:style-name="Horizontal_20_Line"/>
      <text:h text:style-name="Heading_20_1" text:outline-level="1"><text:soft-page-break/>Resultado da Sprint 3.6</text:h>
      <text:p text:style-name="Text_20_body">Concluímos:</text:p>
      <text:p text:style-name="Text_20_body">✅ Wireframe da página inicial.<text:line-break/>✅ Wireframe da biblioteca.<text:line-break/>✅ Wireframe da área de leitura.<text:line-break/>✅ Wireframe da comunidade.<text:line-break/>✅ Wireframe do perfil.<text:line-break/>✅ Fluxo principal do usuário.</text:p>
      <text:p text:style-name="Horizontal_20_Line"/>
      <text:h text:style-name="Heading_20_1" text:outline-level="1">Fase 3 — Design da Interface concluída</text:h>
      <text:p text:style-name="Text_20_body">Checklist final:</text:p>
      <text:p text:style-name="Text_20_body">✅ Definir identidade visual.<text:line-break/>✅ Criar paleta de cores.<text:line-break/>✅ Definir tipografia.<text:line-break/>✅ Criar componentes visuais.<text:line-break/>✅ Elaborar Design System.<text:line-break/>✅ Produzir wireframes das principais páginas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7:50:36.267051405</meta:creation-date>
    <dc:date>2026-07-08T18:49:23.577866506</dc:date>
    <dc:creator>João António</dc:creator>
    <meta:editing-duration>PT54M57S</meta:editing-duration>
    <meta:editing-cycles>8</meta:editing-cycles>
    <meta:generator>LibreOffice/26.2.4.2$Linux_X86_64 LibreOffice_project/620$Build-2</meta:generator>
    <meta:document-statistic meta:table-count="2" meta:image-count="0" meta:object-count="0" meta:page-count="41" meta:paragraph-count="1077" meta:word-count="3630" meta:character-count="25725" meta:non-whitespace-character-count="22125"/>
  </office:meta>
</office:document-meta>
</file>