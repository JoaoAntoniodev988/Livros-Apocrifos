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</style:style>
    <style:style style:name="P27" style:family="paragraph" style:parent-style-name="Compact" style:list-style-name="WWNum1021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28" style:family="paragraph" style:parent-style-name="Comment">
      <style:paragraph-properties fo:margin-top="0.42cm" fo:margin-bottom="0.349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Comment">
      <style:paragraph-properties fo:margin-left="1.251cm" fo:margin-right="0cm" fo:margin-top="0cm" fo:margin-bottom="0.247cm" fo:line-height="115%" fo:text-align="left" fo:text-indent="-0.499cm" style:text-autospace="none" loext:tab-stop-distance="0cm" style:writing-mode="lr-tb">
        <style:tab-stops>
          <style:tab-stop style:position="0.709cm"/>
        </style:tab-stops>
      </style:paragraph-properties>
      <style:text-properties style:font-family-generic="roman"/>
    </style:style>
    <style:style style:name="P30" style:family="paragraph" style:parent-style-name="Comment">
      <style:paragraph-properties fo:margin-left="0.101cm" fo:margin-right="0.101cm" fo:margin-top="0.42cm" fo:margin-bottom="0.349cm" fo:line-height="100%" fo:text-align="left" fo:text-indent="0cm" style:text-autospace="none" loext:tab-stop-distance="0cm" style:writing-mode="lr-tb">
        <style:tab-stops>
          <style:tab-stop style:position="0.709cm"/>
        </style:tab-stops>
      </style:paragraph-properties>
      <style:text-properties style:font-family-generic="roman"/>
    </style:style>
    <style:style style:name="P31" style:family="paragraph" style:parent-style-name="Comment">
      <style:paragraph-properties fo:margin-top="0.42cm" fo:margin-bottom="0.349cm" fo:text-align="left"/>
      <style:text-properties fo:font-size="10pt" style:font-size-asian="10pt" style:font-size-complex="10pt"/>
    </style:style>
    <style:style style:name="P32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loext:opacity="0%" fo:font-family="'Liberation Mono', 'Courier New'" style:font-family-generic="modern" style:font-pitch="fixed" fo:font-size="10pt" style:font-family-asian="'Noto Sans Mono CJK SC'" style:font-family-generic-asian="modern" style:font-pitch-asian="fixed" style:font-size-asian="10pt" style:font-family-complex="'Liberation Mono', 'Courier New'" style:font-family-generic-complex="modern" style:font-pitch-complex="fixed" style:font-size-complex="10pt"/>
    </style:style>
    <style:style style:name="T6" style:family="text">
      <style:text-properties style:use-window-font-color="true" loext:opacity="0%" style:font-family-generic="roman" fo:font-size="10pt" style:font-size-asian="10pt" style:font-size-complex="10pt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1322588270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fase-1-planejamento"/><text:bookmark-end text:name="entregas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3092517257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fase-2-estruturação"/><text:bookmark-end text:name="entregas-1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173808620155953" text:continue-list="list3092517257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fase-3-design-da-interface"/><text:bookmark-end text:name="entregas-2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173810020511919" text:continue-list="list173808620155953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<text:span text:style-name="T3">Navegação principal → diz respeito ao usuário se deslocar entre as páginas da aplicação (Header, Navbar, Footer). </text:span></text:p><text:p text:style-name="P26"><text:span text:style-name="T3">Componentes reutilizáveis → são blocos da interface que podem aparecer em várias páginas, mas não são necessariamente navegação.</text:span></text:p><text:p text:style-name="P26"><text:span text:style-name="T3"/></text:p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Construir o layout responsivo.<text:bookmark-end text:name="__DdeLink__5802_4055040419"/><office:annotation loext:resolved="false"><dc:creator>João António</dc:creator><dc:date>2026-07-11T17:32:44.033393973</dc:date><meta:creator-initials>JA</meta:creator-initials><text:p text:style-name="P28">Próximo passo</text:p><text:p text:style-name="P29"><text:span text:style-name="T4">Finalizar o componente </text:span><text:span text:style-name="T5">slider.js</text:span><text:span text:style-name="T6">, tornando-o totalmente funcional e reutilizável.</text:span></text:p><text:p text:style-name="P29"><text:span text:style-name="T6"/></text:p><text:p text:style-name="P30"><text:span text:style-name="T6">Só sera concluido quando implementarmos livros na biblioteca. </text:span></text:p><text:p text:style-name="P31">Depois deste, o próximo Sprint será deixá-lo com aparência de um slider moderno:</text:p><text:p text:style-name="P31">transição por arrastar (touch e mouse); </text:p><text:p text:style-name="P31">autoplay opcional; </text:p><text:p text:style-name="P31">indicadores (● ○ ○); </text:p><text:p text:style-name="P31">suporte a teclado; </text:p><text:p text:style-name="P31">renderização automática dos livros vindos do livros.json. </text:p><text:p text:style-name="P31">Esse será praticamente o componente final da Biblioteca Apócrifa.</text:p><text:p text:style-name="P31"/><text:p text:style-name="P31"/></office:annotation></text:p>
        </text:list-item>
        <text:list-item text:style-override="WWNum1022">
          <text:p text:style-name="P32"><text:bookmark-start text:name="__DdeLink__6839_2631705103"/>Implementar o carregamento dos dados em JSON.<text:bookmark-end text:name="__DdeLink__6839_2631705103"/></text:p>
        </text:list-item>
        <text:list-item text:style-override="WWNum1023">
          <text:p text:style-name="P33">Criar a arquitetura base em JavaScript.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fase-4-desenvolvimento-da-base"/><text:bookmark-end text:name="entregas-3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173810037840325" text:continue-list="list173810020511919" text:style-name="WWNum1024">
        <text:list-item>
          <text:p text:style-name="P34">Listagem dinâmica das obras.</text:p>
        </text:list-item>
        <text:list-item text:style-override="WWNum1025">
          <text:p text:style-name="P35">Sistema de pesquisa.</text:p>
        </text:list-item>
        <text:list-item text:style-override="WWNum1026">
          <text:p text:style-name="P36">Sistema de filtros.</text:p>
        </text:list-item>
        <text:list-item text:style-override="WWNum1027">
          <text:p text:style-name="P37">Cards dos livros.</text:p>
        </text:list-item>
        <text:list-item text:style-override="WWNum1028">
          <text:p text:style-name="P38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fase-5-biblioteca"/><text:bookmark-end text:name="entregas-4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173809611466853" text:continue-list="list173810037840325" text:style-name="WWNum1029">
        <text:list-item>
          <text:p text:style-name="P39">Carregar o conteúdo da obra dinamicamente.</text:p>
        </text:list-item>
        <text:list-item text:style-override="WWNum1030">
          <text:p text:style-name="P40">Dividir a obra em seções.</text:p>
        </text:list-item>
        <text:list-item text:style-override="WWNum1031">
          <text:p text:style-name="P41">Exibir comentários e exegeses.</text:p>
        </text:list-item>
        <text:list-item text:style-override="WWNum1032">
          <text:p text:style-name="P42">Navegação entre seções.</text:p>
        </text:list-item>
        <text:list-item text:style-override="WWNum1033">
          <text:p text:style-name="P43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fase-6-área-de-estudo"/><text:bookmark-end text:name="entregas-5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173808652791368" text:continue-list="list173809611466853" text:style-name="WWNum1034">
        <text:list-item>
          <text:p text:style-name="P44">Informações históricas da obra.</text:p>
        </text:list-item>
        <text:list-item text:style-override="WWNum1035">
          <text:p text:style-name="P45">Referências bibliográficas.</text:p>
        </text:list-item>
        <text:list-item text:style-override="WWNum1036">
          <text:p text:style-name="P46">Linha do tempo histórica.</text:p>
        </text:list-item>
        <text:list-item text:style-override="WWNum1037">
          <text:p text:style-name="P47">Glossário de termos.</text:p>
        </text:list-item>
        <text:list-item text:style-override="WWNum1038">
          <text:p text:style-name="P48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fase-7-recursos-de-estudo"/><text:bookmark-end text:name="entregas-6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173809288608702" text:continue-list="list173808652791368" text:style-name="WWNum1039">
        <text:list-item>
          <text:p text:style-name="P49">Página de perfil.</text:p>
        </text:list-item>
        <text:list-item text:style-override="WWNum1040">
          <text:p text:style-name="P50">Favoritos.</text:p>
        </text:list-item>
        <text:list-item text:style-override="WWNum1041">
          <text:p text:style-name="P51">Histórico de leitura.</text:p>
        </text:list-item>
        <text:list-item text:style-override="WWNum1042">
          <text:p text:style-name="P52">Progresso de estudo.</text:p>
        </text:list-item>
        <text:list-item text:style-override="WWNum1043">
          <text:p text:style-name="P53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fase-8-perfil-do-usuário"/><text:bookmark-end text:name="entregas-7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173808082371798" text:continue-list="list173809288608702" text:style-name="WWNum1044">
        <text:list-item>
          <text:p text:style-name="P54">Área de discussão.</text:p>
        </text:list-item>
        <text:list-item text:style-override="WWNum1045">
          <text:p text:style-name="P55">Comentários.</text:p>
        </text:list-item>
        <text:list-item text:style-override="WWNum1046">
          <text:p text:style-name="P56">Recomendações de leitura.</text:p>
        </text:list-item>
        <text:list-item text:style-override="WWNum1047">
          <text:p text:style-name="P57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fase-9-comunidade"/><text:bookmark-end text:name="entregas-8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173808992141340" text:continue-list="list173808082371798" text:style-name="WWNum1048">
        <text:list-item>
          <text:p text:style-name="P58">Configurar o Manifest.</text:p>
        </text:list-item>
        <text:list-item text:style-override="WWNum1049">
          <text:p text:style-name="P59">Implementar o Service Worker.</text:p>
        </text:list-item>
        <text:list-item text:style-override="WWNum1050">
          <text:p text:style-name="P60">Cache offline.</text:p>
        </text:list-item>
        <text:list-item text:style-override="WWNum1051">
          <text:p text:style-name="P61">Instalação da aplicação.</text:p>
        </text:list-item>
        <text:list-item text:style-override="WWNum1052">
          <text:p text:style-name="P62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fase-10-progressive-web-app-pwa"/><text:bookmark-end text:name="entregas-9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173810160245087" text:continue-list="list173808992141340" text:style-name="WWNum1053">
        <text:list-item>
          <text:p text:style-name="P63">Testes de navegação.</text:p>
        </text:list-item>
        <text:list-item text:style-override="WWNum1054">
          <text:p text:style-name="P64">Testes de responsividade.</text:p>
        </text:list-item>
        <text:list-item text:style-override="WWNum1055">
          <text:p text:style-name="P65">Testes de acessibilidade.</text:p>
        </text:list-item>
        <text:list-item text:style-override="WWNum1056">
          <text:p text:style-name="P66">Testes de desempenho.</text:p>
        </text:list-item>
        <text:list-item text:style-override="WWNum1057">
          <text:p text:style-name="P67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fase-11-testes"/><text:bookmark-end text:name="entregas-10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173808531096342" text:continue-list="list173810160245087" text:style-name="WWNum1058">
        <text:list-item>
          <text:p text:style-name="P68">Refatoração do código.</text:p>
        </text:list-item>
        <text:list-item text:style-override="WWNum1059">
          <text:p text:style-name="P69">Organização dos arquivos.</text:p>
        </text:list-item>
        <text:list-item text:style-override="WWNum1060">
          <text:p text:style-name="P70">Remoção de código obsoleto.</text:p>
        </text:list-item>
        <text:list-item text:style-override="WWNum1061">
          <text:p text:style-name="P71">Otimização de desempenho.</text:p>
        </text:list-item>
        <text:list-item text:style-override="WWNum1062">
          <text:p text:style-name="P72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fase-12-otimização"/><text:bookmark-end text:name="entregas-11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173808658203652" text:continue-list="list173808531096342" text:style-name="WWNum1063">
        <text:list-item>
          <text:p text:style-name="P73">Publicação no GitHub.</text:p>
        </text:list-item>
        <text:list-item text:style-override="WWNum1064">
          <text:p text:style-name="P74">Publicação no GitHub Pages.</text:p>
        </text:list-item>
        <text:list-item text:style-override="WWNum1065">
          <text:p text:style-name="P75">Revisão do README.</text:p>
        </text:list-item>
        <text:list-item text:style-override="WWNum1066">
          <text:p text:style-name="P76">Documentação final.</text:p>
        </text:list-item>
        <text:list-item text:style-override="WWNum1067">
          <text:p text:style-name="P77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fase-13-publicação"/><text:bookmark-end text:name="entregas-12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8">autenticação de usuários;</text:p>
        </text:list-item>
        <text:list-item>
          <text:p text:style-name="P78">sincronização em nuvem;</text:p>
        </text:list-item>
        <text:list-item>
          <text:p text:style-name="P78">banco de dados;</text:p>
        </text:list-item>
        <text:list-item>
          <text:p text:style-name="P78">comparação entre traduções;</text:p>
        </text:list-item>
        <text:list-item>
          <text:p text:style-name="P78">anotações pessoais;</text:p>
        </text:list-item>
        <text:list-item>
          <text:p text:style-name="P78">exportação de trechos;</text:p>
        </text:list-item>
        <text:list-item>
          <text:p text:style-name="P78">pesquisa avançada;</text:p>
        </text:list-item>
        <text:list-item>
          <text:p text:style-name="P78">inteligência artificial para apoio aos estudos;</text:p>
        </text:list-item>
        <text:list-item>
          <text:p text:style-name="P78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visão-de-longo-prazo"/><text:bookmark-end text:name="objetivo-da-versão-1.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11T17:38:05.646276888</dc:date>
    <meta:generator>LibreOffice/26.2.4.2$Linux_X86_64 LibreOffice_project/620$Build-2</meta:generator>
    <meta:editing-duration>PT5H12M24S</meta:editing-duration>
    <dc:creator>João António</dc:creator>
    <meta:editing-cycles>6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