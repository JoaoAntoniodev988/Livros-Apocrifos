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First_20_Paragraph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Compact" style:list-style-name="WWNum100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7" style:family="paragraph" style:parent-style-name="Compact" style:list-style-name="WWNum100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8" style:family="paragraph" style:parent-style-name="Compact" style:list-style-name="WWNum100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9" style:family="paragraph" style:parent-style-name="Compact" style:list-style-name="WWNum100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0" style:family="paragraph" style:parent-style-name="Compact" style:list-style-name="WWNum100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1" style:family="paragraph" style:parent-style-name="Compact" style:list-style-name="WWNum100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2" style:family="paragraph" style:parent-style-name="Compact" style:list-style-name="WWNum100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3" style:family="paragraph" style:parent-style-name="Compact" style:list-style-name="WWNum100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 style:parent-style-name="Compact" style:list-style-name="WWNum100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 style:parent-style-name="Compact" style:list-style-name="WWNum1010"/>
    <style:style style:name="P16" style:family="paragraph" style:parent-style-name="Compact" style:list-style-name="WWNum101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7" style:family="paragraph" style:parent-style-name="Compact" style:list-style-name="WWNum101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8" style:family="paragraph" style:parent-style-name="Compact" style:list-style-name="WWNum101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9" style:family="paragraph" style:parent-style-name="Compact" style:list-style-name="WWNum101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0" style:family="paragraph" style:parent-style-name="Compact" style:list-style-name="WWNum101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1" style:family="paragraph" style:parent-style-name="Compact" style:list-style-name="WWNum101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2" style:family="paragraph" style:parent-style-name="Compact" style:list-style-name="WWNum101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3" style:family="paragraph" style:parent-style-name="Compact" style:list-style-name="WWNum101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4" style:family="paragraph" style:parent-style-name="Compact" style:list-style-name="WWNum101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5" style:family="paragraph" style:parent-style-name="Compact" style:list-style-name="WWNum1020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6" style:family="paragraph" style:parent-style-name="Comment">
      <style:paragraph-properties fo:margin-top="0.42cm" fo:margin-bottom="0.349cm"/>
      <style:text-properties fo:font-size="10pt" style:font-size-asian="10pt" style:font-size-complex="10pt"/>
    </style:style>
    <style:style style:name="P27" style:family="paragraph" style:parent-style-name="Compact" style:list-style-name="WWNum1021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Compact" style:list-style-name="WWNum1022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Compact" style:list-style-name="WWNum1023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Compact" style:list-style-name="WWNum1024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Compact" style:list-style-name="WWNum1025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Compact" style:list-style-name="WWNum1026"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Compact" style:list-style-name="WWNum1027"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Compact" style:list-style-name="WWNum1028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Compact" style:list-style-name="WWNum1029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Compact" style:list-style-name="WWNum1030"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Compact" style:list-style-name="WWNum1031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Compact" style:list-style-name="WWNum1032"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Compact" style:list-style-name="WWNum1033"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Compact" style:list-style-name="WWNum1034"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Compact" style:list-style-name="WWNum1035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Compact" style:list-style-name="WWNum1036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Compact" style:list-style-name="WWNum1037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Compact" style:list-style-name="WWNum1038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Compact" style:list-style-name="WWNum1039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Compact" style:list-style-name="WWNum1040"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Compact" style:list-style-name="WWNum1041"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Compact" style:list-style-name="WWNum1042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Compact" style:list-style-name="WWNum1043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Compact" style:list-style-name="WWNum1044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Compact" style:list-style-name="WWNum1045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Compact" style:list-style-name="WWNum1046"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Compact" style:list-style-name="WWNum1047"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Compact" style:list-style-name="WWNum1048"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Compact" style:list-style-name="WWNum1049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Compact" style:list-style-name="WWNum1050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Compact" style:list-style-name="WWNum1051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Compact" style:list-style-name="WWNum1052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Compact" style:list-style-name="WWNum1053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Compact" style:list-style-name="WWNum1054"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Compact" style:list-style-name="WWNum1055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Compact" style:list-style-name="WWNum1056"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Compact" style:list-style-name="WWNum1057"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Compact" style:list-style-name="WWNum1058"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Compact" style:list-style-name="WWNum1059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Compact" style:list-style-name="WWNum1060"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Compact" style:list-style-name="WWNum1061"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Compact" style:list-style-name="WWNum1062"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Compact" style:list-style-name="WWNum1063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Compact" style:list-style-name="WWNum1064"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Compact" style:list-style-name="WWNum1065"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Compact" style:list-style-name="WWNum1066">
      <style:text-properties fo:language="zxx" fo:country="none" style:language-asian="zxx" style:country-asian="none" style:language-complex="zxx" style:country-complex="none"/>
    </style:style>
    <style:style style:name="P73" style:family="paragraph" style:parent-style-name="Compact" style:list-style-name="WWNum1067">
      <style:text-properties fo:language="zxx" fo:country="none" style:language-asian="zxx" style:country-asian="none" style:language-complex="zxx" style:country-complex="none"/>
    </style:style>
    <style:style style:name="P74" style:family="paragraph" style:parent-style-name="Compact" style:list-style-name="WWNum1068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2" style:family="text">
      <style:text-properties fo:language="pt" fo:country="BR" style:script-type="latin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roadmap-biblioteca-apócrifa"/>Roadmap — Biblioteca Apócrifa</text:h>
      <text:p text:style-name="P2">O desenvolvimento da Biblioteca Apócrifa seguirá uma abordagem incremental, permitindo validar cada etapa antes de avançar para a próxima.Cada fase representa uma entrega funcional da plataforma, facilitando testes, manutenção e evolução do projeto.</text:p>
      <text:p text:style-name="P3"><draw:rect text:anchor-type="as-char" style:rel-width="100%" draw:z-index="0" draw:name="Forma1" draw:style-name="gr1" draw:text-style-name="P4" svg:width="16.511cm" svg:height="0.054cm"><text:p/></draw:rect><text:bookmark-end text:name="roadmap-biblioteca-apócrifa"/></text:p>
      <text:h text:style-name="P1" text:outline-level="1"><text:bookmark-start text:name="fase-1-planejamento"/>Fase 1 — Planejamento</text:h>
      <text:p text:style-name="P2">Objetivo: definir a visão do projeto, seus requisitos e a estratégia de desenvolvimento.</text:p>
      <text:h text:style-name="P5" text:outline-level="2"><text:bookmark-start text:name="entregas"/>Entregas</text:h>
      <text:list xml:id="list2840135718" text:style-name="WWNum1001">
        <text:list-item>
          <text:p text:style-name="P6">Definição da ideia do projeto.</text:p>
        </text:list-item>
        <text:list-item text:style-override="WWNum1002">
          <text:p text:style-name="P7">Levantamento dos requisitos funcionais.</text:p>
        </text:list-item>
        <text:list-item text:style-override="WWNum1003">
          <text:p text:style-name="P8">Levantamento dos requisitos não funcionais.</text:p>
        </text:list-item>
        <text:list-item text:style-override="WWNum1004">
          <text:p text:style-name="P9">Definição das regras de negócio.</text:p>
        </text:list-item>
        <text:list-item text:style-override="WWNum1005">
          <text:p text:style-name="P10">Elaboração do roadmap.</text:p>
        </text:list-item>
      </text:list>
      <text:p text:style-name="P3"><draw:rect text:anchor-type="as-char" style:rel-width="100%" draw:z-index="1" draw:name="Forma2" draw:style-name="gr1" draw:text-style-name="P4" svg:width="16.511cm" svg:height="0.054cm"><text:p/></draw:rect><text:bookmark-end text:name="entregas"/><text:bookmark-end text:name="fase-1-planejamento"/></text:p>
      <text:h text:style-name="P1" text:outline-level="1"><text:bookmark-start text:name="fase-2-estruturação"/>Fase 2 — Estruturação</text:h>
      <text:p text:style-name="P2">Objetivo: organizar a arquitetura da aplicação antes do desenvolvimento.</text:p>
      <text:h text:style-name="P5" text:outline-level="2"><text:bookmark-start text:name="entregas-1"/>Entregas</text:h>
      <text:list xml:id="list2582276315" text:style-name="WWNum1006">
        <text:list-item>
          <text:p text:style-name="P11">Definir a estrutura definitiva das pastas.</text:p>
        </text:list-item>
        <text:list-item text:style-override="WWNum1007">
          <text:p text:style-name="P12">Organizar os arquivos HTML.</text:p>
        </text:list-item>
        <text:list-item text:style-override="WWNum1008">
          <text:p text:style-name="P13">Organizar os arquivos CSS.</text:p>
        </text:list-item>
        <text:list-item text:style-override="WWNum1009">
          <text:p text:style-name="P14">Organizar os arquivos JavaScript.</text:p>
        </text:list-item>
        <text:list-item text:style-override="WWNum1010">
          <text:p text:style-name="P15"><text:span text:style-name="T1">Criar a estrutura inicial do </text:span><text:span text:style-name="Verbatim_20_Char"><text:span text:style-name="T1">livros.json</text:span></text:span><text:span text:style-name="T1">.</text:span></text:p>
        </text:list-item>
        <text:list-item text:style-override="WWNum1011">
          <text:p text:style-name="P16">Definir o padrão dos componentes reutilizáveis.</text:p>
        </text:list-item>
        <text:list-item text:style-override="WWNum1012">
          <text:p text:style-name="P17">Atualizar a documentação da arquitetura.</text:p>
        </text:list-item>
      </text:list>
      <text:p text:style-name="P3"><draw:rect text:anchor-type="as-char" style:rel-width="100%" draw:z-index="2" draw:name="Forma3" draw:style-name="gr1" draw:text-style-name="P4" svg:width="16.511cm" svg:height="0.054cm"><text:p/></draw:rect><text:bookmark-end text:name="entregas-1"/><text:bookmark-end text:name="fase-2-estruturação"/></text:p>
      <text:h text:style-name="P1" text:outline-level="1"><text:bookmark-start text:name="fase-3-design-da-interface"/><text:soft-page-break/>Fase 3 — Design da Interface</text:h>
      <text:p text:style-name="P2">Objetivo: criar uma identidade visual consistente para a plataforma.</text:p>
      <text:h text:style-name="P5" text:outline-level="2"><text:bookmark-start text:name="entregas-2"/>Entregas</text:h>
      <text:list xml:id="list220646431764364" text:continue-list="list2582276315" text:style-name="WWNum1013">
        <text:list-item>
          <text:p text:style-name="P18">Definir a identidade visual.</text:p>
        </text:list-item>
        <text:list-item text:style-override="WWNum1014">
          <text:p text:style-name="P19">Criar a paleta de cores.</text:p>
        </text:list-item>
        <text:list-item text:style-override="WWNum1015">
          <text:p text:style-name="P20">Definir a tipografia.</text:p>
        </text:list-item>
        <text:list-item text:style-override="WWNum1016">
          <text:p text:style-name="P21">Criar os componentes visuais.</text:p>
        </text:list-item>
        <text:list-item text:style-override="WWNum1017">
          <text:p text:style-name="P22">Elaborar o Design System.</text:p>
        </text:list-item>
        <text:list-item text:style-override="WWNum1018">
          <text:p text:style-name="P23">Produzir os wireframes das principais páginas.</text:p>
        </text:list-item>
      </text:list>
      <text:p text:style-name="P3"><draw:rect text:anchor-type="as-char" style:rel-width="100%" draw:z-index="3" draw:name="Forma4" draw:style-name="gr1" draw:text-style-name="P4" svg:width="16.511cm" svg:height="0.054cm"><text:p/></draw:rect><text:bookmark-end text:name="entregas-2"/><text:bookmark-end text:name="fase-3-design-da-interface"/></text:p>
      <text:h text:style-name="P1" text:outline-level="1"><text:bookmark-start text:name="fase-4-desenvolvimento-da-base"/>Fase 4 — Desenvolvimento da Base</text:h>
      <text:p text:style-name="P2">Objetivo: construir a estrutura principal da aplicação.</text:p>
      <text:h text:style-name="P5" text:outline-level="2"><text:bookmark-start text:name="entregas-3"/>Entregas</text:h>
      <text:list xml:id="list220644423710155" text:continue-list="list220646431764364" text:style-name="WWNum1019">
        <text:list-item>
          <text:p text:style-name="P24"><office:annotation office:name="__Annotation__402_4055040419" loext:resolved="true"><dc:creator>João António</dc:creator><dc:date>2026-07-09T13:39:19.613468570</dc:date><meta:creator-initials>JA</meta:creator-initials><text:p text:style-name="Comment">Criou-se e organizou-se todo conteudo das principais paginais html. Como também inplementou-se todo css da pasta assets e o css pagina html. </text:p><text:p text:style-name="Comment"/></office:annotation>Desenvolver a página inicial.<office:annotation-end office:name="__Annotation__402_4055040419"/></text:p>
        </text:list-item>
        <text:list-item text:style-override="WWNum1020">
          <text:p text:style-name="P25"><office:annotation office:name="__Annotation__403_4055040419" loext:resolved="true"><dc:creator>João António</dc:creator><dc:date>2026-07-09T13:45:00.101402327</dc:date><meta:creator-initials>JA</meta:creator-initials><text:p text:style-name="Comment"><text:span text:style-name="T2">Criou-se os conteudos de <text:s/>todos os componetes reutilizaveis <text:s/>e o seu javaScrit para a rederização. Ou seja fez-se com que os componentes como header e footer aparecessem dinamicamente em todas as</text:span> paginas principais. Como tambem se inplementou um Js, navigation.js para mostras <text:s/>a pagina em que o usuario está.. </text:p><text:p text:style-name="P26">Navegação principal → diz respeito ao usuário se deslocar entre as páginas da aplicação (Header, Navbar, Footer). </text:p><text:p text:style-name="P26">Componentes reutilizáveis → são blocos da interface que podem aparecer em várias páginas, mas não são necessariamente navegação.</text:p><text:p text:style-name="P26"/></office:annotation>Desenvolver a navegação principal.<office:annotation-end office:name="__Annotation__403_4055040419"/></text:p>
        </text:list-item>
        <text:list-item text:style-override="WWNum1021">
          <text:p text:style-name="P27"><text:bookmark-start text:name="__DdeLink__5802_4055040419"/>Construir o layout responsivo.<text:bookmark-end text:name="__DdeLink__5802_4055040419"/></text:p>
        </text:list-item>
        <text:list-item text:style-override="WWNum1022">
          <text:p text:style-name="P28">Implementar o carregamento dos dados em JSON.</text:p>
        </text:list-item>
        <text:list-item text:style-override="WWNum1023">
          <text:p text:style-name="P29">Criar a arquitetura base em JavaScript.</text:p>
        </text:list-item>
      </text:list>
      <text:p text:style-name="P3"><draw:rect text:anchor-type="as-char" style:rel-width="100%" draw:z-index="4" draw:name="Forma5" draw:style-name="gr1" draw:text-style-name="P4" svg:width="16.511cm" svg:height="0.054cm"><text:p/></draw:rect><text:bookmark-end text:name="entregas-3"/><text:bookmark-end text:name="fase-4-desenvolvimento-da-base"/></text:p>
      <text:h text:style-name="P1" text:outline-level="1"><text:bookmark-start text:name="fase-5-biblioteca"/>Fase 5 — Biblioteca</text:h>
      <text:p text:style-name="P2">Objetivo: disponibilizar o catálogo digital das obras.</text:p>
      <text:h text:style-name="P5" text:outline-level="2"><text:bookmark-start text:name="entregas-4"/>Entregas</text:h>
      <text:list xml:id="list220644550306019" text:continue-list="list220644423710155" text:style-name="WWNum1024">
        <text:list-item>
          <text:p text:style-name="P30">Listagem dinâmica das obras.</text:p>
        </text:list-item>
        <text:list-item text:style-override="WWNum1025">
          <text:p text:style-name="P31">Sistema de pesquisa.</text:p>
        </text:list-item>
        <text:list-item text:style-override="WWNum1026">
          <text:p text:style-name="P32">Sistema de filtros.</text:p>
        </text:list-item>
        <text:list-item text:style-override="WWNum1027">
          <text:p text:style-name="P33">Cards dos livros.</text:p>
        </text:list-item>
        <text:list-item text:style-override="WWNum1028">
          <text:p text:style-name="P34">Página de detalhes da obra.</text:p>
        </text:list-item>
      </text:list>
      <text:p text:style-name="P3"><draw:rect text:anchor-type="as-char" style:rel-width="100%" draw:z-index="5" draw:name="Forma6" draw:style-name="gr1" draw:text-style-name="P4" svg:width="16.511cm" svg:height="0.054cm"><text:p/></draw:rect><text:bookmark-end text:name="entregas-4"/><text:bookmark-end text:name="fase-5-biblioteca"/></text:p>
      <text:h text:style-name="P1" text:outline-level="1"><text:bookmark-start text:name="fase-6-área-de-estudo"/><text:soft-page-break/>Fase 6 — Área de Estudo</text:h>
      <text:p text:style-name="P2">Objetivo: transformar a leitura em uma experiência de aprendizado.</text:p>
      <text:h text:style-name="P5" text:outline-level="2"><text:bookmark-start text:name="entregas-5"/>Entregas</text:h>
      <text:list xml:id="list220644456380763" text:continue-list="list220644550306019" text:style-name="WWNum1029">
        <text:list-item>
          <text:p text:style-name="P35">Carregar o conteúdo da obra dinamicamente.</text:p>
        </text:list-item>
        <text:list-item text:style-override="WWNum1030">
          <text:p text:style-name="P36">Dividir a obra em seções.</text:p>
        </text:list-item>
        <text:list-item text:style-override="WWNum1031">
          <text:p text:style-name="P37">Exibir comentários e exegeses.</text:p>
        </text:list-item>
        <text:list-item text:style-override="WWNum1032">
          <text:p text:style-name="P38">Navegação entre seções.</text:p>
        </text:list-item>
        <text:list-item text:style-override="WWNum1033">
          <text:p text:style-name="P39">Melhorar a experiência de leitura.</text:p>
        </text:list-item>
      </text:list>
      <text:p text:style-name="P3"><draw:rect text:anchor-type="as-char" style:rel-width="100%" draw:z-index="6" draw:name="Forma7" draw:style-name="gr1" draw:text-style-name="P4" svg:width="16.511cm" svg:height="0.054cm"><text:p/></draw:rect><text:bookmark-end text:name="entregas-5"/><text:bookmark-end text:name="fase-6-área-de-estudo"/></text:p>
      <text:h text:style-name="P1" text:outline-level="1"><text:bookmark-start text:name="fase-7-recursos-de-estudo"/>Fase 7 — Recursos de Estudo</text:h>
      <text:p text:style-name="P2">Objetivo: enriquecer o conteúdo apresentado ao usuário.</text:p>
      <text:h text:style-name="P5" text:outline-level="2"><text:bookmark-start text:name="entregas-6"/>Entregas</text:h>
      <text:list xml:id="list220645966579098" text:continue-list="list220644456380763" text:style-name="WWNum1034">
        <text:list-item>
          <text:p text:style-name="P40">Informações históricas da obra.</text:p>
        </text:list-item>
        <text:list-item text:style-override="WWNum1035">
          <text:p text:style-name="P41">Referências bibliográficas.</text:p>
        </text:list-item>
        <text:list-item text:style-override="WWNum1036">
          <text:p text:style-name="P42">Linha do tempo histórica.</text:p>
        </text:list-item>
        <text:list-item text:style-override="WWNum1037">
          <text:p text:style-name="P43">Glossário de termos.</text:p>
        </text:list-item>
        <text:list-item text:style-override="WWNum1038">
          <text:p text:style-name="P44">Referências cruzadas entre obras.</text:p>
        </text:list-item>
      </text:list>
      <text:p text:style-name="P3"><draw:rect text:anchor-type="as-char" style:rel-width="100%" draw:z-index="7" draw:name="Forma8" draw:style-name="gr1" draw:text-style-name="P4" svg:width="16.511cm" svg:height="0.054cm"><text:p/></draw:rect><text:bookmark-end text:name="entregas-6"/><text:bookmark-end text:name="fase-7-recursos-de-estudo"/></text:p>
      <text:h text:style-name="P1" text:outline-level="1"><text:bookmark-start text:name="fase-8-perfil-do-usuário"/>Fase 8 — Perfil do Usuário</text:h>
      <text:p text:style-name="P2">Objetivo: personalizar a experiência de estudo.</text:p>
      <text:h text:style-name="P5" text:outline-level="2"><text:bookmark-start text:name="entregas-7"/>Entregas</text:h>
      <text:list xml:id="list220645807297797" text:continue-list="list220645966579098" text:style-name="WWNum1039">
        <text:list-item>
          <text:p text:style-name="P45">Página de perfil.</text:p>
        </text:list-item>
        <text:list-item text:style-override="WWNum1040">
          <text:p text:style-name="P46">Favoritos.</text:p>
        </text:list-item>
        <text:list-item text:style-override="WWNum1041">
          <text:p text:style-name="P47">Histórico de leitura.</text:p>
        </text:list-item>
        <text:list-item text:style-override="WWNum1042">
          <text:p text:style-name="P48">Progresso de estudo.</text:p>
        </text:list-item>
        <text:list-item text:style-override="WWNum1043">
          <text:p text:style-name="P49">Configurações pessoais.</text:p>
        </text:list-item>
      </text:list>
      <text:p text:style-name="P3"><draw:rect text:anchor-type="as-char" style:rel-width="100%" draw:z-index="8" draw:name="Forma9" draw:style-name="gr1" draw:text-style-name="P4" svg:width="16.511cm" svg:height="0.054cm"><text:p/></draw:rect><text:bookmark-end text:name="entregas-7"/><text:bookmark-end text:name="fase-8-perfil-do-usuário"/></text:p>
      <text:h text:style-name="P1" text:outline-level="1"><text:bookmark-start text:name="fase-9-comunidade"/><text:soft-page-break/>Fase 9 — Comunidade</text:h>
      <text:p text:style-name="P2">Objetivo: incentivar a troca de conhecimento entre os usuários.</text:p>
      <text:h text:style-name="P5" text:outline-level="2"><text:bookmark-start text:name="entregas-8"/>Entregas</text:h>
      <text:list xml:id="list220645916882326" text:continue-list="list220645807297797" text:style-name="WWNum1044">
        <text:list-item>
          <text:p text:style-name="P50">Área de discussão.</text:p>
        </text:list-item>
        <text:list-item text:style-override="WWNum1045">
          <text:p text:style-name="P51">Comentários.</text:p>
        </text:list-item>
        <text:list-item text:style-override="WWNum1046">
          <text:p text:style-name="P52">Recomendações de leitura.</text:p>
        </text:list-item>
        <text:list-item text:style-override="WWNum1047">
          <text:p text:style-name="P53">Compartilhamento de conteúdo.</text:p>
        </text:list-item>
      </text:list>
      <text:p text:style-name="P3"><draw:rect text:anchor-type="as-char" style:rel-width="100%" draw:z-index="9" draw:name="Forma10" draw:style-name="gr1" draw:text-style-name="P4" svg:width="16.511cm" svg:height="0.054cm"><text:p/></draw:rect><text:bookmark-end text:name="entregas-8"/><text:bookmark-end text:name="fase-9-comunidade"/></text:p>
      <text:h text:style-name="P1" text:outline-level="1"><text:bookmark-start text:name="fase-10-progressive-web-app-pwa"/>Fase 10 — Progressive Web App (PWA)</text:h>
      <text:p text:style-name="P2">Objetivo: tornar a plataforma instalável e funcional offline.</text:p>
      <text:h text:style-name="P5" text:outline-level="2"><text:bookmark-start text:name="entregas-9"/>Entregas</text:h>
      <text:list xml:id="list220645955526334" text:continue-list="list220645916882326" text:style-name="WWNum1048">
        <text:list-item>
          <text:p text:style-name="P54">Configurar o Manifest.</text:p>
        </text:list-item>
        <text:list-item text:style-override="WWNum1049">
          <text:p text:style-name="P55">Implementar o Service Worker.</text:p>
        </text:list-item>
        <text:list-item text:style-override="WWNum1050">
          <text:p text:style-name="P56">Cache offline.</text:p>
        </text:list-item>
        <text:list-item text:style-override="WWNum1051">
          <text:p text:style-name="P57">Instalação da aplicação.</text:p>
        </text:list-item>
        <text:list-item text:style-override="WWNum1052">
          <text:p text:style-name="P58">Atualização automática dos arquivos.</text:p>
        </text:list-item>
      </text:list>
      <text:p text:style-name="P3"><draw:rect text:anchor-type="as-char" style:rel-width="100%" draw:z-index="10" draw:name="Forma11" draw:style-name="gr1" draw:text-style-name="P4" svg:width="16.511cm" svg:height="0.054cm"><text:p/></draw:rect><text:bookmark-end text:name="entregas-9"/><text:bookmark-end text:name="fase-10-progressive-web-app-pwa"/></text:p>
      <text:h text:style-name="P1" text:outline-level="1"><text:bookmark-start text:name="fase-11-testes"/>Fase 11 — Testes</text:h>
      <text:p text:style-name="P2">Objetivo: validar a estabilidade da plataforma.</text:p>
      <text:h text:style-name="P5" text:outline-level="2"><text:bookmark-start text:name="entregas-10"/>Entregas</text:h>
      <text:list xml:id="list220646460888300" text:continue-list="list220645955526334" text:style-name="WWNum1053">
        <text:list-item>
          <text:p text:style-name="P59">Testes de navegação.</text:p>
        </text:list-item>
        <text:list-item text:style-override="WWNum1054">
          <text:p text:style-name="P60">Testes de responsividade.</text:p>
        </text:list-item>
        <text:list-item text:style-override="WWNum1055">
          <text:p text:style-name="P61">Testes de acessibilidade.</text:p>
        </text:list-item>
        <text:list-item text:style-override="WWNum1056">
          <text:p text:style-name="P62">Testes de desempenho.</text:p>
        </text:list-item>
        <text:list-item text:style-override="WWNum1057">
          <text:p text:style-name="P63">Correção de erros encontrados.</text:p>
        </text:list-item>
      </text:list>
      <text:p text:style-name="P3"><draw:rect text:anchor-type="as-char" style:rel-width="100%" draw:z-index="11" draw:name="Forma12" draw:style-name="gr1" draw:text-style-name="P4" svg:width="16.511cm" svg:height="0.054cm"><text:p/></draw:rect><text:bookmark-end text:name="entregas-10"/><text:bookmark-end text:name="fase-11-testes"/></text:p>
      <text:h text:style-name="P1" text:outline-level="1"><text:bookmark-start text:name="fase-12-otimização"/><text:soft-page-break/>Fase 12 — Otimização</text:h>
      <text:p text:style-name="P2">Objetivo: melhorar a qualidade do código e da aplicação.</text:p>
      <text:h text:style-name="P5" text:outline-level="2"><text:bookmark-start text:name="entregas-11"/>Entregas</text:h>
      <text:list xml:id="list220646389563773" text:continue-list="list220646460888300" text:style-name="WWNum1058">
        <text:list-item>
          <text:p text:style-name="P64">Refatoração do código.</text:p>
        </text:list-item>
        <text:list-item text:style-override="WWNum1059">
          <text:p text:style-name="P65">Organização dos arquivos.</text:p>
        </text:list-item>
        <text:list-item text:style-override="WWNum1060">
          <text:p text:style-name="P66">Remoção de código obsoleto.</text:p>
        </text:list-item>
        <text:list-item text:style-override="WWNum1061">
          <text:p text:style-name="P67">Otimização de desempenho.</text:p>
        </text:list-item>
        <text:list-item text:style-override="WWNum1062">
          <text:p text:style-name="P68">Revisão da documentação.</text:p>
        </text:list-item>
      </text:list>
      <text:p text:style-name="P3"><draw:rect text:anchor-type="as-char" style:rel-width="100%" draw:z-index="12" draw:name="Forma13" draw:style-name="gr1" draw:text-style-name="P4" svg:width="16.511cm" svg:height="0.054cm"><text:p/></draw:rect><text:bookmark-end text:name="entregas-11"/><text:bookmark-end text:name="fase-12-otimização"/></text:p>
      <text:h text:style-name="P1" text:outline-level="1"><text:bookmark-start text:name="fase-13-publicação"/>Fase 13 — Publicação</text:h>
      <text:p text:style-name="P2">Objetivo: disponibilizar a plataforma para utilização pública.</text:p>
      <text:h text:style-name="P5" text:outline-level="2"><text:bookmark-start text:name="entregas-12"/>Entregas</text:h>
      <text:list xml:id="list220646214652761" text:continue-list="list220646389563773" text:style-name="WWNum1063">
        <text:list-item>
          <text:p text:style-name="P69">Publicação no GitHub.</text:p>
        </text:list-item>
        <text:list-item text:style-override="WWNum1064">
          <text:p text:style-name="P70">Publicação no GitHub Pages.</text:p>
        </text:list-item>
        <text:list-item text:style-override="WWNum1065">
          <text:p text:style-name="P71">Revisão do README.</text:p>
        </text:list-item>
        <text:list-item text:style-override="WWNum1066">
          <text:p text:style-name="P72">Documentação final.</text:p>
        </text:list-item>
        <text:list-item text:style-override="WWNum1067">
          <text:p text:style-name="P73">Preparação para futuras versões.</text:p>
        </text:list-item>
      </text:list>
      <text:p text:style-name="P3"><draw:rect text:anchor-type="as-char" style:rel-width="100%" draw:z-index="13" draw:name="Forma14" draw:style-name="gr1" draw:text-style-name="P4" svg:width="16.511cm" svg:height="0.054cm"><text:p/></draw:rect><text:bookmark-end text:name="entregas-12"/><text:bookmark-end text:name="fase-13-publicação"/></text:p>
      <text:h text:style-name="P1" text:outline-level="1"><text:bookmark-start text:name="visão-de-longo-prazo"/>Visão de Longo Prazo</text:h>
      <text:p text:style-name="P2">Após a conclusão da primeira versão, a plataforma poderá evoluir com funcionalidades como:</text:p>
      <text:list text:style-name="WWNum1068">
        <text:list-item>
          <text:p text:style-name="P74">autenticação de usuários;</text:p>
        </text:list-item>
        <text:list-item>
          <text:p text:style-name="P74">sincronização em nuvem;</text:p>
        </text:list-item>
        <text:list-item>
          <text:p text:style-name="P74">banco de dados;</text:p>
        </text:list-item>
        <text:list-item>
          <text:p text:style-name="P74">comparação entre traduções;</text:p>
        </text:list-item>
        <text:list-item>
          <text:p text:style-name="P74">anotações pessoais;</text:p>
        </text:list-item>
        <text:list-item>
          <text:p text:style-name="P74">exportação de trechos;</text:p>
        </text:list-item>
        <text:list-item>
          <text:p text:style-name="P74">pesquisa avançada;</text:p>
        </text:list-item>
        <text:list-item>
          <text:p text:style-name="P74">inteligência artificial para apoio aos estudos;</text:p>
        </text:list-item>
        <text:list-item>
          <text:p text:style-name="P74"><text:soft-page-break/>aplicativo para dispositivos móveis.</text:p>
        </text:list-item>
      </text:list>
      <text:p text:style-name="P3"><draw:rect text:anchor-type="as-char" style:rel-width="100%" draw:z-index="14" draw:name="Forma15" draw:style-name="gr1" draw:text-style-name="P4" svg:width="16.511cm" svg:height="0.054cm"><text:p/></draw:rect></text:p>
      <text:h text:style-name="P5" text:outline-level="2"><text:bookmark-start text:name="objetivo-da-versão-1.0"/>Objetivo da Versão 1.0</text:h>
      <text:p text:style-name="P2">Ao final deste roadmap, a Biblioteca Apócrifa deverá oferecer uma plataforma de estudo completa, permitindo que qualquer usuário navegue pelo catálogo, consulte informações históricas, leia obras organizadas por seções e aprofunde seus conhecimentos por meio de comentários e recursos de apoio, tudo em uma interface moderna, responsiva e preparada para futuras expansões.<text:bookmark-end text:name="objetivo-da-versão-1.0"/><text:bookmark-end text:name="visão-de-longo-prazo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family-complex="'Noto Sans'" style:font-family-generic-complex="system" style:font-pitch-complex="variable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style:font-name-complex="Symbol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complex="Wingdings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>
      <style:text-properties style:font-name-complex="Wingdings" style:font-family-complex="Wingdings" style:font-family-generic-complex="system" style:font-pitch-complex="variable"/>
    </style:style>
    <style:style style:name="ListLabel_20_619" style:display-name="ListLabel 619" style:family="text">
      <style:text-properties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bullet text:level="1" text:style-name="ListLabel_20_1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0">
      <text:list-level-style-bullet text:level="1" text:style-name="ListLabel_20_1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1">
      <text:list-level-style-bullet text:level="1" text:style-name="ListLabel_20_1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2">
      <text:list-level-style-bullet text:level="1" text:style-name="ListLabel_20_1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3">
      <text:list-level-style-bullet text:level="1" text:style-name="ListLabel_20_2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4">
      <text:list-level-style-bullet text:level="1" text:style-name="ListLabel_20_2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5">
      <text:list-level-style-bullet text:level="1" text:style-name="ListLabel_20_2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6">
      <text:list-level-style-bullet text:level="1" text:style-name="ListLabel_20_2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7">
      <text:list-level-style-bullet text:level="1" text:style-name="ListLabel_20_2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8">
      <text:list-level-style-bullet text:level="1" text:style-name="ListLabel_20_2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9">
      <text:list-level-style-bullet text:level="1" text:style-name="ListLabel_20_2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0">
      <text:list-level-style-bullet text:level="1" text:style-name="ListLabel_20_2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1">
      <text:list-level-style-bullet text:level="1" text:style-name="ListLabel_20_2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2">
      <text:list-level-style-bullet text:level="1" text:style-name="ListLabel_20_2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3">
      <text:list-level-style-bullet text:level="1" text:style-name="ListLabel_20_2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4">
      <text:list-level-style-bullet text:level="1" text:style-name="ListLabel_20_3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5">
      <text:list-level-style-bullet text:level="1" text:style-name="ListLabel_20_3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6">
      <text:list-level-style-bullet text:level="1" text:style-name="ListLabel_20_3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7">
      <text:list-level-style-bullet text:level="1" text:style-name="ListLabel_20_3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8">
      <text:list-level-style-bullet text:level="1" text:style-name="ListLabel_20_3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9">
      <text:list-level-style-bullet text:level="1" text:style-name="ListLabel_20_3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0">
      <text:list-level-style-bullet text:level="1" text:style-name="ListLabel_20_3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1">
      <text:list-level-style-bullet text:level="1" text:style-name="ListLabel_20_3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2">
      <text:list-level-style-bullet text:level="1" text:style-name="ListLabel_20_3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3">
      <text:list-level-style-bullet text:level="1" text:style-name="ListLabel_20_3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4">
      <text:list-level-style-bullet text:level="1" text:style-name="ListLabel_20_3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5">
      <text:list-level-style-bullet text:level="1" text:style-name="ListLabel_20_4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6">
      <text:list-level-style-bullet text:level="1" text:style-name="ListLabel_20_4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7">
      <text:list-level-style-bullet text:level="1" text:style-name="ListLabel_20_4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8">
      <text:list-level-style-bullet text:level="1" text:style-name="ListLabel_20_4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9">
      <text:list-level-style-bullet text:level="1" text:style-name="ListLabel_20_4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0">
      <text:list-level-style-bullet text:level="1" text:style-name="ListLabel_20_4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1">
      <text:list-level-style-bullet text:level="1" text:style-name="ListLabel_20_4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2">
      <text:list-level-style-bullet text:level="1" text:style-name="ListLabel_20_4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3">
      <text:list-level-style-bullet text:level="1" text:style-name="ListLabel_20_4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4">
      <text:list-level-style-bullet text:level="1" text:style-name="ListLabel_20_4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5">
      <text:list-level-style-bullet text:level="1" text:style-name="ListLabel_20_4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6">
      <text:list-level-style-bullet text:level="1" text:style-name="ListLabel_20_5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7">
      <text:list-level-style-bullet text:level="1" text:style-name="ListLabel_20_5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8">
      <text:list-level-style-bullet text:level="1" text:style-name="ListLabel_20_5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9">
      <text:list-level-style-bullet text:level="1" text:style-name="ListLabel_20_5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0">
      <text:list-level-style-bullet text:level="1" text:style-name="ListLabel_20_5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1">
      <text:list-level-style-bullet text:level="1" text:style-name="ListLabel_20_5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2">
      <text:list-level-style-bullet text:level="1" text:style-name="ListLabel_20_5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3">
      <text:list-level-style-bullet text:level="1" text:style-name="ListLabel_20_5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4">
      <text:list-level-style-bullet text:level="1" text:style-name="ListLabel_20_5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5">
      <text:list-level-style-bullet text:level="1" text:style-name="ListLabel_20_5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6">
      <text:list-level-style-bullet text:level="1" text:style-name="ListLabel_20_5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7">
      <text:list-level-style-bullet text:level="1" text:style-name="ListLabel_20_6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8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3:57:37</meta:creation-date>
    <dc:date>2026-07-09T22:06:41.874648818</dc:date>
    <meta:generator>LibreOffice/26.2.4.2$Linux_X86_64 LibreOffice_project/620$Build-2</meta:generator>
    <meta:editing-duration>PT5H6M3S</meta:editing-duration>
    <dc:creator>João António</dc:creator>
    <meta:editing-cycles>5</meta:editing-cycles>
    <meta:document-statistic meta:table-count="0" meta:image-count="0" meta:object-count="0" meta:page-count="6" meta:paragraph-count="136" meta:word-count="637" meta:character-count="4129" meta:non-whitespace-character-count="3675"/>
    <meta:user-defined meta:name="AppVersion">12.0000</meta:user-defined>
    <meta:template xlink:type="simple" xlink:actuate="onRequest" xlink:title="Normal.dotm" xlink:href=""/>
  </office:meta>
</office:document-meta>
</file>