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First_20_Paragraph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Compact" style:list-style-name="WWNum1001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7" style:family="paragraph" style:parent-style-name="Compact" style:list-style-name="WWNum1002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8" style:family="paragraph" style:parent-style-name="Compact" style:list-style-name="WWNum1003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9" style:family="paragraph" style:parent-style-name="Compact" style:list-style-name="WWNum1004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0" style:family="paragraph" style:parent-style-name="Compact" style:list-style-name="WWNum1005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1" style:family="paragraph" style:parent-style-name="Compact" style:list-style-name="WWNum1006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2" style:family="paragraph" style:parent-style-name="Compact" style:list-style-name="WWNum1007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3" style:family="paragraph" style:parent-style-name="Compact" style:list-style-name="WWNum1008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4" style:family="paragraph" style:parent-style-name="Compact" style:list-style-name="WWNum1009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5" style:family="paragraph" style:parent-style-name="Compact" style:list-style-name="WWNum1010"/>
    <style:style style:name="P16" style:family="paragraph" style:parent-style-name="Compact" style:list-style-name="WWNum1011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7" style:family="paragraph" style:parent-style-name="Compact" style:list-style-name="WWNum1012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8" style:family="paragraph" style:parent-style-name="Compact" style:list-style-name="WWNum1013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9" style:family="paragraph" style:parent-style-name="Compact" style:list-style-name="WWNum1014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20" style:family="paragraph" style:parent-style-name="Compact" style:list-style-name="WWNum1015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21" style:family="paragraph" style:parent-style-name="Compact" style:list-style-name="WWNum1016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22" style:family="paragraph" style:parent-style-name="Compact" style:list-style-name="WWNum1017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23" style:family="paragraph" style:parent-style-name="Compact" style:list-style-name="WWNum1018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24" style:family="paragraph" style:parent-style-name="Compact" style:list-style-name="WWNum1019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25" style:family="paragraph" style:parent-style-name="Compact" style:list-style-name="WWNum1020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26" style:family="paragraph" style:parent-style-name="Comment">
      <style:paragraph-properties fo:margin-top="0.42cm" fo:margin-bottom="0.349cm"/>
    </style:style>
    <style:style style:name="P27" style:family="paragraph" style:parent-style-name="Compact" style:list-style-name="WWNum1021">
      <style:text-properties style:text-line-through-style="none" style:text-line-through-type="none" fo:language="zxx" fo:country="none" style:language-asian="zxx" style:country-asian="none" style:language-complex="zxx" style:country-complex="none"/>
    </style:style>
    <style:style style:name="P28" style:family="paragraph" style:parent-style-name="Comment">
      <style:paragraph-properties fo:margin-left="1.251cm" fo:margin-right="0cm" fo:margin-top="0cm" fo:margin-bottom="0.247cm" fo:line-height="115%" fo:text-align="left" fo:text-indent="-0.499cm" style:text-autospace="none" loext:tab-stop-distance="0cm" style:writing-mode="lr-tb">
        <style:tab-stops>
          <style:tab-stop style:position="0.709cm"/>
        </style:tab-stops>
      </style:paragraph-properties>
    </style:style>
    <style:style style:name="P29" style:family="paragraph" style:parent-style-name="Comment">
      <style:paragraph-properties fo:margin-left="0.101cm" fo:margin-right="0.101cm" fo:margin-top="0.42cm" fo:margin-bottom="0.349cm" fo:line-height="100%" fo:text-align="left" fo:text-indent="0cm" style:text-autospace="none" loext:tab-stop-distance="0cm" style:writing-mode="lr-tb">
        <style:tab-stops>
          <style:tab-stop style:position="0.709cm"/>
        </style:tab-stops>
      </style:paragraph-properties>
    </style:style>
    <style:style style:name="P30" style:family="paragraph" style:parent-style-name="Comment">
      <style:paragraph-properties fo:margin-top="0.42cm" fo:margin-bottom="0.349cm" fo:text-align="left"/>
    </style:style>
    <style:style style:name="P31" style:family="paragraph" style:parent-style-name="Compact" style:list-style-name="WWNum1022">
      <style:text-properties fo:language="zxx" fo:country="none" style:language-asian="zxx" style:country-asian="none" style:language-complex="zxx" style:country-complex="none"/>
    </style:style>
    <style:style style:name="P32" style:family="paragraph" style:parent-style-name="Comment">
      <style:paragraph-properties fo:margin-top="0cm" fo:margin-bottom="0.247cm" fo:line-height="115%" fo:text-align="left" style:text-autospace="none" style:writing-mode="lr-tb"/>
    </style:style>
    <style:style style:name="P33" style:family="paragraph" style:parent-style-name="Compact" style:list-style-name="WWNum1023">
      <style:text-properties fo:language="zxx" fo:country="none" style:language-asian="zxx" style:country-asian="none" style:language-complex="zxx" style:country-complex="none"/>
    </style:style>
    <style:style style:name="P34" style:family="paragraph" style:parent-style-name="Compact" style:list-style-name="WWNum1024">
      <style:text-properties fo:language="zxx" fo:country="none" style:language-asian="zxx" style:country-asian="none" style:language-complex="zxx" style:country-complex="none"/>
    </style:style>
    <style:style style:name="P35" style:family="paragraph" style:parent-style-name="Compact" style:list-style-name="WWNum1025">
      <style:text-properties fo:language="zxx" fo:country="none" style:language-asian="zxx" style:country-asian="none" style:language-complex="zxx" style:country-complex="none"/>
    </style:style>
    <style:style style:name="P36" style:family="paragraph" style:parent-style-name="Compact" style:list-style-name="WWNum1026">
      <style:text-properties fo:language="zxx" fo:country="none" style:language-asian="zxx" style:country-asian="none" style:language-complex="zxx" style:country-complex="none"/>
    </style:style>
    <style:style style:name="P37" style:family="paragraph" style:parent-style-name="Compact" style:list-style-name="WWNum1027">
      <style:text-properties fo:language="zxx" fo:country="none" style:language-asian="zxx" style:country-asian="none" style:language-complex="zxx" style:country-complex="none"/>
    </style:style>
    <style:style style:name="P38" style:family="paragraph" style:parent-style-name="Compact" style:list-style-name="WWNum1028">
      <style:text-properties fo:language="zxx" fo:country="none" style:language-asian="zxx" style:country-asian="none" style:language-complex="zxx" style:country-complex="none"/>
    </style:style>
    <style:style style:name="P39" style:family="paragraph" style:parent-style-name="Compact" style:list-style-name="WWNum1029">
      <style:text-properties fo:language="zxx" fo:country="none" style:language-asian="zxx" style:country-asian="none" style:language-complex="zxx" style:country-complex="none"/>
    </style:style>
    <style:style style:name="P40" style:family="paragraph" style:parent-style-name="Compact" style:list-style-name="WWNum1030">
      <style:text-properties fo:language="zxx" fo:country="none" style:language-asian="zxx" style:country-asian="none" style:language-complex="zxx" style:country-complex="none"/>
    </style:style>
    <style:style style:name="P41" style:family="paragraph" style:parent-style-name="Compact" style:list-style-name="WWNum1031">
      <style:text-properties fo:language="zxx" fo:country="none" style:language-asian="zxx" style:country-asian="none" style:language-complex="zxx" style:country-complex="none"/>
    </style:style>
    <style:style style:name="P42" style:family="paragraph" style:parent-style-name="Compact" style:list-style-name="WWNum1032">
      <style:text-properties fo:language="zxx" fo:country="none" style:language-asian="zxx" style:country-asian="none" style:language-complex="zxx" style:country-complex="none"/>
    </style:style>
    <style:style style:name="P43" style:family="paragraph" style:parent-style-name="Compact" style:list-style-name="WWNum1033">
      <style:text-properties fo:language="zxx" fo:country="none" style:language-asian="zxx" style:country-asian="none" style:language-complex="zxx" style:country-complex="none"/>
    </style:style>
    <style:style style:name="P44" style:family="paragraph" style:parent-style-name="Compact" style:list-style-name="WWNum1034">
      <style:text-properties fo:language="zxx" fo:country="none" style:language-asian="zxx" style:country-asian="none" style:language-complex="zxx" style:country-complex="none"/>
    </style:style>
    <style:style style:name="P45" style:family="paragraph" style:parent-style-name="Compact" style:list-style-name="WWNum1035">
      <style:text-properties fo:language="zxx" fo:country="none" style:language-asian="zxx" style:country-asian="none" style:language-complex="zxx" style:country-complex="none"/>
    </style:style>
    <style:style style:name="P46" style:family="paragraph" style:parent-style-name="Compact" style:list-style-name="WWNum1036">
      <style:text-properties fo:language="zxx" fo:country="none" style:language-asian="zxx" style:country-asian="none" style:language-complex="zxx" style:country-complex="none"/>
    </style:style>
    <style:style style:name="P47" style:family="paragraph" style:parent-style-name="Compact" style:list-style-name="WWNum1037">
      <style:text-properties fo:language="zxx" fo:country="none" style:language-asian="zxx" style:country-asian="none" style:language-complex="zxx" style:country-complex="none"/>
    </style:style>
    <style:style style:name="P48" style:family="paragraph" style:parent-style-name="Compact" style:list-style-name="WWNum1038">
      <style:text-properties fo:language="zxx" fo:country="none" style:language-asian="zxx" style:country-asian="none" style:language-complex="zxx" style:country-complex="none"/>
    </style:style>
    <style:style style:name="P49" style:family="paragraph" style:parent-style-name="Compact" style:list-style-name="WWNum1039">
      <style:text-properties fo:language="zxx" fo:country="none" style:language-asian="zxx" style:country-asian="none" style:language-complex="zxx" style:country-complex="none"/>
    </style:style>
    <style:style style:name="P50" style:family="paragraph" style:parent-style-name="Compact" style:list-style-name="WWNum1040">
      <style:text-properties fo:language="zxx" fo:country="none" style:language-asian="zxx" style:country-asian="none" style:language-complex="zxx" style:country-complex="none"/>
    </style:style>
    <style:style style:name="P51" style:family="paragraph" style:parent-style-name="Compact" style:list-style-name="WWNum1041">
      <style:text-properties fo:language="zxx" fo:country="none" style:language-asian="zxx" style:country-asian="none" style:language-complex="zxx" style:country-complex="none"/>
    </style:style>
    <style:style style:name="P52" style:family="paragraph" style:parent-style-name="Compact" style:list-style-name="WWNum1042">
      <style:text-properties fo:language="zxx" fo:country="none" style:language-asian="zxx" style:country-asian="none" style:language-complex="zxx" style:country-complex="none"/>
    </style:style>
    <style:style style:name="P53" style:family="paragraph" style:parent-style-name="Compact" style:list-style-name="WWNum1043">
      <style:text-properties fo:language="zxx" fo:country="none" style:language-asian="zxx" style:country-asian="none" style:language-complex="zxx" style:country-complex="none"/>
    </style:style>
    <style:style style:name="P54" style:family="paragraph" style:parent-style-name="Compact" style:list-style-name="WWNum1044">
      <style:text-properties fo:language="zxx" fo:country="none" style:language-asian="zxx" style:country-asian="none" style:language-complex="zxx" style:country-complex="none"/>
    </style:style>
    <style:style style:name="P55" style:family="paragraph" style:parent-style-name="Compact" style:list-style-name="WWNum1045">
      <style:text-properties fo:language="zxx" fo:country="none" style:language-asian="zxx" style:country-asian="none" style:language-complex="zxx" style:country-complex="none"/>
    </style:style>
    <style:style style:name="P56" style:family="paragraph" style:parent-style-name="Compact" style:list-style-name="WWNum1046">
      <style:text-properties fo:language="zxx" fo:country="none" style:language-asian="zxx" style:country-asian="none" style:language-complex="zxx" style:country-complex="none"/>
    </style:style>
    <style:style style:name="P57" style:family="paragraph" style:parent-style-name="Compact" style:list-style-name="WWNum1047">
      <style:text-properties fo:language="zxx" fo:country="none" style:language-asian="zxx" style:country-asian="none" style:language-complex="zxx" style:country-complex="none"/>
    </style:style>
    <style:style style:name="P58" style:family="paragraph" style:parent-style-name="Compact" style:list-style-name="WWNum1048">
      <style:text-properties fo:language="zxx" fo:country="none" style:language-asian="zxx" style:country-asian="none" style:language-complex="zxx" style:country-complex="none"/>
    </style:style>
    <style:style style:name="P59" style:family="paragraph" style:parent-style-name="Compact" style:list-style-name="WWNum1049">
      <style:text-properties fo:language="zxx" fo:country="none" style:language-asian="zxx" style:country-asian="none" style:language-complex="zxx" style:country-complex="none"/>
    </style:style>
    <style:style style:name="P60" style:family="paragraph" style:parent-style-name="Compact" style:list-style-name="WWNum1050">
      <style:text-properties fo:language="zxx" fo:country="none" style:language-asian="zxx" style:country-asian="none" style:language-complex="zxx" style:country-complex="none"/>
    </style:style>
    <style:style style:name="P61" style:family="paragraph" style:parent-style-name="Compact" style:list-style-name="WWNum1051">
      <style:text-properties fo:language="zxx" fo:country="none" style:language-asian="zxx" style:country-asian="none" style:language-complex="zxx" style:country-complex="none"/>
    </style:style>
    <style:style style:name="P62" style:family="paragraph" style:parent-style-name="Compact" style:list-style-name="WWNum1052">
      <style:text-properties fo:language="zxx" fo:country="none" style:language-asian="zxx" style:country-asian="none" style:language-complex="zxx" style:country-complex="none"/>
    </style:style>
    <style:style style:name="P63" style:family="paragraph" style:parent-style-name="Compact" style:list-style-name="WWNum1053">
      <style:text-properties fo:language="zxx" fo:country="none" style:language-asian="zxx" style:country-asian="none" style:language-complex="zxx" style:country-complex="none"/>
    </style:style>
    <style:style style:name="P64" style:family="paragraph" style:parent-style-name="Compact" style:list-style-name="WWNum1054">
      <style:text-properties fo:language="zxx" fo:country="none" style:language-asian="zxx" style:country-asian="none" style:language-complex="zxx" style:country-complex="none"/>
    </style:style>
    <style:style style:name="P65" style:family="paragraph" style:parent-style-name="Compact" style:list-style-name="WWNum1055">
      <style:text-properties fo:language="zxx" fo:country="none" style:language-asian="zxx" style:country-asian="none" style:language-complex="zxx" style:country-complex="none"/>
    </style:style>
    <style:style style:name="P66" style:family="paragraph" style:parent-style-name="Compact" style:list-style-name="WWNum1056">
      <style:text-properties fo:language="zxx" fo:country="none" style:language-asian="zxx" style:country-asian="none" style:language-complex="zxx" style:country-complex="none"/>
    </style:style>
    <style:style style:name="P67" style:family="paragraph" style:parent-style-name="Compact" style:list-style-name="WWNum1057">
      <style:text-properties fo:language="zxx" fo:country="none" style:language-asian="zxx" style:country-asian="none" style:language-complex="zxx" style:country-complex="none"/>
    </style:style>
    <style:style style:name="P68" style:family="paragraph" style:parent-style-name="Compact" style:list-style-name="WWNum1058">
      <style:text-properties fo:language="zxx" fo:country="none" style:language-asian="zxx" style:country-asian="none" style:language-complex="zxx" style:country-complex="none"/>
    </style:style>
    <style:style style:name="P69" style:family="paragraph" style:parent-style-name="Compact" style:list-style-name="WWNum1059">
      <style:text-properties fo:language="zxx" fo:country="none" style:language-asian="zxx" style:country-asian="none" style:language-complex="zxx" style:country-complex="none"/>
    </style:style>
    <style:style style:name="P70" style:family="paragraph" style:parent-style-name="Compact" style:list-style-name="WWNum1060">
      <style:text-properties fo:language="zxx" fo:country="none" style:language-asian="zxx" style:country-asian="none" style:language-complex="zxx" style:country-complex="none"/>
    </style:style>
    <style:style style:name="P71" style:family="paragraph" style:parent-style-name="Compact" style:list-style-name="WWNum1061">
      <style:text-properties fo:language="zxx" fo:country="none" style:language-asian="zxx" style:country-asian="none" style:language-complex="zxx" style:country-complex="none"/>
    </style:style>
    <style:style style:name="P72" style:family="paragraph" style:parent-style-name="Compact" style:list-style-name="WWNum1062">
      <style:text-properties fo:language="zxx" fo:country="none" style:language-asian="zxx" style:country-asian="none" style:language-complex="zxx" style:country-complex="none"/>
    </style:style>
    <style:style style:name="P73" style:family="paragraph" style:parent-style-name="Compact" style:list-style-name="WWNum1063">
      <style:text-properties fo:language="zxx" fo:country="none" style:language-asian="zxx" style:country-asian="none" style:language-complex="zxx" style:country-complex="none"/>
    </style:style>
    <style:style style:name="P74" style:family="paragraph" style:parent-style-name="Compact" style:list-style-name="WWNum1064">
      <style:text-properties fo:language="zxx" fo:country="none" style:language-asian="zxx" style:country-asian="none" style:language-complex="zxx" style:country-complex="none"/>
    </style:style>
    <style:style style:name="P75" style:family="paragraph" style:parent-style-name="Compact" style:list-style-name="WWNum1065">
      <style:text-properties fo:language="zxx" fo:country="none" style:language-asian="zxx" style:country-asian="none" style:language-complex="zxx" style:country-complex="none"/>
    </style:style>
    <style:style style:name="P76" style:family="paragraph" style:parent-style-name="Compact" style:list-style-name="WWNum1066">
      <style:text-properties fo:language="zxx" fo:country="none" style:language-asian="zxx" style:country-asian="none" style:language-complex="zxx" style:country-complex="none"/>
    </style:style>
    <style:style style:name="P77" style:family="paragraph" style:parent-style-name="Compact" style:list-style-name="WWNum1067">
      <style:text-properties fo:language="zxx" fo:country="none" style:language-asian="zxx" style:country-asian="none" style:language-complex="zxx" style:country-complex="none"/>
    </style:style>
    <style:style style:name="P78" style:family="paragraph" style:parent-style-name="Compact" style:list-style-name="WWNum1068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T2" style:family="text">
      <style:text-properties fo:language="pt" fo:country="BR" style:script-type="latin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style:use-window-font-color="true" loext:opacity="0%" fo:font-size="10pt" fo:font-weight="bold" style:font-size-asian="10pt" style:font-weight-asian="bold" style:font-size-complex="10pt" style:font-weight-complex="bold"/>
    </style:style>
    <style:style style:name="T6" style:family="text">
      <style:text-properties style:use-window-font-color="true" loext:opacity="0%" fo:font-family="'Liberation Mono', 'Courier New'" style:font-family-generic="modern" style:font-pitch="fixed" fo:font-size="10pt" style:font-family-asian="'Noto Sans Mono CJK SC'" style:font-family-generic-asian="modern" style:font-pitch-asian="fixed" style:font-size-asian="10pt" style:font-family-complex="'Liberation Mono', 'Courier New'" style:font-family-generic-complex="modern" style:font-pitch-complex="fixed" style:font-size-complex="10pt"/>
    </style:style>
    <style:style style:name="T7" style:family="text">
      <style:text-properties style:use-window-font-color="true" loext:opacity="0%" fo:font-size="10pt" style:font-size-asian="10pt" style:font-size-complex="10pt"/>
    </style:style>
    <style:style style:name="T8" style:family="text">
      <style:text-properties fo:font-family="'Liberation Serif', 'Times New Roman'" style:font-family-generic="roman" style:font-pitch="variable" fo:font-size="24pt" fo:font-weight="bold" style:font-family-asian="'Noto Serif CJK SC'" style:font-pitch-asian="variable" style:font-family-complex="'Liberation Serif', 'Times New Roman'" style:font-family-generic-complex="roman" style:font-pitch-complex="variable" style:font-size-complex="24pt" style:font-weight-complex="bold"/>
    </style:style>
    <style:style style:name="T9" style:family="text">
      <style:text-properties fo:font-family="'Liberation Serif', 'Times New Roman'" style:font-family-generic="roman" style:font-pitch="variable" fo:font-size="14pt" fo:font-weight="bold" style:font-family-asian="'Noto Serif CJK SC'" style:font-pitch-asian="variable" style:font-family-complex="'Liberation Serif', 'Times New Roman'" style:font-family-generic-complex="roman" style:font-pitch-complex="variable" style:font-size-complex="14pt" style:font-weight-complex="bold"/>
    </style:style>
    <style:style style:name="T10" style:family="text">
      <style:text-properties fo:font-family="'Liberation Mono', 'Courier New'" style:font-family-generic="modern" style:font-pitch="fixed" style:font-family-asian="'Noto Sans Mono CJK SC'" style:font-family-generic-asian="modern" style:font-pitch-asian="fixed" style:font-family-complex="'Liberation Mono', 'Courier New'" style:font-family-generic-complex="modern" style:font-pitch-complex="fixed"/>
    </style:style>
    <style:style style:name="T11" style:family="text">
      <style:text-properties fo:font-weight="bold" style:font-weight-asian="bold" style:font-weight-complex="bold"/>
    </style:style>
    <style:style style:name="gr1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roadmap-biblioteca-apócrifa"/>Roadmap — Biblioteca Apócrifa</text:h>
      <text:p text:style-name="P2">O desenvolvimento da Biblioteca Apócrifa seguirá uma abordagem incremental, permitindo validar cada etapa antes de avançar para a próxima.Cada fase representa uma entrega funcional da plataforma, facilitando testes, manutenção e evolução do projeto.</text:p>
      <text:p text:style-name="P3"><draw:rect text:anchor-type="as-char" style:rel-width="100%" draw:z-index="0" draw:name="Forma1" draw:style-name="gr1" draw:text-style-name="P4" svg:width="16.511cm" svg:height="0.054cm"><text:p/></draw:rect><text:bookmark-end text:name="roadmap-biblioteca-apócrifa"/></text:p>
      <text:h text:style-name="P1" text:outline-level="1"><text:bookmark-start text:name="fase-1-planejamento"/>Fase 1 — Planejamento</text:h>
      <text:p text:style-name="P2">Objetivo: definir a visão do projeto, seus requisitos e a estratégia de desenvolvimento.</text:p>
      <text:h text:style-name="P5" text:outline-level="2"><text:bookmark-start text:name="entregas"/>Entregas</text:h>
      <text:list xml:id="list191225947" text:style-name="WWNum1001">
        <text:list-item>
          <text:p text:style-name="P6">Definição da ideia do projeto.</text:p>
        </text:list-item>
        <text:list-item text:style-override="WWNum1002">
          <text:p text:style-name="P7">Levantamento dos requisitos funcionais.</text:p>
        </text:list-item>
        <text:list-item text:style-override="WWNum1003">
          <text:p text:style-name="P8">Levantamento dos requisitos não funcionais.</text:p>
        </text:list-item>
        <text:list-item text:style-override="WWNum1004">
          <text:p text:style-name="P9">Definição das regras de negócio.</text:p>
        </text:list-item>
        <text:list-item text:style-override="WWNum1005">
          <text:p text:style-name="P10">Elaboração do roadmap.</text:p>
        </text:list-item>
      </text:list>
      <text:p text:style-name="P3"><draw:rect text:anchor-type="as-char" style:rel-width="100%" draw:z-index="1" draw:name="Forma2" draw:style-name="gr1" draw:text-style-name="P4" svg:width="16.511cm" svg:height="0.054cm"><text:p/></draw:rect><text:bookmark-end text:name="entregas"/><text:bookmark-end text:name="fase-1-planejamento"/></text:p>
      <text:h text:style-name="P1" text:outline-level="1"><text:bookmark-start text:name="fase-2-estruturação"/>Fase 2 — Estruturação</text:h>
      <text:p text:style-name="P2">Objetivo: organizar a arquitetura da aplicação antes do desenvolvimento.</text:p>
      <text:h text:style-name="P5" text:outline-level="2"><text:bookmark-start text:name="entregas-1"/>Entregas</text:h>
      <text:list xml:id="list3731915617" text:style-name="WWNum1006">
        <text:list-item>
          <text:p text:style-name="P11">Definir a estrutura definitiva das pastas.</text:p>
        </text:list-item>
        <text:list-item text:style-override="WWNum1007">
          <text:p text:style-name="P12">Organizar os arquivos HTML.</text:p>
        </text:list-item>
        <text:list-item text:style-override="WWNum1008">
          <text:p text:style-name="P13">Organizar os arquivos CSS.</text:p>
        </text:list-item>
        <text:list-item text:style-override="WWNum1009">
          <text:p text:style-name="P14">Organizar os arquivos JavaScript.</text:p>
        </text:list-item>
        <text:list-item text:style-override="WWNum1010">
          <text:p text:style-name="P15"><text:span text:style-name="T1">Criar a estrutura inicial do </text:span><text:span text:style-name="Verbatim_20_Char"><text:span text:style-name="T1">livros.json</text:span></text:span><text:span text:style-name="T1">.</text:span></text:p>
        </text:list-item>
        <text:list-item text:style-override="WWNum1011">
          <text:p text:style-name="P16">Definir o padrão dos componentes reutilizáveis.</text:p>
        </text:list-item>
        <text:list-item text:style-override="WWNum1012">
          <text:p text:style-name="P17">Atualizar a documentação da arquitetura.</text:p>
        </text:list-item>
      </text:list>
      <text:p text:style-name="P3"><draw:rect text:anchor-type="as-char" style:rel-width="100%" draw:z-index="2" draw:name="Forma3" draw:style-name="gr1" draw:text-style-name="P4" svg:width="16.511cm" svg:height="0.054cm"><text:p/></draw:rect><text:bookmark-end text:name="entregas-1"/><text:bookmark-end text:name="fase-2-estruturação"/></text:p>
      <text:h text:style-name="P1" text:outline-level="1"><text:bookmark-start text:name="fase-3-design-da-interface"/><text:soft-page-break/>Fase 3 — Design da Interface</text:h>
      <text:p text:style-name="P2">Objetivo: criar uma identidade visual consistente para a plataforma.</text:p>
      <text:h text:style-name="P5" text:outline-level="2"><text:bookmark-start text:name="entregas-2"/>Entregas</text:h>
      <text:list xml:id="list14110934571358" text:continue-list="list3731915617" text:style-name="WWNum1013">
        <text:list-item>
          <text:p text:style-name="P18">Definir a identidade visual.</text:p>
        </text:list-item>
        <text:list-item text:style-override="WWNum1014">
          <text:p text:style-name="P19">Criar a paleta de cores.</text:p>
        </text:list-item>
        <text:list-item text:style-override="WWNum1015">
          <text:p text:style-name="P20">Definir a tipografia.</text:p>
        </text:list-item>
        <text:list-item text:style-override="WWNum1016">
          <text:p text:style-name="P21">Criar os componentes visuais.</text:p>
        </text:list-item>
        <text:list-item text:style-override="WWNum1017">
          <text:p text:style-name="P22">Elaborar o Design System.</text:p>
        </text:list-item>
        <text:list-item text:style-override="WWNum1018">
          <text:p text:style-name="P23">Produzir os wireframes das principais páginas.</text:p>
        </text:list-item>
      </text:list>
      <text:p text:style-name="P3"><draw:rect text:anchor-type="as-char" style:rel-width="100%" draw:z-index="3" draw:name="Forma4" draw:style-name="gr1" draw:text-style-name="P4" svg:width="16.511cm" svg:height="0.054cm"><text:p/></draw:rect><text:bookmark-end text:name="entregas-2"/><text:bookmark-end text:name="fase-3-design-da-interface"/></text:p>
      <text:h text:style-name="P1" text:outline-level="1"><text:bookmark-start text:name="fase-4-desenvolvimento-da-base"/>Fase 4 — Desenvolvimento da Base</text:h>
      <text:p text:style-name="P2">Objetivo: construir a estrutura principal da aplicação.</text:p>
      <text:h text:style-name="P5" text:outline-level="2"><text:bookmark-start text:name="entregas-3"/>Entregas</text:h>
      <text:list xml:id="list14112240599163" text:continue-list="list14110934571358" text:style-name="WWNum1019">
        <text:list-item>
          <text:p text:style-name="P24"><office:annotation office:name="__Annotation__402_4055040419" loext:resolved="true"><dc:creator>João António</dc:creator><dc:date>2026-07-09T13:39:19.613468570</dc:date><meta:creator-initials>JA</meta:creator-initials><text:p text:style-name="Comment">Criou-se e organizou-se todo conteudo das principais paginais html. Como também inplementou-se todo css da pasta assets e o css pagina html. </text:p><text:p text:style-name="Comment"/></office:annotation>Desenvolver a página inicial.<office:annotation-end office:name="__Annotation__402_4055040419"/></text:p>
        </text:list-item>
        <text:list-item text:style-override="WWNum1020">
          <text:p text:style-name="P25"><office:annotation office:name="__Annotation__403_4055040419" loext:resolved="true"><dc:creator>João António</dc:creator><dc:date>2026-07-09T13:45:00.101402327</dc:date><meta:creator-initials>JA</meta:creator-initials><text:p text:style-name="Comment"><text:span text:style-name="T2">Criou-se os conteudos de <text:s/>todos os componetes reutilizaveis <text:s/>e o seu javaScrit para a rederização. Ou seja fez-se com que os componentes como header e footer aparecessem dinamicamente em todas as</text:span> paginas principais. Como tambem se inplementou um Js, navigation.js para mostras <text:s/>a pagina em que o usuario está.. </text:p><text:p text:style-name="P26"><text:span text:style-name="T3">Navegação principal → diz respeito ao usuário se deslocar entre as páginas da aplicação (Header, Navbar, Footer). </text:span></text:p><text:p text:style-name="P26"><text:span text:style-name="T3">Componentes reutilizáveis → são blocos da interface que podem aparecer em várias páginas, mas não são necessariamente navegação.</text:span></text:p><text:p text:style-name="P26"><text:span text:style-name="T3"/></text:p></office:annotation>Desenvolver a navegação principal.<office:annotation-end office:name="__Annotation__403_4055040419"/></text:p>
        </text:list-item>
        <text:list-item text:style-override="WWNum1021">
          <text:p text:style-name="P27"><text:bookmark-start text:name="__DdeLink__5802_4055040419"/>Construir o layout responsivo.<text:bookmark-end text:name="__DdeLink__5802_4055040419"/><office:annotation loext:resolved="false"><dc:creator>João António</dc:creator><dc:date>2026-07-11T17:32:44.033393973</dc:date><meta:creator-initials>JA</meta:creator-initials><text:p text:style-name="P26"><text:span text:style-name="T4">Próximo passo</text:span></text:p><text:p text:style-name="P28"><text:span text:style-name="T5">Finalizar o componente </text:span><text:span text:style-name="T6">slider.js</text:span><text:span text:style-name="T7">, tornando-o totalmente funcional e reutilizável.</text:span></text:p><text:p text:style-name="P28"><text:span text:style-name="T7"/></text:p><text:p text:style-name="P29"><text:span text:style-name="T7">Só sera concluido quando implementarmos livros na biblioteca. </text:span></text:p><text:p text:style-name="P30"><text:span text:style-name="T3">Depois deste, o próximo Sprint será deixá-lo com aparência de um slider moderno:</text:span></text:p><text:p text:style-name="P30"><text:span text:style-name="T3">transição por arrastar (touch e mouse); </text:span></text:p><text:p text:style-name="P30"><text:span text:style-name="T3">autoplay opcional; </text:span></text:p><text:p text:style-name="P30"><text:span text:style-name="T3">indicadores (● ○ ○); </text:span></text:p><text:p text:style-name="P30"><text:span text:style-name="T3">suporte a teclado; </text:span></text:p><text:p text:style-name="P30"><text:span text:style-name="T3">renderização automática dos livros vindos do livros.json. </text:span></text:p><text:p text:style-name="P30"><text:span text:style-name="T3">Esse será praticamente o componente final da Biblioteca Apócrifa.</text:span></text:p><text:p text:style-name="P30"><text:span text:style-name="T3"/></text:p><text:p text:style-name="P30"><text:span text:style-name="T3"/></text:p></office:annotation></text:p>
        </text:list-item>
        <text:list-item text:style-override="WWNum1022">
          <text:p text:style-name="P31"><text:bookmark-start text:name="__DdeLink__6854_2631705103"/><text:bookmark-start text:name="__DdeLink__6839_2631705103"/>Implementar o carregamento dos dados em JSON.<text:bookmark-end text:name="__DdeLink__6854_2631705103"/><text:bookmark-end text:name="__DdeLink__6839_2631705103"/><office:annotation loext:resolved="false"><dc:creator>João António</dc:creator><dc:date>2026-07-11T17:47:57.451432385</dc:date><meta:creator-initials>JA</meta:creator-initials><text:p text:style-name="P32"><text:span text:style-name="T8">Roadmap desta funcionalidade</text:span></text:p><text:p text:style-name="P32">Eu dividiria este desenvolvimento em quatro pequenos sprints:</text:p><text:p text:style-name="P32"><text:span text:style-name="T9">Sprint 1 (agora)</text:span></text:p><text:p text:style-name="P28">✅ Criar <text:span text:style-name="T10">livros.json</text:span>.</text:p><text:p text:style-name="P28">✅ Criar <text:span text:style-name="T10">LivrosService</text:span>.</text:p><text:p text:style-name="P28">✅ Carregar o JSON com <text:span text:style-name="T10">fetch()</text:span>.</text:p><text:p text:style-name="P28">✅ Disponibilizar os dados para o projeto.</text:p><text:p text:style-name="P32"><text:span text:style-name="T9">Sprint 2</text:span></text:p><text:p text:style-name="P28">Renderizar automaticamente os livros na página <text:span text:style-name="T11">Biblioteca</text:span>.</text:p><text:p text:style-name="P32"><text:span text:style-name="T9">Sprint 3</text:span></text:p><text:p text:style-name="P28">Renderizar automaticamente os <text:span text:style-name="T11">destaques</text:span> na Home.</text:p><text:p text:style-name="P32"><text:span text:style-name="T9">Sprint 4</text:span></text:p><text:p text:style-name="P28">Implementar filtros, pesquisa e categorias</text:p><text:p text:style-name="P28">.</text:p></office:annotation></text:p>
        </text:list-item>
        <text:list-item text:style-override="WWNum1023">
          <text:p text:style-name="P33">Criar a arquitetura base em JavaScript.</text:p>
        </text:list-item>
      </text:list>
      <text:p text:style-name="P3"><draw:rect text:anchor-type="as-char" style:rel-width="100%" draw:z-index="4" draw:name="Forma5" draw:style-name="gr1" draw:text-style-name="P4" svg:width="16.511cm" svg:height="0.054cm"><text:p/></draw:rect><text:bookmark-end text:name="entregas-3"/><text:bookmark-end text:name="fase-4-desenvolvimento-da-base"/></text:p>
      <text:h text:style-name="P1" text:outline-level="1"><text:bookmark-start text:name="fase-5-biblioteca"/>Fase 5 — Biblioteca</text:h>
      <text:p text:style-name="P2">Objetivo: disponibilizar o catálogo digital das obras.</text:p>
      <text:h text:style-name="P5" text:outline-level="2"><text:bookmark-start text:name="entregas-4"/>Entregas</text:h>
      <text:list xml:id="list14112460648540" text:continue-list="list14112240599163" text:style-name="WWNum1024">
        <text:list-item>
          <text:p text:style-name="P34">Listagem dinâmica das obras.</text:p>
        </text:list-item>
        <text:list-item text:style-override="WWNum1025">
          <text:p text:style-name="P35">Sistema de pesquisa.</text:p>
        </text:list-item>
        <text:list-item text:style-override="WWNum1026">
          <text:p text:style-name="P36">Sistema de filtros.</text:p>
        </text:list-item>
        <text:list-item text:style-override="WWNum1027">
          <text:p text:style-name="P37">Cards dos livros.</text:p>
        </text:list-item>
        <text:list-item text:style-override="WWNum1028">
          <text:p text:style-name="P38">Página de detalhes da obra.</text:p>
        </text:list-item>
      </text:list>
      <text:p text:style-name="P3"><draw:rect text:anchor-type="as-char" style:rel-width="100%" draw:z-index="5" draw:name="Forma6" draw:style-name="gr1" draw:text-style-name="P4" svg:width="16.511cm" svg:height="0.054cm"><text:p/></draw:rect><text:bookmark-end text:name="entregas-4"/><text:bookmark-end text:name="fase-5-biblioteca"/></text:p>
      <text:h text:style-name="P1" text:outline-level="1"><text:bookmark-start text:name="fase-6-área-de-estudo"/><text:soft-page-break/>Fase 6 — Área de Estudo</text:h>
      <text:p text:style-name="P2">Objetivo: transformar a leitura em uma experiência de aprendizado.</text:p>
      <text:h text:style-name="P5" text:outline-level="2"><text:bookmark-start text:name="entregas-5"/>Entregas</text:h>
      <text:list xml:id="list14112869257403" text:continue-list="list14112460648540" text:style-name="WWNum1029">
        <text:list-item>
          <text:p text:style-name="P39">Carregar o conteúdo da obra dinamicamente.</text:p>
        </text:list-item>
        <text:list-item text:style-override="WWNum1030">
          <text:p text:style-name="P40">Dividir a obra em seções.</text:p>
        </text:list-item>
        <text:list-item text:style-override="WWNum1031">
          <text:p text:style-name="P41">Exibir comentários e exegeses.</text:p>
        </text:list-item>
        <text:list-item text:style-override="WWNum1032">
          <text:p text:style-name="P42">Navegação entre seções.</text:p>
        </text:list-item>
        <text:list-item text:style-override="WWNum1033">
          <text:p text:style-name="P43">Melhorar a experiência de leitura.</text:p>
        </text:list-item>
      </text:list>
      <text:p text:style-name="P3"><draw:rect text:anchor-type="as-char" style:rel-width="100%" draw:z-index="6" draw:name="Forma7" draw:style-name="gr1" draw:text-style-name="P4" svg:width="16.511cm" svg:height="0.054cm"><text:p/></draw:rect><text:bookmark-end text:name="entregas-5"/><text:bookmark-end text:name="fase-6-área-de-estudo"/></text:p>
      <text:h text:style-name="P1" text:outline-level="1"><text:bookmark-start text:name="fase-7-recursos-de-estudo"/>Fase 7 — Recursos de Estudo</text:h>
      <text:p text:style-name="P2">Objetivo: enriquecer o conteúdo apresentado ao usuário.</text:p>
      <text:h text:style-name="P5" text:outline-level="2"><text:bookmark-start text:name="entregas-6"/>Entregas</text:h>
      <text:list xml:id="list14112156836336" text:continue-list="list14112869257403" text:style-name="WWNum1034">
        <text:list-item>
          <text:p text:style-name="P44">Informações históricas da obra.</text:p>
        </text:list-item>
        <text:list-item text:style-override="WWNum1035">
          <text:p text:style-name="P45">Referências bibliográficas.</text:p>
        </text:list-item>
        <text:list-item text:style-override="WWNum1036">
          <text:p text:style-name="P46">Linha do tempo histórica.</text:p>
        </text:list-item>
        <text:list-item text:style-override="WWNum1037">
          <text:p text:style-name="P47">Glossário de termos.</text:p>
        </text:list-item>
        <text:list-item text:style-override="WWNum1038">
          <text:p text:style-name="P48">Referências cruzadas entre obras.</text:p>
        </text:list-item>
      </text:list>
      <text:p text:style-name="P3"><draw:rect text:anchor-type="as-char" style:rel-width="100%" draw:z-index="7" draw:name="Forma8" draw:style-name="gr1" draw:text-style-name="P4" svg:width="16.511cm" svg:height="0.054cm"><text:p/></draw:rect><text:bookmark-end text:name="entregas-6"/><text:bookmark-end text:name="fase-7-recursos-de-estudo"/></text:p>
      <text:h text:style-name="P1" text:outline-level="1"><text:bookmark-start text:name="fase-8-perfil-do-usuário"/>Fase 8 — Perfil do Usuário</text:h>
      <text:p text:style-name="P2">Objetivo: personalizar a experiência de estudo.</text:p>
      <text:h text:style-name="P5" text:outline-level="2"><text:bookmark-start text:name="entregas-7"/>Entregas</text:h>
      <text:list xml:id="list14112343550122" text:continue-list="list14112156836336" text:style-name="WWNum1039">
        <text:list-item>
          <text:p text:style-name="P49">Página de perfil.</text:p>
        </text:list-item>
        <text:list-item text:style-override="WWNum1040">
          <text:p text:style-name="P50">Favoritos.</text:p>
        </text:list-item>
        <text:list-item text:style-override="WWNum1041">
          <text:p text:style-name="P51">Histórico de leitura.</text:p>
        </text:list-item>
        <text:list-item text:style-override="WWNum1042">
          <text:p text:style-name="P52">Progresso de estudo.</text:p>
        </text:list-item>
        <text:list-item text:style-override="WWNum1043">
          <text:p text:style-name="P53">Configurações pessoais.</text:p>
        </text:list-item>
      </text:list>
      <text:p text:style-name="P3"><draw:rect text:anchor-type="as-char" style:rel-width="100%" draw:z-index="8" draw:name="Forma9" draw:style-name="gr1" draw:text-style-name="P4" svg:width="16.511cm" svg:height="0.054cm"><text:p/></draw:rect><text:bookmark-end text:name="entregas-7"/><text:bookmark-end text:name="fase-8-perfil-do-usuário"/></text:p>
      <text:h text:style-name="P1" text:outline-level="1"><text:bookmark-start text:name="fase-9-comunidade"/><text:soft-page-break/>Fase 9 — Comunidade</text:h>
      <text:p text:style-name="P2">Objetivo: incentivar a troca de conhecimento entre os usuários.</text:p>
      <text:h text:style-name="P5" text:outline-level="2"><text:bookmark-start text:name="entregas-8"/>Entregas</text:h>
      <text:list xml:id="list14112179270584" text:continue-list="list14112343550122" text:style-name="WWNum1044">
        <text:list-item>
          <text:p text:style-name="P54">Área de discussão.</text:p>
        </text:list-item>
        <text:list-item text:style-override="WWNum1045">
          <text:p text:style-name="P55">Comentários.</text:p>
        </text:list-item>
        <text:list-item text:style-override="WWNum1046">
          <text:p text:style-name="P56">Recomendações de leitura.</text:p>
        </text:list-item>
        <text:list-item text:style-override="WWNum1047">
          <text:p text:style-name="P57">Compartilhamento de conteúdo.</text:p>
        </text:list-item>
      </text:list>
      <text:p text:style-name="P3"><draw:rect text:anchor-type="as-char" style:rel-width="100%" draw:z-index="9" draw:name="Forma10" draw:style-name="gr1" draw:text-style-name="P4" svg:width="16.511cm" svg:height="0.054cm"><text:p/></draw:rect><text:bookmark-end text:name="entregas-8"/><text:bookmark-end text:name="fase-9-comunidade"/></text:p>
      <text:h text:style-name="P1" text:outline-level="1"><text:bookmark-start text:name="fase-10-progressive-web-app-pwa"/>Fase 10 — Progressive Web App (PWA)</text:h>
      <text:p text:style-name="P2">Objetivo: tornar a plataforma instalável e funcional offline.</text:p>
      <text:h text:style-name="P5" text:outline-level="2"><text:bookmark-start text:name="entregas-9"/>Entregas</text:h>
      <text:list xml:id="list14111795937727" text:continue-list="list14112179270584" text:style-name="WWNum1048">
        <text:list-item>
          <text:p text:style-name="P58">Configurar o Manifest.</text:p>
        </text:list-item>
        <text:list-item text:style-override="WWNum1049">
          <text:p text:style-name="P59">Implementar o Service Worker.</text:p>
        </text:list-item>
        <text:list-item text:style-override="WWNum1050">
          <text:p text:style-name="P60">Cache offline.</text:p>
        </text:list-item>
        <text:list-item text:style-override="WWNum1051">
          <text:p text:style-name="P61">Instalação da aplicação.</text:p>
        </text:list-item>
        <text:list-item text:style-override="WWNum1052">
          <text:p text:style-name="P62">Atualização automática dos arquivos.</text:p>
        </text:list-item>
      </text:list>
      <text:p text:style-name="P3"><draw:rect text:anchor-type="as-char" style:rel-width="100%" draw:z-index="10" draw:name="Forma11" draw:style-name="gr1" draw:text-style-name="P4" svg:width="16.511cm" svg:height="0.054cm"><text:p/></draw:rect><text:bookmark-end text:name="entregas-9"/><text:bookmark-end text:name="fase-10-progressive-web-app-pwa"/></text:p>
      <text:h text:style-name="P1" text:outline-level="1"><text:bookmark-start text:name="fase-11-testes"/>Fase 11 — Testes</text:h>
      <text:p text:style-name="P2">Objetivo: validar a estabilidade da plataforma.</text:p>
      <text:h text:style-name="P5" text:outline-level="2"><text:bookmark-start text:name="entregas-10"/>Entregas</text:h>
      <text:list xml:id="list14110894112812" text:continue-list="list14111795937727" text:style-name="WWNum1053">
        <text:list-item>
          <text:p text:style-name="P63">Testes de navegação.</text:p>
        </text:list-item>
        <text:list-item text:style-override="WWNum1054">
          <text:p text:style-name="P64">Testes de responsividade.</text:p>
        </text:list-item>
        <text:list-item text:style-override="WWNum1055">
          <text:p text:style-name="P65">Testes de acessibilidade.</text:p>
        </text:list-item>
        <text:list-item text:style-override="WWNum1056">
          <text:p text:style-name="P66">Testes de desempenho.</text:p>
        </text:list-item>
        <text:list-item text:style-override="WWNum1057">
          <text:p text:style-name="P67">Correção de erros encontrados.</text:p>
        </text:list-item>
      </text:list>
      <text:p text:style-name="P3"><draw:rect text:anchor-type="as-char" style:rel-width="100%" draw:z-index="11" draw:name="Forma12" draw:style-name="gr1" draw:text-style-name="P4" svg:width="16.511cm" svg:height="0.054cm"><text:p/></draw:rect><text:bookmark-end text:name="entregas-10"/><text:bookmark-end text:name="fase-11-testes"/></text:p>
      <text:h text:style-name="P1" text:outline-level="1"><text:bookmark-start text:name="fase-12-otimização"/><text:soft-page-break/>Fase 12 — Otimização</text:h>
      <text:p text:style-name="P2">Objetivo: melhorar a qualidade do código e da aplicação.</text:p>
      <text:h text:style-name="P5" text:outline-level="2"><text:bookmark-start text:name="entregas-11"/>Entregas</text:h>
      <text:list xml:id="list14111907277019" text:continue-list="list14110894112812" text:style-name="WWNum1058">
        <text:list-item>
          <text:p text:style-name="P68">Refatoração do código.</text:p>
        </text:list-item>
        <text:list-item text:style-override="WWNum1059">
          <text:p text:style-name="P69">Organização dos arquivos.</text:p>
        </text:list-item>
        <text:list-item text:style-override="WWNum1060">
          <text:p text:style-name="P70">Remoção de código obsoleto.</text:p>
        </text:list-item>
        <text:list-item text:style-override="WWNum1061">
          <text:p text:style-name="P71">Otimização de desempenho.</text:p>
        </text:list-item>
        <text:list-item text:style-override="WWNum1062">
          <text:p text:style-name="P72">Revisão da documentação.</text:p>
        </text:list-item>
      </text:list>
      <text:p text:style-name="P3"><draw:rect text:anchor-type="as-char" style:rel-width="100%" draw:z-index="12" draw:name="Forma13" draw:style-name="gr1" draw:text-style-name="P4" svg:width="16.511cm" svg:height="0.054cm"><text:p/></draw:rect><text:bookmark-end text:name="entregas-11"/><text:bookmark-end text:name="fase-12-otimização"/></text:p>
      <text:h text:style-name="P1" text:outline-level="1"><text:bookmark-start text:name="fase-13-publicação"/>Fase 13 — Publicação</text:h>
      <text:p text:style-name="P2">Objetivo: disponibilizar a plataforma para utilização pública.</text:p>
      <text:h text:style-name="P5" text:outline-level="2"><text:bookmark-start text:name="entregas-12"/>Entregas</text:h>
      <text:list xml:id="list14111715561449" text:continue-list="list14111907277019" text:style-name="WWNum1063">
        <text:list-item>
          <text:p text:style-name="P73">Publicação no GitHub.</text:p>
        </text:list-item>
        <text:list-item text:style-override="WWNum1064">
          <text:p text:style-name="P74">Publicação no GitHub Pages.</text:p>
        </text:list-item>
        <text:list-item text:style-override="WWNum1065">
          <text:p text:style-name="P75">Revisão do README.</text:p>
        </text:list-item>
        <text:list-item text:style-override="WWNum1066">
          <text:p text:style-name="P76">Documentação final.</text:p>
        </text:list-item>
        <text:list-item text:style-override="WWNum1067">
          <text:p text:style-name="P77">Preparação para futuras versões.</text:p>
        </text:list-item>
      </text:list>
      <text:p text:style-name="P3"><draw:rect text:anchor-type="as-char" style:rel-width="100%" draw:z-index="13" draw:name="Forma14" draw:style-name="gr1" draw:text-style-name="P4" svg:width="16.511cm" svg:height="0.054cm"><text:p/></draw:rect><text:bookmark-end text:name="entregas-12"/><text:bookmark-end text:name="fase-13-publicação"/></text:p>
      <text:h text:style-name="P1" text:outline-level="1"><text:bookmark-start text:name="visão-de-longo-prazo"/>Visão de Longo Prazo</text:h>
      <text:p text:style-name="P2">Após a conclusão da primeira versão, a plataforma poderá evoluir com funcionalidades como:</text:p>
      <text:list text:style-name="WWNum1068">
        <text:list-item>
          <text:p text:style-name="P78">autenticação de usuários;</text:p>
        </text:list-item>
        <text:list-item>
          <text:p text:style-name="P78">sincronização em nuvem;</text:p>
        </text:list-item>
        <text:list-item>
          <text:p text:style-name="P78">banco de dados;</text:p>
        </text:list-item>
        <text:list-item>
          <text:p text:style-name="P78">comparação entre traduções;</text:p>
        </text:list-item>
        <text:list-item>
          <text:p text:style-name="P78">anotações pessoais;</text:p>
        </text:list-item>
        <text:list-item>
          <text:p text:style-name="P78">exportação de trechos;</text:p>
        </text:list-item>
        <text:list-item>
          <text:p text:style-name="P78">pesquisa avançada;</text:p>
        </text:list-item>
        <text:list-item>
          <text:p text:style-name="P78">inteligência artificial para apoio aos estudos;</text:p>
        </text:list-item>
        <text:list-item>
          <text:p text:style-name="P78"><text:soft-page-break/>aplicativo para dispositivos móveis.</text:p>
        </text:list-item>
      </text:list>
      <text:p text:style-name="P3"><draw:rect text:anchor-type="as-char" style:rel-width="100%" draw:z-index="14" draw:name="Forma15" draw:style-name="gr1" draw:text-style-name="P4" svg:width="16.511cm" svg:height="0.054cm"><text:p/></draw:rect></text:p>
      <text:h text:style-name="P5" text:outline-level="2"><text:bookmark-start text:name="objetivo-da-versão-1.0"/>Objetivo da Versão 1.0</text:h>
      <text:p text:style-name="P2">Ao final deste roadmap, a Biblioteca Apócrifa deverá oferecer uma plataforma de estudo completa, permitindo que qualquer usuário navegue pelo catálogo, consulte informações históricas, leia obras organizadas por seções e aprofunde seus conhecimentos por meio de comentários e recursos de apoio, tudo em uma interface moderna, responsiva e preparada para futuras expansões.<text:bookmark-end text:name="objetivo-da-versão-1.0"/><text:bookmark-end text:name="visão-de-longo-prazo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318cm" fo:margin-bottom="0.318cm" style:contextual-spacing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cm" fo:margin-bottom="0.212cm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Title" style:family="paragraph" style:parent-style-name="Standard" style:next-style-name="Text_20_body" loext:linked-style-name="Title_20_Char" style:class="chapter">
      <style:paragraph-properties fo:margin-top="0cm" fo:margin-bottom="0.141cm" style:contextual-spacing="true" fo:line-height="100%" fo:text-align="center" style:justify-single-word="false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Title" style:next-style-name="Text_20_body" loext:linked-style-name="Subtitle_20_Char" style:class="chapter">
      <style:text-properties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Author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Abstract_20_Title" style:display-name="Abstract Title" style:family="paragraph" style:parent-style-name="Standard" style:next-style-name="Abstract">
      <style:paragraph-properties fo:margin-top="0.529cm" fo:margin-bottom="0cm" style:contextual-spacing="false" fo:text-align="center" style:justify-single-word="false" fo:keep-together="always" fo:keep-with-next="always"/>
      <style:text-properties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176cm" fo:margin-bottom="0.529cm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Text_20_body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Text_20_body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Text_20_body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Text_20_body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Text_20_body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Text_20_body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Text_20_body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Text_20_body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Footnote" style:family="paragraph" style:parent-style-name="Standard" style:class="extra"/>
    <style:style style:name="Footnote_20_Block_20_Text" style:display-name="Footnote Block Text" style:family="paragraph" style:parent-style-name="Footnote" style:next-style-name="Footnote">
      <style:paragraph-properties fo:margin-left="0.847cm" fo:margin-right="0.847cm" fo:margin-top="0.176cm" fo:margin-bottom="0.176cm" style:contextual-spacing="false" fo:text-indent="0cm" style:auto-text-indent="false"/>
    </style:style>
    <style:style style:name="Definition_20_Term" style:display-name="Definition Term" style:family="paragraph" style:parent-style-name="Standard" style:next-style-name="Definition">
      <style:paragraph-properties fo:margin-top="0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423cm" fo:margin-bottom="0.141cm" style:contextual-spacing="false" fo:line-height="108%"/>
      <style:text-properties fo:color="#365f91" loext:opacity="100%" style:font-name="Aptos Display" fo:font-family="'Aptos Display'" style:font-family-generic="roman" style:font-pitch="variable" fo:font-weight="normal" style:font-name-asian="Aptos1" style:font-family-asian="Aptos" style:font-family-generic-asian="system" style:font-pitch-asian="variable" style:font-weight-asian="normal" style:font-name-complex="Noto Sans Arabic" style:font-family-complex="'Noto Sans Arabic'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/>
    <style:style style:name="ListLabel_20_425" style:display-name="ListLabel 425" style:family="text"/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/>
    <style:style style:name="ListLabel_20_429" style:display-name="ListLabel 429" style:family="text"/>
    <style:style style:name="ListLabel_20_430" style:display-name="ListLabel 430" style:family="text"/>
    <style:style style:name="ListLabel_20_431" style:display-name="ListLabel 431" style:family="text"/>
    <style:style style:name="ListLabel_20_432" style:display-name="ListLabel 432" style:family="text"/>
    <style:style style:name="ListLabel_20_433" style:display-name="ListLabel 433" style:family="text"/>
    <style:style style:name="ListLabel_20_434" style:display-name="ListLabel 434" style:family="text"/>
    <style:style style:name="ListLabel_20_435" style:display-name="ListLabel 435" style:family="text"/>
    <style:style style:name="ListLabel_20_436" style:display-name="ListLabel 436" style:family="text"/>
    <style:style style:name="ListLabel_20_437" style:display-name="ListLabel 437" style:family="text"/>
    <style:style style:name="ListLabel_20_438" style:display-name="ListLabel 438" style:family="text"/>
    <style:style style:name="ListLabel_20_439" style:display-name="ListLabel 439" style:family="text"/>
    <style:style style:name="ListLabel_20_440" style:display-name="ListLabel 440" style:family="text"/>
    <style:style style:name="ListLabel_20_441" style:display-name="ListLabel 441" style:family="text"/>
    <style:style style:name="ListLabel_20_442" style:display-name="ListLabel 442" style:family="text"/>
    <style:style style:name="ListLabel_20_443" style:display-name="ListLabel 443" style:family="text"/>
    <style:style style:name="ListLabel_20_444" style:display-name="ListLabel 444" style:family="text"/>
    <style:style style:name="ListLabel_20_445" style:display-name="ListLabel 445" style:family="text"/>
    <style:style style:name="ListLabel_20_446" style:display-name="ListLabel 446" style:family="text"/>
    <style:style style:name="ListLabel_20_447" style:display-name="ListLabel 447" style:family="text"/>
    <style:style style:name="ListLabel_20_448" style:display-name="ListLabel 448" style:family="text"/>
    <style:style style:name="ListLabel_20_449" style:display-name="ListLabel 449" style:family="text"/>
    <style:style style:name="ListLabel_20_450" style:display-name="ListLabel 450" style:family="text"/>
    <style:style style:name="ListLabel_20_451" style:display-name="ListLabel 451" style:family="text"/>
    <style:style style:name="ListLabel_20_452" style:display-name="ListLabel 452" style:family="text"/>
    <style:style style:name="ListLabel_20_453" style:display-name="ListLabel 453" style:family="text"/>
    <style:style style:name="ListLabel_20_454" style:display-name="ListLabel 454" style:family="text"/>
    <style:style style:name="ListLabel_20_455" style:display-name="ListLabel 455" style:family="text"/>
    <style:style style:name="ListLabel_20_456" style:display-name="ListLabel 456" style:family="text"/>
    <style:style style:name="ListLabel_20_457" style:display-name="ListLabel 457" style:family="text"/>
    <style:style style:name="ListLabel_20_458" style:display-name="ListLabel 458" style:family="text"/>
    <style:style style:name="ListLabel_20_459" style:display-name="ListLabel 459" style:family="text"/>
    <style:style style:name="ListLabel_20_460" style:display-name="ListLabel 460" style:family="text"/>
    <style:style style:name="ListLabel_20_461" style:display-name="ListLabel 461" style:family="text"/>
    <style:style style:name="ListLabel_20_462" style:display-name="ListLabel 462" style:family="text"/>
    <style:style style:name="ListLabel_20_463" style:display-name="ListLabel 463" style:family="text"/>
    <style:style style:name="ListLabel_20_464" style:display-name="ListLabel 464" style:family="text"/>
    <style:style style:name="ListLabel_20_465" style:display-name="ListLabel 465" style:family="text"/>
    <style:style style:name="ListLabel_20_466" style:display-name="ListLabel 466" style:family="text"/>
    <style:style style:name="ListLabel_20_467" style:display-name="ListLabel 467" style:family="text"/>
    <style:style style:name="ListLabel_20_468" style:display-name="ListLabel 468" style:family="text"/>
    <style:style style:name="ListLabel_20_469" style:display-name="ListLabel 469" style:family="text"/>
    <style:style style:name="ListLabel_20_470" style:display-name="ListLabel 470" style:family="text"/>
    <style:style style:name="ListLabel_20_471" style:display-name="ListLabel 471" style:family="text"/>
    <style:style style:name="ListLabel_20_472" style:display-name="ListLabel 472" style:family="text"/>
    <style:style style:name="ListLabel_20_473" style:display-name="ListLabel 473" style:family="text"/>
    <style:style style:name="ListLabel_20_474" style:display-name="ListLabel 474" style:family="text"/>
    <style:style style:name="ListLabel_20_475" style:display-name="ListLabel 475" style:family="text"/>
    <style:style style:name="ListLabel_20_476" style:display-name="ListLabel 476" style:family="text"/>
    <style:style style:name="ListLabel_20_477" style:display-name="ListLabel 477" style:family="text"/>
    <style:style style:name="ListLabel_20_478" style:display-name="ListLabel 478" style:family="text"/>
    <style:style style:name="ListLabel_20_479" style:display-name="ListLabel 479" style:family="text"/>
    <style:style style:name="ListLabel_20_480" style:display-name="ListLabel 480" style:family="text"/>
    <style:style style:name="ListLabel_20_481" style:display-name="ListLabel 481" style:family="text"/>
    <style:style style:name="ListLabel_20_482" style:display-name="ListLabel 482" style:family="text"/>
    <style:style style:name="ListLabel_20_483" style:display-name="ListLabel 483" style:family="text"/>
    <style:style style:name="ListLabel_20_484" style:display-name="ListLabel 484" style:family="text"/>
    <style:style style:name="ListLabel_20_485" style:display-name="ListLabel 485" style:family="text"/>
    <style:style style:name="ListLabel_20_486" style:display-name="ListLabel 486" style:family="text"/>
    <style:style style:name="ListLabel_20_487" style:display-name="ListLabel 487" style:family="text"/>
    <style:style style:name="ListLabel_20_488" style:display-name="ListLabel 488" style:family="text"/>
    <style:style style:name="ListLabel_20_489" style:display-name="ListLabel 489" style:family="text"/>
    <style:style style:name="ListLabel_20_490" style:display-name="ListLabel 490" style:family="text"/>
    <style:style style:name="ListLabel_20_491" style:display-name="ListLabel 491" style:family="text"/>
    <style:style style:name="ListLabel_20_492" style:display-name="ListLabel 492" style:family="text"/>
    <style:style style:name="ListLabel_20_493" style:display-name="ListLabel 493" style:family="text"/>
    <style:style style:name="ListLabel_20_494" style:display-name="ListLabel 494" style:family="text"/>
    <style:style style:name="ListLabel_20_495" style:display-name="ListLabel 495" style:family="text"/>
    <style:style style:name="ListLabel_20_496" style:display-name="ListLabel 496" style:family="text"/>
    <style:style style:name="ListLabel_20_497" style:display-name="ListLabel 497" style:family="text"/>
    <style:style style:name="ListLabel_20_498" style:display-name="ListLabel 498" style:family="text"/>
    <style:style style:name="ListLabel_20_499" style:display-name="ListLabel 499" style:family="text"/>
    <style:style style:name="ListLabel_20_500" style:display-name="ListLabel 500" style:family="text"/>
    <style:style style:name="ListLabel_20_501" style:display-name="ListLabel 501" style:family="text"/>
    <style:style style:name="ListLabel_20_502" style:display-name="ListLabel 502" style:family="text"/>
    <style:style style:name="ListLabel_20_503" style:display-name="ListLabel 503" style:family="text"/>
    <style:style style:name="ListLabel_20_504" style:display-name="ListLabel 504" style:family="text"/>
    <style:style style:name="ListLabel_20_505" style:display-name="ListLabel 505" style:family="text"/>
    <style:style style:name="ListLabel_20_506" style:display-name="ListLabel 506" style:family="text"/>
    <style:style style:name="ListLabel_20_507" style:display-name="ListLabel 507" style:family="text"/>
    <style:style style:name="ListLabel_20_508" style:display-name="ListLabel 508" style:family="text"/>
    <style:style style:name="ListLabel_20_509" style:display-name="ListLabel 509" style:family="text"/>
    <style:style style:name="ListLabel_20_510" style:display-name="ListLabel 510" style:family="text"/>
    <style:style style:name="ListLabel_20_511" style:display-name="ListLabel 511" style:family="text"/>
    <style:style style:name="ListLabel_20_512" style:display-name="ListLabel 512" style:family="text"/>
    <style:style style:name="ListLabel_20_513" style:display-name="ListLabel 513" style:family="text"/>
    <style:style style:name="ListLabel_20_514" style:display-name="ListLabel 514" style:family="text"/>
    <style:style style:name="ListLabel_20_515" style:display-name="ListLabel 515" style:family="text"/>
    <style:style style:name="ListLabel_20_516" style:display-name="ListLabel 516" style:family="text"/>
    <style:style style:name="ListLabel_20_517" style:display-name="ListLabel 517" style:family="text"/>
    <style:style style:name="ListLabel_20_518" style:display-name="ListLabel 518" style:family="text"/>
    <style:style style:name="ListLabel_20_519" style:display-name="ListLabel 519" style:family="text"/>
    <style:style style:name="ListLabel_20_520" style:display-name="ListLabel 520" style:family="text"/>
    <style:style style:name="ListLabel_20_521" style:display-name="ListLabel 521" style:family="text"/>
    <style:style style:name="ListLabel_20_522" style:display-name="ListLabel 522" style:family="text"/>
    <style:style style:name="ListLabel_20_523" style:display-name="ListLabel 523" style:family="text"/>
    <style:style style:name="ListLabel_20_524" style:display-name="ListLabel 524" style:family="text"/>
    <style:style style:name="ListLabel_20_525" style:display-name="ListLabel 525" style:family="text"/>
    <style:style style:name="ListLabel_20_526" style:display-name="ListLabel 526" style:family="text"/>
    <style:style style:name="ListLabel_20_527" style:display-name="ListLabel 527" style:family="text"/>
    <style:style style:name="ListLabel_20_528" style:display-name="ListLabel 528" style:family="text"/>
    <style:style style:name="ListLabel_20_529" style:display-name="ListLabel 529" style:family="text"/>
    <style:style style:name="ListLabel_20_530" style:display-name="ListLabel 530" style:family="text"/>
    <style:style style:name="ListLabel_20_531" style:display-name="ListLabel 531" style:family="text"/>
    <style:style style:name="ListLabel_20_532" style:display-name="ListLabel 532" style:family="text"/>
    <style:style style:name="ListLabel_20_533" style:display-name="ListLabel 533" style:family="text"/>
    <style:style style:name="ListLabel_20_534" style:display-name="ListLabel 534" style:family="text"/>
    <style:style style:name="ListLabel_20_535" style:display-name="ListLabel 535" style:family="text"/>
    <style:style style:name="ListLabel_20_536" style:display-name="ListLabel 536" style:family="text"/>
    <style:style style:name="ListLabel_20_537" style:display-name="ListLabel 537" style:family="text"/>
    <style:style style:name="ListLabel_20_538" style:display-name="ListLabel 538" style:family="text"/>
    <style:style style:name="ListLabel_20_539" style:display-name="ListLabel 539" style:family="text"/>
    <style:style style:name="ListLabel_20_540" style:display-name="ListLabel 540" style:family="text"/>
    <style:style style:name="ListLabel_20_541" style:display-name="ListLabel 541" style:family="text"/>
    <style:style style:name="ListLabel_20_542" style:display-name="ListLabel 542" style:family="text"/>
    <style:style style:name="ListLabel_20_543" style:display-name="ListLabel 543" style:family="text"/>
    <style:style style:name="ListLabel_20_544" style:display-name="ListLabel 544" style:family="text"/>
    <style:style style:name="ListLabel_20_545" style:display-name="ListLabel 545" style:family="text"/>
    <style:style style:name="ListLabel_20_546" style:display-name="ListLabel 546" style:family="text"/>
    <style:style style:name="ListLabel_20_547" style:display-name="ListLabel 547" style:family="text"/>
    <style:style style:name="ListLabel_20_548" style:display-name="ListLabel 548" style:family="text"/>
    <style:style style:name="ListLabel_20_549" style:display-name="ListLabel 549" style:family="text"/>
    <style:style style:name="ListLabel_20_550" style:display-name="ListLabel 550" style:family="text"/>
    <style:style style:name="ListLabel_20_551" style:display-name="ListLabel 551" style:family="text"/>
    <style:style style:name="ListLabel_20_552" style:display-name="ListLabel 552" style:family="text"/>
    <style:style style:name="ListLabel_20_553" style:display-name="ListLabel 553" style:family="text"/>
    <style:style style:name="ListLabel_20_554" style:display-name="ListLabel 554" style:family="text"/>
    <style:style style:name="ListLabel_20_555" style:display-name="ListLabel 555" style:family="text"/>
    <style:style style:name="ListLabel_20_556" style:display-name="ListLabel 556" style:family="text"/>
    <style:style style:name="ListLabel_20_557" style:display-name="ListLabel 557" style:family="text"/>
    <style:style style:name="ListLabel_20_558" style:display-name="ListLabel 558" style:family="text"/>
    <style:style style:name="ListLabel_20_559" style:display-name="ListLabel 559" style:family="text"/>
    <style:style style:name="ListLabel_20_560" style:display-name="ListLabel 560" style:family="text"/>
    <style:style style:name="ListLabel_20_561" style:display-name="ListLabel 561" style:family="text"/>
    <style:style style:name="ListLabel_20_562" style:display-name="ListLabel 562" style:family="text"/>
    <style:style style:name="ListLabel_20_563" style:display-name="ListLabel 563" style:family="text"/>
    <style:style style:name="ListLabel_20_564" style:display-name="ListLabel 564" style:family="text"/>
    <style:style style:name="ListLabel_20_565" style:display-name="ListLabel 565" style:family="text"/>
    <style:style style:name="ListLabel_20_566" style:display-name="ListLabel 566" style:family="text"/>
    <style:style style:name="ListLabel_20_567" style:display-name="ListLabel 567" style:family="text"/>
    <style:style style:name="ListLabel_20_568" style:display-name="ListLabel 568" style:family="text"/>
    <style:style style:name="ListLabel_20_569" style:display-name="ListLabel 569" style:family="text"/>
    <style:style style:name="ListLabel_20_570" style:display-name="ListLabel 570" style:family="text"/>
    <style:style style:name="ListLabel_20_571" style:display-name="ListLabel 571" style:family="text"/>
    <style:style style:name="ListLabel_20_572" style:display-name="ListLabel 572" style:family="text"/>
    <style:style style:name="ListLabel_20_573" style:display-name="ListLabel 573" style:family="text"/>
    <style:style style:name="ListLabel_20_574" style:display-name="ListLabel 574" style:family="text"/>
    <style:style style:name="ListLabel_20_575" style:display-name="ListLabel 575" style:family="text"/>
    <style:style style:name="ListLabel_20_576" style:display-name="ListLabel 576" style:family="text"/>
    <style:style style:name="ListLabel_20_577" style:display-name="ListLabel 577" style:family="text"/>
    <style:style style:name="ListLabel_20_578" style:display-name="ListLabel 578" style:family="text"/>
    <style:style style:name="ListLabel_20_579" style:display-name="ListLabel 579" style:family="text"/>
    <style:style style:name="ListLabel_20_580" style:display-name="ListLabel 580" style:family="text"/>
    <style:style style:name="ListLabel_20_581" style:display-name="ListLabel 581" style:family="text"/>
    <style:style style:name="ListLabel_20_582" style:display-name="ListLabel 582" style:family="text"/>
    <style:style style:name="ListLabel_20_583" style:display-name="ListLabel 583" style:family="text"/>
    <style:style style:name="ListLabel_20_584" style:display-name="ListLabel 584" style:family="text"/>
    <style:style style:name="ListLabel_20_585" style:display-name="ListLabel 585" style:family="text"/>
    <style:style style:name="ListLabel_20_586" style:display-name="ListLabel 586" style:family="text"/>
    <style:style style:name="ListLabel_20_587" style:display-name="ListLabel 587" style:family="text"/>
    <style:style style:name="ListLabel_20_588" style:display-name="ListLabel 588" style:family="text"/>
    <style:style style:name="ListLabel_20_589" style:display-name="ListLabel 589" style:family="text"/>
    <style:style style:name="ListLabel_20_590" style:display-name="ListLabel 590" style:family="text"/>
    <style:style style:name="ListLabel_20_591" style:display-name="ListLabel 591" style:family="text"/>
    <style:style style:name="ListLabel_20_592" style:display-name="ListLabel 592" style:family="text"/>
    <style:style style:name="ListLabel_20_593" style:display-name="ListLabel 593" style:family="text"/>
    <style:style style:name="ListLabel_20_594" style:display-name="ListLabel 594" style:family="text"/>
    <style:style style:name="ListLabel_20_595" style:display-name="ListLabel 595" style:family="text"/>
    <style:style style:name="ListLabel_20_596" style:display-name="ListLabel 596" style:family="text"/>
    <style:style style:name="ListLabel_20_597" style:display-name="ListLabel 597" style:family="text"/>
    <style:style style:name="ListLabel_20_598" style:display-name="ListLabel 598" style:family="text"/>
    <style:style style:name="ListLabel_20_599" style:display-name="ListLabel 599" style:family="text"/>
    <style:style style:name="ListLabel_20_600" style:display-name="ListLabel 600" style:family="text"/>
    <style:style style:name="ListLabel_20_601" style:display-name="ListLabel 601" style:family="text"/>
    <style:style style:name="ListLabel_20_602" style:display-name="ListLabel 602" style:family="text"/>
    <style:style style:name="ListLabel_20_603" style:display-name="ListLabel 603" style:family="text"/>
    <style:style style:name="ListLabel_20_604" style:display-name="ListLabel 604" style:family="text"/>
    <style:style style:name="ListLabel_20_605" style:display-name="ListLabel 605" style:family="text"/>
    <style:style style:name="ListLabel_20_606" style:display-name="ListLabel 606" style:family="text"/>
    <style:style style:name="ListLabel_20_607" style:display-name="ListLabel 607" style:family="text"/>
    <style:style style:name="ListLabel_20_608" style:display-name="ListLabel 608" style:family="text"/>
    <style:style style:name="ListLabel_20_609" style:display-name="ListLabel 609" style:family="text"/>
    <style:style style:name="ListLabel_20_610" style:display-name="ListLabel 610" style:family="text"/>
    <style:style style:name="ListLabel_20_611" style:display-name="ListLabel 611" style:family="text"/>
    <style:style style:name="ListLabel_20_612" style:display-name="ListLabel 612" style:family="text"/>
    <style:style style:name="ListLabel_20_613" style:display-name="ListLabel 613" style:family="text">
      <style:text-properties style:font-name-complex="Symbol" style:font-family-complex="Symbol" style:font-family-generic-complex="system" style:font-pitch-complex="variable"/>
    </style:style>
    <style:style style:name="ListLabel_20_614" style:display-name="ListLabel 614" style:family="text">
      <style:text-properties style:font-name-complex="Courier New" style:font-family-complex="'Courier New'" style:font-family-generic-complex="system" style:font-pitch-complex="variable"/>
    </style:style>
    <style:style style:name="ListLabel_20_615" style:display-name="ListLabel 615" style:family="text">
      <style:text-properties style:font-name-complex="Wingdings" style:font-family-complex="Wingdings" style:font-family-generic-complex="system" style:font-pitch-complex="variable"/>
    </style:style>
    <style:style style:name="ListLabel_20_616" style:display-name="ListLabel 616" style:family="text">
      <style:text-properties style:font-name-complex="Symbol" style:font-family-complex="Symbol" style:font-family-generic-complex="system" style:font-pitch-complex="variable"/>
    </style:style>
    <style:style style:name="ListLabel_20_617" style:display-name="ListLabel 617" style:family="text">
      <style:text-properties style:font-name-complex="Courier New" style:font-family-complex="'Courier New'" style:font-family-generic-complex="system" style:font-pitch-complex="variable"/>
    </style:style>
    <style:style style:name="ListLabel_20_618" style:display-name="ListLabel 618" style:family="text">
      <style:text-properties style:font-name-complex="Wingdings" style:font-family-complex="Wingdings" style:font-family-generic-complex="system" style:font-pitch-complex="variable"/>
    </style:style>
    <style:style style:name="ListLabel_20_619" style:display-name="ListLabel 619" style:family="text">
      <style:text-properties style:font-name-complex="Symbol" style:font-family-complex="Symbol" style:font-family-generic-complex="system" style:font-pitch-complex="variable"/>
    </style:style>
    <style:style style:name="ListLabel_20_620" style:display-name="ListLabel 620" style:family="text">
      <style:text-properties style:font-name-complex="Courier New" style:font-family-complex="'Courier New'" style:font-family-generic-complex="system" style:font-pitch-complex="variable"/>
    </style:style>
    <style:style style:name="ListLabel_20_621" style:display-name="ListLabel 621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1">
      <text:list-level-style-bullet text:level="1" text:style-name="ListLabel_20_10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2">
      <text:list-level-style-bullet text:level="1" text:style-name="ListLabel_20_19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3">
      <text:list-level-style-bullet text:level="1" text:style-name="ListLabel_20_28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4">
      <text:list-level-style-bullet text:level="1" text:style-name="ListLabel_20_37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5">
      <text:list-level-style-bullet text:level="1" text:style-name="ListLabel_20_46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6">
      <text:list-level-style-bullet text:level="1" text:style-name="ListLabel_20_5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7">
      <text:list-level-style-bullet text:level="1" text:style-name="ListLabel_20_6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8">
      <text:list-level-style-bullet text:level="1" text:style-name="ListLabel_20_7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9">
      <text:list-level-style-bullet text:level="1" text:style-name="ListLabel_20_8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0">
      <text:list-level-style-bullet text:level="1" text:style-name="ListLabel_20_9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1">
      <text:list-level-style-bullet text:level="1" text:style-name="ListLabel_20_10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2">
      <text:list-level-style-bullet text:level="1" text:style-name="ListLabel_20_10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3">
      <text:list-level-style-bullet text:level="1" text:style-name="ListLabel_20_11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4">
      <text:list-level-style-bullet text:level="1" text:style-name="ListLabel_20_12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3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3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3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3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3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5">
      <text:list-level-style-bullet text:level="1" text:style-name="ListLabel_20_13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3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3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4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4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4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4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6">
      <text:list-level-style-bullet text:level="1" text:style-name="ListLabel_20_14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4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4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4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5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5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5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7">
      <text:list-level-style-bullet text:level="1" text:style-name="ListLabel_20_15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5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5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5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5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6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6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8">
      <text:list-level-style-bullet text:level="1" text:style-name="ListLabel_20_16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6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6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6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6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6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7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9">
      <text:list-level-style-bullet text:level="1" text:style-name="ListLabel_20_17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7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7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7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7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7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7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0">
      <text:list-level-style-bullet text:level="1" text:style-name="ListLabel_20_18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8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8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8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8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8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8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8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1">
      <text:list-level-style-bullet text:level="1" text:style-name="ListLabel_20_19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9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9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9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9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9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9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9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9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2">
      <text:list-level-style-bullet text:level="1" text:style-name="ListLabel_20_19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0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0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0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0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0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0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0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3">
      <text:list-level-style-bullet text:level="1" text:style-name="ListLabel_20_20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1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1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1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1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1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1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4">
      <text:list-level-style-bullet text:level="1" text:style-name="ListLabel_20_21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1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2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2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2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2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2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5">
      <text:list-level-style-bullet text:level="1" text:style-name="ListLabel_20_22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2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2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3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3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3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3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6">
      <text:list-level-style-bullet text:level="1" text:style-name="ListLabel_20_23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3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3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3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4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4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4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7">
      <text:list-level-style-bullet text:level="1" text:style-name="ListLabel_20_24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4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4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4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4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5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5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8">
      <text:list-level-style-bullet text:level="1" text:style-name="ListLabel_20_25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5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5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5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5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5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6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9">
      <text:list-level-style-bullet text:level="1" text:style-name="ListLabel_20_26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6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6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6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6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6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6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0">
      <text:list-level-style-bullet text:level="1" text:style-name="ListLabel_20_27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7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7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7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7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7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7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7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1">
      <text:list-level-style-bullet text:level="1" text:style-name="ListLabel_20_28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8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8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8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8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8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8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8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8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2">
      <text:list-level-style-bullet text:level="1" text:style-name="ListLabel_20_28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9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9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9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9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9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9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9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3">
      <text:list-level-style-bullet text:level="1" text:style-name="ListLabel_20_29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0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0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0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0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0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0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4">
      <text:list-level-style-bullet text:level="1" text:style-name="ListLabel_20_30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0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1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1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1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1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1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5">
      <text:list-level-style-bullet text:level="1" text:style-name="ListLabel_20_31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1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1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2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2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2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2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6">
      <text:list-level-style-bullet text:level="1" text:style-name="ListLabel_20_32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2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2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2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3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3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3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7">
      <text:list-level-style-bullet text:level="1" text:style-name="ListLabel_20_33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3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3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3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3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4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4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8">
      <text:list-level-style-bullet text:level="1" text:style-name="ListLabel_20_34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4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4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4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4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4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5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9">
      <text:list-level-style-bullet text:level="1" text:style-name="ListLabel_20_35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5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5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5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5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5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5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0">
      <text:list-level-style-bullet text:level="1" text:style-name="ListLabel_20_36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6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6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6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6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6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6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6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1">
      <text:list-level-style-bullet text:level="1" text:style-name="ListLabel_20_37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7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7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7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7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7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7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7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7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2">
      <text:list-level-style-bullet text:level="1" text:style-name="ListLabel_20_37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8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8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8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8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8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8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8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3">
      <text:list-level-style-bullet text:level="1" text:style-name="ListLabel_20_38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9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9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9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9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9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9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4">
      <text:list-level-style-bullet text:level="1" text:style-name="ListLabel_20_39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9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0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0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0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0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0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5">
      <text:list-level-style-bullet text:level="1" text:style-name="ListLabel_20_40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0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0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1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1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1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1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6">
      <text:list-level-style-bullet text:level="1" text:style-name="ListLabel_20_41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1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1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1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2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2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2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7">
      <text:list-level-style-bullet text:level="1" text:style-name="ListLabel_20_42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2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2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2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2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3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3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8">
      <text:list-level-style-bullet text:level="1" text:style-name="ListLabel_20_43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3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3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3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3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3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4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9">
      <text:list-level-style-bullet text:level="1" text:style-name="ListLabel_20_44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4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4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4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4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4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4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0">
      <text:list-level-style-bullet text:level="1" text:style-name="ListLabel_20_45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5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5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5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5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5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5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5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1">
      <text:list-level-style-bullet text:level="1" text:style-name="ListLabel_20_46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6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6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6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6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6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6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6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6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2">
      <text:list-level-style-bullet text:level="1" text:style-name="ListLabel_20_46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7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7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7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7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7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7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7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3">
      <text:list-level-style-bullet text:level="1" text:style-name="ListLabel_20_47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8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8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8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8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8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8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4">
      <text:list-level-style-bullet text:level="1" text:style-name="ListLabel_20_48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8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9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9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9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9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9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5">
      <text:list-level-style-bullet text:level="1" text:style-name="ListLabel_20_49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9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9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0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0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0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0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6">
      <text:list-level-style-bullet text:level="1" text:style-name="ListLabel_20_50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0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0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0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1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1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1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7">
      <text:list-level-style-bullet text:level="1" text:style-name="ListLabel_20_51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1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1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1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1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2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2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8">
      <text:list-level-style-bullet text:level="1" text:style-name="ListLabel_20_52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2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2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2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2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2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3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9">
      <text:list-level-style-bullet text:level="1" text:style-name="ListLabel_20_53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3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3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3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3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3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3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0">
      <text:list-level-style-bullet text:level="1" text:style-name="ListLabel_20_54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4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4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4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4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4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4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4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1">
      <text:list-level-style-bullet text:level="1" text:style-name="ListLabel_20_55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5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5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5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5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5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5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5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5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2">
      <text:list-level-style-bullet text:level="1" text:style-name="ListLabel_20_55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6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6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6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6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6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6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6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3">
      <text:list-level-style-bullet text:level="1" text:style-name="ListLabel_20_56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7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7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7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7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7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7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4">
      <text:list-level-style-bullet text:level="1" text:style-name="ListLabel_20_57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7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8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8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8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8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8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5">
      <text:list-level-style-bullet text:level="1" text:style-name="ListLabel_20_58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8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8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9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9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9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9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6">
      <text:list-level-style-bullet text:level="1" text:style-name="ListLabel_20_59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9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9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9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0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0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0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7">
      <text:list-level-style-bullet text:level="1" text:style-name="ListLabel_20_60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0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0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0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0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1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1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8">
      <text:list-level-style-bullet text:level="1" text:style-name="ListLabel_20_6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8T13:57:37</meta:creation-date>
    <dc:date>2026-07-15T01:41:09.788946790</dc:date>
    <meta:generator>LibreOffice/26.2.4.2$Linux_X86_64 LibreOffice_project/620$Build-2</meta:generator>
    <meta:editing-duration>PT8H42M45S</meta:editing-duration>
    <dc:creator>João António</dc:creator>
    <meta:editing-cycles>8</meta:editing-cycles>
    <meta:document-statistic meta:table-count="0" meta:image-count="0" meta:object-count="0" meta:page-count="6" meta:paragraph-count="136" meta:word-count="637" meta:character-count="4129" meta:non-whitespace-character-count="3675"/>
    <meta:user-defined meta:name="AppVersion">12.0000</meta:user-defined>
    <meta:template xlink:type="simple" xlink:actuate="onRequest" xlink:title="Normal.dotm" xlink:href=""/>
  </office:meta>
</office:document-meta>
</file>