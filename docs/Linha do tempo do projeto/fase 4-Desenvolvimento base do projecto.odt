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006cm" table:align="left"/>
    </style:style>
    <style:style style:name="Tabela1.A" style:family="table-column">
      <style:table-column-properties style:column-width="3.769cm"/>
    </style:style>
    <style:style style:name="Tabela1.B" style:family="table-column">
      <style:table-column-properties style:column-width="12.23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063cm" table:align="left"/>
    </style:style>
    <style:style style:name="Tabela2.A" style:family="table-column">
      <style:table-column-properties style:column-width="3.769cm"/>
    </style:style>
    <style:style style:name="Tabela2.B" style:family="table-column">
      <style:table-column-properties style:column-width="7.29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324cm" table:align="left"/>
    </style:style>
    <style:style style:name="Tabela3.A" style:family="table-column">
      <style:table-column-properties style:column-width="5.293cm"/>
    </style:style>
    <style:style style:name="Tabela3.B" style:family="table-column">
      <style:table-column-properties style:column-width="7.03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6.168cm" table:align="left"/>
    </style:style>
    <style:style style:name="Tabela4.A" style:family="table-column">
      <style:table-column-properties style:column-width="4.202cm"/>
    </style:style>
    <style:style style:name="Tabela4.B" style:family="table-column">
      <style:table-column-properties style:column-width="1.967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5.567cm" table:align="left"/>
    </style:style>
    <style:style style:name="Tabela5.A" style:family="table-column">
      <style:table-column-properties style:column-width="1.812cm"/>
    </style:style>
    <style:style style:name="Tabela5.B" style:family="table-column">
      <style:table-column-properties style:column-width="3.755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orizontal_20_Line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</style:style>
    <style:style style:name="P8" style:family="paragraph" style:parent-style-name="Heading_20_3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Heading_20_1">
      <style:paragraph-properties fo:margin-top="0cm" fo:margin-bottom="0.247cm" style:contextual-spacing="false" fo:line-height="115%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Quotations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>
      <style:paragraph-properties fo:margin-top="0cm" fo:margin-bottom="0cm" style:contextual-spacing="false"/>
    </style:style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 style:list-style-name="L25"/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1"/>
    <style:style style:name="P39" style:family="paragraph" style:parent-style-name="Text_20_body" style:list-style-name="L32"/>
    <style:style style:name="P40" style:family="paragraph" style:parent-style-name="Text_20_body" style:list-style-name="L33"/>
    <style:style style:name="P41" style:family="paragraph" style:parent-style-name="Text_20_body" style:list-style-name="L34"/>
    <style:style style:name="P42" style:family="paragraph" style:parent-style-name="Text_20_body" style:list-style-name="L35"/>
    <style:style style:name="P43" style:family="paragraph" style:parent-style-name="Text_20_body" style:list-style-name="L36"/>
    <style:style style:name="P44" style:family="paragraph" style:parent-style-name="Text_20_body" style:list-style-name="L37"/>
    <style:style style:name="P45" style:family="paragraph" style:parent-style-name="Text_20_body" style:list-style-name="L38"/>
    <style:style style:name="P46" style:family="paragraph" style:parent-style-name="Text_20_body" style:list-style-name="L39"/>
    <style:style style:name="P47" style:family="paragraph" style:parent-style-name="Text_20_body" style:list-style-name="L40"/>
    <style:style style:name="P48" style:family="paragraph" style:parent-style-name="Text_20_body" style:list-style-name="L41"/>
    <style:style style:name="P49" style:family="paragraph" style:parent-style-name="Text_20_body" style:list-style-name="L42"/>
    <style:style style:name="P50" style:family="paragraph" style:parent-style-name="Text_20_body" style:list-style-name="L43"/>
    <style:style style:name="P51" style:family="paragraph" style:parent-style-name="Text_20_body" style:list-style-name="L44"/>
    <style:style style:name="P52" style:family="paragraph" style:parent-style-name="Text_20_body" style:list-style-name="L45"/>
    <style:style style:name="P53" style:family="paragraph" style:parent-style-name="Text_20_body" style:list-style-name="L46"/>
    <style:style style:name="P54" style:family="paragraph" style:parent-style-name="Text_20_body" style:list-style-name="L47"/>
    <style:style style:name="P55" style:family="paragraph" style:parent-style-name="Text_20_body" style:list-style-name="L48"/>
    <style:style style:name="P56" style:family="paragraph" style:parent-style-name="Text_20_body">
      <style:text-properties officeooo:rsid="002a372b" officeooo:paragraph-rsid="002a372b"/>
    </style:style>
    <style:style style:name="P57" style:family="paragraph" style:parent-style-name="Heading_20_2">
      <style:paragraph-properties fo:margin-top="0cm" fo:margin-bottom="0.247cm" style:contextual-spacing="false" fo:line-height="115%"/>
      <style:text-properties officeooo:rsid="002a372b"/>
    </style:style>
    <style:style style:name="P58" style:family="paragraph" style:parent-style-name="Text_20_body">
      <style:text-properties officeooo:rsid="002a372b"/>
    </style:style>
    <style:style style:name="P59" style:family="paragraph" style:parent-style-name="Text_20_body" style:list-style-name="L49">
      <style:paragraph-properties fo:margin-top="0cm" fo:margin-bottom="0cm" style:contextual-spacing="false"/>
      <style:text-properties officeooo:rsid="002a372b"/>
    </style:style>
    <style:style style:name="P60" style:family="paragraph" style:parent-style-name="Text_20_body" style:list-style-name="L49">
      <style:text-properties officeooo:rsid="002a372b"/>
    </style:style>
    <style:style style:name="P61" style:family="paragraph" style:parent-style-name="Horizontal_20_Line">
      <style:paragraph-properties fo:margin-top="0cm" fo:margin-bottom="0.247cm" style:contextual-spacing="false" fo:line-height="115%"/>
      <style:text-properties officeooo:rsid="002a372b"/>
    </style:style>
    <style:style style:name="P6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rsid="002a372b"/>
    </style:style>
    <style:style style:name="P63" style:family="paragraph" style:parent-style-name="Preformatted_20_Text">
      <style:paragraph-properties fo:margin-top="0cm" fo:margin-bottom="0.247cm" style:contextual-spacing="false" fo:line-height="115%"/>
      <style:text-properties officeooo:rsid="002a372b"/>
    </style:style>
    <style:style style:name="P64" style:family="paragraph" style:parent-style-name="Text_20_body" style:list-style-name="L50">
      <style:paragraph-properties fo:margin-top="0cm" fo:margin-bottom="0cm" style:contextual-spacing="false"/>
      <style:text-properties officeooo:rsid="002a372b"/>
    </style:style>
    <style:style style:name="P65" style:family="paragraph" style:parent-style-name="Text_20_body" style:list-style-name="L50">
      <style:text-properties officeooo:rsid="002a372b"/>
    </style:style>
    <style:style style:name="P66" style:family="paragraph" style:parent-style-name="Heading_20_3">
      <style:paragraph-properties fo:margin-top="0cm" fo:margin-bottom="0.247cm" style:contextual-spacing="false" fo:line-height="115%"/>
      <style:text-properties officeooo:rsid="002a372b"/>
    </style:style>
    <style:style style:name="P67" style:family="paragraph" style:parent-style-name="Text_20_body" style:list-style-name="L51">
      <style:paragraph-properties fo:margin-top="0cm" fo:margin-bottom="0cm" style:contextual-spacing="false"/>
      <style:text-properties officeooo:rsid="002a372b"/>
    </style:style>
    <style:style style:name="P68" style:family="paragraph" style:parent-style-name="Text_20_body" style:list-style-name="L51">
      <style:text-properties officeooo:rsid="002a372b"/>
    </style:style>
    <style:style style:name="P69" style:family="paragraph" style:parent-style-name="Text_20_body" style:list-style-name="L52">
      <style:paragraph-properties fo:margin-top="0cm" fo:margin-bottom="0cm" style:contextual-spacing="false"/>
      <style:text-properties officeooo:rsid="002a372b"/>
    </style:style>
    <style:style style:name="P70" style:family="paragraph" style:parent-style-name="Text_20_body" style:list-style-name="L52">
      <style:text-properties officeooo:rsid="002a372b"/>
    </style:style>
    <style:style style:name="P71" style:family="paragraph" style:parent-style-name="Heading_20_1">
      <style:paragraph-properties fo:margin-top="0cm" fo:margin-bottom="0.247cm" style:contextual-spacing="false" fo:line-height="115%"/>
      <style:text-properties officeooo:rsid="002a372b"/>
    </style:style>
    <style:style style:name="P72" style:family="paragraph" style:parent-style-name="Text_20_body" style:list-style-name="L53">
      <style:text-properties officeooo:rsid="002a372b"/>
    </style:style>
    <style:style style:name="P73" style:family="paragraph" style:parent-style-name="Text_20_body" style:list-style-name="L54">
      <style:text-properties officeooo:rsid="002a372b"/>
    </style:style>
    <style:style style:name="P74" style:family="paragraph" style:parent-style-name="Text_20_body" style:list-style-name="L55">
      <style:text-properties officeooo:rsid="002a372b"/>
    </style:style>
    <style:style style:name="P75" style:family="paragraph" style:parent-style-name="Text_20_body" style:list-style-name="L56">
      <style:text-properties officeooo:rsid="002a372b"/>
    </style:style>
    <style:style style:name="P76" style:family="paragraph" style:parent-style-name="Text_20_body" style:list-style-name="L57">
      <style:text-properties officeooo:rsid="002a372b"/>
    </style:style>
    <style:style style:name="P77" style:family="paragraph" style:parent-style-name="Text_20_body">
      <style:text-properties officeooo:rsid="002dea74" officeooo:paragraph-rsid="002dea74"/>
    </style:style>
    <style:style style:name="P78" style:family="paragraph" style:parent-style-name="Heading_20_2">
      <style:paragraph-properties fo:margin-top="0cm" fo:margin-bottom="0.247cm" style:contextual-spacing="false" fo:line-height="115%"/>
      <style:text-properties officeooo:rsid="002dea74"/>
    </style:style>
    <style:style style:name="P79" style:family="paragraph" style:parent-style-name="Text_20_body">
      <style:text-properties officeooo:rsid="002dea74"/>
    </style:style>
    <style:style style:name="P80" style:family="paragraph" style:parent-style-name="Heading_20_3">
      <style:paragraph-properties fo:margin-top="0cm" fo:margin-bottom="0.247cm" style:contextual-spacing="false" fo:line-height="115%"/>
      <style:text-properties officeooo:rsid="002dea74"/>
    </style:style>
    <style:style style:name="P81" style:family="paragraph" style:parent-style-name="Preformatted_20_Text">
      <style:paragraph-properties fo:margin-top="0cm" fo:margin-bottom="0.247cm" style:contextual-spacing="false" fo:line-height="115%"/>
      <style:text-properties officeooo:rsid="002dea74"/>
    </style:style>
    <style:style style:name="P82" style:family="paragraph" style:parent-style-name="Horizontal_20_Line">
      <style:paragraph-properties fo:margin-top="0cm" fo:margin-bottom="0.247cm" style:contextual-spacing="false" fo:line-height="115%"/>
      <style:text-properties officeooo:rsid="002dea74"/>
    </style:style>
    <style:style style:name="P83" style:family="paragraph" style:parent-style-name="Heading_20_1">
      <style:paragraph-properties fo:margin-top="0cm" fo:margin-bottom="0.247cm" style:contextual-spacing="false" fo:line-height="115%"/>
      <style:text-properties officeooo:rsid="002dea74"/>
    </style:style>
    <style:style style:name="P84" style:family="paragraph" style:parent-style-name="Text_20_body" style:list-style-name="L58">
      <style:text-properties officeooo:rsid="002dea74"/>
    </style:style>
    <style:style style:name="P85" style:family="paragraph" style:parent-style-name="Text_20_body" style:list-style-name="L59">
      <style:text-properties officeooo:rsid="002dea74"/>
    </style:style>
    <style:style style:name="P86" style:family="paragraph" style:parent-style-name="Text_20_body" style:list-style-name="L60">
      <style:text-properties officeooo:rsid="002dea74"/>
    </style:style>
    <style:style style:name="P87" style:family="paragraph" style:parent-style-name="Text_20_body" style:list-style-name="L61">
      <style:text-properties officeooo:rsid="002dea74"/>
    </style:style>
    <style:style style:name="P88" style:family="paragraph" style:parent-style-name="Text_20_body" style:list-style-name="L62">
      <style:text-properties officeooo:rsid="002dea74"/>
    </style:style>
    <style:style style:name="P89" style:family="paragraph" style:parent-style-name="Text_20_body">
      <style:text-properties officeooo:rsid="0031ce28" officeooo:paragraph-rsid="0031ce28"/>
    </style:style>
    <style:style style:name="P90" style:family="paragraph" style:parent-style-name="Text_20_body">
      <style:text-properties officeooo:rsid="0031ce28"/>
    </style:style>
    <style:style style:name="P91" style:family="paragraph" style:parent-style-name="Preformatted_20_Text">
      <style:paragraph-properties fo:margin-top="0cm" fo:margin-bottom="0.247cm" style:contextual-spacing="false" fo:line-height="115%"/>
      <style:text-properties officeooo:rsid="0031ce28"/>
    </style:style>
    <style:style style:name="P92" style:family="paragraph" style:parent-style-name="Text_20_body" style:list-style-name="L63">
      <style:text-properties officeooo:rsid="0031ce28"/>
    </style:style>
    <style:style style:name="P93" style:family="paragraph" style:parent-style-name="Horizontal_20_Line">
      <style:paragraph-properties fo:margin-top="0cm" fo:margin-bottom="0.247cm" style:contextual-spacing="false" fo:line-height="115%"/>
      <style:text-properties officeooo:rsid="0031ce28"/>
    </style:style>
    <style:style style:name="P94" style:family="paragraph" style:parent-style-name="Heading_20_1">
      <style:paragraph-properties fo:margin-top="0cm" fo:margin-bottom="0.247cm" style:contextual-spacing="false" fo:line-height="115%"/>
      <style:text-properties officeooo:rsid="0031ce28"/>
    </style:style>
    <style:style style:name="P95" style:family="paragraph" style:parent-style-name="Heading_20_3">
      <style:paragraph-properties fo:margin-top="0cm" fo:margin-bottom="0.247cm" style:contextual-spacing="false" fo:line-height="115%"/>
      <style:text-properties officeooo:rsid="0031ce28"/>
    </style:style>
    <style:style style:name="P96" style:family="paragraph" style:parent-style-name="Text_20_body" style:list-style-name="L64">
      <style:text-properties officeooo:rsid="0031ce28"/>
    </style:style>
    <style:style style:name="P97" style:family="paragraph" style:parent-style-name="Heading_20_2">
      <style:paragraph-properties fo:margin-top="0cm" fo:margin-bottom="0.247cm" style:contextual-spacing="false" fo:line-height="115%"/>
      <style:text-properties officeooo:rsid="0031ce28"/>
    </style:style>
    <style:style style:name="T1" style:family="text">
      <style:text-properties officeooo:rsid="001ce0e6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. Agora entramos realmente na <text:span text:style-name="Strong_20_Emphasis">Fase 4 — Desenvolvimento da Base</text:span>.</text:p>
      <text:p text:style-name="Text_20_body">Antes de mexer no código, quero reforçar uma decisão importante de engenharia:</text:p>
      <text:p text:style-name="Text_20_body">O seu <text:span text:style-name="Source_20_Text">index.html</text:span> atual <text:span text:style-name="Strong_20_Emphasis">já possui conteúdo valioso</text:span>, principalmente a parte histórica. Nós não vamos apagar isso. Vamos <text:span text:style-name="Strong_20_Emphasis">refatorar e adaptar para a nova arquitetura do projeto</text:span>.</text:p>
      <text:p text:style-name="Text_20_body">O objetivo desta primeira entrega é:</text:p>
      <text:h text:style-name="Heading_20_1" text:outline-level="1">Sprint 4.1 — Desenvolver a Página Inicial</text:h>
      <text:h text:style-name="Heading_20_2" text:outline-level="2">Meta</text:h>
      <text:p text:style-name="Text_20_body">Transformar o <text:span text:style-name="Source_20_Text">index.html</text:span> em uma página inicial de uma <text:span text:style-name="Strong_20_Emphasis">plataforma de estudo</text:span>, não apenas em um artigo histórico.</text:p>
      <text:p text:style-name="Text_20_body">Hoje ele funciona como uma página informativa. Precisamos transformar em:</text:p>
      <text:p text:style-name="Quotations">Uma porta de entrada para uma biblioteca digital de pesquisa e estudo.</text:p>
      <text:p text:style-name="Horizontal_20_Line"/>
      <text:h text:style-name="Heading_20_1" text:outline-level="1">Problemas atuais encontrados no index</text:h>
      <text:h text:style-name="Heading_20_2" text:outline-level="2">1. O conteúdo está misturado</text:h>
      <text:p text:style-name="Text_20_body">Hoje temos:</text:p>
      <text:list text:style-name="L1">
        <text:list-item>
          <text:p text:style-name="P1">estrutura da página;</text:p>
        </text:list-item>
        <text:list-item>
          <text:p text:style-name="P1">conteúdo histórico;</text:p>
        </text:list-item>
        <text:list-item>
          <text:p text:style-name="P1">navegação;</text:p>
        </text:list-item>
        <text:list-item>
          <text:p text:style-name="P1">rodapé;</text:p>
        </text:list-item>
      </text:list>
      <text:p text:style-name="Text_20_body">tudo dentro do mesmo arquivo.</text:p>
      <text:p text:style-name="Text_20_body">No futuro isso dificulta manutenção.</text:p>
      <text:p text:style-name="Horizontal_20_Line"/>
      <text:h text:style-name="Heading_20_2" text:outline-level="2">2. Falta uma hierarquia de página inicial</text:h>
      <text:p text:style-name="Text_20_body">Pelo wireframe definido, a Home precisa ter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Hero (apresentação)</text:span></text:p>
      <text:p text:style-name="Preformatted_20_Text"/>
      <text:p text:style-name="Preformatted_20_Text"><text:span text:style-name="Source_20_Text">Introdução histórica</text:span></text:p>
      <text:p text:style-name="Preformatted_20_Text"/>
      <text:p text:style-name="Preformatted_20_Text"><text:span text:style-name="Source_20_Text">Como funciona a plataforma</text:span></text:p>
      <text:p text:style-name="Preformatted_20_Text"/>
      <text:p text:style-name="Preformatted_20_Text"><text:span text:style-name="Source_20_Text">Obras em destaque</text:span></text:p>
      <text:p text:style-name="Preformatted_20_Text"><text:soft-page-break/></text:p>
      <text:p text:style-name="Preformatted_20_Text"><text:span text:style-name="Source_20_Text">Nota do editor</text:span></text:p>
      <text:p text:style-name="Preformatted_20_Text"/>
      <text:p text:style-name="P2"><text:span text:style-name="Source_20_Text">Footer</text:span></text:p>
      <text:p text:style-name="Text_20_body">Hoje temos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Texto gigante</text:span></text:p>
      <text:p text:style-name="Preformatted_20_Text"/>
      <text:p text:style-name="Preformatted_20_Text"><text:span text:style-name="Source_20_Text">Gnose</text:span></text:p>
      <text:p text:style-name="Preformatted_20_Text"/>
      <text:p text:style-name="Preformatted_20_Text"><text:span text:style-name="Source_20_Text">Nota</text:span></text:p>
      <text:p text:style-name="Preformatted_20_Text"/>
      <text:p text:style-name="P2"><text:span text:style-name="Source_20_Text">Footer</text:span></text:p>
      <text:p text:style-name="Horizontal_20_Line"/>
      <text:h text:style-name="Heading_20_2" text:outline-level="2">3. Conteúdo histórico precisa virar uma seção</text:h>
      <text:p text:style-name="Text_20_body">O conteúdo atual é excelente, mas ele deve ser organizado.</text:p>
      <text:p text:style-name="Text_20_body">Exemplo:</text:p>
      <text:p text:style-name="Text_20_body">Antes:</text:p>
      <text:p text:style-name="Preformatted_20_Text"><text:span text:style-name="Source_20_Text">&lt;h2&gt;A grande descoberta: Nag Hammadi&lt;/h2&gt;</text:span></text:p>
      <text:p text:style-name="Preformatted_20_Text"/>
      <text:p text:style-name="P2"><text:span text:style-name="Source_20_Text">&lt;p&gt;Texto...&lt;/p&gt;</text:span></text:p>
      <text:p text:style-name="Text_20_body">Depois:</text:p>
      <text:p text:style-name="Preformatted_20_Text"><text:span text:style-name="Source_20_Text">&lt;section class="history-section"&gt;</text:span></text:p>
      <text:p text:style-name="Preformatted_20_Text"/>
      <text:p text:style-name="Preformatted_20_Text"><text:span text:style-name="Source_20_Text">&lt;h2&gt;A grande descoberta: Nag Hammadi&lt;/h2&gt;</text:span></text:p>
      <text:p text:style-name="Preformatted_20_Text"/>
      <text:p text:style-name="Preformatted_20_Text"><text:span text:style-name="Source_20_Text">&lt;p&gt;</text:span></text:p>
      <text:p text:style-name="Preformatted_20_Text"><text:span text:style-name="Source_20_Text">Texto...</text:span></text:p>
      <text:p text:style-name="Preformatted_20_Text"><text:span text:style-name="Source_20_Text">&lt;/p&gt;</text:span></text:p>
      <text:p text:style-name="Preformatted_20_Text"/>
      <text:p text:style-name="P2"><text:span text:style-name="Source_20_Text">&lt;/section&gt;</text:span></text:p>
      <text:p text:style-name="Text_20_body">Isso facilita:</text:p>
      <text:list text:style-name="L2">
        <text:list-item>
          <text:p text:style-name="P3">CSS;</text:p>
        </text:list-item>
        <text:list-item>
          <text:p text:style-name="P3">leitura;</text:p>
        </text:list-item>
        <text:list-item>
          <text:p text:style-name="P3">responsividade;</text:p>
        </text:list-item>
        <text:list-item>
          <text:p text:style-name="P3">acessibilidade.</text:p>
        </text:list-item>
      </text:list>
      <text:p text:style-name="Horizontal_20_Line"/>
      <text:h text:style-name="Heading_20_1" text:outline-level="1">Nova estrutura planejada para o index.html</text:h>
      <text:p text:style-name="Text_20_body">A nova versão ficará assim:</text:p>
      <text:p text:style-name="Preformatted_20_Text"><text:span text:style-name="Source_20_Text">&lt;body&gt;</text:span></text:p>
      <text:p text:style-name="Preformatted_20_Text"><text:soft-page-break/></text:p>
      <text:p text:style-name="Preformatted_20_Text"><text:span text:style-name="Source_20_Text">&lt;header&gt;</text:span></text:p>
      <text:p text:style-name="Preformatted_20_Text"><text:span text:style-name="Source_20_Text"><text:s text:c="4"/>Navbar</text:span></text:p>
      <text:p text:style-name="Preformatted_20_Text"><text:span text:style-name="Source_20_Text">&lt;/header&gt;</text:span></text:p>
      <text:p text:style-name="Preformatted_20_Text"/>
      <text:p text:style-name="Preformatted_20_Text"/>
      <text:p text:style-name="Preformatted_20_Text"><text:span text:style-name="Source_20_Text">&lt;main&gt;</text:span></text:p>
      <text:p text:style-name="Preformatted_20_Text"/>
      <text:p text:style-name="Preformatted_20_Text"><text:span text:style-name="Source_20_Text">&lt;section class="hero"&gt;</text:span></text:p>
      <text:p text:style-name="Preformatted_20_Text"/>
      <text:p text:style-name="Preformatted_20_Text"><text:span text:style-name="Source_20_Text"><text:s text:c="4"/>Título da plataforma</text:span></text:p>
      <text:p text:style-name="Preformatted_20_Text"/>
      <text:p text:style-name="Preformatted_20_Text"><text:span text:style-name="Source_20_Text"><text:s text:c="4"/>Descrição</text:span></text:p>
      <text:p text:style-name="Preformatted_20_Text"/>
      <text:p text:style-name="Preformatted_20_Text"><text:span text:style-name="Source_20_Text"><text:s text:c="4"/>Botão explorar bibliotec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intro"&gt;</text:span></text:p>
      <text:p text:style-name="Preformatted_20_Text"/>
      <text:p text:style-name="Preformatted_20_Text"><text:span text:style-name="Source_20_Text"><text:s text:c="4"/>O que são textos apócrifos?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history"&gt;</text:span></text:p>
      <text:p text:style-name="Preformatted_20_Text"/>
      <text:p text:style-name="Preformatted_20_Text"><text:span text:style-name="Source_20_Text"><text:s text:c="4"/>Origem histórica</text:span></text:p>
      <text:p text:style-name="Preformatted_20_Text"/>
      <text:p text:style-name="Preformatted_20_Text"><text:span text:style-name="Source_20_Text"><text:s text:c="4"/>Nag Hammadi</text:span></text:p>
      <text:p text:style-name="Preformatted_20_Text"/>
      <text:p text:style-name="Preformatted_20_Text"><text:span text:style-name="Source_20_Text"><text:s text:c="4"/>Manuscritos do Mar Morto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platform"&gt;</text:span></text:p>
      <text:p text:style-name="Preformatted_20_Text"/>
      <text:p text:style-name="Preformatted_20_Text"><text:span text:style-name="Source_20_Text"><text:s text:c="4"/>Como funciona?</text:span></text:p>
      <text:p text:style-name="Preformatted_20_Text"/>
      <text:p text:style-name="Preformatted_20_Text"><text:span text:style-name="Source_20_Text"><text:s text:c="4"/>Biblioteca</text:span></text:p>
      <text:p text:style-name="Preformatted_20_Text"><text:span text:style-name="Source_20_Text"><text:s text:c="4"/>Leitura</text:span></text:p>
      <text:p text:style-name="Preformatted_20_Text"><text:span text:style-name="Source_20_Text"><text:s text:c="4"/>Pesquis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featured-books"&gt;</text:span></text:p>
      <text:p text:style-name="Preformatted_20_Text"/>
      <text:p text:style-name="Preformatted_20_Text"><text:span text:style-name="Source_20_Text"><text:s text:c="4"/>Obras em destaque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editor-note"&gt;</text:span></text:p>
      <text:p text:style-name="Preformatted_20_Text"/>
      <text:p text:style-name="Preformatted_20_Text"><text:span text:style-name="Source_20_Text"><text:s text:c="4"/>Nota do editor</text:span></text:p>
      <text:p text:style-name="Preformatted_20_Text"/>
      <text:p text:style-name="Preformatted_20_Text"><text:soft-page-break/><text:span text:style-name="Source_20_Text">&lt;/section&gt;</text:span></text:p>
      <text:p text:style-name="Preformatted_20_Text"/>
      <text:p text:style-name="Preformatted_20_Text"/>
      <text:p text:style-name="Preformatted_20_Text"><text:span text:style-name="Source_20_Text">&lt;/main&gt;</text:span></text:p>
      <text:p text:style-name="Preformatted_20_Text"/>
      <text:p text:style-name="Preformatted_20_Text"/>
      <text:p text:style-name="Preformatted_20_Text"><text:span text:style-name="Source_20_Text">&lt;footer&gt;</text:span></text:p>
      <text:p text:style-name="Preformatted_20_Text"/>
      <text:p text:style-name="Preformatted_20_Text"><text:span text:style-name="Source_20_Text">&lt;/footer&gt;</text:span></text:p>
      <text:p text:style-name="Preformatted_20_Text"/>
      <text:p text:style-name="Preformatted_20_Text"/>
      <text:p text:style-name="P2"><text:span text:style-name="Source_20_Text">&lt;/body&gt;</text:span></text:p>
      <text:p text:style-name="Horizontal_20_Line"/>
      <text:h text:style-name="Heading_20_1" text:outline-level="1">Alterações que faremos no seu conteúdo</text:h>
      <text:h text:style-name="Heading_20_2" text:outline-level="2">O texto inicial será transformado em Hero</text:h>
      <text:p text:style-name="Text_20_body">Atual:</text:p>
      <text:p text:style-name="Quotations">Início</text:p>
      <text:p text:style-name="Text_20_body">Será substituído por algo mais alinhado ao projeto:</text:p>
      <text:p text:style-name="Text_20_body">Exemplo:</text:p>
      <text:p text:style-name="Preformatted_20_Text"><text:span text:style-name="Source_20_Text">Biblioteca Apócrifa</text:span></text:p>
      <text:p text:style-name="Preformatted_20_Text"/>
      <text:p text:style-name="Preformatted_20_Text"><text:span text:style-name="Source_20_Text">Uma plataforma digital dedicada ao estudo,</text:span></text:p>
      <text:p text:style-name="Preformatted_20_Text"><text:span text:style-name="Source_20_Text">preservação e pesquisa de textos antigos.</text:span></text:p>
      <text:p text:style-name="Preformatted_20_Text"/>
      <text:p text:style-name="Preformatted_20_Text"><text:span text:style-name="Source_20_Text">Explore manuscritos, evangelhos apócrifos</text:span></text:p>
      <text:p text:style-name="Preformatted_20_Text"><text:span text:style-name="Source_20_Text">e literatura gnóstica em uma experiência</text:span></text:p>
      <text:p text:style-name="P2"><text:span text:style-name="Source_20_Text">organizada de leitura.</text:span></text:p>
      <text:p text:style-name="Horizontal_20_Line"/>
      <text:h text:style-name="Heading_20_1" text:outline-level="1">Nova seção: Como funciona</text:h>
      <text:p text:style-name="Text_20_body">Essa parte ainda não existe no seu código.</text:p>
      <text:p text:style-name="Text_20_body">Vamos adicionar:</text:p>
      <text:p text:style-name="Preformatted_20_Text"><text:span text:style-name="Source_20_Text">📚 Biblioteca</text:span></text:p>
      <text:p text:style-name="Preformatted_20_Text"/>
      <text:p text:style-name="Preformatted_20_Text"><text:span text:style-name="Source_20_Text">Encontre textos históricos organizados.</text:span></text:p>
      <text:p text:style-name="Preformatted_20_Text"/>
      <text:p text:style-name="Preformatted_20_Text"/>
      <text:p text:style-name="Preformatted_20_Text"><text:span text:style-name="Source_20_Text"> Área de leitura</text:span></text:p>
      <text:p text:style-name="Preformatted_20_Text"/>
      <text:p text:style-name="Preformatted_20_Text"><text:span text:style-name="Source_20_Text">Leia cada obra dividida por seções.</text:span></text:p>
      <text:p text:style-name="Preformatted_20_Text"/>
      <text:p text:style-name="Preformatted_20_Text"/>
      <text:p text:style-name="Preformatted_20_Text"><text:span text:style-name="Source_20_Text"> Pesquisa</text:span></text:p>
      <text:p text:style-name="Preformatted_20_Text"/>
      <text:p text:style-name="P2"><text:span text:style-name="Source_20_Text">Explore contexto histórico e comentários.</text:span></text:p>
      <text:p text:style-name="Text_20_body"><text:soft-page-break/>Isso conecta o usuário com a proposta da plataforma.</text:p>
      <text:p text:style-name="Horizontal_20_Line"/>
      <text:h text:style-name="Heading_20_1" text:outline-level="1">Nova seção: Obras em destaque</text:h>
      <text:p text:style-name="Text_20_body">Hoje existe:</text:p>
      <text:p text:style-name="Preformatted_20_Text"><text:span text:style-name="Source_20_Text">&lt;section class="livros-destaque"&gt;</text:span></text:p>
      <text:p text:style-name="Preformatted_20_Text"><text:span text:style-name="Source_20_Text">&lt;h2&gt;Gnose&lt;/h2&gt;</text:span></text:p>
      <text:p text:style-name="P2"><text:span text:style-name="Source_20_Text">&lt;/section&gt;</text:span></text:p>
      <text:p text:style-name="Text_20_body">Está muito vazio.</text:p>
      <text:p text:style-name="Text_20_body">Vamos preparar para receber futuramente dados do:</text:p>
      <text:p text:style-name="P2"><text:span text:style-name="Source_20_Text">assets/dados/livros.json</text:span></text:p>
      <text:p text:style-name="Text_20_body">Estrutura:</text:p>
      <text:p text:style-name="Preformatted_20_Text"><text:span text:style-name="Source_20_Text">Obras em destaque</text:span></text:p>
      <text:p text:style-name="Preformatted_20_Text"/>
      <text:p text:style-name="Preformatted_20_Text"><text:span text:style-name="Source_20_Text">[ Evangelho de Tomé ]</text:span></text:p>
      <text:p text:style-name="Preformatted_20_Text"/>
      <text:p text:style-name="Preformatted_20_Text"><text:span text:style-name="Source_20_Text">[ Evangelho de Maria ]</text:span></text:p>
      <text:p text:style-name="Preformatted_20_Text"/>
      <text:p text:style-name="P2"><text:span text:style-name="Source_20_Text">[ Apócrifo de João ]</text:span></text:p>
      <text:p text:style-name="Horizontal_20_Line"/>
      <text:h text:style-name="Heading_20_1" text:outline-level="1">O que NÃO vamos fazer agora</text:h>
      <text:p text:style-name="Text_20_body">Para manter o foco:</text:p>
      <text:p text:style-name="Text_20_body">❌ Não criar JavaScript ainda.</text:p>
      <text:p text:style-name="Text_20_body">❌ Não ligar JSON ainda.</text:p>
      <text:p text:style-name="Text_20_body">❌ Não criar cards dinâmicos ainda.</text:p>
      <text:p text:style-name="Text_20_body">❌ Não fazer PWA ainda.</text:p>
      <text:p text:style-name="Text_20_body">Primeiro:</text:p>
      <text:p text:style-name="Text_20_body">HTML sólido.</text:p>
      <text:p text:style-name="Horizontal_20_Line"/>
      <text:h text:style-name="Heading_20_1" text:outline-level="1">Próximo passo prático</text:h>
      <text:p text:style-name="Text_20_body">Vou fazer a primeira refatoração do seu <text:span text:style-name="Source_20_Text">index.html</text:span>.</text:p>
      <text:p text:style-name="Text_20_body">A entrega será:</text:p>
      <text:p text:style-name="Text_20_body">✅ HTML5 semântico.<text:line-break/>✅ Estrutura baseada no wireframe.<text:line-break/><text:soft-page-break/>✅ Conteúdo histórico preservado.<text:line-break/>✅ Classes preparadas para o CSS do Design System.<text:line-break/>✅ Compatível com a arquitetura definida.</text:p>
      <text:p text:style-name="Text_20_body">Depois dessa etapa validamos o HTML e só então avançamos para o CSS da Home (<text:span text:style-name="Source_20_Text">home.css</text:span>).</text:p>
      <text:p text:style-name="Text_20_body">Perfeito. Fiz a primeira refatoração do seu <text:span text:style-name="Source_20_Text">index.html</text:span> seguindo a arquitetura que definimos.</text:p>
      <text:p text:style-name="Text_20_body">Nesta versão eu mantive o conteúdo histórico como patrimônio do projeto, mas reorganizei para funcionar como <text:span text:style-name="Strong_20_Emphasis">página inicial de uma plataforma de estudo</text:span>.</text:p>
      <text:p text:style-name="Text_20_body">Principais mudanças:</text:p>
      <text:list text:style-name="L3">
        <text:list-item>
          <text:p text:style-name="P4">Removido o excesso de texto direto no <text:span text:style-name="Source_20_Text">&lt;main&gt;</text:span>.</text:p>
        </text:list-item>
        <text:list-item>
          <text:p text:style-name="P4">Criada uma seção <text:span text:style-name="Strong_20_Emphasis">Hero</text:span> para apresentar a plataforma.</text:p>
        </text:list-item>
        <text:list-item>
          <text:p text:style-name="P4">Conteúdo histórico organizado em blocos.</text:p>
        </text:list-item>
        <text:list-item>
          <text:p text:style-name="P4">Criada uma seção "Como funciona".</text:p>
        </text:list-item>
        <text:list-item>
          <text:p text:style-name="P4">Criada uma área preparada para livros em destaque.</text:p>
        </text:list-item>
        <text:list-item>
          <text:p text:style-name="P4">Mantida a navegação atual.</text:p>
        </text:list-item>
        <text:list-item>
          <text:p text:style-name="P4">Mantida a estrutura preparada para o nosso CSS (<text:span text:style-name="Source_20_Text">home.css</text:span>).</text:p>
        </text:list-item>
        <text:list-item>
          <text:p text:style-name="P4">Melhorada a semântica HTML.</text:p>
        </text:list-item>
      </text:list>
      <text:p text:style-name="P5"><text:span text:style-name="Source_20_Text">&lt;!DOCTYPE html&gt;</text:span></text:p>
      <text:p text:style-name="P5"><text:span text:style-name="Source_20_Text">&lt;html lang="pt-br"&gt;</text:span></text:p>
      <text:p text:style-name="P5"/>
      <text:p text:style-name="P5"><text:span text:style-name="Source_20_Text">&lt;head&gt;</text:span></text:p>
      <text:p text:style-name="P5"><text:span text:style-name="Source_20_Text"><text:s text:c="4"/>&lt;meta charset="UTF-8"&gt;</text:span></text:p>
      <text:p text:style-name="P5"><text:span text:style-name="Source_20_Text"><text:s text:c="4"/>&lt;meta name="viewport" content="width=device-width, initial-scale=1.0"&gt;</text:span></text:p>
      <text:p text:style-name="P5"/>
      <text:p text:style-name="P5"><text:span text:style-name="Source_20_Text"><text:s text:c="4"/>&lt;title&gt;Biblioteca Apócrifa | Plataforma de Estudo&lt;/title&gt;</text:span></text:p>
      <text:p text:style-name="P5"/>
      <text:p text:style-name="P5"><text:span text:style-name="Source_20_Text"><text:s text:c="4"/>&lt;!-- Google Fonts --&gt;</text:span></text:p>
      <text:p text:style-name="P5"><text:span text:style-name="Source_20_Text"><text:s text:c="4"/>&lt;link rel="preconnect" href="https://fonts.googleapis.com"&gt;</text:span></text:p>
      <text:p text:style-name="P5"><text:span text:style-name="Source_20_Text"><text:s text:c="4"/>&lt;link rel="preconnect" href="https://fonts.gstatic.com" crossorigin&gt;</text:span></text:p>
      <text:p text:style-name="P5"/>
      <text:p text:style-name="P5"><text:span text:style-name="Source_20_Text"><text:s text:c="4"/>&lt;link href="https://fonts.googleapis.com/css2?family=Merriweather:wght@300;400;700&amp;family=Open+Sans:wght@300;400;600;700&amp;display=swap" rel="stylesheet"&gt;</text:span></text:p>
      <text:p text:style-name="P5"/>
      <text:p text:style-name="P5"/>
      <text:p text:style-name="P5"><text:span text:style-name="Source_20_Text"><text:s text:c="4"/>&lt;!-- CSS Global --&gt;</text:span></text:p>
      <text:p text:style-name="P5"><text:span text:style-name="Source_20_Text"><text:s text:c="4"/>&lt;link rel="stylesheet" href="assets/css/variables.css"&gt;</text:span></text:p>
      <text:p text:style-name="P5"><text:soft-page-break/><text:span text:style-name="Source_20_Text"><text:s text:c="4"/>&lt;link rel="stylesheet" href="assets/css/base.css"&gt;</text:span></text:p>
      <text:p text:style-name="P5"><text:span text:style-name="Source_20_Text"><text:s text:c="4"/>&lt;link rel="stylesheet" href="assets/css/layout.css"&gt;</text:span></text:p>
      <text:p text:style-name="P5"><text:span text:style-name="Source_20_Text"><text:s text:c="4"/>&lt;link rel="stylesheet" href="assets/css/components.css"&gt;</text:span></text:p>
      <text:p text:style-name="P5"/>
      <text:p text:style-name="P5"><text:span text:style-name="Source_20_Text"><text:s text:c="4"/>&lt;!-- CSS da Página --&gt;</text:span></text:p>
      <text:p text:style-name="P5"><text:span text:style-name="Source_20_Text"><text:s text:c="4"/>&lt;link rel="stylesheet" href="assets/css/home.css"&gt;</text:span></text:p>
      <text:p text:style-name="P5"/>
      <text:p text:style-name="P5"><text:span text:style-name="Source_20_Text">&lt;/head&gt;</text:span></text:p>
      <text:p text:style-name="P5"/>
      <text:p text:style-name="P5"/>
      <text:p text:style-name="P5"><text:span text:style-name="Source_20_Text">&lt;body&gt;</text:span></text:p>
      <text:p text:style-name="P5"/>
      <text:p text:style-name="P5"/>
      <text:p text:style-name="P5"><text:span text:style-name="Source_20_Text">&lt;header class="app-header"&gt;</text:span></text:p>
      <text:p text:style-name="P5"/>
      <text:p text:style-name="P5"><text:span text:style-name="Source_20_Text"><text:s text:c="4"/>&lt;div class="container app-header__container"&gt;</text:span></text:p>
      <text:p text:style-name="P5"/>
      <text:p text:style-name="P5"><text:span text:style-name="Source_20_Text"><text:s text:c="8"/>&lt;a href="index.html" class="app-header__logo"&gt;</text:span></text:p>
      <text:p text:style-name="P5"><text:span text:style-name="Source_20_Text"><text:s text:c="12"/>Biblioteca Apócrifa</text:span></text:p>
      <text:p text:style-name="P5"><text:span text:style-name="Source_20_Text"><text:s text:c="8"/>&lt;/a&gt;</text:span></text:p>
      <text:p text:style-name="P5"/>
      <text:p text:style-name="P5"/>
      <text:p text:style-name="P5"><text:span text:style-name="Source_20_Text"><text:s text:c="8"/>&lt;nav class="app-header__nav"&gt;</text:span></text:p>
      <text:p text:style-name="P5"/>
      <text:p text:style-name="P5"><text:span text:style-name="Source_20_Text"><text:s text:c="12"/>&lt;a href="index.html"&gt;</text:span></text:p>
      <text:p text:style-name="P5"><text:span text:style-name="Source_20_Text"><text:s text:c="16"/>Início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biblioteca.html"&gt;</text:span></text:p>
      <text:p text:style-name="P5"><text:span text:style-name="Source_20_Text"><text:s text:c="16"/>Biblioteca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leitura.html"&gt;</text:span></text:p>
      <text:p text:style-name="P5"><text:span text:style-name="Source_20_Text"><text:s text:c="16"/>Área de Leitura</text:span></text:p>
      <text:p text:style-name="P5"><text:span text:style-name="Source_20_Text"><text:s text:c="12"/>&lt;/a&gt;</text:span></text:p>
      <text:p text:style-name="P5"/>
      <text:p text:style-name="P5"><text:soft-page-break/><text:span text:style-name="Source_20_Text"><text:s text:c="12"/>&lt;a href="paginas/comunidade.html"&gt;</text:span></text:p>
      <text:p text:style-name="P5"><text:span text:style-name="Source_20_Text"><text:s text:c="16"/>Comunidade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perfil.html"&gt;</text:span></text:p>
      <text:p text:style-name="P5"><text:span text:style-name="Source_20_Text"><text:s text:c="16"/>Perfil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8"/>&lt;/nav&gt;</text:span></text:p>
      <text:p text:style-name="P5"/>
      <text:p text:style-name="P5"/>
      <text:p text:style-name="P5"><text:span text:style-name="Source_20_Text"><text:s text:c="8"/>&lt;div class="app-header__actions"&gt;</text:span></text:p>
      <text:p text:style-name="P5"/>
      <text:p text:style-name="P5"><text:span text:style-name="Source_20_Text"><text:s text:c="12"/>&lt;button class="icon-button" aria-label="Pesquisar"&gt;</text:span></text:p>
      <text:p text:style-name="P5"><text:span text:style-name="Source_20_Text"><text:s text:c="16"/>🔍</text:span></text:p>
      <text:p text:style-name="P5"><text:span text:style-name="Source_20_Text"><text:s text:c="12"/>&lt;/button&gt;</text:span></text:p>
      <text:p text:style-name="P5"/>
      <text:p text:style-name="P5"/>
      <text:p text:style-name="P5"><text:span text:style-name="Source_20_Text"><text:s text:c="12"/>&lt;button class="icon-button" aria-label="Perfil"&gt;</text:span></text:p>
      <text:p text:style-name="P5"><text:span text:style-name="Source_20_Text"><text:s text:c="16"/>👤</text:span></text:p>
      <text:p text:style-name="P5"><text:span text:style-name="Source_20_Text"><text:s text:c="12"/>&lt;/button&gt;</text:span></text:p>
      <text:p text:style-name="P5"/>
      <text:p text:style-name="P5"><text:span text:style-name="Source_20_Text"><text:s text:c="8"/>&lt;/div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header&gt;</text:span></text:p>
      <text:p text:style-name="P5"/>
      <text:p text:style-name="P5"/>
      <text:p text:style-name="P5"/>
      <text:p text:style-name="P5"><text:span text:style-name="Source_20_Text">&lt;main&gt;</text:span></text:p>
      <text:p text:style-name="P5"/>
      <text:p text:style-name="P5"/>
      <text:p text:style-name="P5"><text:span text:style-name="Source_20_Text">&lt;!-- HERO --&gt;</text:span></text:p>
      <text:p text:style-name="P5"/>
      <text:p text:style-name="P5"><text:span text:style-name="Source_20_Text">&lt;section class="hero"&gt;</text:span></text:p>
      <text:p text:style-name="P5"><text:soft-page-break/></text:p>
      <text:p text:style-name="P5"><text:span text:style-name="Source_20_Text"><text:s text:c="4"/>&lt;div class="container"&gt;</text:span></text:p>
      <text:p text:style-name="P5"/>
      <text:p text:style-name="P5"><text:span text:style-name="Source_20_Text"><text:s text:c="8"/>&lt;h1&gt;</text:span></text:p>
      <text:p text:style-name="P5"><text:span text:style-name="Source_20_Text"><text:s text:c="12"/>Biblioteca Apócrifa</text:span></text:p>
      <text:p text:style-name="P5"><text:span text:style-name="Source_20_Text"><text:s text:c="8"/>&lt;/h1&gt;</text:span></text:p>
      <text:p text:style-name="P5"/>
      <text:p text:style-name="P5"/>
      <text:p text:style-name="P5"><text:span text:style-name="Source_20_Text"><text:s text:c="8"/>&lt;p&gt;</text:span></text:p>
      <text:p text:style-name="P5"><text:span text:style-name="Source_20_Text"><text:s text:c="12"/>Uma plataforma digital dedicada ao estudo,</text:span></text:p>
      <text:p text:style-name="P5"><text:span text:style-name="Source_20_Text"><text:s text:c="12"/>preservação e pesquisa de textos antigos,</text:span></text:p>
      <text:p text:style-name="P5"><text:span text:style-name="Source_20_Text"><text:s text:c="12"/>apócrifos e gnósticos.</text:span></text:p>
      <text:p text:style-name="P5"><text:span text:style-name="Source_20_Text"><text:s text:c="8"/>&lt;/p&gt;</text:span></text:p>
      <text:p text:style-name="P5"/>
      <text:p text:style-name="P5"/>
      <text:p text:style-name="P5"><text:span text:style-name="Source_20_Text"><text:s text:c="8"/>&lt;a href="paginas/biblioteca.html" class="button-primary"&gt;</text:span></text:p>
      <text:p text:style-name="P5"><text:span text:style-name="Source_20_Text"><text:s text:c="12"/>Explorar Biblioteca</text:span></text:p>
      <text:p text:style-name="P5"><text:span text:style-name="Source_20_Text"><text:s text:c="8"/>&lt;/a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><text:span text:style-name="Source_20_Text">&lt;!-- INTRODUÇÃO --&gt;</text:span></text:p>
      <text:p text:style-name="P5"/>
      <text:p text:style-name="P5"><text:span text:style-name="Source_20_Text">&lt;section class="intro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 que são textos apócrifos?</text:span></text:p>
      <text:p text:style-name="P5"><text:span text:style-name="Source_20_Text">&lt;/h2&gt;</text:span></text:p>
      <text:p text:style-name="P5"><text:soft-page-break/></text:p>
      <text:p text:style-name="P5"/>
      <text:p text:style-name="P5"><text:span text:style-name="Source_20_Text">&lt;p&gt;</text:span></text:p>
      <text:p text:style-name="P5"><text:span text:style-name="Source_20_Text">A palavra "apócrifo" origina-se do grego</text:span></text:p>
      <text:p text:style-name="P5"><text:span text:style-name="Source_20_Text">&lt;em&gt;apokryphos&lt;/em&gt;, que significa</text:span></text:p>
      <text:p text:style-name="P5"><text:span text:style-name="Source_20_Text">"oculto" ou "secreto"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o longo da história, diversos textos religiosos</text:span></text:p>
      <text:p text:style-name="P5"><text:span text:style-name="Source_20_Text">e literários ficaram fora dos cânones oficiais,</text:span></text:p>
      <text:p text:style-name="P5"><text:span text:style-name="Source_20_Text">mas continuam sendo importantes fontes para o</text:span></text:p>
      <text:p text:style-name="P5"><text:span text:style-name="Source_20_Text">estudo histórico, cultural e religioso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!-- HISTÓRIA --&gt;</text:span></text:p>
      <text:p text:style-name="P5"/>
      <text:p text:style-name="P5"><text:span text:style-name="Source_20_Text">&lt;section class="history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ntexto Histórico</text:span></text:p>
      <text:p text:style-name="P5"><text:span text:style-name="Source_20_Text">&lt;/h2&gt;</text:span></text:p>
      <text:p text:style-name="P5"/>
      <text:p text:style-name="P5"><text:soft-page-break/></text:p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rigem dos textos apócrifos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Os textos apócrifos surgiram principalmente entre</text:span></text:p>
      <text:p text:style-name="P5"><text:span text:style-name="Source_20_Text">os séculos III a.C. e I d.C., durante um período</text:span></text:p>
      <text:p text:style-name="P5"><text:span text:style-name="Source_20_Text">de grandes transformações culturais e religiosa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A descoberta de Nag Hammadi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m 1945, a descoberta da Biblioteca de Nag Hammadi,</text:span></text:p>
      <text:p text:style-name="P5"><text:span text:style-name="Source_20_Text">no Egito, revelou uma coleção de textos gnósticos</text:span></text:p>
      <text:p text:style-name="P5"><text:span text:style-name="Source_20_Text">que trouxe novas informações sobre diferentes</text:span></text:p>
      <text:p text:style-name="P5"><text:span text:style-name="Source_20_Text">correntes do cristianismo primitivo.</text:span></text:p>
      <text:p text:style-name="P5"><text:span text:style-name="Source_20_Text">&lt;/p&gt;</text:span></text:p>
      <text:p text:style-name="P5"/>
      <text:p text:style-name="P5"/>
      <text:p text:style-name="P5"><text:soft-page-break/><text:span text:style-name="Source_20_Text">&lt;/article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s Manuscritos do Mar Morto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Descobertos em 1947, os Manuscritos do Mar Morto</text:span></text:p>
      <text:p text:style-name="P5"><text:span text:style-name="Source_20_Text">ampliaram o conhecimento sobre comunidades judaicas</text:span></text:p>
      <text:p text:style-name="P5"><text:span text:style-name="Source_20_Text">antigas e seus textos religios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COMO FUNCIONA --&gt;</text:span></text:p>
      <text:p text:style-name="P5"/>
      <text:p text:style-name="P5"><text:soft-page-break/><text:span text:style-name="Source_20_Text">&lt;section class="platform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mo funciona a plataforma?</text:span></text:p>
      <text:p text:style-name="P5"><text:span text:style-name="Source_20_Text">&lt;/h2&gt;</text:span></text:p>
      <text:p text:style-name="P5"/>
      <text:p text:style-name="P5"/>
      <text:p text:style-name="P5"/>
      <text:p text:style-name="P5"><text:span text:style-name="Source_20_Text">&lt;div class="platform-grid"&gt;</text:span></text:p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 Bibliotec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xplore obras organizadas por categoria,</text:span></text:p>
      <text:p text:style-name="P5"><text:span text:style-name="Source_20_Text">autor e contexto histórico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 Área de leitur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oft-page-break/><text:span text:style-name="Source_20_Text">Leia textos divididos por seções,</text:span></text:p>
      <text:p text:style-name="P5"><text:span text:style-name="Source_20_Text">acompanhados de comentários e análises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 Pesquis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stude diferentes documentos históricos</text:span></text:p>
      <text:p text:style-name="P5"><text:span text:style-name="Source_20_Text">em uma experiência organizada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LIVROS EM DESTAQUE --&gt;</text:span></text:p>
      <text:p text:style-name="P5"><text:soft-page-break/></text:p>
      <text:p text:style-name="P5"><text:span text:style-name="Source_20_Text">&lt;section class="featured-books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bras em destaque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div class="books-grid"&gt;</text:span></text:p>
      <text:p text:style-name="P5"/>
      <text:p text:style-name="P5"/>
      <text:p text:style-name="P5"><text:span text:style-name="Source_20_Text">&lt;!-- Futuramente renderizado pelo livros.json --&gt;</text:span></text:p>
      <text:p text:style-name="P5"/>
      <text:p text:style-name="P5"/>
      <text:p text:style-name="P5"><text:span text:style-name="Source_20_Text">&lt;article class="book-card"&gt;</text:span></text:p>
      <text:p text:style-name="P5"/>
      <text:p text:style-name="P5"><text:span text:style-name="Source_20_Text">&lt;h3&gt;</text:span></text:p>
      <text:p text:style-name="P5"><text:span text:style-name="Source_20_Text">Evangelho de Tomé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Texto gnóstico encontrado na Biblioteca de Nag Hammadi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a href="paginas/leitura.html"&gt;</text:span></text:p>
      <text:p text:style-name="P5"><text:span text:style-name="Source_20_Text">Começar estudo</text:span></text:p>
      <text:p text:style-name="P5"><text:span text:style-name="Source_20_Text">&lt;/a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><text:soft-page-break/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NOTA DO EDITOR --&gt;</text:span></text:p>
      <text:p text:style-name="P5"/>
      <text:p text:style-name="P5"><text:span text:style-name="Source_20_Text">&lt;section class="editor-note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Nota do Editor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ste site possui fins puramente históricos,</text:span></text:p>
      <text:p text:style-name="P5"><text:span text:style-name="Source_20_Text">literários e académicos. O objetivo é preservar</text:span></text:p>
      <text:p text:style-name="P5"><text:span text:style-name="Source_20_Text">e disponibilizar o acesso à literatura antiga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><text:soft-page-break/></text:p>
      <text:p text:style-name="P5"/>
      <text:p text:style-name="P5"><text:span text:style-name="Source_20_Text">&lt;/mai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footer class="footer"&gt;</text:span></text:p>
      <text:p text:style-name="P5"/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© 2026 Biblioteca Apócrifa.</text:span></text:p>
      <text:p text:style-name="P5"><text:span text:style-name="Source_20_Text">Projeto desenvolvido para fins históricos,</text:span></text:p>
      <text:p text:style-name="P5"><text:span text:style-name="Source_20_Text">literários e académic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utor:</text:span></text:p>
      <text:p text:style-name="P5"><text:span text:style-name="Source_20_Text">&lt;em&gt;João de Sousa António&lt;/em&gt;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footer&gt;</text:span></text:p>
      <text:p text:style-name="P5"/>
      <text:p text:style-name="P5"/>
      <text:p text:style-name="P5"/>
      <text:p text:style-name="P5"/>
      <text:p text:style-name="P5"><text:soft-page-break/><text:span text:style-name="Source_20_Text">&lt;/body&gt;</text:span></text:p>
      <text:p text:style-name="P5"/>
      <text:p text:style-name="P5"><text:span text:style-name="Source_20_Text">&lt;/html&gt;</text:span></text:p>
      <text:p text:style-name="P6"/>
      <text:h text:style-name="P7" text:outline-level="2">O que foi construído nesta etapa</text:h>
      <text:p text:style-name="Text_20_body">Agora o <text:span text:style-name="Source_20_Text">index.html</text:span> já está alinhado com o projeto:</text:p>
      <text:h text:style-name="P8" text:outline-level="3">Antes:</text:h>
      <text:p text:style-name="Text_20_body">Era uma página de texto histórico.</text:p>
      <text:h text:style-name="P8" text:outline-level="3">Agora:</text:h>
      <text:p text:style-name="Text_20_body">É uma <text:span text:style-name="Strong_20_Emphasis">landing page de uma plataforma de estudo</text:span>.</text:p>
      <text:p text:style-name="Text_20_body">A estrutura já conversa com:</text:p>
      <text:list text:style-name="L4">
        <text:list-item>
          <text:p text:style-name="P9">Design System;</text:p>
        </text:list-item>
        <text:list-item>
          <text:p text:style-name="P9">Wireframe;</text:p>
        </text:list-item>
        <text:list-item>
          <text:p text:style-name="P9">Arquitetura de componentes;</text:p>
        </text:list-item>
        <text:list-item>
          <text:p text:style-name="P9">Futuro consumo do <text:span text:style-name="Source_20_Text">livros.json</text:span>.</text:p>
        </text:list-item>
      </text:list>
      <text:p text:style-name="P6"/>
      <text:h text:style-name="P7" text:outline-level="2">Próximo passo da Fase 4.1</text:h>
      <text:p text:style-name="Text_20_body">Antes de avançarmos para outra página, precisamos fechar a Home.</text:p>
      <text:p text:style-name="Text_20_body">A sequência correta será:</text:p>
      <text:list text:style-name="L5">
        <text:list-item>
          <text:p text:style-name="P10">✅ Estrutura HTML da Home (concluído)</text:p>
        </text:list-item>
        <text:list-item>
          <text:p text:style-name="P10">⏳ Implementar o CSS da Home (<text:span text:style-name="Source_20_Text">home.css</text:span>)</text:p>
        </text:list-item>
        <text:list-item>
          <text:p text:style-name="P10"><text:bookmark-start text:name="__DdeLink__3366_829906918"/>⏳ Testar responsividade</text:p>
        </text:list-item>
        <text:list-item>
          <text:p text:style-name="P10">⏳ Ajustar detalhes visuais<text:bookmark-end text:name="__DdeLink__3366_829906918"/></text:p>
        </text:list-item>
      </text:list>
      <text:p text:style-name="Text_20_body">Só depois disso vamos para:</text:p>
      <text:p text:style-name="Text_20_body"><text:span text:style-name="Strong_20_Emphasis">Fase 4.2 — Desenvolver a Biblioteca (</text:span><text:span text:style-name="Strong_20_Emphasis"><text:span text:style-name="Source_20_Text">biblioteca.html</text:span></text:span><text:span text:style-name="Strong_20_Emphasis">)</text:span></text:p>
      <text:p text:style-name="Text_20_body">Então o próximo trabalho será transformar esse HTML em uma interface visual usando o nosso Design System.</text:p>
      <text:p text:style-name="Text_20_body">Perfeito. Esse é exatamente o fluxo que eu seguiria em um projeto profissional.</text:p>
      <text:p text:style-name="Text_20_body">A partir de agora, vamos seguir esta regra:</text:p>
      <text:list text:style-name="L6">
        <text:list-item>
          <text:p text:style-name="P11">Primeiro definimos o Design System (já concluído).</text:p>
        </text:list-item>
        <text:list-item>
          <text:p text:style-name="P11">Depois implementamos esse Design System em CSS.</text:p>
        </text:list-item>
        <text:list-item>
          <text:p text:style-name="P11">Só depois estilizamos as páginas (<text:span text:style-name="Source_20_Text">home.css</text:span>, <text:span text:style-name="Source_20_Text">biblioteca.css</text:span>, etc.).</text:p>
        </text:list-item>
      </text:list>
      <text:p text:style-name="Text_20_body"><text:soft-page-break/>Assim evitamos retrabalho.</text:p>
      <text:p text:style-name="P6"/>
      <text:h text:style-name="P12" text:outline-level="1">Objetivo do <text:span text:style-name="Source_20_Text">base.css</text:span></text:h>
      <text:p text:style-name="Text_20_body">O <text:span text:style-name="Source_20_Text">base.css</text:span> <text:span text:style-name="Strong_20_Emphasis">não é para criar componentes</text:span> nem definir cores específicas da Home. Ele é responsável apenas pelos estilos globais da aplicação.</text:p>
      <text:p text:style-name="Text_20_body">Sua responsabilidade será:</text:p>
      <text:list text:style-name="L7">
        <text:list-item>
          <text:p text:style-name="P13">Reset básico.</text:p>
        </text:list-item>
        <text:list-item>
          <text:p text:style-name="P13">Configuração do <text:span text:style-name="Source_20_Text">html</text:span> e <text:span text:style-name="Source_20_Text">body</text:span>.</text:p>
        </text:list-item>
        <text:list-item>
          <text:p text:style-name="P13">Tipografia global.</text:p>
        </text:list-item>
        <text:list-item>
          <text:p text:style-name="P13">Links.</text:p>
        </text:list-item>
        <text:list-item>
          <text:p text:style-name="P13">Imagens.</text:p>
        </text:list-item>
        <text:list-item>
          <text:p text:style-name="P13">Listas.</text:p>
        </text:list-item>
        <text:list-item>
          <text:p text:style-name="P13">Seleção de texto.</text:p>
        </text:list-item>
        <text:list-item>
          <text:p text:style-name="P13">Comportamentos padrão.</text:p>
        </text:list-item>
      </text:list>
      <text:p text:style-name="Text_20_body">Tudo que for botão, card, navbar, footer ou hero ficará em <text:span text:style-name="Source_20_Text">components.css</text:span>.</text:p>
      <text:p text:style-name="P6"/>
      <text:h text:style-name="P7" text:outline-level="2"><text:span text:style-name="Source_20_Text">assets/css/base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RESET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*,</text:span></text:p>
      <text:p text:style-name="P5"><text:span text:style-name="Source_20_Text">*::before,</text:span></text:p>
      <text:p text:style-name="P5"><text:span text:style-name="Source_20_Text">*::after {</text:span></text:p>
      <text:p text:style-name="P5"><text:span text:style-name="Source_20_Text"><text:s text:c="4"/>margin: 0;</text:span></text:p>
      <text:p text:style-name="P5"><text:span text:style-name="Source_20_Text"><text:s text:c="4"/>padding: 0;</text:span></text:p>
      <text:p text:style-name="P5"><text:span text:style-name="Source_20_Text"><text:s text:c="4"/>box-sizing: border-box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DOCUMEN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tml {</text:span></text:p>
      <text:p text:style-name="P5"><text:soft-page-break/><text:span text:style-name="Source_20_Text"><text:s text:c="4"/>font-size: 100%;</text:span></text:p>
      <text:p text:style-name="P5"><text:span text:style-name="Source_20_Text"><text:s text:c="4"/>scroll-behavior: smooth;</text:span></text:p>
      <text:p text:style-name="P5"><text:span text:style-name="Source_20_Text">}</text:span></text:p>
      <text:p text:style-name="P5"/>
      <text:p text:style-name="P5"><text:span text:style-name="Source_20_Text">body {</text:span></text:p>
      <text:p text:style-name="P5"><text:span text:style-name="Source_20_Text"><text:s text:c="4"/>font-family: var(--font-interface);</text:span></text:p>
      <text:p text:style-name="P5"><text:span text:style-name="Source_20_Text"><text:s text:c="4"/>font-size: var(--font-size-body);</text:span></text:p>
      <text:p text:style-name="P5"><text:span text:style-name="Source_20_Text"><text:s text:c="4"/>line-height: 1.7;</text:span></text:p>
      <text:p text:style-name="P5"/>
      <text:p text:style-name="P5"><text:span text:style-name="Source_20_Text"><text:s text:c="4"/>color: var(--color-text);</text:span></text:p>
      <text:p text:style-name="P5"><text:span text:style-name="Source_20_Text"><text:s text:c="4"/>background-color: var(--color-background);</text:span></text:p>
      <text:p text:style-name="P5"/>
      <text:p text:style-name="P5"><text:span text:style-name="Source_20_Text"><text:s text:c="4"/>text-rendering: optimizeLegibility;</text:span></text:p>
      <text:p text:style-name="P5"><text:span text:style-name="Source_20_Text"><text:s text:c="4"/>-webkit-font-smoothing: antialiased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TIPOGRAFIA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1,</text:span></text:p>
      <text:p text:style-name="P5"><text:span text:style-name="Source_20_Text">h2,</text:span></text:p>
      <text:p text:style-name="P5"><text:span text:style-name="Source_20_Text">h3,</text:span></text:p>
      <text:p text:style-name="P5"><text:span text:style-name="Source_20_Text">h4,</text:span></text:p>
      <text:p text:style-name="P5"><text:span text:style-name="Source_20_Text">h5,</text:span></text:p>
      <text:p text:style-name="P5"><text:span text:style-name="Source_20_Text">h6 {</text:span></text:p>
      <text:p text:style-name="P5"><text:span text:style-name="Source_20_Text"><text:s text:c="4"/>font-family: var(--font-reading);</text:span></text:p>
      <text:p text:style-name="P5"><text:span text:style-name="Source_20_Text"><text:s text:c="4"/>font-weight: 700;</text:span></text:p>
      <text:p text:style-name="P5"><text:span text:style-name="Source_20_Text"><text:s text:c="4"/>line-height: 1.3;</text:span></text:p>
      <text:p text:style-name="P5"><text:span text:style-name="Source_20_Text"><text:s text:c="4"/>color: var(--color-text);</text:span></text:p>
      <text:p text:style-name="P5"><text:span text:style-name="Source_20_Text">}</text:span></text:p>
      <text:p text:style-name="P5"/>
      <text:p text:style-name="P5"><text:span text:style-name="Source_20_Text">h1 {</text:span></text:p>
      <text:p text:style-name="P5"><text:span text:style-name="Source_20_Text"><text:s text:c="4"/>font-size: var(--font-size-h1);</text:span></text:p>
      <text:p text:style-name="P5"><text:span text:style-name="Source_20_Text">}</text:span></text:p>
      <text:p text:style-name="P5"/>
      <text:p text:style-name="P5"><text:soft-page-break/><text:span text:style-name="Source_20_Text">h2 {</text:span></text:p>
      <text:p text:style-name="P5"><text:span text:style-name="Source_20_Text"><text:s text:c="4"/>font-size: var(--font-size-h2);</text:span></text:p>
      <text:p text:style-name="P5"><text:span text:style-name="Source_20_Text">}</text:span></text:p>
      <text:p text:style-name="P5"/>
      <text:p text:style-name="P5"><text:span text:style-name="Source_20_Text">h3 {</text:span></text:p>
      <text:p text:style-name="P5"><text:span text:style-name="Source_20_Text"><text:s text:c="4"/>font-size: var(--font-size-h3);</text:span></text:p>
      <text:p text:style-name="P5"><text:span text:style-name="Source_20_Text">}</text:span></text:p>
      <text:p text:style-name="P5"/>
      <text:p text:style-name="P5"><text:span text:style-name="Source_20_Text">p {</text:span></text:p>
      <text:p text:style-name="P5"><text:span text:style-name="Source_20_Text"><text:s text:c="4"/>margin-bottom: var(--space-md);</text:span></text:p>
      <text:p text:style-name="P5"><text:span text:style-name="Source_20_Text">}</text:span></text:p>
      <text:p text:style-name="P5"/>
      <text:p text:style-name="P5"><text:span text:style-name="Source_20_Text">small {</text:span></text:p>
      <text:p text:style-name="P5"><text:span text:style-name="Source_20_Text"><text:s text:c="4"/>font-size: var(--font-size-small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NK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a {</text:span></text:p>
      <text:p text:style-name="P5"><text:span text:style-name="Source_20_Text"><text:s text:c="4"/>color: inherit;</text:span></text:p>
      <text:p text:style-name="P5"><text:span text:style-name="Source_20_Text"><text:s text:c="4"/>text-decoration: none;</text:span></text:p>
      <text:p text:style-name="P5"><text:span text:style-name="Source_20_Text"><text:s text:c="4"/>transition: color .3s ease;</text:span></text:p>
      <text:p text:style-name="P5"><text:span text:style-name="Source_20_Text">}</text:span></text:p>
      <text:p text:style-name="P5"/>
      <text:p text:style-name="P5"><text:span text:style-name="Source_20_Text">a:hover {</text:span></text:p>
      <text:p text:style-name="P5"><text:span text:style-name="Source_20_Text"><text:s text:c="4"/>color: var(--color-primary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STA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ul,</text:span></text:p>
      <text:p text:style-name="P5"><text:span text:style-name="Source_20_Text">ol {</text:span></text:p>
      <text:p text:style-name="P5"><text:soft-page-break/><text:span text:style-name="Source_20_Text"><text:s text:c="4"/>list-style: none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IMAGEN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img {</text:span></text:p>
      <text:p text:style-name="P5"><text:span text:style-name="Source_20_Text"><text:s text:c="4"/>display: block;</text:span></text:p>
      <text:p text:style-name="P5"><text:span text:style-name="Source_20_Text"><text:s text:c="4"/>max-width: 100%;</text:span></text:p>
      <text:p text:style-name="P5"><text:span text:style-name="Source_20_Text"><text:s text:c="4"/>height: auto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FORMULÁRIO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button,</text:span></text:p>
      <text:p text:style-name="P5"><text:span text:style-name="Source_20_Text">input,</text:span></text:p>
      <text:p text:style-name="P5"><text:span text:style-name="Source_20_Text">textarea,</text:span></text:p>
      <text:p text:style-name="P5"><text:span text:style-name="Source_20_Text">select {</text:span></text:p>
      <text:p text:style-name="P5"><text:span text:style-name="Source_20_Text"><text:s text:c="4"/>font: inherit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SELEÇÃO DE TEX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:selection {</text:span></text:p>
      <text:p text:style-name="P5"><text:span text:style-name="Source_20_Text"><text:s text:c="4"/>background-color: var(--color-secondary);</text:span></text:p>
      <text:p text:style-name="P5"><text:span text:style-name="Source_20_Text"><text:s text:c="4"/>color: #ffffff;</text:span></text:p>
      <text:p text:style-name="P5"><text:span text:style-name="Source_20_Text">}</text:span></text:p>
      <text:p text:style-name="P6"/>
      <text:h text:style-name="P7" text:outline-level="2">O que este arquivo NÃO terá</text:h>
      <text:p text:style-name="Text_20_body">Não colocaremos aqui:</text:p>
      <text:list text:style-name="L8">
        <text:list-item>
          <text:p text:style-name="P14"><text:span text:style-name="Source_20_Text">.hero</text:span></text:p>
        </text:list-item>
        <text:list-item>
          <text:p text:style-name="P14"><text:soft-page-break/><text:span text:style-name="Source_20_Text">.button-primary</text:span></text:p>
        </text:list-item>
        <text:list-item>
          <text:p text:style-name="P14"><text:span text:style-name="Source_20_Text">.book-card</text:span></text:p>
        </text:list-item>
        <text:list-item>
          <text:p text:style-name="P14"><text:span text:style-name="Source_20_Text">.feature-card</text:span></text:p>
        </text:list-item>
        <text:list-item>
          <text:p text:style-name="P14"><text:span text:style-name="Source_20_Text">.footer</text:span></text:p>
        </text:list-item>
        <text:list-item>
          <text:p text:style-name="P14"><text:span text:style-name="Source_20_Text">.navbar</text:span></text:p>
        </text:list-item>
        <text:list-item>
          <text:p text:style-name="P14"><text:span text:style-name="Source_20_Text">.container</text:span></text:p>
        </text:list-item>
      </text:list>
      <text:p text:style-name="Text_20_body">Esses pertencem a outros arquivos da arquitetura.</text:p>
      <text:p text:style-name="P6"/>
      <text:h text:style-name="P8" text:outline-level="3">Próximo passo</text:h>
      <text:p text:style-name="Text_20_body">Depois do <text:span text:style-name="Source_20_Text">base.css</text:span>, minha sugestão é seguir esta ordem:</text:p>
      <text:list text:style-name="L9">
        <text:list-item>
          <text:p text:style-name="P15">✅ <text:span text:style-name="Source_20_Text">variables.css</text:span> (implementando todas as variáveis do Design System)</text:p>
        </text:list-item>
        <text:list-item>
          <text:p text:style-name="P15">✅ <text:span text:style-name="Source_20_Text">layout.css</text:span> (container, grids, seções)</text:p>
        </text:list-item>
        <text:list-item>
          <text:p text:style-name="P15">✅ <text:span text:style-name="Source_20_Text">components.css</text:span> (botões, cards, header, footer e componentes reutilizáveis)</text:p>
        </text:list-item>
        <text:list-item>
          <text:p text:style-name="P15">✅ <text:span text:style-name="Source_20_Text">home.css</text:span> (estilos exclusivos da página inicial)</text:p>
        </text:list-item>
      </text:list>
      <text:p text:style-name="Text_20_body">Essa sequência mantém a arquitetura limpa, escalável e fácil de evoluir conforme a plataforma crescer.</text:p>
      <text:p text:style-name="Text_20_body">Excelente. Agora vamos criar o arquivo mais importante do projeto: <text:span text:style-name="Strong_20_Emphasis"><text:span text:style-name="Source_20_Text">variables.css</text:span></text:span>.</text:p>
      <text:p text:style-name="Text_20_body">Ele será a base de todo o Design System. Nenhum outro arquivo CSS deverá possuir valores "mágicos" como <text:span text:style-name="Source_20_Text">#243447</text:span>, <text:span text:style-name="Source_20_Text">16px</text:span> ou <text:span text:style-name="Source_20_Text">1200px</text:span>. Tudo será consumido através das variáveis definidas aqui.</text:p>
      <text:p text:style-name="P6"/>
      <text:h text:style-name="P12" text:outline-level="1">Responsabilidade do <text:span text:style-name="Source_20_Text">variables.css</text:span></text:h>
      <text:p text:style-name="Text_20_body">Este arquivo armazenará apenas <text:span text:style-name="Strong_20_Emphasis">tokens de design</text:span>, ou seja:</text:p>
      <text:list text:style-name="L10">
        <text:list-item>
          <text:p text:style-name="P16">Cores</text:p>
        </text:list-item>
        <text:list-item>
          <text:p text:style-name="P16">Tipografia</text:p>
        </text:list-item>
        <text:list-item>
          <text:p text:style-name="P16">Tamanhos de fonte</text:p>
        </text:list-item>
        <text:list-item>
          <text:p text:style-name="P16">Espaçamentos</text:p>
        </text:list-item>
        <text:list-item>
          <text:p text:style-name="P16">Bordas</text:p>
        </text:list-item>
        <text:list-item>
          <text:p text:style-name="P16">Sombras</text:p>
        </text:list-item>
        <text:list-item>
          <text:p text:style-name="P16">Containers</text:p>
        </text:list-item>
        <text:list-item>
          <text:p text:style-name="P16">Breakpoints</text:p>
        </text:list-item>
        <text:list-item>
          <text:p text:style-name="P16">Transições</text:p>
        </text:list-item>
      </text:list>
      <text:p text:style-name="Text_20_body"><text:soft-page-break/>Ele <text:span text:style-name="Strong_20_Emphasis">não terá nenhuma classe CSS</text:span> (<text:span text:style-name="Source_20_Text">.button</text:span>, <text:span text:style-name="Source_20_Text">.card</text:span>, etc.).</text:p>
      <text:p text:style-name="P6"/>
      <text:h text:style-name="P7" text:outline-level="2"><text:span text:style-name="Source_20_Text">assets/css/variables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DESIGN TOKENS</text:span></text:p>
      <text:p text:style-name="P5"><text:span text:style-name="Source_20_Text"><text:s text:c="3"/>Biblioteca Apócrifa - Design System v1.0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root {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COR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Cores principais */</text:span></text:p>
      <text:p text:style-name="P5"><text:span text:style-name="Source_20_Text"><text:s text:c="4"/>--color-primary: #243447;</text:span></text:p>
      <text:p text:style-name="P5"><text:span text:style-name="Source_20_Text"><text:s text:c="4"/>--color-secondary: #9A7B4F;</text:span></text:p>
      <text:p text:style-name="P5"/>
      <text:p text:style-name="P5"><text:span text:style-name="Source_20_Text"><text:s text:c="4"/>/* Fundos */</text:span></text:p>
      <text:p text:style-name="P5"><text:span text:style-name="Source_20_Text"><text:s text:c="4"/>--color-background: #F8F5EF;</text:span></text:p>
      <text:p text:style-name="P5"><text:span text:style-name="Source_20_Text"><text:s text:c="4"/>--color-reading-background: #FCFAF5;</text:span></text:p>
      <text:p text:style-name="P5"><text:span text:style-name="Source_20_Text"><text:s text:c="4"/>--color-surface: #FFFFFF;</text:span></text:p>
      <text:p text:style-name="P5"/>
      <text:p text:style-name="P5"><text:span text:style-name="Source_20_Text"><text:s text:c="4"/>/* Textos */</text:span></text:p>
      <text:p text:style-name="P5"><text:span text:style-name="Source_20_Text"><text:s text:c="4"/>--color-text: #2C2C2C;</text:span></text:p>
      <text:p text:style-name="P5"><text:span text:style-name="Source_20_Text"><text:s text:c="4"/>--color-text-muted: #6B6B6B;</text:span></text:p>
      <text:p text:style-name="P5"/>
      <text:p text:style-name="P5"><text:span text:style-name="Source_20_Text"><text:s text:c="4"/>/* Bordas */</text:span></text:p>
      <text:p text:style-name="P5"><text:span text:style-name="Source_20_Text"><text:s text:c="4"/>--color-border: #D8D2C8;</text:span></text:p>
      <text:p text:style-name="P5"/>
      <text:p text:style-name="P5"><text:span text:style-name="Source_20_Text"><text:s text:c="4"/>/* Estados */</text:span></text:p>
      <text:p text:style-name="P5"><text:span text:style-name="Source_20_Text"><text:s text:c="4"/>--color-success: #2E7D32;</text:span></text:p>
      <text:p text:style-name="P5"><text:span text:style-name="Source_20_Text"><text:s text:c="4"/>--color-warning: #ED6C02;</text:span></text:p>
      <text:p text:style-name="P5"><text:span text:style-name="Source_20_Text"><text:s text:c="4"/>--color-error: #C62828;</text:span></text:p>
      <text:p text:style-name="P5"><text:span text:style-name="Source_20_Text"><text:s text:c="4"/>--color-info: #1565C0;</text:span></text:p>
      <text:p text:style-name="P5"/>
      <text:p text:style-name="P5"><text:soft-page-break/><text:span text:style-name="Source_20_Text"><text:s text:c="4"/>/* ======================================================</text:span></text:p>
      <text:p text:style-name="P5"><text:span text:style-name="Source_20_Text"><text:s text:c="7"/>TIPOGRAFIA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Famílias */</text:span></text:p>
      <text:p text:style-name="P5"><text:span text:style-name="Source_20_Text"><text:s text:c="4"/>--font-interface: "Open Sans", sans-serif;</text:span></text:p>
      <text:p text:style-name="P5"><text:span text:style-name="Source_20_Text"><text:s text:c="4"/>--font-reading: "Merriweather", serif;</text:span></text:p>
      <text:p text:style-name="P5"/>
      <text:p text:style-name="P5"><text:span text:style-name="Source_20_Text"><text:s text:c="4"/>/* Escala tipográfica */</text:span></text:p>
      <text:p text:style-name="P5"><text:span text:style-name="Source_20_Text"><text:s text:c="4"/>--font-size-h1: 2.5rem;</text:span></text:p>
      <text:p text:style-name="P5"><text:span text:style-name="Source_20_Text"><text:s text:c="4"/>--font-size-h2: 2rem;</text:span></text:p>
      <text:p text:style-name="P5"><text:span text:style-name="Source_20_Text"><text:s text:c="4"/>--font-size-h3: 1.5rem;</text:span></text:p>
      <text:p text:style-name="P5"/>
      <text:p text:style-name="P5"><text:span text:style-name="Source_20_Text"><text:s text:c="4"/>--font-size-body: 1.125rem;</text:span></text:p>
      <text:p text:style-name="P5"><text:span text:style-name="Source_20_Text"><text:s text:c="4"/>--font-size-small: 0.875rem;</text:span></text:p>
      <text:p text:style-name="P5"/>
      <text:p text:style-name="P5"><text:span text:style-name="Source_20_Text"><text:s text:c="4"/>/* Pesos */</text:span></text:p>
      <text:p text:style-name="P5"><text:span text:style-name="Source_20_Text"><text:s text:c="4"/>--font-weight-regular: 400;</text:span></text:p>
      <text:p text:style-name="P5"><text:span text:style-name="Source_20_Text"><text:s text:c="4"/>--font-weight-semibold: 600;</text:span></text:p>
      <text:p text:style-name="P5"><text:span text:style-name="Source_20_Text"><text:s text:c="4"/>--font-weight-bold: 700;</text:span></text:p>
      <text:p text:style-name="P5"/>
      <text:p text:style-name="P5"><text:span text:style-name="Source_20_Text"><text:s text:c="4"/>/* Altura das linhas */</text:span></text:p>
      <text:p text:style-name="P5"><text:span text:style-name="Source_20_Text"><text:s text:c="4"/>--line-height-heading: 1.3;</text:span></text:p>
      <text:p text:style-name="P5"><text:span text:style-name="Source_20_Text"><text:s text:c="4"/>--line-height-body: 1.7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ESPAÇAMENTO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pace-xs: .25rem;</text:span></text:p>
      <text:p text:style-name="P5"><text:span text:style-name="Source_20_Text"><text:s text:c="4"/>--space-sm: .5rem;</text:span></text:p>
      <text:p text:style-name="P5"><text:span text:style-name="Source_20_Text"><text:s text:c="4"/>--space-md: 1rem;</text:span></text:p>
      <text:p text:style-name="P5"><text:span text:style-name="Source_20_Text"><text:s text:c="4"/>--space-lg: 2rem;</text:span></text:p>
      <text:p text:style-name="P5"><text:span text:style-name="Source_20_Text"><text:s text:c="4"/>--space-xl: 4rem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oft-page-break/><text:span text:style-name="Source_20_Text"><text:s text:c="7"/>CONTAINER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container-width: 1200px;</text:span></text:p>
      <text:p text:style-name="P5"><text:span text:style-name="Source_20_Text"><text:s text:c="4"/>--reading-width: 750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ORD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radius-sm: 4px;</text:span></text:p>
      <text:p text:style-name="P5"><text:span text:style-name="Source_20_Text"><text:s text:c="4"/>--radius-md: 8px;</text:span></text:p>
      <text:p text:style-name="P5"><text:span text:style-name="Source_20_Text"><text:s text:c="4"/>--radius-lg: 16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SOMBR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hadow-sm: 0 2px 6px rgba(0, 0, 0, 0.08);</text:span></text:p>
      <text:p text:style-name="P5"><text:span text:style-name="Source_20_Text"><text:s text:c="4"/>--shadow-md: 0 6px 18px rgba(0, 0, 0, 0.12)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TRANSIÇÕ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transition-fast: .2s ease;</text:span></text:p>
      <text:p text:style-name="P5"><text:span text:style-name="Source_20_Text"><text:s text:c="4"/>--transition-normal: .3s ease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REAKPOINT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breakpoint-mobile: 640px;</text:span></text:p>
      <text:p text:style-name="P5"><text:span text:style-name="Source_20_Text"><text:s text:c="4"/>--breakpoint-tablet: 1024px;</text:span></text:p>
      <text:p text:style-name="P5"><text:span text:style-name="Source_20_Text"><text:s text:c="4"/>--breakpoint-desktop: 1200px;</text:span></text:p>
      <text:p text:style-name="P5"/>
      <text:p text:style-name="P5"><text:soft-page-break/><text:span text:style-name="Source_20_Text">}</text:span></text:p>
      <text:p text:style-name="P6"/>
      <text:h text:style-name="P7" text:outline-level="2">Avaliação da arquitetura</text:h>
      <text:p text:style-name="Text_20_body">Esse arquivo ficou alinhado ao Design System que definimos. Ele também é escalável: se no futuro você quiser alterar a cor principal da plataforma ou aumentar o tamanho dos títulos, bastará mudar uma variável.</text:p>
      <text:h text:style-name="P8" text:outline-level="3">Uma sugestão de melhoria</text:h>
      <text:p text:style-name="Text_20_body">Pensando na <text:span text:style-name="Strong_20_Emphasis">Área de Leitura</text:span>, que será o núcleo da plataforma, eu acrescentaria mais dois tokens de tipografia:</text:p>
      <text:p text:style-name="P5"><text:span text:style-name="Source_20_Text">/* Largura ideal para leitura */</text:span></text:p>
      <text:p text:style-name="P5"><text:span text:style-name="Source_20_Text">--reading-line-height: 1.9;</text:span></text:p>
      <text:p text:style-name="P5"/>
      <text:p text:style-name="P5"><text:span text:style-name="Source_20_Text">/* Espaçamento entre parágrafos */</text:span></text:p>
      <text:p text:style-name="P5"><text:span text:style-name="Source_20_Text">--paragraph-spacing: 1.5rem;</text:span></text:p>
      <text:p text:style-name="Text_20_body"><text:span text:style-name="Strong_20_Emphasis">Por quê?</text:span></text:p>
      <text:p text:style-name="Text_20_body">A página de leitura terá capítulos longos, exegeses e comentários. Usar uma altura de linha um pouco maior e um espaçamento específico entre parágrafos melhora bastante a legibilidade sem afetar as outras páginas.</text:p>
      <text:p text:style-name="Text_20_body">Não é obrigatório adicionar agora, mas considero uma boa preparação para quando começarmos a desenvolver a <text:span text:style-name="Strong_20_Emphasis">Área de Leitura</text:span>.</text:p>
      <text:p text:style-name="Text_20_body"/>
      <text:p text:style-name="Text_20_body">Essa ideia vale a pena manter, mas neste projeto a memória está desativada, então não consigo guardá-la para conversas futuras.</text:p>
      <text:p text:style-name="Text_20_body">A melhor alternativa é registrá-la na documentação do projeto. Podemos criar um arquivo como <text:span text:style-name="Source_20_Text">DESIGN_SYSTEM.md</text:span> ou adicionar uma seção chamada <text:span text:style-name="Strong_20_Emphasis">"Decisões de Arquitetura"</text:span>, por exemplo:</text:p>
      <text:p text:style-name="Quotations"><text:span text:style-name="Strong_20_Emphasis">Área de Leitura</text:span></text:p>
      <text:p text:style-name="Quotations">Quando a página de leitura for implementada, utilizar:</text:p>
      <text:list text:style-name="L11">
        <text:list-item>
          <text:p text:style-name="P17"><text:span text:style-name="Source_20_Text">--reading-line-height: 1.9;</text:span></text:p>
        </text:list-item>
        <text:list-item>
          <text:p text:style-name="P17"><text:span text:style-name="Source_20_Text">--paragraph-spacing: 1.5rem;</text:span></text:p>
        </text:list-item>
      </text:list>
      <text:p text:style-name="Quotations"><text:span text:style-name="Strong_20_Emphasis">Justificativa:</text:span> melhorar a legibilidade de textos longos, comentários e exegeses.</text:p>
      <text:p text:style-name="Text_20_body">Assim essa decisão fica documentada e não depende da memória da conversa.</text:p>
      <text:p text:style-name="Horizontal_20_Line"/>
      <text:h text:style-name="Heading_20_1" text:outline-level="1"><text:soft-page-break/>Agora vamos para <text:span text:style-name="Source_20_Text">components.css</text:span></text:h>
      <text:h text:style-name="Heading_20_2" text:outline-level="2">Objetivo</text:h>
      <text:p text:style-name="Text_20_body">O <text:span text:style-name="Source_20_Text">components.css</text:span> conterá <text:span text:style-name="Strong_20_Emphasis">todos os componentes reutilizáveis</text:span> da plataforma.</text:p>
      <text:p text:style-name="Text_20_body">Ele <text:span text:style-name="Strong_20_Emphasis">não</text:span> deve conter estilos exclusivos da Home, Biblioteca ou Leitura. Esses ficam nos respectivos arquivos (<text:span text:style-name="Source_20_Text">home.css</text:span>, <text:span text:style-name="Source_20_Text">biblioteca.css</text:span>, <text:span text:style-name="Source_20_Text">leitura.css</text:span>).</text:p>
      <text:p text:style-name="Text_20_body">Nossa divisão será esta:</text:p>
      <text:p text:style-name="Preformatted_20_Text"><text:span text:style-name="Source_20_Text">components.css</text:span></text:p>
      <text:p text:style-name="Preformatted_20_Text"/>
      <text:p text:style-name="Preformatted_20_Text"><text:span text:style-name="Source_20_Text">• Botões</text:span></text:p>
      <text:p text:style-name="Preformatted_20_Text"><text:span text:style-name="Source_20_Text">• Cards</text:span></text:p>
      <text:p text:style-name="Preformatted_20_Text"><text:span text:style-name="Source_20_Text">• Cabeçalho (Header)</text:span></text:p>
      <text:p text:style-name="Preformatted_20_Text"><text:span text:style-name="Source_20_Text">• Navegação</text:span></text:p>
      <text:p text:style-name="Preformatted_20_Text"><text:span text:style-name="Source_20_Text">• Footer</text:span></text:p>
      <text:p text:style-name="Preformatted_20_Text"><text:span text:style-name="Source_20_Text">• Ícones</text:span></text:p>
      <text:p text:style-name="P2"><text:span text:style-name="Source_20_Text">• Section Header</text:span></text:p>
      <text:p text:style-name="Text_20_body">Perceba que <text:span text:style-name="Strong_20_Emphasis">Hero</text:span>, <text:span text:style-name="Strong_20_Emphasis">Intro</text:span>, <text:span text:style-name="Strong_20_Emphasis">History</text:span>, <text:span text:style-name="Strong_20_Emphasis">Platform</text:span> e <text:span text:style-name="Strong_20_Emphasis">Featured Books</text:span> <text:span text:style-name="Strong_20_Emphasis">não</text:span> entram aqui, porque são seções específicas da página inicial.</text:p>
      <text:p text:style-name="Horizontal_20_Line"/>
      <text:h text:style-name="Heading_20_2" text:outline-level="2"><text:span text:style-name="Source_20_Text">assets/css/components.css</text:span>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prim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font-family: var(--font-interface);</text:span></text:p>
      <text:p text:style-name="Preformatted_20_Text"><text:span text:style-name="Source_20_Text"><text:s text:c="4"/>font-weight: var(--font-weight-semibold);</text:span></text:p>
      <text:p text:style-name="Preformatted_20_Text"/>
      <text:p text:style-name="Preformatted_20_Text"><text:span text:style-name="Source_20_Text"><text:s text:c="4"/>color: var(--color-surface);</text:span></text:p>
      <text:p text:style-name="Preformatted_20_Text"><text:span text:style-name="Source_20_Text"><text:s text:c="4"/>background-color: var(--color-primary)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background-color var(--transition-normal),</text:span></text:p>
      <text:p text:style-name="Preformatted_20_Text"><text:span text:style-name="Source_20_Text"><text:s text:c="8"/>transform var(--transition-fast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primary:hover {</text:span></text:p>
      <text:p text:style-name="Preformatted_20_Text"><text:span text:style-name="Source_20_Text"><text:s text:c="4"/>background-color: var(--color-secondary);</text:span></text:p>
      <text:p text:style-name="Preformatted_20_Text"><text:span text:style-name="Source_20_Text"><text:s text:c="4"/>transform: translateY(-2px);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.button-primary:focus-visible {</text:span></text:p>
      <text:p text:style-name="Preformatted_20_Text"><text:span text:style-name="Source_20_Text"><text:s text:c="4"/>outline: 2px solid var(--color-secondary);</text:span></text:p>
      <text:p text:style-name="Preformatted_20_Text"><text:span text:style-name="Source_20_Text"><text:s text:c="4"/>outline-offset: 3px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SECUNDÁRI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second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border: 1px solid var(--color-primary)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transition: all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secondary:hover {</text:span></text:p>
      <text:p text:style-name="Preformatted_20_Text"><text:span text:style-name="Source_20_Text"><text:s text:c="4"/>background: var(--color-primary);</text:span></text:p>
      <text:p text:style-name="Preformatted_20_Text"><text:span text:style-name="Source_20_Text"><text:s text:c="4"/>color: var(--color-surface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DE ÍCON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con-button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width: 42px;</text:span></text:p>
      <text:p text:style-name="Preformatted_20_Text"><text:span text:style-name="Source_20_Text"><text:s text:c="4"/>height: 42px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50%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 background-color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icon-button:hover {</text:span></text:p>
      <text:p text:style-name="Preformatted_20_Text"><text:span text:style-name="Source_20_Text"><text:s text:c="4"/>background-color: rgba(0,0,0,.08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ADER</text:span></text:p>
      <text:p text:style-name="Preformatted_20_Text"><text:span text:style-name="Source_20_Text">========================================================== */</text:span></text:p>
      <text:p text:style-name="Preformatted_20_Text"><text:soft-page-break/></text:p>
      <text:p text:style-name="Preformatted_20_Text"><text:span text:style-name="Source_20_Text">.app-header {</text:span></text:p>
      <text:p text:style-name="Preformatted_20_Text"><text:span text:style-name="Source_20_Text"><text:s text:c="4"/>background: var(--color-surface);</text:span></text:p>
      <text:p text:style-name="Preformatted_20_Text"><text:span text:style-name="Source_20_Text"><text:s text:c="4"/>border-bottom: 1px solid var(--color-border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container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space-between;</text:span></text:p>
      <text:p text:style-name="Preformatted_20_Text"/>
      <text:p text:style-name="Preformatted_20_Text"><text:span text:style-name="Source_20_Text"><text:s text:c="4"/>min-height: 80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logo {</text:span></text:p>
      <text:p text:style-name="Preformatted_20_Text"><text:span text:style-name="Source_20_Text"><text:s text:c="4"/>font-family: var(--font-reading);</text:span></text:p>
      <text:p text:style-name="Preformatted_20_Text"><text:span text:style-name="Source_20_Text"><text:s text:c="4"/>font-size: 1.5rem;</text:span></text:p>
      <text:p text:style-name="Preformatted_20_Text"><text:span text:style-name="Source_20_Text"><text:s text:c="4"/>font-weight: var(--font-weight-bold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a {</text:span></text:p>
      <text:p text:style-name="Preformatted_20_Text"><text:span text:style-name="Source_20_Text"><text:s text:c="4"/>font-weight: var(--font-weight-semibol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actions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ARD DO LIV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ook-card {</text:span></text:p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transform var(--transition-fast),</text:span></text:p>
      <text:p text:style-name="Preformatted_20_Text"><text:span text:style-name="Source_20_Text"><text:s text:c="8"/>box-shadow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-card:hover {</text:span></text:p>
      <text:p text:style-name="Preformatted_20_Text"><text:span text:style-name="Source_20_Text"><text:s text:c="4"/>transform: translateY(-4px);</text:span></text:p>
      <text:p text:style-name="Preformatted_20_Text"><text:span text:style-name="Source_20_Text"><text:s text:c="4"/>box-shadow: var(--shadow-md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oft-page-break/><text:span text:style-name="Source_20_Text"><text:s text:c="3"/>CARD DE FUNCIONAL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-card {</text:span></text:p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TÍTULO DAS SEÇ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section-header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ODAPÉ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ooter {</text:span></text:p>
      <text:p text:style-name="Preformatted_20_Text"><text:span text:style-name="Source_20_Text"><text:s text:c="4"/>margin-top: var(--space-xl);</text:span></text:p>
      <text:p text:style-name="Preformatted_20_Text"/>
      <text:p text:style-name="Preformatted_20_Text"><text:span text:style-name="Source_20_Text"><text:s text:c="4"/>border-top: 1px solid var(--color-border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footer__content {</text:span></text:p>
      <text:p text:style-name="Preformatted_20_Text"><text:span text:style-name="Source_20_Text"><text:s text:c="4"/>padding: var(--space-lg) 0;</text:span></text:p>
      <text:p text:style-name="Preformatted_20_Text"/>
      <text:p text:style-name="Preformatted_20_Text"><text:span text:style-name="Source_20_Text"><text:s text:c="4"/>text-align: center;</text:span></text:p>
      <text:p text:style-name="P2"><text:span text:style-name="Source_20_Text">}</text:span></text:p>
      <text:p text:style-name="Horizontal_20_Line"/>
      <text:h text:style-name="Heading_20_3" text:outline-level="3">Avaliação</text:h>
      <text:p text:style-name="Text_20_body">Esse <text:span text:style-name="Source_20_Text">components.css</text:span> está totalmente compatível com o HTML que você construiu e com o nosso Design System.</text:p>
      <text:p text:style-name="Text_20_body">Ele também respeita a responsabilidade de cada arquivo:</text:p>
      <text:list text:style-name="L12">
        <text:list-item>
          <text:p text:style-name="P18">✅ <text:span text:style-name="Source_20_Text">variables.css</text:span> → apenas tokens.</text:p>
        </text:list-item>
        <text:list-item>
          <text:p text:style-name="P18">✅ <text:span text:style-name="Source_20_Text">base.css</text:span> → estilos globais.</text:p>
        </text:list-item>
        <text:list-item>
          <text:p text:style-name="P18">✅ <text:bookmark-start text:name="__DdeLink__3364_829906918"/><text:bookmark-start text:name="__DdeLink__3362_829906918"/><text:span text:style-name="Source_20_Text">layout.css</text:span> <text:bookmark-end text:name="__DdeLink__3364_829906918"/><text:bookmark-end text:name="__DdeLink__3362_829906918"/>→ estrutura e containers.</text:p>
        </text:list-item>
        <text:list-item>
          <text:p text:style-name="P18">✅ <text:span text:style-name="Source_20_Text">components.css</text:span> → componentes reutilizáveis.</text:p>
        </text:list-item>
        <text:list-item>
          <text:p text:style-name="P18">⏳ <text:span text:style-name="Source_20_Text">home.css</text:span> → apenas estilos específicos da página inicial.</text:p>
        </text:list-item>
      </text:list>
      <text:p text:style-name="Text_20_body"><text:soft-page-break/>Essa separação vai facilitar muito a manutenção conforme a plataforma crescer.</text:p>
      <text:p text:style-name="Standard">/* ==========================================================</text:p>
      <text:p text:style-name="Standard"><text:s text:c="3"/>CONTAINER</text:p>
      <text:p text:style-name="Standard">========================================================== */</text:p>
      <text:p text:style-name="Standard"/>
      <text:p text:style-name="Standard">.container {</text:p>
      <text:p text:style-name="Standard"><text:s text:c="4"/>width: min(100% - 2rem, var(--container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SEÇÕES</text:p>
      <text:p text:style-name="Standard">========================================================== */</text:p>
      <text:p text:style-name="Standard"/>
      <text:p text:style-name="Standard">section {</text:p>
      <text:p text:style-name="Standard"><text:s text:c="4"/>padding-block: var(--space-xl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ÁREA DE LEITURA</text:p>
      <text:p text:style-name="Standard">========================================================== */</text:p>
      <text:p text:style-name="Standard"/>
      <text:p text:style-name="Standard">.reading-container {</text:p>
      <text:p text:style-name="Standard"><text:s text:c="4"/>width: min(100% - 2rem, var(--reading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GENÉRICO</text:p>
      <text:p text:style-name="Standard">========================================================== */</text:p>
      <text:p text:style-name="Standard"/>
      <text:p text:style-name="Standard">.grid {</text:p>
      <text:p text:style-name="Standard"><text:s text:c="4"/>display: grid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2 COLUNAS</text:p>
      <text:p text:style-name="Standard">========================================================== */</text:p>
      <text:p text:style-name="Standard"/>
      <text:p text:style-name="Standard">.grid-2 {</text:p>
      <text:p text:style-name="Standard"><text:s text:c="4"/>display: grid;</text:p>
      <text:p text:style-name="Standard"><text:s text:c="4"/>grid-template-columns: repeat(2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3 COLUNAS</text:p>
      <text:p text:style-name="Standard">========================================================== */</text:p>
      <text:p text:style-name="Standard"/>
      <text:p text:style-name="Standard">.grid-3 {</text:p>
      <text:p text:style-name="Standard"><text:s text:c="4"/>display: grid;</text:p>
      <text:p text:style-name="Standard"><text:soft-page-break/><text:s text:c="4"/>grid-template-columns: repeat(3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FLEX GENÉRICO</text:p>
      <text:p text:style-name="Standard">========================================================== */</text:p>
      <text:p text:style-name="Standard"/>
      <text:p text:style-name="Standard">.flex {</text:p>
      <text:p text:style-name="Standard"><text:s text:c="4"/>display: flex;</text:p>
      <text:p text:style-name="Standard">}</text:p>
      <text:p text:style-name="Standard"/>
      <text:p text:style-name="Standard">.flex-center {</text:p>
      <text:p text:style-name="Standard"><text:s text:c="4"/>display: flex;</text:p>
      <text:p text:style-name="Standard"><text:s text:c="4"/>justify-content: center;</text:p>
      <text:p text:style-name="Standard"><text:s text:c="4"/>align-items: center;</text:p>
      <text:p text:style-name="Standard">}</text:p>
      <text:p text:style-name="Standard"/>
      <text:p text:style-name="Standard">.flex-between {</text:p>
      <text:p text:style-name="Standard"><text:s text:c="4"/>display: flex;</text:p>
      <text:p text:style-name="Standard"><text:s text:c="4"/>justify-content: space-between;</text:p>
      <text:p text:style-name="Standard"><text:s text:c="4"/>align-items: center;</text:p>
      <text:p text:style-name="Standard">}</text:p>
      <text:p text:style-name="Standard"/>
      <text:p text:style-name="Standard">/* ==========================================================</text:p>
      <text:p text:style-name="Standard"><text:s text:c="3"/>RESPONSIVIDADE</text:p>
      <text:p text:style-name="Standard">========================================================== */</text:p>
      <text:p text:style-name="Standard"/>
      <text:p text:style-name="Standard">@media (max-width: 1024px) {</text:p>
      <text:p text:style-name="Standard"/>
      <text:p text:style-name="Standard"><text:s text:c="4"/>.grid-3 {</text:p>
      <text:p text:style-name="Standard"><text:s text:c="8"/>grid-template-columns: repeat(2, 1fr);</text:p>
      <text:p text:style-name="Standard"><text:s text:c="4"/>}</text:p>
      <text:p text:style-name="Standard"/>
      <text:p text:style-name="Standard">}</text:p>
      <text:p text:style-name="Standard"/>
      <text:p text:style-name="Standard">@media (max-width: 640px) {</text:p>
      <text:p text:style-name="Standard"/>
      <text:p text:style-name="Standard"><text:s text:c="4"/>.grid-2,</text:p>
      <text:p text:style-name="Standard"><text:s text:c="4"/>.grid-3 {</text:p>
      <text:p text:style-name="Standard"><text:s text:c="8"/>grid-template-columns: 1fr;</text:p>
      <text:p text:style-name="Standard"><text:s text:c="4"/>}</text:p>
      <text:p text:style-name="Standard"/>
      <text:p text:style-name="Standard">}</text:p>
      <text:p text:style-name="Standard"/>
      <text:p text:style-name="Text_20_body">Sim. Para o <text:span text:style-name="Strong_20_Emphasis"><text:span text:style-name="Source_20_Text">index.html</text:span></text:span>, devem estar linkados apenas os arquivos necessários para a Home.</text:p>
      <text:p text:style-name="Text_20_body">Na ordem correta:</text:p>
      <text:p text:style-name="Preformatted_20_Text"><text:span text:style-name="Source_20_Text">&lt;!-- Google Fonts --&gt;</text:span></text:p>
      <text:p text:style-name="Preformatted_20_Text"><text:span text:style-name="Source_20_Text">&lt;link rel="preconnect" href="https://fonts.googleapis.com"&gt;</text:span></text:p>
      <text:p text:style-name="Preformatted_20_Text"><text:span text:style-name="Source_20_Text">&lt;link rel="preconnect" href="https://fonts.gstatic.com" crossorigin&gt;</text:span></text:p>
      <text:p text:style-name="Preformatted_20_Text"><text:soft-page-break/><text:span text:style-name="Source_20_Text">&lt;link href="https://fonts.googleapis.com/css2?family=Merriweather:wght@300;400;700&amp;family=Open+Sans:wght@300;400;600;700&amp;display=swap" rel="stylesheet"&gt;</text:span></text:p>
      <text:p text:style-name="Preformatted_20_Text"/>
      <text:p text:style-name="Preformatted_20_Text"><text:span text:style-name="Source_20_Text">&lt;!-- Design System --&gt;</text:span></text:p>
      <text:p text:style-name="Preformatted_20_Text"><text:span text:style-name="Source_20_Text">&lt;link rel="stylesheet" href="assets/css/variables.css"&gt;</text:span></text:p>
      <text:p text:style-name="Preformatted_20_Text"/>
      <text:p text:style-name="Preformatted_20_Text"><text:span text:style-name="Source_20_Text">&lt;!-- Estilos Globais --&gt;</text:span></text:p>
      <text:p text:style-name="Preformatted_20_Text"><text:span text:style-name="Source_20_Text">&lt;link rel="stylesheet" href="assets/css/base.css"&gt;</text:span></text:p>
      <text:p text:style-name="Preformatted_20_Text"/>
      <text:p text:style-name="Preformatted_20_Text"><text:span text:style-name="Source_20_Text">&lt;!-- Estrutura --&gt;</text:span></text:p>
      <text:p text:style-name="Preformatted_20_Text"><text:span text:style-name="Source_20_Text">&lt;link rel="stylesheet" href="assets/css/layout.css"&gt;</text:span></text:p>
      <text:p text:style-name="Preformatted_20_Text"/>
      <text:p text:style-name="Preformatted_20_Text"><text:span text:style-name="Source_20_Text">&lt;!-- Componentes Reutilizáveis --&gt;</text:span></text:p>
      <text:p text:style-name="Preformatted_20_Text"><text:span text:style-name="Source_20_Text">&lt;link rel="stylesheet" href="assets/css/components.css"&gt;</text:span></text:p>
      <text:p text:style-name="Preformatted_20_Text"/>
      <text:p text:style-name="Preformatted_20_Text"><text:span text:style-name="Source_20_Text">&lt;!-- Página Inicial --&gt;</text:span></text:p>
      <text:p text:style-name="P2"><text:span text:style-name="Source_20_Text">&lt;link rel="stylesheet" href="assets/css/home.css"&gt;</text:span></text:p>
      <text:p text:style-name="Horizontal_20_Line"/>
      <text:h text:style-name="Heading_20_2" text:outline-level="2">O que cada arquivo faz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Arquivo</text:p>
            </table:table-cell>
            <table:table-cell table:style-name="Tabela1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variables.css</text:span></text:p>
          </table:table-cell>
          <table:table-cell table:style-name="Tabela1.A1" office:value-type="string">
            <text:p text:style-name="Table_20_Contents">Variáveis do Design System (cores, fontes, espaçamentos, etc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ase.css</text:span></text:p>
          </table:table-cell>
          <table:table-cell table:style-name="Tabela1.A1" office:value-type="string">
            <text:p text:style-name="Table_20_Contents">Reset e estilos globais (<text:span text:style-name="Source_20_Text">body</text:span>, títulos, links, imagens, listas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ayout.css</text:span></text:p>
          </table:table-cell>
          <table:table-cell table:style-name="Tabela1.A1" office:value-type="string">
            <text:p text:style-name="Table_20_Contents">Containers, grids, flex, estrutura e responsividad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omponents.css</text:span></text:p>
          </table:table-cell>
          <table:table-cell table:style-name="Tabela1.A1" office:value-type="string">
            <text:p text:style-name="Table_20_Contents">Componentes reutilizáveis (header, footer, botões, cards, navegação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home.css</text:span></text:p>
          </table:table-cell>
          <table:table-cell table:style-name="Tabela1.A1" office:value-type="string">
            <text:p text:style-name="Table_20_Contents">Estilos exclusivos da página inicial</text:p>
          </table:table-cell>
        </table:table-row>
      </table:table>
      <text:p text:style-name="Horizontal_20_Line"/>
      <text:h text:style-name="Heading_20_2" text:outline-level="2">O que <text:span text:style-name="Strong_20_Emphasis">não</text:span> deve estar no <text:span text:style-name="Source_20_Text">index.html</text:span></text:h>
      <text:p text:style-name="Text_20_body">Por exemplo:</text:p>
      <text:p text:style-name="Preformatted_20_Text"><text:span text:style-name="Source_20_Text">biblioteca.css</text:span></text:p>
      <text:p text:style-name="Preformatted_20_Text"><text:span text:style-name="Source_20_Text">leitura.css</text:span></text:p>
      <text:p text:style-name="Preformatted_20_Text"><text:span text:style-name="Source_20_Text">perfil.css</text:span></text:p>
      <text:p text:style-name="P2"><text:span text:style-name="Source_20_Text">comunidade.css</text:span></text:p>
      <text:p text:style-name="Text_20_body">Esses arquivos devem ser carregados <text:span text:style-name="Strong_20_Emphasis">apenas</text:span> nas respectivas páginas.</text:p>
      <text:p text:style-name="Horizontal_20_Line"/>
      <text:h text:style-name="Heading_20_2" text:outline-level="2">Como ficará nas outras páginas</text:h>
      <text:h text:style-name="Heading_20_3" text:outline-level="3"><text:span text:style-name="Source_20_Text">bibliotec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biblioteca.css</text:span></text:p>
      <text:h text:style-name="Heading_20_3" text:outline-level="3"><text:soft-page-break/><text:span text:style-name="Source_20_Text">leitur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leitura.css</text:span></text:p>
      <text:h text:style-name="Heading_20_3" text:outline-level="3"><text:span text:style-name="Source_20_Text">comunidade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comunidade.css</text:span></text:p>
      <text:h text:style-name="Heading_20_3" text:outline-level="3"><text:span text:style-name="Source_20_Text">perfil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perfil.css</text:span></text:p>
      <text:p text:style-name="Horizontal_20_Line"/>
      <text:h text:style-name="Heading_20_3" text:outline-level="3">Uma observação importante</text:h>
      <text:p text:style-name="Text_20_body">A única exceção são as <text:span text:style-name="Strong_20_Emphasis">Google Fonts</text:span>. Como todas as páginas usam <text:span text:style-name="Strong_20_Emphasis">Open Sans</text:span> e <text:span text:style-name="Strong_20_Emphasis">Merriweather</text:span>, elas também devem ser incluídas em todas as páginas da aplicação (ou centralizadas futuramente, se o projeto evoluir para um template comum).</text:p>
      <text:p text:style-name="Text_20_body">Essa organização segue a arquitetura que planejamos e evita carregar CSS desnecessário em cada página.</text:p>
      <text:p text:style-name="Text_20_body">Perfeito. Agora sim faz sentido começar o <text:span text:style-name="Source_20_Text">home.css</text:span>.</text:p>
      <text:p text:style-name="Text_20_body">Mas quero estabelecer uma regra que seguiremos até o final do projeto.</text:p>
      <text:h text:style-name="Heading_20_2" text:outline-level="2">Regra da arquitetura</text:h>
      <text:p text:style-name="Text_20_body">Cada arquivo CSS terá apenas uma responsabilidade.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Arquivo</text:p>
            </table:table-cell>
            <table:table-cell table:style-name="Tabela2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variables.css</text:span></text:p>
          </table:table-cell>
          <table:table-cell table:style-name="Tabela2.A1" office:value-type="string">
            <text:p text:style-name="Table_20_Contents">Tokens (cores, fontes, espaçamentos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base.css</text:span></text:p>
          </table:table-cell>
          <table:table-cell table:style-name="Tabela2.A1" office:value-type="string">
            <text:p text:style-name="Table_20_Contents">Estilos globa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ayout.css</text:span></text:p>
          </table:table-cell>
          <table:table-cell table:style-name="Tabela2.A1" office:value-type="string">
            <text:p text:style-name="Table_20_Contents">Estrutura (container, grid, flex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mponents.css</text:span></text:p>
          </table:table-cell>
          <table:table-cell table:style-name="Tabela2.A1" office:value-type="string">
            <text:p text:style-name="Table_20_Contents">Componentes reutilizáve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home.css</text:span></text:p>
          </table:table-cell>
          <table:table-cell table:style-name="Tabela2.A1" office:value-type="string">
            <text:p text:style-name="Table_20_Contents"><text:span text:style-name="Strong_20_Emphasis">Somente o layout e aparência da Home</text:span></text:p>
          </table:table-cell>
        </table:table-row>
      </table:table>
      <text:p text:style-name="Text_20_body">Isso significa que no <text:span text:style-name="Source_20_Text">home.css</text:span> <text:span text:style-name="Strong_20_Emphasis">não criaremos estilos para</text:span>:</text:p>
      <text:list text:style-name="L13">
        <text:list-item>
          <text:p text:style-name="P19"><text:span text:style-name="Source_20_Text">.container</text:span></text:p>
        </text:list-item>
        <text:list-item>
          <text:p text:style-name="P19"><text:span text:style-name="Source_20_Text">.button-primary</text:span></text:p>
        </text:list-item>
        <text:list-item>
          <text:p text:style-name="P19"><text:span text:style-name="Source_20_Text">.book-card</text:span></text:p>
        </text:list-item>
        <text:list-item>
          <text:p text:style-name="P19"><text:soft-page-break/><text:span text:style-name="Source_20_Text">.feature-card</text:span></text:p>
        </text:list-item>
        <text:list-item>
          <text:p text:style-name="P19"><text:span text:style-name="Source_20_Text">.app-header</text:span></text:p>
        </text:list-item>
        <text:list-item>
          <text:p text:style-name="P19"><text:span text:style-name="Source_20_Text">.footer</text:span></text:p>
        </text:list-item>
      </text:list>
      <text:p text:style-name="Text_20_body">Porque esses já existem em outros arquivos.</text:p>
      <text:p text:style-name="Horizontal_20_Line"/>
      <text:h text:style-name="Heading_20_1" text:outline-level="1">O que existe na Home?</text:h>
      <text:p text:style-name="Text_20_body">Analisando o seu HTML, a Home possui estas seções:</text:p>
      <text:p text:style-name="Preformatted_20_Text"><text:span text:style-name="Source_20_Text">Hero</text:span></text:p>
      <text:p text:style-name="Preformatted_20_Text"/>
      <text:p text:style-name="Preformatted_20_Text"><text:span text:style-name="Source_20_Text">Introdução</text:span></text:p>
      <text:p text:style-name="Preformatted_20_Text"/>
      <text:p text:style-name="Preformatted_20_Text"><text:span text:style-name="Source_20_Text">Contexto Histórico</text:span></text:p>
      <text:p text:style-name="Preformatted_20_Text"/>
      <text:p text:style-name="Preformatted_20_Text"><text:span text:style-name="Source_20_Text">History Section</text:span></text:p>
      <text:p text:style-name="Preformatted_20_Text"/>
      <text:p text:style-name="Preformatted_20_Text"><text:span text:style-name="Source_20_Text">Platform</text:span></text:p>
      <text:p text:style-name="Preformatted_20_Text"/>
      <text:p text:style-name="Preformatted_20_Text"><text:span text:style-name="Source_20_Text">Featured Books</text:span></text:p>
      <text:p text:style-name="Preformatted_20_Text"/>
      <text:p text:style-name="P2"><text:span text:style-name="Source_20_Text">Editor Note</text:span></text:p>
      <text:p text:style-name="Text_20_body">Então o <text:span text:style-name="Source_20_Text">home.css</text:span> será organizado exatamente nessa ordem.</text:p>
      <text:p text:style-name="Horizontal_20_Line"/>
      <text:h text:style-name="Heading_20_1" text:outline-level="1">assets/css/home.css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ero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min-height: 80vh;</text:span></text:p>
      <text:p text:style-name="Preformatted_20_Text"/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__content,</text:span></text:p>
      <text:p text:style-name="Preformatted_20_Text"><text:span text:style-name="Source_20_Text">.hero_content {</text:span></text:p>
      <text:p text:style-name="Preformatted_20_Text"><text:span text:style-name="Source_20_Text"><text:s text:c="4"/>max-width: 76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h1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p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/* ==========================================================</text:span></text:p>
      <text:p text:style-name="Preformatted_20_Text"><text:span text:style-name="Source_20_Text"><text:s text:c="3"/>INTRODUÇÃ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ntro__content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NTEXTO HISTÓRIC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istory {</text:span></text:p>
      <text:p text:style-name="Preformatted_20_Text"><text:span text:style-name="Source_20_Text"><text:s text:c="4"/>padding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article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h3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p:last-child {</text:span></text:p>
      <text:p text:style-name="Preformatted_20_Text"><text:span text:style-name="Source_20_Text"><text:s text:c="4"/>margin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MO FUNCIONA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platform__content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platform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3, 1fr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LIVROS EM DESTAQU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d-books h2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s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auto-fit, minmax(280px, 1fr)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NOTA DO EDITOR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oft-page-break/><text:span text:style-name="Source_20_Text">.editor-note {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editor-note p {</text:span></text:p>
      <text:p text:style-name="Preformatted_20_Text"><text:span text:style-name="Source_20_Text"><text:s text:c="4"/>max-width: 70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ESPONSIV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@media (max-width: 1024px) {</text:span></text:p>
      <text:p text:style-name="Preformatted_20_Text"/>
      <text:p text:style-name="Preformatted_20_Text"><text:span text:style-name="Source_20_Text"><text:s text:c="4"/>.platform-grid {</text:span></text:p>
      <text:p text:style-name="Preformatted_20_Text"><text:span text:style-name="Source_20_Text"><text:s text:c="8"/>grid-template-columns: repeat(2, 1f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><text:span text:style-name="Source_20_Text">@media (max-width: 640px) {</text:span></text:p>
      <text:p text:style-name="Preformatted_20_Text"/>
      <text:p text:style-name="Preformatted_20_Text"><text:span text:style-name="Source_20_Text"><text:s text:c="4"/>.hero {</text:span></text:p>
      <text:p text:style-name="Preformatted_20_Text"><text:span text:style-name="Source_20_Text"><text:s text:c="8"/>min-height: 60vh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.platform-grid,</text:span></text:p>
      <text:p text:style-name="Preformatted_20_Text"><text:span text:style-name="Source_20_Text"><text:s text:c="4"/>.books-grid {</text:span></text:p>
      <text:p text:style-name="Preformatted_20_Text"><text:span text:style-name="Source_20_Text"><text:s text:c="8"/>grid-template-columns: 1fr;</text:span></text:p>
      <text:p text:style-name="Preformatted_20_Text"><text:span text:style-name="Source_20_Text"><text:s text:c="4"/>}</text:span></text:p>
      <text:p text:style-name="Preformatted_20_Text"/>
      <text:p text:style-name="P2"><text:span text:style-name="Source_20_Text">}</text:span></text:p>
      <text:p text:style-name="Horizontal_20_Line"/>
      <text:h text:style-name="Heading_20_1" text:outline-level="1">Agora quero fazer uma observação importante</text:h>
      <text:p text:style-name="Text_20_body">Analisando todo o projeto, percebi um padrão que pode deixá-lo ainda mais profissional.</text:p>
      <text:p text:style-name="Text_20_body">Você começou a usar classes como:</text:p>
      <text:p text:style-name="Preformatted_20_Text"><text:span text:style-name="Source_20_Text">hero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p text:style-name="Text_20_body">Há uma inconsistência aí:</text:p>
      <text:list text:style-name="L14">
        <text:list-item>
          <text:p text:style-name="P20"><text:span text:style-name="Source_20_Text">hero_content</text:span> usa um único <text:span text:style-name="Source_20_Text">_</text:span>.</text:p>
        </text:list-item>
        <text:list-item>
          <text:p text:style-name="P20"><text:span text:style-name="Source_20_Text">intro__content</text:span> usa dois <text:span text:style-name="Source_20_Text">__</text:span>.</text:p>
        </text:list-item>
        <text:list-item>
          <text:p text:style-name="P20"><text:span text:style-name="Source_20_Text">platform__content</text:span> usa dois <text:span text:style-name="Source_20_Text">__</text:span>.</text:p>
        </text:list-item>
      </text:list>
      <text:p text:style-name="Text_20_body">Se decidirmos usar a metodologia <text:span text:style-name="Strong_20_Emphasis">BEM</text:span>, devemos ser consistentes.</text:p>
      <text:p text:style-name="Text_20_body"><text:soft-page-break/>O correto seria:</text:p>
      <text:p text:style-name="P2"><text:span text:style-name="Source_20_Text">hero__content</text:span></text:p>
      <text:p text:style-name="Text_20_body">em vez de</text:p>
      <text:p text:style-name="P2"><text:span text:style-name="Source_20_Text">hero_content</text:span></text:p>
      <text:p text:style-name="Text_20_body">Assim, todos os blocos seguem o mesmo padrão:</text:p>
      <text:p text:style-name="Preformatted_20_Text"><text:span text:style-name="Source_20_Text">hero_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h text:style-name="Heading_20_2" text:outline-level="2">Minha recomendação</text:h>
      <text:p text:style-name="Text_20_body">Antes de continuarmos construindo as outras páginas, eu faria essa pequena correção no HTML para adotar <text:span text:style-name="Strong_20_Emphasis">BEM</text:span> de forma consistente. É uma alteração simples agora e evita inconsistências quando o projeto crescer. Depois disso, manteremos esse padrão em toda a Biblioteca Apócrifa.</text:p>
      <text:p text:style-name="Text_20_body">Perfeito. Concluímos a etapa dos <text:span text:style-name="Strong_20_Emphasis">componentes reutilizáveis</text:span> da arquitetura.</text:p>
      <text:p text:style-name="Text_20_body">Agora entramos no próximo ponto da Fase 4:</text:p>
      <text:h text:style-name="Heading_20_1" text:outline-level="1">Desenvolvimento JavaScript — Sistema de componentes</text:h>
      <text:p text:style-name="Text_20_body">Objetivo:</text:p>
      <text:p text:style-name="Text_20_body">Criar o mecanismo que vai carregar automaticamente:</text:p>
      <text:list text:style-name="L15">
        <text:list-item>
          <text:p text:style-name="P21"><text:span text:style-name="Source_20_Text">header.html</text:span></text:p>
        </text:list-item>
        <text:list-item>
          <text:p text:style-name="P21"><text:span text:style-name="Source_20_Text">navbar.html</text:span></text:p>
        </text:list-item>
        <text:list-item>
          <text:p text:style-name="P21"><text:span text:style-name="Source_20_Text">footer.html</text:span></text:p>
        </text:list-item>
        <text:list-item>
          <text:p text:style-name="P21"><text:span text:style-name="Source_20_Text">book-card.html</text:span></text:p>
        </text:list-item>
        <text:list-item>
          <text:p text:style-name="P21"><text:span text:style-name="Source_20_Text">loading.html</text:span></text:p>
        </text:list-item>
        <text:list-item>
          <text:p text:style-name="P21"><text:span text:style-name="Source_20_Text">reading-section.html</text:span></text:p>
        </text:list-item>
        <text:list-item>
          <text:p text:style-name="P21"><text:span text:style-name="Source_20_Text">search.html</text:span></text:p>
        </text:list-item>
        <text:list-item>
          <text:p text:style-name="P21"><text:span text:style-name="Source_20_Text">sidebar.html</text:span></text:p>
        </text:list-item>
      </text:list>
      <text:p text:style-name="Text_20_body">Sem precisar copiar e colar código em todas as páginas.</text:p>
      <text:p text:style-name="Horizontal_20_Line"/>
      <text:h text:style-name="Heading_20_2" text:outline-level="2"><text:soft-page-break/>Estrutura JavaScript</text:h>
      <text:p text:style-name="Text_20_body">Vamos criar:</text:p>
      <text:p text:style-name="Preformatted_20_Text"><text:span text:style-name="Source_20_Text">assets/</text:span></text:p>
      <text:p text:style-name="Preformatted_20_Text"><text:span text:style-name="Source_20_Text">│</text:span></text:p>
      <text:p text:style-name="Preformatted_20_Text"><text:span text:style-name="Source_20_Text">└── js/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├── components.js</text:span></text:p>
      <text:p text:style-name="Preformatted_20_Text"><text:span text:style-name="Source_20_Text"><text:s text:c="4"/>├── main.js</text:span></text:p>
      <text:p text:style-name="P2"><text:span text:style-name="Source_20_Text"><text:s text:c="4"/>└── library.js</text:span></text:p>
      <text:p text:style-name="Text_20_body">Primeiro vamos trabalhar apenas com:</text:p>
      <text:p text:style-name="P2"><text:span text:style-name="Source_20_Text">components.js</text:span></text:p>
      <text:p text:style-name="Text_20_body">Responsabilidade:</text:p>
      <text:list text:style-name="L16">
        <text:list-item>
          <text:p text:style-name="P22">localizar elementos reservados para componentes;</text:p>
        </text:list-item>
        <text:list-item>
          <text:p text:style-name="P22">buscar o arquivo HTML;</text:p>
        </text:list-item>
        <text:list-item>
          <text:p text:style-name="P22">inserir o conteúdo automaticamente.</text:p>
        </text:list-item>
      </text:list>
      <text:p text:style-name="Horizontal_20_Line"/>
      <text:h text:style-name="Heading_20_2" text:outline-level="2">Como vamos usar nas páginas</text:h>
      <text:p text:style-name="Text_20_body">Agora o HTML deixa de ter:</text:p>
      <text:p text:style-name="Preformatted_20_Text"><text:span text:style-name="Source_20_Text">&lt;header class="app-header"&gt;</text:span></text:p>
      <text:p text:style-name="Preformatted_20_Text"><text:span text:style-name="Source_20_Text">...</text:span></text:p>
      <text:p text:style-name="P2"><text:span text:style-name="Source_20_Text">&lt;/header&gt;</text:span></text:p>
      <text:p text:style-name="Text_20_body">e passa a ter:</text:p>
      <text:p text:style-name="P2"><text:span text:style-name="Source_20_Text">&lt;div data-component="header"&gt;&lt;/div&gt;</text:span></text:p>
      <text:p text:style-name="Text_20_body">O JavaScript coloca o conteúdo automaticamente.</text:p>
      <text:p text:style-name="Horizontal_20_Line"/>
      <text:p text:style-name="Text_20_body">No footer:</text:p>
      <text:p text:style-name="Text_20_body">Antes:</text:p>
      <text:p text:style-name="Preformatted_20_Text"><text:span text:style-name="Source_20_Text">&lt;footer class="footer"&gt;</text:span></text:p>
      <text:p text:style-name="Preformatted_20_Text"><text:span text:style-name="Source_20_Text">...</text:span></text:p>
      <text:p text:style-name="P2"><text:span text:style-name="Source_20_Text">&lt;/footer&gt;</text:span></text:p>
      <text:p text:style-name="Text_20_body">Agora:</text:p>
      <text:p text:style-name="P2"><text:span text:style-name="Source_20_Text">&lt;div data-component="footer"&gt;&lt;/div&gt;</text:span></text:p>
      <text:p text:style-name="Horizontal_20_Line"/>
      <text:h text:style-name="Heading_20_2" text:outline-level="2">Ligação nas páginas</text:h>
      <text:p text:style-name="Text_20_body">Todas as páginas terão:</text:p>
      <text:p text:style-name="P2"><text:soft-page-break/><text:span text:style-name="Source_20_Text">&lt;script src="../assets/js/components.js"&gt;&lt;/script&gt;</text:span></text:p>
      <text:p text:style-name="Text_20_body">ou no <text:span text:style-name="Source_20_Text">index.html</text:span>:</text:p>
      <text:p text:style-name="P2"><text:span text:style-name="Source_20_Text">&lt;script src="assets/js/components.js"&gt;&lt;/script&gt;</text:span></text:p>
      <text:p text:style-name="Horizontal_20_Line"/>
      <text:p text:style-name="Text_20_body">Próxima etapa depois deste arquivo:</text:p>
      <text:list text:style-name="L17">
        <text:list-item>
          <text:p text:style-name="P23">Ajustar os caminhos dos componentes (<text:span text:style-name="Source_20_Text">index</text:span> e páginas internas);</text:p>
        </text:list-item>
      </text:list>
      <text:p text:style-name="Text_20_body">Está <text:span text:style-name="T1">bem. A</text:span>gora é seguinte estamos no ponto sobre a navegação principal, as única<text:span text:style-name="T1">s</text:span> navegaçõ<text:span text:style-name="T1">es</text:span> que tivemos ate agora são: header e footer agora quanto as outras navegações como por exemplo: book-car.html, loading, reading-section, search, sidebar. E a proposito <text:s/>qual é a finalidade do componete sidebar?</text:p>
      <text:p text:style-name="Text_20_body"/>
      <text:p text:style-name="Text_20_body">Essa é uma ótima pergunta. Na verdade, estamos num momento importante da arquitetura do projeto.</text:p>
      <text:p text:style-name="Text_20_body">Primeiro, uma distinção:</text:p>
      <text:list text:style-name="L18">
        <text:list-item>
          <text:p text:style-name="P24"><text:span text:style-name="Strong_20_Emphasis">Navegação principal</text:span> → diz respeito ao usuário se deslocar entre as páginas da aplicação (Header, Navbar, Footer).</text:p>
        </text:list-item>
        <text:list-item>
          <text:p text:style-name="P24"><text:span text:style-name="Strong_20_Emphasis">Componentes reutilizáveis</text:span> → são blocos da interface que podem aparecer em várias páginas, mas <text:span text:style-name="Strong_20_Emphasis">não são necessariamente navegação</text:span>.</text:p>
        </text:list-item>
      </text:list>
      <text:p text:style-name="Text_20_body">Então, neste momento:</text:p>
      <text:h text:style-name="P8" text:outline-level="3">✅ Navegação principal</text:h>
      <text:list text:style-name="L19">
        <text:list-item>
          <text:p text:style-name="P25"><text:span text:style-name="Source_20_Text">header.html</text:span></text:p>
        </text:list-item>
        <text:list-item>
          <text:p text:style-name="P25"><text:span text:style-name="Source_20_Text">navbar.html</text:span></text:p>
        </text:list-item>
        <text:list-item>
          <text:p text:style-name="P25"><text:span text:style-name="Source_20_Text">footer.html</text:span></text:p>
        </text:list-item>
      </text:list>
      <text:p text:style-name="Text_20_body">Esse ponto do roadmap pode ser considerado praticamente concluído.</text:p>
      <text:p text:style-name="P6"/>
      <text:h text:style-name="P7" text:outline-level="2">Agora sobre os outros componentes</text:h>
      <text:h text:style-name="P8" text:outline-level="3">📖 <text:span text:style-name="Source_20_Text">book-card.html</text:span></text:h>
      <text:p text:style-name="Text_20_body"><text:span text:style-name="Strong_20_Emphasis">Finalidade:</text:span></text:p>
      <text:p text:style-name="Text_20_body">Representar um livro em qualquer lista da plataforma.</text:p>
      <text:p text:style-name="Text_20_body">Será usado em:</text:p>
      <text:list text:style-name="L20">
        <text:list-item>
          <text:p text:style-name="P26">Biblioteca</text:p>
        </text:list-item>
        <text:list-item>
          <text:p text:style-name="P26">Pesquisa</text:p>
        </text:list-item>
        <text:list-item>
          <text:p text:style-name="P26">Livros relacionados</text:p>
        </text:list-item>
        <text:list-item>
          <text:p text:style-name="P26"><text:soft-page-break/>Favoritos</text:p>
        </text:list-item>
        <text:list-item>
          <text:p text:style-name="P26">Recomendações</text:p>
        </text:list-item>
      </text:list>
      <text:p text:style-name="P6"/>
      <text:h text:style-name="P8" text:outline-level="3">🔍 <text:span text:style-name="Source_20_Text">search.html</text:span></text:h>
      <text:p text:style-name="Text_20_body"><text:span text:style-name="Strong_20_Emphasis">Finalidade:</text:span></text:p>
      <text:p text:style-name="Text_20_body">Campo de pesquisa reutilizável.</text:p>
      <text:p text:style-name="Text_20_body">Será usado em:</text:p>
      <text:list text:style-name="L21">
        <text:list-item>
          <text:p text:style-name="P27">Biblioteca</text:p>
        </text:list-item>
        <text:list-item>
          <text:p text:style-name="P27">Área de leitura</text:p>
        </text:list-item>
        <text:list-item>
          <text:p text:style-name="P27">Comunidade (no futuro)</text:p>
        </text:list-item>
        <text:list-item>
          <text:p text:style-name="P27">Sidebar (se existir)</text:p>
        </text:list-item>
      </text:list>
      <text:p text:style-name="P6"/>
      <text:h text:style-name="P8" text:outline-level="3">⏳ <text:span text:style-name="Source_20_Text">loading.html</text:span></text:h>
      <text:p text:style-name="Text_20_body"><text:span text:style-name="Strong_20_Emphasis">Finalidade:</text:span></text:p>
      <text:p text:style-name="Text_20_body">Mostrar um estado de carregamento.</text:p>
      <text:p text:style-name="Text_20_body">Exemplo:</text:p>
      <text:p text:style-name="P5"><text:span text:style-name="Source_20_Text">Carregando livros...</text:span></text:p>
      <text:p text:style-name="P5"/>
      <text:p text:style-name="P5"><text:span text:style-name="Source_20_Text">████████░░░░</text:span></text:p>
      <text:p text:style-name="Text_20_body">Será utilizado sempre que estivermos aguardando dados do <text:span text:style-name="Source_20_Text">livros.json</text:span>.</text:p>
      <text:p text:style-name="P6"/>
      <text:h text:style-name="P8" text:outline-level="3">📄 <text:span text:style-name="Source_20_Text">reading-section.html</text:span></text:h>
      <text:p text:style-name="Text_20_body"><text:span text:style-name="Strong_20_Emphasis">Finalidade:</text:span></text:p>
      <text:p text:style-name="Text_20_body">É um bloco de conteúdo para a página de leitura.</text:p>
      <text:p text:style-name="Text_20_body">Exemplo:</text:p>
      <text:p text:style-name="P5"><text:span text:style-name="Source_20_Text">Título</text:span></text:p>
      <text:p text:style-name="P5"/>
      <text:p text:style-name="P5"><text:span text:style-name="Source_20_Text">Texto...</text:span></text:p>
      <text:p text:style-name="P5"/>
      <text:p text:style-name="P5"><text:span text:style-name="Source_20_Text">Notas</text:span></text:p>
      <text:p text:style-name="P5"/>
      <text:p text:style-name="P5"><text:span text:style-name="Source_20_Text">Comentários</text:span></text:p>
      <text:p text:style-name="Text_20_body">Um livro será composto por várias <text:span text:style-name="Source_20_Text">reading-section</text:span>.</text:p>
      <text:p text:style-name="P6"/>
      <text:h text:style-name="P7" text:outline-level="2"><text:soft-page-break/>📚 <text:span text:style-name="Source_20_Text">sidebar.html</text:span></text:h>
      <text:p text:style-name="Text_20_body">Esse é o componente que merece uma decisão arquitetural.</text:p>
      <text:p text:style-name="Text_20_body">Quando fizemos o planejamento, colocamos uma sidebar pensando numa plataforma de estudos. Hoje o projeto está mais claro, então podemos definir exatamente sua função.</text:p>
      <text:h text:style-name="P8" text:outline-level="3">Minha proposta</text:h>
      <text:p text:style-name="Text_20_body">A sidebar <text:span text:style-name="Strong_20_Emphasis">não será um menu lateral de navegação</text:span>.</text:p>
      <text:p text:style-name="Text_20_body">Ela será um <text:span text:style-name="Strong_20_Emphasis">painel de apoio ao estudo</text:span>.</text:p>
      <text:p text:style-name="Text_20_body">Por exemplo, na página de leitura:</text:p>
      <text:p text:style-name="P5"><text:span text:style-name="Source_20_Text">┌───────────────────────────────┬───────────────────┐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Índice <text:s text:c="11"/>│</text:span></text:p>
      <text:p text:style-name="P5"><text:span text:style-name="Source_20_Text">│ <text:s text:c="30"/>│ <text:s text:c="18"/>│</text:span></text:p>
      <text:p text:style-name="P5"><text:span text:style-name="Source_20_Text">│ Texto <text:s text:c="24"/>│ Capítulo 1 <text:s text:c="7"/>│</text:span></text:p>
      <text:p text:style-name="P5"><text:span text:style-name="Source_20_Text">│ <text:s text:c="30"/>│ Capítulo 2 <text:s text:c="7"/>│</text:span></text:p>
      <text:p text:style-name="P5"><text:span text:style-name="Source_20_Text">│ <text:s text:c="30"/>│ Capítulo 3 <text:s text:c="7"/>│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Livros relacionados│</text:span></text:p>
      <text:p text:style-name="P5"><text:span text:style-name="Source_20_Text">│ <text:s text:c="30"/>│ <text:s text:c="18"/>│</text:span></text:p>
      <text:p text:style-name="P5"><text:span text:style-name="Source_20_Text">└───────────────────────────────┴───────────────────┘</text:span></text:p>
      <text:p text:style-name="Text_20_body">Ela pode conter:</text:p>
      <text:list text:style-name="L22">
        <text:list-item>
          <text:p text:style-name="P28">Índice do livro.</text:p>
        </text:list-item>
        <text:list-item>
          <text:p text:style-name="P28">Capítulos.</text:p>
        </text:list-item>
        <text:list-item>
          <text:p text:style-name="P28">Progresso de leitura.</text:p>
        </text:list-item>
        <text:list-item>
          <text:p text:style-name="P28">Livros relacionados.</text:p>
        </text:list-item>
        <text:list-item>
          <text:p text:style-name="P28">Anotações (futuramente).</text:p>
        </text:list-item>
        <text:list-item>
          <text:p text:style-name="P28">Favoritos (futuramente).</text:p>
        </text:list-item>
      </text:list>
      <text:p text:style-name="Text_20_body">Perceba que ela <text:span text:style-name="Strong_20_Emphasis">não substitui o Header</text:span>. Ela auxilia o usuário enquanto estuda.</text:p>
      <text:p text:style-name="P6"/>
      <text:h text:style-name="P7" text:outline-level="2">Minha recomendação</text:h>
      <text:p text:style-name="Text_20_body">Eu manteria todos os componentes que planejamos. Eles continuam fazendo sentido, mas cada um com uma responsabilidade bem definida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omponente</text:p>
            </table:table-cell>
            <table:table-cell table:style-name="Tabela3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ource_20_Text">header.html</text:span></text:p>
          </table:table-cell>
          <table:table-cell table:style-name="Tabela3.A1" office:value-type="string">
            <text:p text:style-name="Table_20_Contents">Cabeçalho da aplicaçã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navbar.html</text:span></text:p>
          </table:table-cell>
          <table:table-cell table:style-name="Tabela3.A1" office:value-type="string">
            <text:p text:style-name="Table_20_Contents">Navegação principal (desktop e mobile)</text:p>
          </table:table-cell>
        </table:table-row>
        <text:soft-page-break/>
        <table:table-row>
          <table:table-cell table:style-name="Tabela3.A1" office:value-type="string">
            <text:p text:style-name="Table_20_Contents"><text:span text:style-name="Source_20_Text">footer.html</text:span></text:p>
          </table:table-cell>
          <table:table-cell table:style-name="Tabela3.A1" office:value-type="string">
            <text:p text:style-name="Table_20_Contents">Rodapé institucional</text:p>
          </table:table-cell>
        </table:table-row>
        <table:table-row>
          <table:table-cell table:style-name="Tabela3.A1" office:value-type="string">
            <text:p text:style-name="Table_20_Contents"><text:span text:style-name="Source_20_Text">book-card.html</text:span></text:p>
          </table:table-cell>
          <table:table-cell table:style-name="Tabela3.A1" office:value-type="string">
            <text:p text:style-name="Table_20_Contents">Exibir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earch.html</text:span></text:p>
          </table:table-cell>
          <table:table-cell table:style-name="Tabela3.A1" office:value-type="string">
            <text:p text:style-name="Table_20_Contents">Campo de pesquisa</text:p>
          </table:table-cell>
        </table:table-row>
        <table:table-row>
          <table:table-cell table:style-name="Tabela3.A1" office:value-type="string">
            <text:p text:style-name="Table_20_Contents"><text:span text:style-name="Source_20_Text">loading.html</text:span></text:p>
          </table:table-cell>
          <table:table-cell table:style-name="Tabela3.A1" office:value-type="string">
            <text:p text:style-name="Table_20_Contents">Estado de carregament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reading-section.html</text:span></text:p>
          </table:table-cell>
          <table:table-cell table:style-name="Tabela3.A1" office:value-type="string">
            <text:p text:style-name="Table_20_Contents">Seção de leitura de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idebar.html</text:span></text:p>
          </table:table-cell>
          <table:table-cell table:style-name="Tabela3.A1" office:value-type="string">
            <text:p text:style-name="Table_20_Contents">Painel de apoio ao estudo</text:p>
          </table:table-cell>
        </table:table-row>
      </table:table>
      <text:p text:style-name="Text_20_body">Essa divisão está alinhada com o objetivo da Biblioteca Apócrifa como <text:span text:style-name="Strong_20_Emphasis">plataforma de estudo</text:span>, e deixa a arquitetura preparada para as próximas fases sem precisarmos refatorar componentes depois.</text:p>
      <text:h text:style-name="P7" text:outline-level="2">✅ Concluído</text:h>
      <text:p text:style-name="Text_20_body"><text:span text:style-name="Strong_20_Emphasis">Fase 4 — Desenvolvimento da Base</text:span></text:p>
      <text:list text:style-name="L23">
        <text:list-item>
          <text:p text:style-name="P29">✅ Desenvolver a página inicial. </text:p>
        </text:list-item>
        <text:list-item>
          <text:p text:style-name="P29">✅ Desenvolver a página Biblioteca. </text:p>
        </text:list-item>
        <text:list-item>
          <text:p text:style-name="P29">✅ Desenvolver a página Área de Leitura. </text:p>
        </text:list-item>
        <text:list-item>
          <text:p text:style-name="P29">✅ Desenvolver a página Comunidade. </text:p>
        </text:list-item>
        <text:list-item>
          <text:p text:style-name="P29">✅ Desenvolver a página Perfil. </text:p>
        </text:list-item>
        <text:list-item>
          <text:p text:style-name="P29">✅ Desenvolver a navegação principal. </text:p>
        </text:list-item>
        <text:list-item>
          <text:p text:style-name="P30">✅ Criar os componentes reutilizáveis.</text:p>
        </text:list-item>
      </text:list>
      <text:p text:style-name="Text_20_body">Também estou satisfeito com o andamento. O projeto está seguindo um caminho consistente, e isso vai facilitar bastante as próximas fases.</text:p>
      <text:h text:style-name="P7" text:outline-level="2">✅ Concluído</text:h>
      <text:p text:style-name="Text_20_body"><text:span text:style-name="Strong_20_Emphasis">Fase 4 — Desenvolvimento da Base</text:span></text:p>
      <text:list text:style-name="L24">
        <text:list-item>
          <text:p text:style-name="P31">✅ Desenvolver a página inicial.</text:p>
        </text:list-item>
        <text:list-item>
          <text:p text:style-name="P31">✅ Desenvolver a página Biblioteca.</text:p>
        </text:list-item>
        <text:list-item>
          <text:p text:style-name="P31">✅ Desenvolver a página Área de Leitura.</text:p>
        </text:list-item>
        <text:list-item>
          <text:p text:style-name="P31">✅ Desenvolver a página Comunidade.</text:p>
        </text:list-item>
        <text:list-item>
          <text:p text:style-name="P31">✅ Desenvolver a página Perfil.</text:p>
        </text:list-item>
        <text:list-item>
          <text:p text:style-name="P31">✅ Desenvolver a navegação principal.</text:p>
        </text:list-item>
        <text:list-item>
          <text:p text:style-name="P31">✅ Criar os componentes reutilizáveis.</text:p>
        </text:list-item>
      </text:list>
      <text:p text:style-name="Text_20_body">Agora podemos avançar para:</text:p>
      <text:h text:style-name="P12" text:outline-level="1">Fase 4 — Construir o layout responsivo</text:h>
      <text:p text:style-name="Text_20_body">Mas antes de escrever qualquer CSS, vamos definir <text:span text:style-name="Strong_20_Emphasis">como</text:span> vamos tornar a aplicação responsiva. Isso evita retrabalho.</text:p>
      <text:h text:style-name="P7" text:outline-level="2"><text:soft-page-break/>Objetivo</text:h>
      <text:p text:style-name="Text_20_body"><text:bookmark-start text:name="__DdeLink__5805_4055040419"/>Garantir que toda a plataforma funcione bem em:</text:p>
      <text:list text:style-name="L25">
        <text:list-item>
          <text:p text:style-name="P32">📱 Smartphone</text:p>
        </text:list-item>
        <text:list-item>
          <text:p text:style-name="P32">📱 Tablet</text:p>
        </text:list-item>
        <text:list-item>
          <text:p text:style-name="P32">💻 Desktop</text:p>
        </text:list-item>
      </text:list>
      <text:p text:style-name="Text_20_body">seguindo a estratégia <text:span text:style-name="Strong_20_Emphasis">Mobile First</text:span>,<text:bookmark-end text:name="__DdeLink__5805_4055040419"/> que já definimos no Design System.</text:p>
      <text:p text:style-name="P6"/>
      <text:h text:style-name="P7" text:outline-level="2">O que vamos adaptar</text:h>
      <text:h text:style-name="P8" text:outline-level="3"><text:bookmark-start text:name="__DdeLink__5816_4055040419"/>Sprint 1 — Estrutura Global</text:h>
      <text:list text:style-name="L26">
        <text:list-item>
          <text:p text:style-name="P33">Container responsivo.</text:p>
        </text:list-item>
        <text:list-item>
          <text:p text:style-name="P33">Header responsivo.</text:p>
        </text:list-item>
        <text:list-item>
          <text:p text:style-name="P33">Navbar responsiva.</text:p>
        </text:list-item>
        <text:list-item>
          <text:p text:style-name="P33">Footer responsivo.</text:p>
        </text:list-item>
        <text:list-item>
          <text:p text:style-name="P33">Espaçamentos responsivos.<text:bookmark-end text:name="__DdeLink__5816_4055040419"/></text:p>
        </text:list-item>
      </text:list>
      <text:p text:style-name="P6"/>
      <text:h text:style-name="P8" text:outline-level="3">Sprint 2 — Página Inicial</text:h>
      <text:list text:style-name="L27">
        <text:list-item>
          <text:p text:style-name="P34">Hero.</text:p>
        </text:list-item>
        <text:list-item>
          <text:p text:style-name="P34">Introdução.</text:p>
        </text:list-item>
        <text:list-item>
          <text:p text:style-name="P34">História.</text:p>
        </text:list-item>
        <text:list-item>
          <text:p text:style-name="P34">Cards.</text:p>
        </text:list-item>
        <text:list-item>
          <text:p text:style-name="P34">Grid dos livros.</text:p>
        </text:list-item>
      </text:list>
      <text:p text:style-name="P6"/>
      <text:h text:style-name="P8" text:outline-level="3">Sprint 3 — Biblioteca</text:h>
      <text:list text:style-name="L28">
        <text:list-item>
          <text:p text:style-name="P35">Pesquisa.</text:p>
        </text:list-item>
        <text:list-item>
          <text:p text:style-name="P35">Filtros.</text:p>
        </text:list-item>
        <text:list-item>
          <text:p text:style-name="P35">Grid dos livros.</text:p>
        </text:list-item>
      </text:list>
      <text:p text:style-name="P6"/>
      <text:h text:style-name="P8" text:outline-level="3">Sprint 4 — Área de Leitura</text:h>
      <text:list text:style-name="L29">
        <text:list-item>
          <text:p text:style-name="P36">Área principal.</text:p>
        </text:list-item>
        <text:list-item>
          <text:p text:style-name="P36">Sidebar.</text:p>
        </text:list-item>
        <text:list-item>
          <text:p text:style-name="P36">Tipografia para leitura.</text:p>
        </text:list-item>
      </text:list>
      <text:p text:style-name="P6"/>
      <text:h text:style-name="P8" text:outline-level="3"><text:soft-page-break/>Sprint 5 — Comunidade</text:h>
      <text:list text:style-name="L30">
        <text:list-item>
          <text:p text:style-name="P37">Cards.</text:p>
        </text:list-item>
        <text:list-item>
          <text:p text:style-name="P37">Comentários.</text:p>
        </text:list-item>
        <text:list-item>
          <text:p text:style-name="P37">Layout.</text:p>
        </text:list-item>
      </text:list>
      <text:p text:style-name="P6"/>
      <text:h text:style-name="P8" text:outline-level="3">Sprint 6 — Perfil</text:h>
      <text:list text:style-name="L31">
        <text:list-item>
          <text:p text:style-name="P38">Informações do usuário.</text:p>
        </text:list-item>
        <text:list-item>
          <text:p text:style-name="P38">Estatísticas.</text:p>
        </text:list-item>
        <text:list-item>
          <text:p text:style-name="P38">Livros favoritos.</text:p>
        </text:list-item>
      </text:list>
      <text:p text:style-name="P6"/>
      <text:h text:style-name="P7" text:outline-level="2">Ordem de implementação</text:h>
      <text:p text:style-name="Text_20_body">Vamos seguir esta sequência:</text:p>
      <text:list text:style-name="L32">
        <text:list-item>
          <text:p text:style-name="P39"><text:span text:style-name="Source_20_Text">layout.css</text:span> (estrutura global responsiva)</text:p>
        </text:list-item>
        <text:list-item>
          <text:p text:style-name="P39"><text:span text:style-name="Source_20_Text">components.css</text:span> (componentes responsivos)</text:p>
        </text:list-item>
        <text:list-item>
          <text:p text:style-name="P39"><text:span text:style-name="Source_20_Text">home.css</text:span></text:p>
        </text:list-item>
        <text:list-item>
          <text:p text:style-name="P39"><text:span text:style-name="Source_20_Text">biblioteca.css</text:span></text:p>
        </text:list-item>
        <text:list-item>
          <text:p text:style-name="P39"><text:span text:style-name="Source_20_Text">leitura.css</text:span></text:p>
        </text:list-item>
        <text:list-item>
          <text:p text:style-name="P39"><text:span text:style-name="Source_20_Text">comunidade.css</text:span></text:p>
        </text:list-item>
        <text:list-item>
          <text:p text:style-name="P39"><text:span text:style-name="Source_20_Text">perfil.css</text:span></text:p>
        </text:list-item>
      </text:list>
      <text:p text:style-name="Text_20_body">Essa ordem é importante porque <text:span text:style-name="Strong_20_Emphasis">as páginas dependem do layout e dos componentes globais</text:span>.</text:p>
      <text:p text:style-name="P6"/>
      <text:h text:style-name="P8" text:outline-level="3">Antes de começar</text:h>
      <text:p text:style-name="Text_20_body">Nós já escrevemos <text:span text:style-name="Source_20_Text">layout.css</text:span> e <text:span text:style-name="Source_20_Text">components.css</text:span> pensando em responsividade, mas ainda não implementamos os <text:span text:style-name="Emphasis">breakpoints</text:span> nem o menu mobile.</text:p>
      <text:p text:style-name="Text_20_body">Por isso, o próximo passo natural é <text:span text:style-name="Strong_20_Emphasis">revisar e evoluir o </text:span><text:span text:style-name="Strong_20_Emphasis"><text:span text:style-name="Source_20_Text">layout.css</text:span></text:span>, adicionando a base responsiva (breakpoints, comportamento do container e estrutura do header). Depois seguimos para os componentes e, por fim, ajustamos cada página. Essa abordagem evita duplicação de código e mantém a arquitetura organizada.</text:p>
      <text:p text:style-name="Text_20_body">Perfeito. Como definimos no Design System, vamos implementar isso <text:span text:style-name="Strong_20_Emphasis">na base da aplicação</text:span>, não nas páginas individuais. Assim, todas as páginas herdarão automaticamente o comportamento responsivo.</text:p>
      <text:p text:style-name="P6"/>
      <text:h text:style-name="P12" text:outline-level="1"><text:soft-page-break/>Sprint 1 — Estrutura Global</text:h>
      <text:h text:style-name="P7" text:outline-level="2">Arquivos envolvidos</text:h>
      <text:p text:style-name="P5"><text:span text:style-name="Source_20_Text">assets/css/</text:span></text:p>
      <text:p text:style-name="P5"><text:span text:style-name="Source_20_Text">│</text:span></text:p>
      <text:p text:style-name="P5"><text:span text:style-name="Source_20_Text">├── layout.css <text:s text:c="7"/>← Principal</text:span></text:p>
      <text:p text:style-name="P5"><text:span text:style-name="Source_20_Text">├── components.css <text:s text:c="3"/>← Navbar, botões, cards...</text:span></text:p>
      <text:p text:style-name="P5"><text:span text:style-name="Source_20_Text">├── variables.css <text:s text:c="4"/>← Breakpoints</text:span></text:p>
      <text:p text:style-name="P5"><text:span text:style-name="Source_20_Text">└── base.css <text:s text:c="9"/>← Sem alterações</text:span></text:p>
      <text:p text:style-name="P6"/>
      <text:h text:style-name="P12" text:outline-level="1">1. Container responsivo</text:h>
      <text:p text:style-name="Text_20_body"><text:span text:style-name="Strong_20_Emphasis">Arquivo:</text:span> <text:span text:style-name="Source_20_Text">layout.css</text:span></text:p>
      <text:p text:style-name="Text_20_body">O <text:span text:style-name="Source_20_Text">.container</text:span> deve ter largura fluida e padding lateral.</text:p>
      <text:p text:style-name="P5"><text:span text:style-name="Source_20_Text">.container {</text:span></text:p>
      <text:p text:style-name="P5"><text:span text:style-name="Source_20_Text"><text:s text:c="4"/>width: min(100% - 2rem, var(--container-width));</text:span></text:p>
      <text:p text:style-name="P5"><text:span text:style-name="Source_20_Text"><text:s text:c="4"/>margin-inline: auto;</text:span></text:p>
      <text:p text:style-name="P5"><text:span text:style-name="Source_20_Text">}</text:span></text:p>
      <text:p text:style-name="Text_20_body">Isso evita:</text:p>
      <text:list text:style-name="L33">
        <text:list-item>
          <text:p text:style-name="P40">conteúdo colado nas bordas do celular;</text:p>
        </text:list-item>
        <text:list-item>
          <text:p text:style-name="P40">necessidade de definir <text:span text:style-name="Source_20_Text">padding</text:span> em cada seção.</text:p>
        </text:list-item>
      </text:list>
      <text:p text:style-name="P6"/>
      <text:h text:style-name="P12" text:outline-level="1">2. Header responsivo</text:h>
      <text:p text:style-name="Text_20_body">No desktop:</text:p>
      <text:p text:style-name="P5"><text:span text:style-name="Source_20_Text">LOGO <text:s text:c="5"/>MENU <text:s text:c="5"/>BOTÕES</text:span></text:p>
      <text:p text:style-name="Text_20_body">No mobile:</text:p>
      <text:p text:style-name="P5"><text:span text:style-name="Source_20_Text">LOGO <text:s text:c="13"/>☰</text:span></text:p>
      <text:p text:style-name="Text_20_body">Os botões de pesquisa e perfil podem permanecer visíveis ou serem agrupados no menu, conforme decidirmos depois.</text:p>
      <text:p text:style-name="P6"/>
      <text:h text:style-name="P12" text:outline-level="1">3. Navbar responsiva</text:h>
      <text:p text:style-name="Text_20_body">Desktop:</text:p>
      <text:p text:style-name="P5"><text:span text:style-name="Source_20_Text">Início</text:span></text:p>
      <text:p text:style-name="P5"><text:span text:style-name="Source_20_Text">Biblioteca</text:span></text:p>
      <text:p text:style-name="P5"><text:soft-page-break/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Mobile:</text:p>
      <text:p text:style-name="P5"><text:span text:style-name="Source_20_Text">☰</text:span></text:p>
      <text:p text:style-name="P5"/>
      <text:p text:style-name="P5"><text:span text:style-name="Source_20_Text">↓</text:span></text:p>
      <text:p text:style-name="P5"/>
      <text:p text:style-name="P5"><text:span text:style-name="Source_20_Text">Início</text:span></text:p>
      <text:p text:style-name="P5"><text:span text:style-name="Source_20_Text">Biblioteca</text:span></text:p>
      <text:p text:style-name="P5"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Como planejamos, o <text:span text:style-name="Source_20_Text">navbar.html</text:span> será reutilizado também no menu mobile.</text:p>
      <text:p text:style-name="P6"/>
      <text:h text:style-name="P12" text:outline-level="1">4. Footer responsivo</text:h>
      <text:p text:style-name="Text_20_body">Desktop:</text:p>
      <text:p text:style-name="P5"><text:span text:style-name="Source_20_Text">Marca | Explorar | Recursos | Nota</text:span></text:p>
      <text:p text:style-name="Text_20_body">Tablet:</text:p>
      <text:p text:style-name="P5"><text:span text:style-name="Source_20_Text">Marca</text:span></text:p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><text:span text:style-name="Source_20_Text">Nota</text:span></text:p>
      <text:p text:style-name="Text_20_body">Mobile:</text:p>
      <text:p text:style-name="P5"><text:span text:style-name="Source_20_Text">Marca</text:span></text:p>
      <text:p text:style-name="P5"/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/>
      <text:p text:style-name="P5"><text:span text:style-name="Source_20_Text">Nota</text:span></text:p>
      <text:p text:style-name="Text_20_body">Ou seja, as colunas passam a ficar empilhadas.</text:p>
      <text:p text:style-name="P6"/>
      <text:h text:style-name="P12" text:outline-level="1"><text:soft-page-break/>5. Espaçamentos responsivos</text:h>
      <text:p text:style-name="Text_20_body">Não vamos usar valores aleatórios.</text:p>
      <text:p text:style-name="Text_20_body">A escala continuará sendo:</text:p>
      <text:p text:style-name="P5"><text:span text:style-name="Source_20_Text">--space-xs</text:span></text:p>
      <text:p text:style-name="P5"><text:span text:style-name="Source_20_Text">--space-sm</text:span></text:p>
      <text:p text:style-name="P5"><text:span text:style-name="Source_20_Text">--space-md</text:span></text:p>
      <text:p text:style-name="P5"><text:span text:style-name="Source_20_Text">--space-lg</text:span></text:p>
      <text:p text:style-name="P5"><text:span text:style-name="Source_20_Text">--space-xl</text:span></text:p>
      <text:p text:style-name="Text_20_body">Mas nos dispositivos menores reduziremos apenas os espaçamentos entre seções.</text:p>
      <text:p text:style-name="Text_20_body">Exemplo:</text:p>
      <text:p text:style-name="Text_20_body">Desktop</text:p>
      <text:p text:style-name="P5"><text:span text:style-name="Source_20_Text">padding-block: var(--space-xl);</text:span></text:p>
      <text:p text:style-name="Text_20_body">Mobile</text:p>
      <text:p text:style-name="P5"><text:span text:style-name="Source_20_Text">padding-block: var(--space-lg);</text:span></text:p>
      <text:p text:style-name="Text_20_body">Sem alterar a identidade visual.</text:p>
      <text:p text:style-name="P6"/>
      <text:h text:style-name="P12" text:outline-level="1">Breakpoints</text:h>
      <text:p text:style-name="Text_20_body">Seguiremos exatamente o Design System:</text:p>
      <text:p text:style-name="P5"><text:span text:style-name="Source_20_Text">/* Mobile */</text:span></text:p>
      <text:p text:style-name="P5"><text:span text:style-name="Source_20_Text">@media (max-width: 640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Tablet */</text:span></text:p>
      <text:p text:style-name="P5"><text:span text:style-name="Source_20_Text">@media (min-width: 641px) and (max-width: 1024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Desktop */</text:span></text:p>
      <text:p text:style-name="P5"><text:span text:style-name="Source_20_Text">/* Estilos padrão */</text:span></text:p>
      <text:p text:style-name="P6"/>
      <text:h text:style-name="P7" text:outline-level="2">Ordem de implementação</text:h>
      <text:p text:style-name="Text_20_body">Agora vamos implementar nesta sequência:</text:p>
      <text:list text:style-name="L34">
        <text:list-item>
          <text:p text:style-name="P41"><text:bookmark-start text:name="__DdeLink__5818_4055040419"/><text:soft-page-break/>✅ Container responsivo (<text:span text:style-name="Source_20_Text">layout.css</text:span>)<text:bookmark-end text:name="__DdeLink__5818_4055040419"/></text:p>
        </text:list-item>
        <text:list-item>
          <text:p text:style-name="P41"><text:bookmark-start text:name="__DdeLink__5826_4055040419"/>✅ Header responsivo (<text:span text:style-name="Source_20_Text">layout.css</text:span>)<text:bookmark-end text:name="__DdeLink__5826_4055040419"/></text:p>
        </text:list-item>
        <text:list-item>
          <text:p text:style-name="P41">✅ Navbar responsiva (<text:span text:style-name="Source_20_Text">components.css</text:span>)</text:p>
        </text:list-item>
        <text:list-item>
          <text:p text:style-name="P41">✅ Footer responsivo (<text:span text:style-name="Source_20_Text">layout.css</text:span>)</text:p>
        </text:list-item>
        <text:list-item>
          <text:p text:style-name="P41">✅ Espaçamentos responsivos (<text:span text:style-name="Source_20_Text">layout.css</text:span>)</text:p>
        </text:list-item>
      </text:list>
      <text:p text:style-name="Text_20_body">Essa divisão mantém a responsabilidade de cada arquivo clara:</text:p>
      <text:list text:style-name="L35">
        <text:list-item>
          <text:p text:style-name="P42"><text:span text:style-name="Strong_20_Emphasis"><text:span text:style-name="Source_20_Text">layout.css</text:span></text:span> controla a estrutura global.</text:p>
        </text:list-item>
        <text:list-item>
          <text:p text:style-name="P42"><text:span text:style-name="Strong_20_Emphasis"><text:span text:style-name="Source_20_Text">components.css</text:span></text:span> controla o comportamento dos componentes reutilizáveis, como a navbar e os botões.</text:p>
        </text:list-item>
      </text:list>
      <text:p text:style-name="Text_20_body">Essa organização evita conflitos e facilita a manutenção conforme o projeto cresce.</text:p>
      <text:p text:style-name="Text_20_body">Até agora, no ponto <text:span text:style-name="Strong_20_Emphasis">Construir Layout Responsivo</text:span>, já implementamos uma base bastante sólida. O resumo é o seguinte:</text:p>
      <text:p text:style-name="P6"/>
      <text:h text:style-name="P12" text:outline-level="1">Sprint 1 — Estrutura Global</text:h>
      <text:h text:style-name="P7" text:outline-level="2">✅ 1. Container Responsivo</text:h>
      <text:p text:style-name="Text_20_body">Arquivo:</text:p>
      <text:list text:style-name="L36">
        <text:list-item>
          <text:p text:style-name="P43"><text:span text:style-name="Source_20_Text">layout.css</text:span></text:p>
        </text:list-item>
      </text:list>
      <text:p text:style-name="Text_20_body">Implementado:</text:p>
      <text:list text:style-name="L37">
        <text:list-item>
          <text:p text:style-name="P44">Container com largura máxima (<text:span text:style-name="Source_20_Text">1200px</text:span>).</text:p>
        </text:list-item>
        <text:list-item>
          <text:p text:style-name="P44">Área de leitura (<text:span text:style-name="Source_20_Text">750px</text:span>).</text:p>
        </text:list-item>
        <text:list-item>
          <text:p text:style-name="P44">Grid reutilizável.</text:p>
        </text:list-item>
        <text:list-item>
          <text:p text:style-name="P44">Flex reutilizável.</text:p>
        </text:list-item>
        <text:list-item>
          <text:p text:style-name="P44">Quebra automática dos grids em Tablet e Mobile.</text:p>
        </text:list-item>
        <text:list-item>
          <text:p text:style-name="P44">Espaçamentos consistentes.</text:p>
        </text:list-item>
      </text:list>
      <text:p text:style-name="Text_20_body">Resultado:</text:p>
      <text:list text:style-name="L38">
        <text:list-item>
          <text:p text:style-name="P45">Toda a plataforma utiliza a mesma estrutura de layout.</text:p>
        </text:list-item>
      </text:list>
      <text:p text:style-name="P6"/>
      <text:h text:style-name="P7" text:outline-level="2">✅ 2. Header Responsivo</text:h>
      <text:p text:style-name="Text_20_body">Arquivo:</text:p>
      <text:list text:style-name="L39">
        <text:list-item>
          <text:p text:style-name="P46"><text:span text:style-name="Source_20_Text">components.css</text:span></text:p>
        </text:list-item>
      </text:list>
      <text:p text:style-name="Text_20_body">Implementado:</text:p>
      <text:list text:style-name="L40">
        <text:list-item>
          <text:p text:style-name="P47"><text:soft-page-break/>Header sticky.</text:p>
        </text:list-item>
        <text:list-item>
          <text:p text:style-name="P47">Logo.</text:p>
        </text:list-item>
        <text:list-item>
          <text:p text:style-name="P47">Navbar Desktop.</text:p>
        </text:list-item>
        <text:list-item>
          <text:p text:style-name="P47">Área de ações.</text:p>
        </text:list-item>
        <text:list-item>
          <text:p text:style-name="P47">Botão para menu mobile (<text:span text:style-name="Source_20_Text">menu-toggle</text:span>).</text:p>
        </text:list-item>
        <text:list-item>
          <text:p text:style-name="P47">Navegação ativa.</text:p>
        </text:list-item>
        <text:list-item>
          <text:p text:style-name="P47">Hover.</text:p>
        </text:list-item>
        <text:list-item>
          <text:p text:style-name="P47">Estados de foco.</text:p>
        </text:list-item>
        <text:list-item>
          <text:p text:style-name="P47">Preparado para menu hambúrguer.</text:p>
        </text:list-item>
      </text:list>
      <text:p text:style-name="Text_20_body">Resultado:</text:p>
      <text:p text:style-name="Text_20_body">Desktop:</text:p>
      <text:p text:style-name="P5"><text:span text:style-name="Source_20_Text">Logo <text:s text:c="5"/>Menu <text:s text:c="5"/>Ícones</text:span></text:p>
      <text:p text:style-name="Text_20_body">Tablet:</text:p>
      <text:p text:style-name="P5"><text:span text:style-name="Source_20_Text">Logo</text:span></text:p>
      <text:p text:style-name="P5"><text:span text:style-name="Source_20_Text">Menu centralizado</text:span></text:p>
      <text:p text:style-name="Text_20_body">Mobile:</text:p>
      <text:p text:style-name="P5"><text:span text:style-name="Source_20_Text">Logo <text:s text:c="7"/>☰</text:span></text:p>
      <text:p text:style-name="P6"/>
      <text:h text:style-name="P7" text:outline-level="2">✅ 3. Navbar Responsiva</text:h>
      <text:p text:style-name="Text_20_body">Arquivos:</text:p>
      <text:list text:style-name="L41">
        <text:list-item>
          <text:p text:style-name="P48"><text:span text:style-name="Source_20_Text">header.html</text:span></text:p>
        </text:list-item>
        <text:list-item>
          <text:p text:style-name="P48"><text:span text:style-name="Source_20_Text">navigation.js</text:span></text:p>
        </text:list-item>
        <text:list-item>
          <text:p text:style-name="P48"><text:span text:style-name="Source_20_Text">components.css</text:span></text:p>
        </text:list-item>
      </text:list>
      <text:p text:style-name="Text_20_body">Implementado:</text:p>
      <text:list text:style-name="L42">
        <text:list-item>
          <text:p text:style-name="P49">Destaque automático da página ativa.</text:p>
        </text:list-item>
        <text:list-item>
          <text:p text:style-name="P49">Hover animado.</text:p>
        </text:list-item>
        <text:list-item>
          <text:p text:style-name="P49">Estrutura preparada para o menu mobile.</text:p>
        </text:list-item>
        <text:list-item>
          <text:p text:style-name="P49">Componente reutilizável.</text:p>
        </text:list-item>
      </text:list>
      <text:p text:style-name="P6"/>
      <text:h text:style-name="P7" text:outline-level="2">✅ 4. Footer Responsivo</text:h>
      <text:p text:style-name="Text_20_body">Arquivo:</text:p>
      <text:list text:style-name="L43">
        <text:list-item>
          <text:p text:style-name="P50"><text:span text:style-name="Source_20_Text">components.css</text:span></text:p>
        </text:list-item>
      </text:list>
      <text:p text:style-name="Text_20_body"><text:soft-page-break/>Implementado:</text:p>
      <text:p text:style-name="Text_20_body">Desktop</text:p>
      <text:p text:style-name="P5"><text:span text:style-name="Source_20_Text">Marca</text:span></text:p>
      <text:p text:style-name="P5"/>
      <text:p text:style-name="P5"><text:span text:style-name="Source_20_Text">Navegação</text:span></text:p>
      <text:p text:style-name="P5"/>
      <text:p text:style-name="P5"><text:span text:style-name="Source_20_Text">Sobre</text:span></text:p>
      <text:p text:style-name="Text_20_body">Tablet</text:p>
      <text:p text:style-name="P5"><text:span text:style-name="Source_20_Text">Marca</text:span></text:p>
      <text:p text:style-name="P5"/>
      <text:p text:style-name="P5"><text:span text:style-name="Source_20_Text">Navegação | Sobre</text:span></text:p>
      <text:p text:style-name="Text_20_body">Mobile</text:p>
      <text:p text:style-name="P5"><text:span text:style-name="Source_20_Text">Marca</text:span></text:p>
      <text:p text:style-name="P5"/>
      <text:p text:style-name="P5"><text:span text:style-name="Source_20_Text">Navegação</text:span></text:p>
      <text:p text:style-name="P5"/>
      <text:p text:style-name="P5"><text:span text:style-name="Source_20_Text">Sobre</text:span></text:p>
      <text:p text:style-name="P5"/>
      <text:p text:style-name="P5"><text:span text:style-name="Source_20_Text">Copyright</text:span></text:p>
      <text:p text:style-name="P6"/>
      <text:h text:style-name="P12" text:outline-level="1">Home Responsiva</text:h>
      <text:p text:style-name="Text_20_body">Arquivo:</text:p>
      <text:list text:style-name="L44">
        <text:list-item>
          <text:p text:style-name="P51"><text:span text:style-name="Source_20_Text">home.css</text:span></text:p>
        </text:list-item>
      </text:list>
      <text:p text:style-name="Text_20_body">Implementado:</text:p>
      <text:h text:style-name="P7" text:outline-level="2">Hero</text:h>
      <text:p text:style-name="Text_20_body">Centralizado.</text:p>
      <text:p text:style-name="P6"/>
      <text:h text:style-name="P7" text:outline-level="2">Introdução</text:h>
      <text:p text:style-name="Text_20_body">Largura confortável para leitura.</text:p>
      <text:p text:style-name="P6"/>
      <text:h text:style-name="P7" text:outline-level="2">História</text:h>
      <text:p text:style-name="Text_20_body">Largura limitada para leitura.</text:p>
      <text:p text:style-name="P6"/>
      <text:h text:style-name="P7" text:outline-level="2"><text:soft-page-break/>Sidebar</text:h>
      <text:p text:style-name="Text_20_body">Mudança importante.</text:p>
      <text:p text:style-name="Text_20_body">Antes:</text:p>
      <text:p text:style-name="P5"><text:span text:style-name="Source_20_Text">Tudo empilhado.</text:span></text:p>
      <text:p text:style-name="Text_20_body">Agora:</text:p>
      <text:p text:style-name="Text_20_body">Desktop</text:p>
      <text:p text:style-name="P5"><text:span text:style-name="Source_20_Text">Conteúdo Principal <text:s text:c="7"/>Sidebar</text:span></text:p>
      <text:p text:style-name="Text_20_body">Sidebar contendo:</text:p>
      <text:list text:style-name="L45">
        <text:list-item>
          <text:p text:style-name="P52">Como funciona</text:p>
        </text:list-item>
        <text:list-item>
          <text:p text:style-name="P52">Obras em destaque</text:p>
        </text:list-item>
        <text:list-item>
          <text:p text:style-name="P52">Nota do Editor</text:p>
        </text:list-item>
      </text:list>
      <text:p text:style-name="Text_20_body">Tablet</text:p>
      <text:p text:style-name="P5"><text:span text:style-name="Source_20_Text">Conteúdo</text:span></text:p>
      <text:p text:style-name="P5"/>
      <text:p text:style-name="P5"><text:span text:style-name="Source_20_Text">Sidebar</text:span></text:p>
      <text:p text:style-name="Text_20_body">Mobile</text:p>
      <text:p text:style-name="P5"><text:span text:style-name="Source_20_Text">Tudo empilhado.</text:span></text:p>
      <text:p text:style-name="P6"/>
      <text:h text:style-name="P7" text:outline-level="2">Books Grid</text:h>
      <text:p text:style-name="Text_20_body">Preparado para receber dados do <text:span text:style-name="Source_20_Text">livros.json</text:span>.</text:p>
      <text:p text:style-name="P6"/>
      <text:h text:style-name="P7" text:outline-level="2">Cards</text:h>
      <text:p text:style-name="Text_20_body">Os componentes:</text:p>
      <text:list text:style-name="L46">
        <text:list-item>
          <text:p text:style-name="P53">Book Card</text:p>
        </text:list-item>
        <text:list-item>
          <text:p text:style-name="P53">Feature Card</text:p>
        </text:list-item>
      </text:list>
      <text:p text:style-name="Text_20_body">foram padronizados.</text:p>
      <text:p text:style-name="P6"/>
      <text:h text:style-name="P7" text:outline-level="2">Slider (Novo)</text:h>
      <text:p text:style-name="Text_20_body">Começamos o planejamento do componente reutilizável.</text:p>
      <text:p text:style-name="Text_20_body">Estrutura criada:</text:p>
      <text:p text:style-name="P5"><text:span text:style-name="Source_20_Text">books-slider</text:span></text:p>
      <text:p text:style-name="P5"><text:span text:style-name="Source_20_Text">books-track</text:span></text:p>
      <text:p text:style-name="P5"><text:soft-page-break/><text:span text:style-name="Source_20_Text">slider-button</text:span></text:p>
      <text:p text:style-name="P5"><text:span text:style-name="Source_20_Text">slider.js</text:span></text:p>
      <text:p text:style-name="Text_20_body">Ele será reutilizado em toda a plataforma.</text:p>
      <text:p text:style-name="P6"/>
      <text:h text:style-name="P12" text:outline-level="1">Components.css</text:h>
      <text:p text:style-name="Text_20_body">Foi praticamente reescrito.</text:p>
      <text:p text:style-name="Text_20_body">Hoje possui:</text:p>
      <text:p text:style-name="Text_20_body">✅ Botão Primário</text:p>
      <text:p text:style-name="Text_20_body">✅ Botão Secundário</text:p>
      <text:p text:style-name="Text_20_body">✅ Icon Button</text:p>
      <text:p text:style-name="Text_20_body">✅ Header</text:p>
      <text:p text:style-name="Text_20_body">✅ Navbar</text:p>
      <text:p text:style-name="Text_20_body">✅ Menu Mobile</text:p>
      <text:p text:style-name="Text_20_body">✅ Card Base</text:p>
      <text:p text:style-name="Text_20_body">✅ Book Card</text:p>
      <text:p text:style-name="Text_20_body">✅ Feature Card</text:p>
      <text:p text:style-name="Text_20_body">✅ Footer</text:p>
      <text:p text:style-name="Text_20_body">✅ Badge</text:p>
      <text:p text:style-name="Text_20_body">✅ Divider</text:p>
      <text:p text:style-name="Text_20_body">✅ Responsividade</text:p>
      <text:p text:style-name="P6"/>
      <text:h text:style-name="P12" text:outline-level="1">Navegação</text:h>
      <text:p text:style-name="Text_20_body">Implementado:</text:p>
      <text:list text:style-name="L47">
        <text:list-item>
          <text:p text:style-name="P54">Componentes HTML reutilizáveis.</text:p>
        </text:list-item>
        <text:list-item>
          <text:p text:style-name="P54">Carregamento automático.</text:p>
        </text:list-item>
        <text:list-item>
          <text:p text:style-name="P54">Ajuste automático dos caminhos entre <text:span text:style-name="Source_20_Text">index</text:span> e <text:span text:style-name="Source_20_Text">paginas</text:span>.</text:p>
        </text:list-item>
      </text:list>
      <text:p text:style-name="P6"/>
      <text:h text:style-name="P12" text:outline-level="1">Avaliação Atual do Projeto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Área</text:p>
            </table:table-cell>
            <table:table-cell table:style-name="Tabela4.A1" office:value-type="string">
              <text:p text:style-name="Table_20_Heading">Estado</text:p>
            </table:table-cell>
          </table:table-row>
        </table:table-header-rows>
        <table:table-row>
          <table:table-cell table:style-name="Tabela4.A1" office:value-type="string">
            <text:p text:style-name="Table_20_Contents">Estrutura HTML</text:p>
          </table:table-cell>
          <table:table-cell table:style-name="Tabela4.A1" office:value-type="string">
            <text:p text:style-name="Table_20_Contents">⭐ 9.8/10</text:p>
          </table:table-cell>
        </table:table-row>
        <table:table-row>
          <table:table-cell table:style-name="Tabela4.A1" office:value-type="string">
            <text:p text:style-name="Table_20_Contents">Design System</text:p>
          </table:table-cell>
          <table:table-cell table:style-name="Tabela4.A1" office:value-type="string">
            <text:p text:style-name="Table_20_Contents">⭐ 10/10</text:p>
          </table:table-cell>
        </table:table-row>
        <table:table-row>
          <table:table-cell table:style-name="Tabela4.A1" office:value-type="string">
            <text:p text:style-name="Table_20_Contents">CSS Base</text:p>
          </table:table-cell>
          <table:table-cell table:style-name="Tabela4.A1" office:value-type="string">
            <text:p text:style-name="Table_20_Contents">⭐ 10/10</text:p>
          </table:table-cell>
        </table:table-row>
        <text:soft-page-break/>
        <table:table-row>
          <table:table-cell table:style-name="Tabela4.A1" office:value-type="string">
            <text:p text:style-name="Table_20_Contents">Componentes</text:p>
          </table:table-cell>
          <table:table-cell table:style-name="Tabela4.A1" office:value-type="string">
            <text:p text:style-name="Table_20_Contents">⭐ 10/10</text:p>
          </table:table-cell>
        </table:table-row>
        <table:table-row>
          <table:table-cell table:style-name="Tabela4.A1" office:value-type="string">
            <text:p text:style-name="Table_20_Contents">Responsividade</text:p>
          </table:table-cell>
          <table:table-cell table:style-name="Tabela4.A1" office:value-type="string">
            <text:p text:style-name="Table_20_Contents">⭐ 9.5/10</text:p>
          </table:table-cell>
        </table:table-row>
        <table:table-row>
          <table:table-cell table:style-name="Tabela4.A1" office:value-type="string">
            <text:p text:style-name="Table_20_Contents">Organização do Projeto</text:p>
          </table:table-cell>
          <table:table-cell table:style-name="Tabela4.A1" office:value-type="string">
            <text:p text:style-name="Table_20_Contents">⭐ 10/10</text:p>
          </table:table-cell>
        </table:table-row>
      </table:table>
      <text:p text:style-name="P6"/>
      <text:h text:style-name="P7" text:outline-level="2">Próximo passo</text:h>
      <text:p text:style-name="Text_20_body">O <text:span text:style-name="Strong_20_Emphasis">Sprint 1</text:span> está praticamente concluído. Restam apenas dois itens importantes:</text:p>
      <text:list text:style-name="L48">
        <text:list-item>
          <text:p text:style-name="P55"><text:span text:style-name="Strong_20_Emphasis">Implementar o menu mobile</text:span> (utilizando o <text:span text:style-name="Source_20_Text">navbar.html</text:span> e JavaScript).</text:p>
        </text:list-item>
        <text:list-item>
          <text:p text:style-name="P55"><text:bookmark-start text:name="__DdeLink__6842_2631705103"/><text:bookmark-start text:name="__DdeLink__6425_2631705103"/><text:span text:style-name="Strong_20_Emphasis">Finalizar o componente </text:span><text:span text:style-name="Strong_20_Emphasis"><text:span text:style-name="Source_20_Text">slider.js</text:span></text:span>, tornando-o totalmente funcional e reutilizável.<text:bookmark-end text:name="__DdeLink__6842_2631705103"/><text:bookmark-end text:name="__DdeLink__6425_2631705103"/></text:p>
        </text:list-item>
      </text:list>
      <text:p text:style-name="Text_20_body">Depois disso, podemos considerar a etapa <text:span text:style-name="Strong_20_Emphasis">Construir Layout Responsivo</text:span> concluída e avançar para a implementação das funcionalidades da plataforma.</text:p>
      <text:p text:style-name="P56">Perfeito. Agora o Sprint da responsividade ficou praticamente concluído. O próximo passo é muito interessante porque vamos criar um componente JavaScript realmente reutilizável.</text:p>
      <text:h text:style-name="P57" text:outline-level="2">Objetivo do <text:span text:style-name="Source_20_Text">slider.js</text:span></text:h>
      <text:p text:style-name="P58">Queremos um componente que funcione para qualquer lista de cartões, não apenas para "Obras em Destaque".</text:p>
      <text:p text:style-name="P58">Ele deverá permitir:</text:p>
      <text:list text:style-name="L49">
        <text:list-item>
          <text:p text:style-name="P59">✅ Navegar para o próximo item. </text:p>
        </text:list-item>
        <text:list-item>
          <text:p text:style-name="P59">✅ Navegar para o item anterior. </text:p>
        </text:list-item>
        <text:list-item>
          <text:p text:style-name="P59">✅ Definir quantos cartões aparecem por vez. </text:p>
        </text:list-item>
        <text:list-item>
          <text:p text:style-name="P59">✅ Adaptar-se automaticamente ao tamanho da tela. </text:p>
        </text:list-item>
        <text:list-item>
          <text:p text:style-name="P60">✅ Poder ser usado em qualquer página apenas adicionando uma classe HTML. </text:p>
        </text:list-item>
      </text:list>
      <text:p text:style-name="P61"/>
      <text:h text:style-name="P57" text:outline-level="2">Estrutura HTML padrão</text:h>
      <text:p text:style-name="P58">Em qualquer página bastará escrever:</text:p>
      <text:section text:style-name="Sect1" text:name="code-block-viewer">
        <text:p text:style-name="P62"><text:span text:style-name="Source_20_Text">&lt;section class="books-slider"&gt;</text:span></text:p>
        <text:p text:style-name="P63"/>
        <text:p text:style-name="P63"><text:span text:style-name="Source_20_Text"><text:s text:c="4"/>&lt;div class="slider-header"&gt;</text:span></text:p>
        <text:p text:style-name="P63"/>
        <text:p text:style-name="P63"><text:span text:style-name="Source_20_Text"><text:s text:c="8"/>&lt;h2&gt;Obras em Destaque&lt;/h2&gt;</text:span></text:p>
        <text:p text:style-name="P63"/>
        <text:p text:style-name="P63"><text:span text:style-name="Source_20_Text"><text:s text:c="8"/>&lt;div class="slider-controls"&gt;</text:span></text:p>
        <text:p text:style-name="P63"/>
        <text:p text:style-name="P63"><text:span text:style-name="Source_20_Text"><text:s text:c="12"/>&lt;button class="slider-button prev"&gt;</text:span></text:p>
        <text:p text:style-name="P63"><text:span text:style-name="Source_20_Text"><text:s text:c="16"/>←</text:span></text:p>
        <text:p text:style-name="P63"><text:span text:style-name="Source_20_Text"><text:s text:c="12"/>&lt;/button&gt;</text:span></text:p>
        <text:p text:style-name="P63"><text:soft-page-break/></text:p>
        <text:p text:style-name="P63"><text:span text:style-name="Source_20_Text"><text:s text:c="12"/>&lt;button class="slider-button next"&gt;</text:span></text:p>
        <text:p text:style-name="P63"><text:span text:style-name="Source_20_Text"><text:s text:c="16"/>→</text:span></text:p>
        <text:p text:style-name="P63"><text:span text:style-name="Source_20_Text"><text:s text:c="12"/>&lt;/button&gt;</text:span></text:p>
        <text:p text:style-name="P63"/>
        <text:p text:style-name="P63"><text:span text:style-name="Source_20_Text"><text:s text:c="8"/>&lt;/div&gt;</text:span></text:p>
        <text:p text:style-name="P63"/>
        <text:p text:style-name="P63"><text:span text:style-name="Source_20_Text"><text:s text:c="4"/>&lt;/div&gt;</text:span></text:p>
        <text:p text:style-name="P63"/>
        <text:p text:style-name="P63"><text:span text:style-name="Source_20_Text"><text:s text:c="4"/>&lt;div class="slider-window"&gt;</text:span></text:p>
        <text:p text:style-name="P63"/>
        <text:p text:style-name="P63"><text:span text:style-name="Source_20_Text"><text:s text:c="8"/>&lt;div class="books-track"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8"/>&lt;/div&gt;</text:span></text:p>
        <text:p text:style-name="P63"/>
        <text:p text:style-name="P63"><text:span text:style-name="Source_20_Text"><text:s text:c="4"/>&lt;/div&gt;</text:span></text:p>
        <text:p text:style-name="P63"/>
        <text:p text:style-name="P63"><text:span text:style-name="Source_20_Text">&lt;/section&gt;</text:span></text:p>
      </text:section>
      <text:p text:style-name="P61"/>
      <text:h text:style-name="P57" text:outline-level="2">Estrutura CSS</text:h>
      <text:p text:style-name="P58">O CSS já está praticamente preparado, apenas vamos ajustar para este formato:</text:p>
      <text:section text:style-name="Sect1" text:name="Seção1">
        <text:p text:style-name="P62"><text:bookmark text:name="code-block-viewer"/><text:span text:style-name="Source_20_Text">books-slider</text:span></text:p>
        <text:p text:style-name="P63"><text:span text:style-name="Source_20_Text">│</text:span></text:p>
        <text:p text:style-name="P63"><text:span text:style-name="Source_20_Text">├── slider-header</text:span></text:p>
        <text:p text:style-name="P63"><text:soft-page-break/><text:span text:style-name="Source_20_Text">│ <text:s text:c="5"/>├── título</text:span></text:p>
        <text:p text:style-name="P63"><text:span text:style-name="Source_20_Text">│ <text:s text:c="5"/>└── botões</text:span></text:p>
        <text:p text:style-name="P63"><text:span text:style-name="Source_20_Text">│</text:span></text:p>
        <text:p text:style-name="P63"><text:span text:style-name="Source_20_Text">└── slider-window</text:span></text:p>
        <text:p text:style-name="P63"><text:span text:style-name="Source_20_Text"><text:s text:c="8"/>│</text:span></text:p>
        <text:p text:style-name="P63"><text:span text:style-name="Source_20_Text"><text:s text:c="8"/>└── books-track</text:span></text:p>
        <text:p text:style-name="P63"><text:span text:style-name="Source_20_Text"><text:s text:c="16"/>├── card</text:span></text:p>
        <text:p text:style-name="P63"><text:span text:style-name="Source_20_Text"><text:s text:c="16"/>├── card</text:span></text:p>
        <text:p text:style-name="P63"><text:span text:style-name="Source_20_Text"><text:s text:c="16"/>└── card</text:span></text:p>
      </text:section>
      <text:p text:style-name="P58">O <text:span text:style-name="Source_20_Text">slider-window</text:span> será responsável por esconder os cartões que ficam fora da área visível (<text:span text:style-name="Source_20_Text">overflow: hidden</text:span>), enquanto o <text:span text:style-name="Source_20_Text">books-track</text:span> será movido com <text:span text:style-name="Source_20_Text">transform: translateX(...)</text:span>.</text:p>
      <text:p text:style-name="P61"/>
      <text:h text:style-name="P57" text:outline-level="2">Arquitetura do <text:span text:style-name="Source_20_Text">slider.js</text:span></text:h>
      <text:p text:style-name="P58">Vamos criar uma classe reutilizável:</text:p>
      <text:section text:style-name="Sect1" text:name="Seção2">
        <text:p text:style-name="P62"><text:bookmark text:name="code-block-viewer Copia 1"/><text:span text:style-name="Source_20_Text">class Slider {</text:span></text:p>
        <text:p text:style-name="P63"/>
        <text:p text:style-name="P63"><text:span text:style-name="Source_20_Text"><text:s text:c="4"/>constructor(element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init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next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previous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update(){</text:span></text:p>
        <text:p text:style-name="P63"/>
        <text:p text:style-name="P63"><text:span text:style-name="Source_20_Text"><text:s text:c="4"/>}</text:span></text:p>
        <text:p text:style-name="P63"><text:soft-page-break/></text:p>
        <text:p text:style-name="P63"><text:span text:style-name="Source_20_Text">}</text:span></text:p>
      </text:section>
      <text:p text:style-name="P58">Essa abordagem tem várias vantagens:</text:p>
      <text:list text:style-name="L50">
        <text:list-item>
          <text:p text:style-name="P64">Um único ficheiro controla todos os sliders. </text:p>
        </text:list-item>
        <text:list-item>
          <text:p text:style-name="P64">Podemos ter vários sliders na mesma página. </text:p>
        </text:list-item>
        <text:list-item>
          <text:p text:style-name="P65">O código fica organizado e fácil de expandir. </text:p>
        </text:list-item>
      </text:list>
      <text:p text:style-name="P61"/>
      <text:h text:style-name="P57" text:outline-level="2">Funcionalidades que implementaremos</text:h>
      <text:h text:style-name="P66" text:outline-level="3">Sprint 1</text:h>
      <text:list text:style-name="L51">
        <text:list-item>
          <text:p text:style-name="P67">Navegação por botões. </text:p>
        </text:list-item>
        <text:list-item>
          <text:p text:style-name="P67">Movimento suave. </text:p>
        </text:list-item>
        <text:list-item>
          <text:p text:style-name="P67">Responsivo. </text:p>
        </text:list-item>
        <text:list-item>
          <text:p text:style-name="P68">Limites do slider. </text:p>
        </text:list-item>
      </text:list>
      <text:h text:style-name="P66" text:outline-level="3">Sprint 2</text:h>
      <text:list text:style-name="L52">
        <text:list-item>
          <text:p text:style-name="P69">Arrastar com o dedo (touch). </text:p>
        </text:list-item>
        <text:list-item>
          <text:p text:style-name="P69">Arrastar com o rato. </text:p>
        </text:list-item>
        <text:list-item>
          <text:p text:style-name="P69">Auto-play opcional. </text:p>
        </text:list-item>
        <text:list-item>
          <text:p text:style-name="P69">Navegação por teclado. </text:p>
        </text:list-item>
        <text:list-item>
          <text:p text:style-name="P70">Indicadores (● ○ ○ ○). </text:p>
        </text:list-item>
      </text:list>
      <text:p text:style-name="P61"/>
      <text:h text:style-name="P66" text:outline-level="3">Minha recomendação</text:h>
      <text:p text:style-name="P58">Em vez de escrever um <text:span text:style-name="Source_20_Text">slider.js</text:span> simples com poucas linhas, vamos tratá-lo como um componente profissional, da mesma forma que fizemos com <text:span text:style-name="Source_20_Text">componentes.js</text:span>, <text:span text:style-name="Source_20_Text">navigation.js</text:span> e <text:span text:style-name="Source_20_Text">menu.js</text:span>.</text:p>
      <text:p text:style-name="P58">Assim, no final da Biblioteca Apócrifa terás uma pequena biblioteca própria de componentes JavaScript reutilizáveis, o que agrega muito valor ao projeto e ao teu portfólio.</text:p>
      <text:p text:style-name="P56">Excelente. Este é um dos pontos mais importantes do projeto. A partir daqui, a Biblioteca Apócrifa deixa de ser um conjunto de páginas estáticas e começa a comportar-se como uma aplicação.</text:p>
      <text:h text:style-name="P57" text:outline-level="2">O objetivo desta etapa</text:h>
      <text:p text:style-name="P58">Em vez de escrevermos os livros diretamente no HTML:</text:p>
      <text:p text:style-name="P63"><text:span text:style-name="Source_20_Text">&lt;article class="book-card"&gt;</text:span></text:p>
      <text:p text:style-name="P63"><text:span text:style-name="Source_20_Text"><text:s text:c="4"/>&lt;h3&gt;Evangelho de Tomé&lt;/h3&gt;</text:span></text:p>
      <text:p text:style-name="P63"><text:span text:style-name="Source_20_Text"><text:s text:c="4"/>&lt;p&gt;Texto gnóstico encontrado em Nag Hammadi.&lt;/p&gt;</text:span></text:p>
      <text:p text:style-name="P63"><text:span text:style-name="Source_20_Text">&lt;/article&gt;</text:span></text:p>
      <text:p text:style-name="P58">o HTML ficará apenas com um local onde os livros serão inseridos:</text:p>
      <text:p text:style-name="P63"><text:span text:style-name="Source_20_Text">&lt;div class="books-grid"&gt;&lt;/div&gt;</text:span></text:p>
      <text:p text:style-name="P58"><text:soft-page-break/>E todo o conteúdo será carregado a partir de um ficheiro JSON.</text:p>
      <text:p text:style-name="P61"/>
      <text:h text:style-name="P71" text:outline-level="1">Arquitetura que recomendo</text:h>
      <text:p text:style-name="P63"><text:span text:style-name="Source_20_Text">assets/</text:span></text:p>
      <text:p text:style-name="P63"/>
      <text:p text:style-name="P63"><text:span text:style-name="Source_20_Text">│</text:span></text:p>
      <text:p text:style-name="P63"><text:span text:style-name="Source_20_Text">├── data/</text:span></text:p>
      <text:p text:style-name="P63"><text:span text:style-name="Source_20_Text">│ <text:s text:c="5"/>livros.json</text:span></text:p>
      <text:p text:style-name="P63"><text:span text:style-name="Source_20_Text">│</text:span></text:p>
      <text:p text:style-name="P63"><text:span text:style-name="Source_20_Text">├── js/</text:span></text:p>
      <text:p text:style-name="P63"><text:span text:style-name="Source_20_Text">│ <text:s text:c="5"/>componentes.js</text:span></text:p>
      <text:p text:style-name="P63"><text:span text:style-name="Source_20_Text">│ <text:s text:c="5"/>navigation.js</text:span></text:p>
      <text:p text:style-name="P63"><text:span text:style-name="Source_20_Text">│ <text:s text:c="5"/>menu.js</text:span></text:p>
      <text:p text:style-name="P63"><text:span text:style-name="Source_20_Text">│ <text:s text:c="5"/>livros.js <text:s text:c="9"/>← novo</text:span></text:p>
      <text:p text:style-name="P63"><text:span text:style-name="Source_20_Text">│</text:span></text:p>
      <text:p text:style-name="P63"><text:span text:style-name="Source_20_Text">├── css/</text:span></text:p>
      <text:p text:style-name="P61"/>
      <text:h text:style-name="P71" text:outline-level="1">Passo 1 — Criar o <text:span text:style-name="Source_20_Text">livros.json</text:span></text:h>
      <text:p text:style-name="P58">Primeiro vamos definir um modelo de dados sólido. Não vamos criar apenas o necessário para hoje, mas algo que sirva para todo o projeto.</text:p>
      <text:p text:style-name="P58">Exemplo:</text:p>
      <text:p text:style-name="P63"><text:span text:style-name="Source_20_Text">[</text:span></text:p>
      <text:p text:style-name="P63"><text:span text:style-name="Source_20_Text"><text:s text:c="4"/>{</text:span></text:p>
      <text:p text:style-name="P63"><text:span text:style-name="Source_20_Text"><text:s text:c="8"/>"id": 1,</text:span></text:p>
      <text:p text:style-name="P63"><text:span text:style-name="Source_20_Text"><text:s text:c="8"/>"titulo": "Evangelho de Tomé",</text:span></text:p>
      <text:p text:style-name="P63"><text:span text:style-name="Source_20_Text"><text:s text:c="8"/>"autor": "Desconhecido",</text:span></text:p>
      <text:p text:style-name="P63"><text:span text:style-name="Source_20_Text"><text:s text:c="8"/>"categoria": "Evangelhos",</text:span></text:p>
      <text:p text:style-name="P63"><text:span text:style-name="Source_20_Text"><text:s text:c="8"/>"epoca": "Século II",</text:span></text:p>
      <text:p text:style-name="P63"><text:span text:style-name="Source_20_Text"><text:s text:c="8"/>"descricao": "Coleção de 114 ditos atribuídos a Jesus.",</text:span></text:p>
      <text:p text:style-name="P63"><text:span text:style-name="Source_20_Text"><text:s text:c="8"/>"imagem": "assets/img/livros/tome.jpg",</text:span></text:p>
      <text:p text:style-name="P63"><text:span text:style-name="Source_20_Text"><text:s text:c="8"/>"arquivo": "tome.html",</text:span></text:p>
      <text:p text:style-name="P63"><text:span text:style-name="Source_20_Text"><text:s text:c="8"/>"destaque": true</text:span></text:p>
      <text:p text:style-name="P63"><text:span text:style-name="Source_20_Text"><text:s text:c="4"/>},</text:span></text:p>
      <text:p text:style-name="P63"><text:span text:style-name="Source_20_Text"><text:s text:c="4"/>{</text:span></text:p>
      <text:p text:style-name="P63"><text:span text:style-name="Source_20_Text"><text:s text:c="8"/>"id": 2,</text:span></text:p>
      <text:p text:style-name="P63"><text:soft-page-break/><text:span text:style-name="Source_20_Text"><text:s text:c="8"/>"titulo": "Evangelho de Maria",</text:span></text:p>
      <text:p text:style-name="P63"><text:span text:style-name="Source_20_Text"><text:s text:c="8"/>"autor": "Desconhecido",</text:span></text:p>
      <text:p text:style-name="P63"><text:span text:style-name="Source_20_Text"><text:s text:c="8"/>"categoria": "Evangelhos",</text:span></text:p>
      <text:p text:style-name="P63"><text:span text:style-name="Source_20_Text"><text:s text:c="8"/>"epoca": "Século II",</text:span></text:p>
      <text:p text:style-name="P63"><text:span text:style-name="Source_20_Text"><text:s text:c="8"/>"descricao": "Texto gnóstico atribuído a Maria Madalena.",</text:span></text:p>
      <text:p text:style-name="P63"><text:span text:style-name="Source_20_Text"><text:s text:c="8"/>"imagem": "assets/img/livros/maria.jpg",</text:span></text:p>
      <text:p text:style-name="P63"><text:span text:style-name="Source_20_Text"><text:s text:c="8"/>"arquivo": "maria.html",</text:span></text:p>
      <text:p text:style-name="P63"><text:span text:style-name="Source_20_Text"><text:s text:c="8"/>"destaque": true</text:span></text:p>
      <text:p text:style-name="P63"><text:span text:style-name="Source_20_Text"><text:s text:c="4"/>}</text:span></text:p>
      <text:p text:style-name="P63"><text:span text:style-name="Source_20_Text">]</text:span></text:p>
      <text:p text:style-name="P61"/>
      <text:h text:style-name="P71" text:outline-level="1">Por que estes campos?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Campo</text:p>
            </table:table-cell>
            <table:table-cell table:style-name="Tabela5.A1" office:value-type="string">
              <text:p text:style-name="Table_20_Heading">Utilização</text:p>
            </table:table-cell>
          </table:table-row>
        </table:table-header-rows>
        <table:table-row>
          <table:table-cell table:style-name="Tabela5.A1" office:value-type="string">
            <text:p text:style-name="Table_20_Contents">id</text:p>
          </table:table-cell>
          <table:table-cell table:style-name="Tabela5.A1" office:value-type="string">
            <text:p text:style-name="Table_20_Contents">identificar o livro</text:p>
          </table:table-cell>
        </table:table-row>
        <table:table-row>
          <table:table-cell table:style-name="Tabela5.A1" office:value-type="string">
            <text:p text:style-name="Table_20_Contents">titulo</text:p>
          </table:table-cell>
          <table:table-cell table:style-name="Tabela5.A1" office:value-type="string">
            <text:p text:style-name="Table_20_Contents">nome</text:p>
          </table:table-cell>
        </table:table-row>
        <table:table-row>
          <table:table-cell table:style-name="Tabela5.A1" office:value-type="string">
            <text:p text:style-name="Table_20_Contents">autor</text:p>
          </table:table-cell>
          <table:table-cell table:style-name="Tabela5.A1" office:value-type="string">
            <text:p text:style-name="Table_20_Contents">informação histórica</text:p>
          </table:table-cell>
        </table:table-row>
        <table:table-row>
          <table:table-cell table:style-name="Tabela5.A1" office:value-type="string">
            <text:p text:style-name="Table_20_Contents">categoria</text:p>
          </table:table-cell>
          <table:table-cell table:style-name="Tabela5.A1" office:value-type="string">
            <text:p text:style-name="Table_20_Contents">filtros</text:p>
          </table:table-cell>
        </table:table-row>
        <table:table-row>
          <table:table-cell table:style-name="Tabela5.A1" office:value-type="string">
            <text:p text:style-name="Table_20_Contents">epoca</text:p>
          </table:table-cell>
          <table:table-cell table:style-name="Tabela5.A1" office:value-type="string">
            <text:p text:style-name="Table_20_Contents">informação histórica</text:p>
          </table:table-cell>
        </table:table-row>
        <table:table-row>
          <table:table-cell table:style-name="Tabela5.A1" office:value-type="string">
            <text:p text:style-name="Table_20_Contents">descricao</text:p>
          </table:table-cell>
          <table:table-cell table:style-name="Tabela5.A1" office:value-type="string">
            <text:p text:style-name="Table_20_Contents">cartão</text:p>
          </table:table-cell>
        </table:table-row>
        <table:table-row>
          <table:table-cell table:style-name="Tabela5.A1" office:value-type="string">
            <text:p text:style-name="Table_20_Contents">imagem</text:p>
          </table:table-cell>
          <table:table-cell table:style-name="Tabela5.A1" office:value-type="string">
            <text:p text:style-name="Table_20_Contents">capa</text:p>
          </table:table-cell>
        </table:table-row>
        <table:table-row>
          <table:table-cell table:style-name="Tabela5.A1" office:value-type="string">
            <text:p text:style-name="Table_20_Contents">arquivo</text:p>
          </table:table-cell>
          <table:table-cell table:style-name="Tabela5.A1" office:value-type="string">
            <text:p text:style-name="Table_20_Contents">página de leitura</text:p>
          </table:table-cell>
        </table:table-row>
        <table:table-row>
          <table:table-cell table:style-name="Tabela5.A1" office:value-type="string">
            <text:p text:style-name="Table_20_Contents">destaque</text:p>
          </table:table-cell>
          <table:table-cell table:style-name="Tabela5.A1" office:value-type="string">
            <text:p text:style-name="Table_20_Contents">slider da Home</text:p>
          </table:table-cell>
        </table:table-row>
      </table:table>
      <text:p text:style-name="P58">Mais tarde ainda podemos adicionar:</text:p>
      <text:p text:style-name="P63"><text:span text:style-name="Source_20_Text">"idioma": "Copta",</text:span></text:p>
      <text:p text:style-name="P63"><text:span text:style-name="Source_20_Text">"colecao": "Nag Hammadi",</text:span></text:p>
      <text:p text:style-name="P63"><text:span text:style-name="Source_20_Text">"anoDescoberta": 1945,</text:span></text:p>
      <text:p text:style-name="P63"><text:span text:style-name="Source_20_Text">"tags":[]</text:span></text:p>
      <text:p text:style-name="P58">sem alterar o sistema.</text:p>
      <text:p text:style-name="P61"/>
      <text:h text:style-name="P71" text:outline-level="1">Passo 2 — Criar <text:span text:style-name="Source_20_Text">livros.js</text:span></text:h>
      <text:p text:style-name="P58">Este ficheiro ficará responsável por:</text:p>
      <text:list text:style-name="L53">
        <text:list-item>
          <text:p text:style-name="P72">carregar o JSON;</text:p>
        </text:list-item>
        <text:list-item>
          <text:p text:style-name="P72">guardar os livros em memória;</text:p>
        </text:list-item>
        <text:list-item>
          <text:p text:style-name="P72">disponibilizar funções para o resto da aplicação.</text:p>
        </text:list-item>
      </text:list>
      <text:p text:style-name="P58">Não será apenas um <text:span text:style-name="Source_20_Text">fetch()</text:span>. Vamos criar uma pequena camada de acesso aos dados.</text:p>
      <text:p text:style-name="P61"/>
      <text:h text:style-name="P71" text:outline-level="1"><text:soft-page-break/>Estrutura</text:h>
      <text:p text:style-name="P63"><text:span text:style-name="Source_20_Text">class LivrosService {</text:span></text:p>
      <text:p text:style-name="P63"/>
      <text:p text:style-name="P63"><text:span text:style-name="Source_20_Text"><text:s text:c="4"/>async carregar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Todos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Destaques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PorCategoria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PorId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}</text:span></text:p>
      <text:p text:style-name="P58">Esta abordagem é muito melhor do que espalhar <text:span text:style-name="Source_20_Text">fetch()</text:span> pelo projeto inteiro.</text:p>
      <text:p text:style-name="P61"/>
      <text:h text:style-name="P71" text:outline-level="1">No futuro</text:h>
      <text:p text:style-name="P58">Todas as páginas utilizarão este mesmo serviço.</text:p>
      <text:p text:style-name="P58">A Home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Destaques()</text:span></text:p>
      <text:p text:style-name="P63"><text:span text:style-name="Source_20_Text"><text:s text:c="6"/>↓</text:span></text:p>
      <text:p text:style-name="P63"><text:span text:style-name="Source_20_Text">renderizar cards</text:span></text:p>
      <text:p text:style-name="P58"><text:soft-page-break/>A Bibliotec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Todos()</text:span></text:p>
      <text:p text:style-name="P63"><text:span text:style-name="Source_20_Text"><text:s text:c="6"/>↓</text:span></text:p>
      <text:p text:style-name="P63"><text:span text:style-name="Source_20_Text">renderizar todos</text:span></text:p>
      <text:p text:style-name="P58">A Pesquis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PorCategoria()</text:span></text:p>
      <text:p text:style-name="P58">A Página de leitur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PorId()</text:span></text:p>
      <text:p text:style-name="P58">Percebe a vantagem? O JSON é carregado apenas uma vez e todas as páginas reutilizam a mesma fonte de dados.</text:p>
      <text:p text:style-name="P61"/>
      <text:h text:style-name="P71" text:outline-level="1"><text:bookmark-start text:name="__DdeLink__6856_2631705103"/>Roadmap desta funcionalidade</text:h>
      <text:p text:style-name="P58">Eu dividiria este desenvolvimento em quatro pequenos sprints:</text:p>
      <text:h text:style-name="P66" text:outline-level="3">Sprint 1 (agora)</text:h>
      <text:list text:style-name="L54">
        <text:list-item>
          <text:p text:style-name="P73">✅ Criar <text:span text:style-name="Source_20_Text">livros.json</text:span>.</text:p>
        </text:list-item>
        <text:list-item>
          <text:p text:style-name="P73">✅ Criar <text:span text:style-name="Source_20_Text">LivrosService</text:span>.</text:p>
        </text:list-item>
        <text:list-item>
          <text:p text:style-name="P73">✅ Carregar o JSON com <text:span text:style-name="Source_20_Text">fetch()</text:span>.</text:p>
        </text:list-item>
        <text:list-item>
          <text:p text:style-name="P73">✅ Disponibilizar os dados para o projeto.</text:p>
        </text:list-item>
      </text:list>
      <text:h text:style-name="P66" text:outline-level="3">Sprint 2</text:h>
      <text:list text:style-name="L55">
        <text:list-item>
          <text:p text:style-name="P74">Renderizar automaticamente os livros na página <text:span text:style-name="Strong_20_Emphasis">Biblioteca</text:span>.</text:p>
        </text:list-item>
      </text:list>
      <text:h text:style-name="P66" text:outline-level="3">Sprint 3</text:h>
      <text:list text:style-name="L56">
        <text:list-item>
          <text:p text:style-name="P75">Renderizar automaticamente os <text:span text:style-name="Strong_20_Emphasis">destaques</text:span> na Home.</text:p>
        </text:list-item>
      </text:list>
      <text:h text:style-name="P66" text:outline-level="3">Sprint 4</text:h>
      <text:list text:style-name="L57">
        <text:list-item>
          <text:p text:style-name="P76">Implementar filtros, pesquisa e categorias.<text:bookmark-end text:name="__DdeLink__6856_2631705103"/></text:p>
        </text:list-item>
      </text:list>
      <text:p text:style-name="P61"/>
      <text:p text:style-name="P58"><text:soft-page-break/>Na minha opinião, esta é a melhor arquitetura para o projeto. Ela separa claramente <text:span text:style-name="Strong_20_Emphasis">dados (JSON)</text:span>, <text:span text:style-name="Strong_20_Emphasis">lógica (JavaScript)</text:span> e <text:span text:style-name="Strong_20_Emphasis">apresentação (HTML/CSS)</text:span>, tornando a Biblioteca Apócrifa muito mais próxima da estrutura utilizada em aplicações profissionais.</text:p>
      <text:p text:style-name="P56"/>
      <text:p text:style-name="P77">Perfeito. Agora vamos começar a construir uma das partes mais importantes da Biblioteca Apócrifa. A partir deste momento, vamos deixar de pensar apenas como desenvolvedores de um site e passar a pensar como arquitetos de uma aplicação.</text:p>
      <text:h text:style-name="P78" text:outline-level="2">Sprint 1 — Migração dos livros para JSON</text:h>
      <text:p text:style-name="P79">O objetivo é transformar cada livro num conjunto de dados estruturados, preservando integralmente o texto original.</text:p>
      <text:h text:style-name="P80" text:outline-level="3">Fase 1 — Definir o padrão (vamos fazer apenas uma vez)</text:h>
      <text:p text:style-name="P79">Primeiro definimos um único modelo que será seguido por todos os livros.</text:p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</text:span></text:p>
      <text:p text:style-name="P81"><text:span text:style-name="Source_20_Text">│ <text:s text:c="2"/>└── livros/</text:span></text:p>
      <text:p text:style-name="P81"><text:span text:style-name="Source_20_Text">│ <text:s text:c="6"/>├── apocrifo-joao.json</text:span></text:p>
      <text:p text:style-name="P81"><text:span text:style-name="Source_20_Text">│ <text:s text:c="6"/>├── evangelho-tome.json</text:span></text:p>
      <text:p text:style-name="P81"><text:span text:style-name="Source_20_Text">│ <text:s text:c="6"/>├── evangelho-maria.json</text:span></text:p>
      <text:p text:style-name="P81"><text:span text:style-name="Source_20_Text">│ <text:s text:c="6"/>└── ...</text:span></text:p>
      <text:p text:style-name="P81"><text:span text:style-name="Source_20_Text">│</text:span></text:p>
      <text:p text:style-name="P81"><text:span text:style-name="Source_20_Text">├── js/</text:span></text:p>
      <text:p text:style-name="P81"><text:span text:style-name="Source_20_Text">│ <text:s text:c="2"/>├── biblioteca.js</text:span></text:p>
      <text:p text:style-name="P81"><text:span text:style-name="Source_20_Text">│ <text:s text:c="2"/>├── leitura.js</text:span></text:p>
      <text:p text:style-name="P81"><text:span text:style-name="Source_20_Text">│ <text:s text:c="2"/>└── ...</text:span></text:p>
      <text:p text:style-name="P79">Assim, todos os livros terão exatamente a mesma estrutura.</text:p>
      <text:p text:style-name="P82"/>
      <text:h text:style-name="P83" text:outline-level="1">livros.json</text:h>
      <text:p text:style-name="P79">Este ficheiro será o catálogo da biblioteca.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apocrifo-joao",</text:span></text:p>
      <text:p text:style-name="P81"><text:span text:style-name="Source_20_Text"><text:s text:c="8"/>"titulo": "Apócrifo de João",</text:span></text:p>
      <text:p text:style-name="P81"><text:span text:style-name="Source_20_Text"><text:s text:c="8"/>"subtitulo": "Reconstrução Interpretativa e Exegese Gnóstica",</text:span></text:p>
      <text:p text:style-name="P81"><text:soft-page-break/><text:span text:style-name="Source_20_Text"><text:s text:c="8"/>"autor": "Anónimo",</text:span></text:p>
      <text:p text:style-name="P81"><text:span text:style-name="Source_20_Text"><text:s text:c="8"/>"categoria": "Gnosticismo",</text:span></text:p>
      <text:p text:style-name="P81"><text:span text:style-name="Source_20_Text"><text:s text:c="8"/>"colecao": "Nag Hammadi",</text:span></text:p>
      <text:p text:style-name="P81"><text:span text:style-name="Source_20_Text"><text:s text:c="8"/>"epoca": "Século II",</text:span></text:p>
      <text:p text:style-name="P81"><text:span text:style-name="Source_20_Text"><text:s text:c="8"/>"imagem": "assets/img/livros/apocrifo-joao.webp",</text:span></text:p>
      <text:p text:style-name="P81"><text:span text:style-name="Source_20_Text"><text:s text:c="8"/>"arquivo": "apocrifo-joao.json",</text:span></text:p>
      <text:p text:style-name="P81"><text:span text:style-name="Source_20_Text"><text:s text:c="8"/>"destaque": true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79">Este ficheiro será usado para:</text:p>
      <text:list text:style-name="L58">
        <text:list-item>
          <text:p text:style-name="P84">Biblioteca</text:p>
        </text:list-item>
        <text:list-item>
          <text:p text:style-name="P84">Pesquisa</text:p>
        </text:list-item>
        <text:list-item>
          <text:p text:style-name="P84">Slider</text:p>
        </text:list-item>
        <text:list-item>
          <text:p text:style-name="P84">Livros em destaque</text:p>
        </text:list-item>
        <text:list-item>
          <text:p text:style-name="P84">Recomendações</text:p>
        </text:list-item>
        <text:list-item>
          <text:p text:style-name="P84">Sidebar</text:p>
        </text:list-item>
      </text:list>
      <text:p text:style-name="P82"/>
      <text:h text:style-name="P83" text:outline-level="1">Cada livro</text:h>
      <text:p text:style-name="P79">Cada livro possuirá uma estrutura idêntica.</text:p>
      <text:p text:style-name="P81"><text:span text:style-name="Source_20_Text">{</text:span></text:p>
      <text:p text:style-name="P81"><text:span text:style-name="Source_20_Text"><text:s text:c="4"/>"id": "apocrifo-joao",</text:span></text:p>
      <text:p text:style-name="P81"/>
      <text:p text:style-name="P81"><text:span text:style-name="Source_20_Text"><text:s text:c="4"/>"titulo": "",</text:span></text:p>
      <text:p text:style-name="P81"/>
      <text:p text:style-name="P81"><text:span text:style-name="Source_20_Text"><text:s text:c="4"/>"subtitulo": "",</text:span></text:p>
      <text:p text:style-name="P81"/>
      <text:p text:style-name="P81"><text:span text:style-name="Source_20_Text"><text:s text:c="4"/>"introducao": "",</text:span></text:p>
      <text:p text:style-name="P81"/>
      <text:p text:style-name="P81"><text:span text:style-name="Source_20_Text"><text:s text:c="4"/>"secoes": [</text:span></text:p>
      <text:p text:style-name="P81"/>
      <text:p text:style-name="P81"><text:span text:style-name="Source_20_Text"><text:s text:c="4"/>]</text:span></text:p>
      <text:p text:style-name="P81"><text:span text:style-name="Source_20_Text">}</text:span></text:p>
      <text:p text:style-name="P82"/>
      <text:h text:style-name="P78" text:outline-level="2"><text:soft-page-break/>Cada secção</text:h>
      <text:p text:style-name="P81"><text:span text:style-name="Source_20_Text">{</text:span></text:p>
      <text:p text:style-name="P81"><text:span text:style-name="Source_20_Text"><text:s text:c="4"/>"id":"prologo",</text:span></text:p>
      <text:p text:style-name="P81"/>
      <text:p text:style-name="P81"><text:span text:style-name="Source_20_Text"><text:s text:c="4"/>"ordem":1,</text:span></text:p>
      <text:p text:style-name="P81"/>
      <text:p text:style-name="P81"><text:span text:style-name="Source_20_Text"><text:s text:c="4"/>"titulo":"PRÓLOGO",</text:span></text:p>
      <text:p text:style-name="P81"/>
      <text:p text:style-name="P81"><text:span text:style-name="Source_20_Text"><text:s text:c="4"/>"texto":[</text:span></text:p>
      <text:p text:style-name="P81"/>
      <text:p text:style-name="P81"><text:span text:style-name="Source_20_Text"><text:s text:c="4"/>],</text:span></text:p>
      <text:p text:style-name="P81"/>
      <text:p text:style-name="P81"><text:span text:style-name="Source_20_Text"><text:s text:c="4"/>"exegese":[</text:span></text:p>
      <text:p text:style-name="P81"/>
      <text:p text:style-name="P81"><text:span text:style-name="Source_20_Text"><text:s text:c="4"/>]</text:span></text:p>
      <text:p text:style-name="P81"><text:span text:style-name="Source_20_Text">}</text:span></text:p>
      <text:p text:style-name="P82"/>
      <text:h text:style-name="P78" text:outline-level="2">Texto</text:h>
      <text:p text:style-name="P79">Cada parágrafo será um elemento do array.</text:p>
      <text:p text:style-name="P81"><text:span text:style-name="Source_20_Text">"texto":[</text:span></text:p>
      <text:p text:style-name="P81"/>
      <text:p text:style-name="P81"><text:span text:style-name="Source_20_Text">"Parágrafo 1",</text:span></text:p>
      <text:p text:style-name="P81"/>
      <text:p text:style-name="P81"><text:span text:style-name="Source_20_Text">"Parágrafo 2",</text:span></text:p>
      <text:p text:style-name="P81"/>
      <text:p text:style-name="P81"><text:span text:style-name="Source_20_Text">"Parágrafo 3"</text:span></text:p>
      <text:p text:style-name="P81"/>
      <text:p text:style-name="P81"><text:span text:style-name="Source_20_Text">]</text:span></text:p>
      <text:p text:style-name="P79">Nenhuma palavra muda.</text:p>
      <text:p text:style-name="P82"/>
      <text:h text:style-name="P78" text:outline-level="2">Exegese</text:h>
      <text:p text:style-name="P79">Da mesma forma.</text:p>
      <text:p text:style-name="P81"><text:span text:style-name="Source_20_Text">"exegese":[</text:span></text:p>
      <text:p text:style-name="P81"/>
      <text:p text:style-name="P81"><text:span text:style-name="Source_20_Text">"Comentário 1",</text:span></text:p>
      <text:p text:style-name="P81"><text:soft-page-break/></text:p>
      <text:p text:style-name="P81"><text:span text:style-name="Source_20_Text">"Comentário 2"</text:span></text:p>
      <text:p text:style-name="P81"/>
      <text:p text:style-name="P81"><text:span text:style-name="Source_20_Text">]</text:span></text:p>
      <text:p text:style-name="P82"/>
      <text:h text:style-name="P83" text:outline-level="1">Porque separar em arrays?</text:h>
      <text:p text:style-name="P79">Porque depois poderemos fazer coisas como:</text:p>
      <text:p text:style-name="P79">✔ destacar apenas um parágrafo</text:p>
      <text:p text:style-name="P79">✔ guardar onde o utilizador parou</text:p>
      <text:p text:style-name="P79">✔ copiar apenas um trecho</text:p>
      <text:p text:style-name="P79">✔ adicionar notas</text:p>
      <text:p text:style-name="P79">✔ adicionar comentários</text:p>
      <text:p text:style-name="P79">✔ criar referências</text:p>
      <text:p text:style-name="P79">✔ fazer pesquisa</text:p>
      <text:p text:style-name="P82"/>
      <text:h text:style-name="P83" text:outline-level="1">Campos preparados para o futuro</text:h>
      <text:p text:style-name="P79">Mesmo que ainda não utilizemos, eu acrescentaria estes campos.</text:p>
      <text:p text:style-name="P81"><text:span text:style-name="Source_20_Text">{</text:span></text:p>
      <text:p text:style-name="P81"><text:span text:style-name="Source_20_Text"><text:s text:c="4"/>"id":"parte-4",</text:span></text:p>
      <text:p text:style-name="P81"/>
      <text:p text:style-name="P81"><text:span text:style-name="Source_20_Text"><text:s text:c="4"/>"ordem":4,</text:span></text:p>
      <text:p text:style-name="P81"/>
      <text:p text:style-name="P81"><text:span text:style-name="Source_20_Text"><text:s text:c="4"/>"titulo":"A Queda de Sofia",</text:span></text:p>
      <text:p text:style-name="P81"/>
      <text:p text:style-name="P81"><text:span text:style-name="Source_20_Text"><text:s text:c="4"/>"texto":[ ],</text:span></text:p>
      <text:p text:style-name="P81"/>
      <text:p text:style-name="P81"><text:span text:style-name="Source_20_Text"><text:s text:c="4"/>"exegese":[ ],</text:span></text:p>
      <text:p text:style-name="P81"/>
      <text:p text:style-name="P81"><text:span text:style-name="Source_20_Text"><text:s text:c="4"/>"notas":[ ],</text:span></text:p>
      <text:p text:style-name="P81"/>
      <text:p text:style-name="P81"><text:span text:style-name="Source_20_Text"><text:s text:c="4"/>"referencias":[ ],</text:span></text:p>
      <text:p text:style-name="P81"/>
      <text:p text:style-name="P81"><text:span text:style-name="Source_20_Text"><text:s text:c="4"/>"favorito":false</text:span></text:p>
      <text:p text:style-name="P81"><text:span text:style-name="Source_20_Text">}</text:span></text:p>
      <text:p text:style-name="P79"><text:soft-page-break/>Eles não interferem no conteúdo, mas evitam mudanças na estrutura quando implementarmos novas funcionalidades.</text:p>
      <text:p text:style-name="P82"/>
      <text:h text:style-name="P83" text:outline-level="1">O Renderizador</text:h>
      <text:p text:style-name="P79">Em vez de escrevermos HTML para cada livro, o JavaScript fará isso automaticamente.</text:p>
      <text:p text:style-name="P79">Hoje tens:</text:p>
      <text:p text:style-name="P81"><text:span text:style-name="Source_20_Text">Livro HTML</text:span></text:p>
      <text:p text:style-name="P81"><text:span text:style-name="Source_20_Text"><text:s text:c="6"/>↓</text:span></text:p>
      <text:p text:style-name="P81"><text:span text:style-name="Source_20_Text">Página</text:span></text:p>
      <text:p text:style-name="P79">Depois ficará:</text:p>
      <text:p text:style-name="P81"><text:span text:style-name="Source_20_Text">Livro JSON</text:span></text:p>
      <text:p text:style-name="P81"><text:span text:style-name="Source_20_Text"><text:s text:c="6"/>↓</text:span></text:p>
      <text:p text:style-name="P81"><text:span text:style-name="Source_20_Text">Leitura.js</text:span></text:p>
      <text:p text:style-name="P81"><text:span text:style-name="Source_20_Text"><text:s text:c="6"/>↓</text:span></text:p>
      <text:p text:style-name="P81"><text:span text:style-name="Source_20_Text">HTML</text:span></text:p>
      <text:p text:style-name="P81"><text:span text:style-name="Source_20_Text"><text:s text:c="6"/>↓</text:span></text:p>
      <text:p text:style-name="P81"><text:span text:style-name="Source_20_Text">Página</text:span></text:p>
      <text:p text:style-name="P79">Ou seja, um único renderizador servirá para todos os livros.</text:p>
      <text:p text:style-name="P82"/>
      <text:h text:style-name="P83" text:outline-level="1">O que faremos agora</text:h>
      <text:p text:style-name="P79">Este é o plano de execução que proponho:</text:p>
      <text:h text:style-name="P80" text:outline-level="3"><text:bookmark-start text:name="__DdeLink__6870_2631705103"/>✅ Etapa 1<text:bookmark-end text:name="__DdeLink__6870_2631705103"/></text:h>
      <text:p text:style-name="P79">Criar a estrutura definitiva do <text:span text:style-name="Source_20_Text">livros.json</text:span>.</text:p>
      <text:h text:style-name="P80" text:outline-level="3">✅ Etapa 2</text:h>
      <text:p text:style-name="P79">Converter completamente o <text:span text:style-name="Strong_20_Emphasis">Apócrifo de João</text:span> para o novo formato JSON, preservando 100% do texto.</text:p>
      <text:h text:style-name="P80" text:outline-level="3">✅ Etapa 3</text:h>
      <text:p text:style-name="P79">Criar o <text:span text:style-name="Source_20_Text">leitura.js</text:span>, responsável por carregar e renderizar qualquer livro a partir do JSON.</text:p>
      <text:h text:style-name="P80" text:outline-level="3">✅ Etapa 4</text:h>
      <text:p text:style-name="P79">Adaptar a página <text:span text:style-name="Source_20_Text">leitura.html</text:span> para que deixe de conter conteúdo fixo e passe a ser um template reutilizável.</text:p>
      <text:h text:style-name="P80" text:outline-level="3"><text:soft-page-break/>✅ Etapa 5</text:h>
      <text:p text:style-name="P79">Repetir o processo para os restantes cinco livros.</text:p>
      <text:p text:style-name="P82"/>
      <text:p text:style-name="P79">Na minha opinião, esta é a melhor abordagem porque evita retrabalho. Quando o primeiro livro estiver totalmente funcional, os outros cinco seguirão exatamente o mesmo padrão, tornando a expansão da Biblioteca Apócrifa muito mais rápida e consistente.</text:p>
      <text:p text:style-name="P77">Excelente. A partir daqui vamos começar a construir o <text:span text:style-name="Strong_20_Emphasis">backend de dados</text:span> da Biblioteca Apócrifa (mesmo sendo uma aplicação front-end).</text:p>
      <text:p text:style-name="P79">A <text:span text:style-name="Strong_20_Emphasis">Etapa 1</text:span> consiste em criar o catálogo dos livros. Não vamos converter nenhum livro ainda. Vamos apenas definir o padrão que será utilizado por toda a aplicação.</text:p>
      <text:p text:style-name="P82"/>
      <text:h text:style-name="P83" text:outline-level="1">1º Criar a pasta</text:h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</text:span></text:p>
      <text:p text:style-name="P81"><text:span text:style-name="Source_20_Text">│ <text:s text:c="2"/>├── categorias.json</text:span></text:p>
      <text:p text:style-name="P81"><text:span text:style-name="Source_20_Text">│ <text:s text:c="2"/>└── autores.json <text:s text:c="2"/>(opcional por enquanto)</text:span></text:p>
      <text:p text:style-name="P79">Por agora só vamos criar <text:span text:style-name="Strong_20_Emphasis">livros.json</text:span>.</text:p>
      <text:p text:style-name="P82"/>
      <text:h text:style-name="P83" text:outline-level="1">2º Estrutura do livros.json</text:h>
      <text:p text:style-name="P79">Começaremos com apenas um livro.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apocrifo-joao",</text:span></text:p>
      <text:p text:style-name="P81"/>
      <text:p text:style-name="P81"><text:span text:style-name="Source_20_Text"><text:s text:c="8"/>"titulo": "Apócrifo de João",</text:span></text:p>
      <text:p text:style-name="P81"/>
      <text:p text:style-name="P81"><text:span text:style-name="Source_20_Text"><text:s text:c="8"/>"subtitulo": "Reconstrução Interpretativa e Exegese Gnóstica",</text:span></text:p>
      <text:p text:style-name="P81"/>
      <text:p text:style-name="P81"><text:span text:style-name="Source_20_Text"><text:s text:c="8"/>"autor": "Anónimo",</text:span></text:p>
      <text:p text:style-name="P81"/>
      <text:p text:style-name="P81"><text:span text:style-name="Source_20_Text"><text:s text:c="8"/>"colecao": "Biblioteca de Nag Hammadi",</text:span></text:p>
      <text:p text:style-name="P81"/>
      <text:p text:style-name="P81"><text:span text:style-name="Source_20_Text"><text:s text:c="8"/>"categoria": "Gnosticismo",</text:span></text:p>
      <text:p text:style-name="P81"><text:soft-page-break/></text:p>
      <text:p text:style-name="P81"><text:span text:style-name="Source_20_Text"><text:s text:c="8"/>"idiomaOriginal": "Copta",</text:span></text:p>
      <text:p text:style-name="P81"/>
      <text:p text:style-name="P81"><text:span text:style-name="Source_20_Text"><text:s text:c="8"/>"epoca": "Século II",</text:span></text:p>
      <text:p text:style-name="P81"/>
      <text:p text:style-name="P81"><text:span text:style-name="Source_20_Text"><text:s text:c="8"/>"descricao": "Uma reconstrução interpretativa do Apócrifo de João acompanhada por comentários exegéticos.",</text:span></text:p>
      <text:p text:style-name="P81"/>
      <text:p text:style-name="P81"><text:span text:style-name="Source_20_Text"><text:s text:c="8"/>"imagem": "assets/imagens/livros/apocrifo-joao.webp",</text:span></text:p>
      <text:p text:style-name="P81"/>
      <text:p text:style-name="P81"><text:span text:style-name="Source_20_Text"><text:s text:c="8"/>"arquivo": "apocrifo-joao.json",</text:span></text:p>
      <text:p text:style-name="P81"/>
      <text:p text:style-name="P81"><text:span text:style-name="Source_20_Text"><text:s text:c="8"/>"destaque": true,</text:span></text:p>
      <text:p text:style-name="P81"/>
      <text:p text:style-name="P81"><text:span text:style-name="Source_20_Text"><text:s text:c="8"/>"favorito": false,</text:span></text:p>
      <text:p text:style-name="P81"/>
      <text:p text:style-name="P81"><text:span text:style-name="Source_20_Text"><text:s text:c="8"/>"estado": "disponivel"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82"/>
      <text:h text:style-name="P78" text:outline-level="2">Vamos analisar cada campo</text:h>
      <text:h text:style-name="P80" text:outline-level="3">id</text:h>
      <text:p text:style-name="P79">Nunca muda.</text:p>
      <text:p text:style-name="P79">Será usado pelo JavaScript.</text:p>
      <text:p text:style-name="P81"><text:span text:style-name="Source_20_Text">"id":"apocrifo-joao"</text:span></text:p>
      <text:p text:style-name="P82"/>
      <text:h text:style-name="P80" text:outline-level="3">titulo</text:h>
      <text:p text:style-name="P79">O título apresentado ao utilizador.</text:p>
      <text:p text:style-name="P81"><text:span text:style-name="Source_20_Text">"titulo":"Apócrifo de João"</text:span></text:p>
      <text:p text:style-name="P82"/>
      <text:h text:style-name="P80" text:outline-level="3">subtitulo</text:h>
      <text:p text:style-name="P79">Nem todos os livros terão.</text:p>
      <text:p text:style-name="P79">Mas vale a pena existir.</text:p>
      <text:p text:style-name="P82"/>
      <text:h text:style-name="P80" text:outline-level="3"><text:soft-page-break/>autor</text:h>
      <text:p text:style-name="P79">Mesmo que seja desconhecido.</text:p>
      <text:p text:style-name="P81"><text:span text:style-name="Source_20_Text">"autor":"Anónimo"</text:span></text:p>
      <text:p text:style-name="P82"/>
      <text:h text:style-name="P80" text:outline-level="3">coleção</text:h>
      <text:p text:style-name="P79">Depois teremos livros de várias coleções.</text:p>
      <text:p text:style-name="P79">Exemplo:</text:p>
      <text:list text:style-name="L59">
        <text:list-item>
          <text:p text:style-name="P85">Nag Hammadi</text:p>
        </text:list-item>
        <text:list-item>
          <text:p text:style-name="P85">Manuscritos do Mar Morto</text:p>
        </text:list-item>
        <text:list-item>
          <text:p text:style-name="P85">Apócrifos do NT</text:p>
        </text:list-item>
        <text:list-item>
          <text:p text:style-name="P85">Pseudepígrafos</text:p>
        </text:list-item>
      </text:list>
      <text:p text:style-name="P82"/>
      <text:h text:style-name="P80" text:outline-level="3">categoria</text:h>
      <text:p text:style-name="P79">Servirá para os filtros.</text:p>
      <text:p text:style-name="P79">Exemplo:</text:p>
      <text:p text:style-name="P81"><text:span text:style-name="Source_20_Text">Evangelhos</text:span></text:p>
      <text:p text:style-name="P81"/>
      <text:p text:style-name="P81"><text:span text:style-name="Source_20_Text">Apocalipses</text:span></text:p>
      <text:p text:style-name="P81"/>
      <text:p text:style-name="P81"><text:span text:style-name="Source_20_Text">Atos</text:span></text:p>
      <text:p text:style-name="P81"/>
      <text:p text:style-name="P81"><text:span text:style-name="Source_20_Text">Cartas</text:span></text:p>
      <text:p text:style-name="P81"/>
      <text:p text:style-name="P81"><text:span text:style-name="Source_20_Text">Sabedoria</text:span></text:p>
      <text:p text:style-name="P81"/>
      <text:p text:style-name="P81"><text:span text:style-name="Source_20_Text">Gnosticismo</text:span></text:p>
      <text:p text:style-name="P81"/>
      <text:p text:style-name="P81"><text:span text:style-name="Source_20_Text">Liturgia</text:span></text:p>
      <text:p text:style-name="P82"/>
      <text:h text:style-name="P80" text:outline-level="3">idiomaOriginal</text:h>
      <text:p text:style-name="P79">Muito útil para estudantes.</text:p>
      <text:p text:style-name="P81"><text:span text:style-name="Source_20_Text">Copta</text:span></text:p>
      <text:p text:style-name="P81"/>
      <text:p text:style-name="P81"><text:span text:style-name="Source_20_Text">Grego</text:span></text:p>
      <text:p text:style-name="P81"/>
      <text:p text:style-name="P81"><text:soft-page-break/><text:span text:style-name="Source_20_Text">Latim</text:span></text:p>
      <text:p text:style-name="P81"/>
      <text:p text:style-name="P81"><text:span text:style-name="Source_20_Text">Hebraico</text:span></text:p>
      <text:p text:style-name="P81"/>
      <text:p text:style-name="P81"><text:span text:style-name="Source_20_Text">Aramaico</text:span></text:p>
      <text:p text:style-name="P82"/>
      <text:h text:style-name="P80" text:outline-level="3">época</text:h>
      <text:p text:style-name="P79">Depois poderá aparecer na página.</text:p>
      <text:p text:style-name="P81"><text:span text:style-name="Source_20_Text">Século II</text:span></text:p>
      <text:p text:style-name="P81"/>
      <text:p text:style-name="P81"><text:span text:style-name="Source_20_Text">Século III</text:span></text:p>
      <text:p text:style-name="P81"/>
      <text:p text:style-name="P81"><text:span text:style-name="Source_20_Text">Século I</text:span></text:p>
      <text:p text:style-name="P82"/>
      <text:h text:style-name="P80" text:outline-level="3">descrição</text:h>
      <text:p text:style-name="P79">Será mostrada nos cards.</text:p>
      <text:p text:style-name="P82"/>
      <text:h text:style-name="P80" text:outline-level="3">imagem</text:h>
      <text:p text:style-name="P79">Capa do livro.</text:p>
      <text:p text:style-name="P79">Mesmo que inicialmente seja uma imagem padrão.</text:p>
      <text:p text:style-name="P82"/>
      <text:h text:style-name="P80" text:outline-level="3">arquivo</text:h>
      <text:p text:style-name="P79">Este é o mais importante.</text:p>
      <text:p text:style-name="P81"><text:span text:style-name="Source_20_Text">"arquivo":"apocrifo-joao.json"</text:span></text:p>
      <text:p text:style-name="P79">Quando clicarmos num livro, o JavaScript fará:</text:p>
      <text:p text:style-name="P81"><text:span text:style-name="Source_20_Text">fetch("assets/data/livros/apocrifo-joao.json")</text:span></text:p>
      <text:p text:style-name="P82"/>
      <text:h text:style-name="P80" text:outline-level="3">destaque</text:h>
      <text:p text:style-name="P79">Para a Home.</text:p>
      <text:p text:style-name="P81"><text:span text:style-name="Source_20_Text">"destaque":true</text:span></text:p>
      <text:p text:style-name="P79">Depois basta fazer:</text:p>
      <text:p text:style-name="P81"><text:span text:style-name="Source_20_Text">livros.filter(</text:span></text:p>
      <text:p text:style-name="P81"><text:span text:style-name="Source_20_Text"><text:s text:c="4"/>livro=&gt;livro.destaque</text:span></text:p>
      <text:p text:style-name="P81"><text:span text:style-name="Source_20_Text">)</text:span></text:p>
      <text:p text:style-name="P82"/>
      <text:h text:style-name="P80" text:outline-level="3"><text:soft-page-break/>favorito</text:h>
      <text:p text:style-name="P79">Será usado quando existir login.</text:p>
      <text:p text:style-name="P82"/>
      <text:h text:style-name="P80" text:outline-level="3">estado</text:h>
      <text:p text:style-name="P79">Mais para frente.</text:p>
      <text:p text:style-name="P79">Exemplo:</text:p>
      <text:p text:style-name="P81"><text:span text:style-name="Source_20_Text">Disponível</text:span></text:p>
      <text:p text:style-name="P81"/>
      <text:p text:style-name="P81"><text:span text:style-name="Source_20_Text">Em revisão</text:span></text:p>
      <text:p text:style-name="P81"/>
      <text:p text:style-name="P81"><text:span text:style-name="Source_20_Text">Em breve</text:span></text:p>
      <text:p text:style-name="P81"/>
      <text:p text:style-name="P81"><text:span text:style-name="Source_20_Text">Privado</text:span></text:p>
      <text:p text:style-name="P82"/>
      <text:h text:style-name="P83" text:outline-level="1">Eu acrescentaria mais alguns campos</text:h>
      <text:p text:style-name="P79">Pensando já na evolução da plataforma, faria assim:</text:p>
      <text:p text:style-name="P81"><text:span text:style-name="Source_20_Text">{</text:span></text:p>
      <text:p text:style-name="P81"><text:span text:style-name="Source_20_Text"><text:s text:c="4"/>"id":"apocrifo-joao",</text:span></text:p>
      <text:p text:style-name="P81"/>
      <text:p text:style-name="P81"><text:span text:style-name="Source_20_Text"><text:s text:c="4"/>"titulo":"Apócrifo de João",</text:span></text:p>
      <text:p text:style-name="P81"/>
      <text:p text:style-name="P81"><text:span text:style-name="Source_20_Text"><text:s text:c="4"/>"subtitulo":"Reconstrução Interpretativa e Exegese Gnóstica",</text:span></text:p>
      <text:p text:style-name="P81"/>
      <text:p text:style-name="P81"><text:span text:style-name="Source_20_Text"><text:s text:c="4"/>"autor":"Anónimo",</text:span></text:p>
      <text:p text:style-name="P81"/>
      <text:p text:style-name="P81"><text:span text:style-name="Source_20_Text"><text:s text:c="4"/>"colecao":"Biblioteca de Nag Hammadi",</text:span></text:p>
      <text:p text:style-name="P81"/>
      <text:p text:style-name="P81"><text:span text:style-name="Source_20_Text"><text:s text:c="4"/>"categoria":"Gnosticismo",</text:span></text:p>
      <text:p text:style-name="P81"/>
      <text:p text:style-name="P81"><text:span text:style-name="Source_20_Text"><text:s text:c="4"/>"idiomaOriginal":"Copta",</text:span></text:p>
      <text:p text:style-name="P81"/>
      <text:p text:style-name="P81"><text:span text:style-name="Source_20_Text"><text:s text:c="4"/>"epoca":"Século II",</text:span></text:p>
      <text:p text:style-name="P81"/>
      <text:p text:style-name="P81"><text:span text:style-name="Source_20_Text"><text:s text:c="4"/>"numeroSecoes":0,</text:span></text:p>
      <text:p text:style-name="P81"/>
      <text:p text:style-name="P81"><text:soft-page-break/><text:span text:style-name="Source_20_Text"><text:s text:c="4"/>"tempoLeitura":0,</text:span></text:p>
      <text:p text:style-name="P81"/>
      <text:p text:style-name="P81"><text:span text:style-name="Source_20_Text"><text:s text:c="4"/>"palavras":0,</text:span></text:p>
      <text:p text:style-name="P81"/>
      <text:p text:style-name="P81"><text:span text:style-name="Source_20_Text"><text:s text:c="4"/>"descricao":"Uma reconstrução interpretativa do Apócrifo de João acompanhada por comentários exegéticos.",</text:span></text:p>
      <text:p text:style-name="P81"/>
      <text:p text:style-name="P81"><text:span text:style-name="Source_20_Text"><text:s text:c="4"/>"imagem":"assets/imagens/livros/apocrifo-joao.webp",</text:span></text:p>
      <text:p text:style-name="P81"/>
      <text:p text:style-name="P81"><text:span text:style-name="Source_20_Text"><text:s text:c="4"/>"arquivo":"apocrifo-joao.json",</text:span></text:p>
      <text:p text:style-name="P81"/>
      <text:p text:style-name="P81"><text:span text:style-name="Source_20_Text"><text:s text:c="4"/>"destaque":true,</text:span></text:p>
      <text:p text:style-name="P81"/>
      <text:p text:style-name="P81"><text:span text:style-name="Source_20_Text"><text:s text:c="4"/>"favorito":false,</text:span></text:p>
      <text:p text:style-name="P81"/>
      <text:p text:style-name="P81"><text:span text:style-name="Source_20_Text"><text:s text:c="4"/>"estado":"disponivel",</text:span></text:p>
      <text:p text:style-name="P81"/>
      <text:p text:style-name="P81"><text:span text:style-name="Source_20_Text"><text:s text:c="4"/>"versao":"1.0.0",</text:span></text:p>
      <text:p text:style-name="P81"/>
      <text:p text:style-name="P81"><text:span text:style-name="Source_20_Text"><text:s text:c="4"/>"ultimaAtualizacao":"2026-01-01"</text:span></text:p>
      <text:p text:style-name="P81"><text:span text:style-name="Source_20_Text">}</text:span></text:p>
      <text:p text:style-name="P79">Esses campos (<text:span text:style-name="Source_20_Text">numeroSecoes</text:span>, <text:span text:style-name="Source_20_Text">tempoLeitura</text:span> e <text:span text:style-name="Source_20_Text">palavras</text:span>) podem ser preenchidos automaticamente no futuro, mas já deixam a estrutura preparada.</text:p>
      <text:p text:style-name="P82"/>
      <text:h text:style-name="P78" text:outline-level="2">Um pequeno ajuste de arquitetura</text:h>
      <text:p text:style-name="P79">Como já estamos a pensar no crescimento do projeto, eu faria uma pequena alteração na organização dos ficheiros:</text:p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 <text:s text:c="9"/>← catálogo</text:span></text:p>
      <text:p text:style-name="P81"><text:span text:style-name="Source_20_Text">│ <text:s text:c="2"/>├── categorias.json</text:span></text:p>
      <text:p text:style-name="P81"><text:span text:style-name="Source_20_Text">│ <text:s text:c="2"/>└── livros/</text:span></text:p>
      <text:p text:style-name="P81"><text:span text:style-name="Source_20_Text">│ <text:s text:c="6"/>├── apocrifo-joao.json</text:span></text:p>
      <text:p text:style-name="P81"><text:span text:style-name="Source_20_Text">│ <text:s text:c="6"/>├── evangelho-tome.json</text:span></text:p>
      <text:p text:style-name="P81"><text:span text:style-name="Source_20_Text">│ <text:s text:c="6"/>├── evangelho-maria.json</text:span></text:p>
      <text:p text:style-name="P81"><text:soft-page-break/><text:span text:style-name="Source_20_Text">│ <text:s text:c="6"/>└── ...</text:span></text:p>
      <text:p text:style-name="P79">Assim, o catálogo (<text:span text:style-name="Source_20_Text">livros.json</text:span>) fica separado dos ficheiros de conteúdo dos livros, tornando a estrutura mais organizada e fácil de manter.</text:p>
      <text:p text:style-name="P82"/>
      <text:h text:style-name="P80" text:outline-level="3">✅ Objetivo da Etapa 1</text:h>
      <text:p text:style-name="P79">Ao terminar esta etapa teremos um <text:span text:style-name="Strong_20_Emphasis">catálogo central da Biblioteca Apócrifa</text:span>. A partir dele será possível alimentar:</text:p>
      <text:list text:style-name="L60">
        <text:list-item>
          <text:p text:style-name="P86">A página <text:span text:style-name="Strong_20_Emphasis">Biblioteca</text:span>.</text:p>
        </text:list-item>
        <text:list-item>
          <text:p text:style-name="P86">A secção <text:span text:style-name="Strong_20_Emphasis">Obras em destaque</text:span> da Home.</text:p>
        </text:list-item>
        <text:list-item>
          <text:p text:style-name="P86">O <text:span text:style-name="Strong_20_Emphasis">slider</text:span>.</text:p>
        </text:list-item>
        <text:list-item>
          <text:p text:style-name="P86">A <text:span text:style-name="Strong_20_Emphasis">pesquisa</text:span>.</text:p>
        </text:list-item>
        <text:list-item>
          <text:p text:style-name="P86">Os <text:span text:style-name="Strong_20_Emphasis">filtros por categoria</text:span>.</text:p>
        </text:list-item>
        <text:list-item>
          <text:p text:style-name="P86">As <text:span text:style-name="Strong_20_Emphasis">recomendações</text:span>.</text:p>
        </text:list-item>
      </text:list>
      <text:p text:style-name="P79">Depois disso, passaremos para a <text:span text:style-name="Strong_20_Emphasis">Etapa 2</text:span>, onde converteremos o <text:span text:style-name="Strong_20_Emphasis">Apócrifo de João</text:span> para <text:span text:style-name="Source_20_Text">apocrifo-joao.json</text:span> seguindo a estrutura que servirá de modelo para todos os outros livros. Esse será o passo que dará vida ao sistema de leitura da plataforma.</text:p>
      <text:p text:style-name="P77">Excelente. Esta é uma daquelas decisões que vão elevar bastante a qualidade do projeto. Vamos construir uma ferramenta que ficará no próprio projeto e poderá converter qualquer livro HTML para JSON.</text:p>
      <text:h text:style-name="P78" text:outline-level="2">Estrutura</text:h>
      <text:p text:style-name="P79">Cria uma pasta chamada:</text:p>
      <text:p text:style-name="P81"><text:span text:style-name="Source_20_Text">ferramentas/</text:span></text:p>
      <text:p text:style-name="P79">Dentro dela:</text:p>
      <text:p text:style-name="P81"><text:span text:style-name="Source_20_Text">ferramentas/</text:span></text:p>
      <text:p text:style-name="P81"><text:span text:style-name="Source_20_Text">│</text:span></text:p>
      <text:p text:style-name="P81"><text:span text:style-name="Source_20_Text">├── conversor.html</text:span></text:p>
      <text:p text:style-name="P81"><text:span text:style-name="Source_20_Text">├── conversor.css</text:span></text:p>
      <text:p text:style-name="P81"><text:span text:style-name="Source_20_Text">└── conversor.js</text:span></text:p>
      <text:p text:style-name="P79">Esse conversor será usado apenas durante o desenvolvimento. Ele não fará parte da aplicação final.</text:p>
      <text:p text:style-name="P82"/>
      <text:h text:style-name="P83" text:outline-level="1">O que ele fará</text:h>
      <text:list text:style-name="L61">
        <text:list-item>
          <text:p text:style-name="P87">Colas o HTML completo do livro.</text:p>
        </text:list-item>
        <text:list-item>
          <text:p text:style-name="P87">Clicas em <text:span text:style-name="Strong_20_Emphasis">Converter</text:span>.</text:p>
        </text:list-item>
        <text:list-item>
          <text:p text:style-name="P87">O JavaScript lê toda a estrutura.</text:p>
        </text:list-item>
        <text:list-item>
          <text:p text:style-name="P87"><text:soft-page-break/>Gera automaticamente o JSON.</text:p>
        </text:list-item>
        <text:list-item>
          <text:p text:style-name="P87">Clicas em <text:span text:style-name="Strong_20_Emphasis">Download JSON</text:span>.</text:p>
        </text:list-item>
      </text:list>
      <text:p text:style-name="P79">Depois é só colocar o ficheiro em:</text:p>
      <text:p text:style-name="P81"><text:span text:style-name="Source_20_Text">assets/data/livros/</text:span></text:p>
      <text:p text:style-name="P79">E repetir o processo para os outros cinco livros.</text:p>
      <text:p text:style-name="P82"/>
      <text:h text:style-name="P83" text:outline-level="1">Sprint 1</text:h>
      <text:p text:style-name="P79">Vamos fazer por etapas.</text:p>
      <text:p text:style-name="P79">Hoje o conversor apenas deverá:</text:p>
      <text:list text:style-name="L62">
        <text:list-item>
          <text:p text:style-name="P88">receber HTML;</text:p>
        </text:list-item>
        <text:list-item>
          <text:p text:style-name="P88">encontrar todas as <text:span text:style-name="Source_20_Text">&lt;section&gt;</text:span>;</text:p>
        </text:list-item>
        <text:list-item>
          <text:p text:style-name="P88">extrair o título (<text:span text:style-name="Source_20_Text">&lt;h2&gt;</text:span>);</text:p>
        </text:list-item>
        <text:list-item>
          <text:p text:style-name="P88">mostrar o resultado no ecrã.</text:p>
        </text:list-item>
      </text:list>
      <text:p text:style-name="P79">Nada mais.</text:p>
      <text:p text:style-name="P79">Se isso funcionar, o restante será apenas ir adicionando funcionalidades.</text:p>
      <text:p text:style-name="P82"/>
      <text:h text:style-name="P78" text:outline-level="2">Resultado esperado</text:h>
      <text:p text:style-name="P79">Se colares um livro como o teu, o resultado será semelhante a: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prologo",</text:span></text:p>
      <text:p text:style-name="P81"><text:span text:style-name="Source_20_Text"><text:s text:c="8"/>"titulo": "PRÓLOGO — O Encontro que Desperta a Questão"</text:span></text:p>
      <text:p text:style-name="P81"><text:span text:style-name="Source_20_Text"><text:s text:c="4"/>},</text:span></text:p>
      <text:p text:style-name="P81"><text:span text:style-name="Source_20_Text"><text:s text:c="4"/>{</text:span></text:p>
      <text:p text:style-name="P81"><text:span text:style-name="Source_20_Text"><text:s text:c="8"/>"id": "parte-1",</text:span></text:p>
      <text:p text:style-name="P81"><text:span text:style-name="Source_20_Text"><text:s text:c="8"/>"titulo": "PARTE I — A Revelação"</text:span></text:p>
      <text:p text:style-name="P81"><text:span text:style-name="Source_20_Text"><text:s text:c="4"/>},</text:span></text:p>
      <text:p text:style-name="P81"><text:span text:style-name="Source_20_Text"><text:s text:c="4"/>{</text:span></text:p>
      <text:p text:style-name="P81"><text:span text:style-name="Source_20_Text"><text:s text:c="8"/>"id": "parte-2",</text:span></text:p>
      <text:p text:style-name="P81"><text:span text:style-name="Source_20_Text"><text:s text:c="8"/>"titulo": "PARTE II — O Reino da Luz"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82"/>
      <text:p text:style-name="P79"><text:soft-page-break/>Este é um primeiro passo pequeno, mas importante: confirma que conseguimos interpretar corretamente a estrutura do HTML.</text:p>
      <text:p text:style-name="P79">Depois vamos evoluir o conversor para extrair automaticamente o conteúdo de <text:span text:style-name="Source_20_Text">.texto-sagrado</text:span>, <text:span text:style-name="Source_20_Text">.exegese</text:span>, listas, citações e diálogos, até gerar um JSON completo pronto para ser usado pela Biblioteca Apócrifa. Esse conversor ficará como uma ferramenta muito útil para adicionar novos livros no futuro.</text:p>
      <text:p text:style-name="P89">Perfeito! 🎉 Isso confirma que o <text:span text:style-name="Source_20_Text">LivrosService</text:span> já está a funcionar corretamente.</text:p>
      <text:p text:style-name="P90">O resultado:</text:p>
      <text:p text:style-name="P91"><text:span text:style-name="Source_20_Text">(2) [{...}, {...}]</text:span></text:p>
      <text:p text:style-name="P90">significa que:</text:p>
      <text:list text:style-name="L63">
        <text:list-item>
          <text:p text:style-name="P92">✅ O <text:span text:style-name="Source_20_Text">fetch()</text:span> está correto.</text:p>
        </text:list-item>
        <text:list-item>
          <text:p text:style-name="P92">✅ O <text:span text:style-name="Source_20_Text">livros.json</text:span> está a ser encontrado.</text:p>
        </text:list-item>
        <text:list-item>
          <text:p text:style-name="P92">✅ O JSON está válido.</text:p>
        </text:list-item>
        <text:list-item>
          <text:p text:style-name="P92">✅ Os dados estão a ser convertidos para objetos JavaScript.</text:p>
        </text:list-item>
        <text:list-item>
          <text:p text:style-name="P92">✅ O <text:span text:style-name="Source_20_Text">LivrosService</text:span> está concluído.</text:p>
        </text:list-item>
      </text:list>
      <text:p text:style-name="P90"><text:span text:style-name="Strong_20_Emphasis">Na prática, acabámos de concluir o Sprint 1.</text:span></text:p>
      <text:p text:style-name="P93"/>
      <text:h text:style-name="P94" text:outline-level="1">O que já foi implementado</text:h>
      <text:h text:style-name="P95" text:outline-level="3">✔ Estrutura de dados</text:h>
      <text:p text:style-name="P91"><text:span text:style-name="Source_20_Text">assets/</text:span></text:p>
      <text:p text:style-name="P91"><text:span text:style-name="Source_20_Text">│</text:span></text:p>
      <text:p text:style-name="P91"><text:span text:style-name="Source_20_Text">├── dados/</text:span></text:p>
      <text:p text:style-name="P91"><text:span text:style-name="Source_20_Text">│ <text:s text:c="2"/>├── livros.json</text:span></text:p>
      <text:p text:style-name="P91"><text:span text:style-name="Source_20_Text">│ <text:s text:c="2"/>└── livros/</text:span></text:p>
      <text:p text:style-name="P91"><text:span text:style-name="Source_20_Text">│</text:span></text:p>
      <text:p text:style-name="P91"><text:span text:style-name="Source_20_Text">├── js/</text:span></text:p>
      <text:p text:style-name="P91"><text:span text:style-name="Source_20_Text">│ <text:s text:c="2"/>└── services/</text:span></text:p>
      <text:p text:style-name="P91"><text:span text:style-name="Source_20_Text">│ <text:s text:c="6"/>└── LivrosService.js</text:span></text:p>
      <text:p text:style-name="P93"/>
      <text:h text:style-name="P95" text:outline-level="3">✔ LivrosService</text:h>
      <text:p text:style-name="P90">Ele já consegue:</text:p>
      <text:list text:style-name="L64">
        <text:list-item>
          <text:p text:style-name="P96">carregar o JSON</text:p>
        </text:list-item>
        <text:list-item>
          <text:p text:style-name="P96">devolver um array de livros</text:p>
        </text:list-item>
        <text:list-item>
          <text:p text:style-name="P96">ser reutilizado por qualquer página</text:p>
        </text:list-item>
      </text:list>
      <text:p text:style-name="P90"><text:soft-page-break/>Exemplo:</text:p>
      <text:p text:style-name="P91"><text:span text:style-name="Source_20_Text">const livros = await livrosService.getLivros();</text:span></text:p>
      <text:p text:style-name="P93"/>
      <text:h text:style-name="P95" text:outline-level="3">✔ JSON</text:h>
      <text:p text:style-name="P90">O primeiro livro foi convertido.</text:p>
      <text:p text:style-name="P90">Agora basta ir adicionando os restantes.</text:p>
      <text:p text:style-name="P93"/>
      <text:h text:style-name="P94" text:outline-level="1">Agora começa a parte interessante.</text:h>
      <text:p text:style-name="P90">Até aqui apenas carregámos os dados.</text:p>
      <text:p text:style-name="P90">Agora vamos utilizá-los para construir a interface automaticamente.</text:p>
      <text:p text:style-name="P90">Entramos oficialmente no <text:span text:style-name="Strong_20_Emphasis">Sprint 2</text:span>.</text:p>
      <text:h text:style-name="P97" text:outline-level="2">Sprint 2 — Biblioteca dinâmica</text:h>
      <text:p text:style-name="P90">Em vez de escrever isto:</text:p>
      <text:p text:style-name="P91"><text:span text:style-name="Source_20_Text">&lt;article class="book-card"&gt;</text:span></text:p>
      <text:p text:style-name="P91"><text:span text:style-name="Source_20_Text"><text:s text:c="4"/>...</text:span></text:p>
      <text:p text:style-name="P91"><text:span text:style-name="Source_20_Text">&lt;/article&gt;</text:span></text:p>
      <text:p text:style-name="P91"/>
      <text:p text:style-name="P91"><text:span text:style-name="Source_20_Text">&lt;article class="book-card"&gt;</text:span></text:p>
      <text:p text:style-name="P91"><text:span text:style-name="Source_20_Text"><text:s text:c="4"/>...</text:span></text:p>
      <text:p text:style-name="P91"><text:span text:style-name="Source_20_Text">&lt;/article&gt;</text:span></text:p>
      <text:p text:style-name="P91"/>
      <text:p text:style-name="P91"><text:span text:style-name="Source_20_Text">&lt;article class="book-card"&gt;</text:span></text:p>
      <text:p text:style-name="P91"><text:span text:style-name="Source_20_Text"><text:s text:c="4"/>...</text:span></text:p>
      <text:p text:style-name="P91"><text:span text:style-name="Source_20_Text">&lt;/article&gt;</text:span></text:p>
      <text:p text:style-name="P90">vamos fazer isto:</text:p>
      <text:p text:style-name="P91"><text:span text:style-name="Source_20_Text">const livros = await livrosService.getLivros();</text:span></text:p>
      <text:p text:style-name="P91"/>
      <text:p text:style-name="P91"><text:span text:style-name="Source_20_Text">livros.forEach(livro =&gt; {</text:span></text:p>
      <text:p text:style-name="P91"/>
      <text:p text:style-name="P91"><text:span text:style-name="Source_20_Text"><text:s text:c="4"/>// cria automaticamente um card</text:span></text:p>
      <text:p text:style-name="P91"/>
      <text:p text:style-name="P91"><text:span text:style-name="Source_20_Text">});</text:span></text:p>
      <text:p text:style-name="P90">Ou seja,</text:p>
      <text:p text:style-name="P91"><text:span text:style-name="Source_20_Text">livros.json</text:span></text:p>
      <text:p text:style-name="P91"><text:soft-page-break/><text:span text:style-name="Source_20_Text"><text:s text:c="8"/>↓</text:span></text:p>
      <text:p text:style-name="P91"><text:span text:style-name="Source_20_Text">LivrosService</text:span></text:p>
      <text:p text:style-name="P91"><text:span text:style-name="Source_20_Text"><text:s text:c="8"/>↓</text:span></text:p>
      <text:p text:style-name="P91"><text:span text:style-name="Source_20_Text">biblioteca.js</text:span></text:p>
      <text:p text:style-name="P91"><text:span text:style-name="Source_20_Text"><text:s text:c="8"/>↓</text:span></text:p>
      <text:p text:style-name="P91"><text:span text:style-name="Source_20_Text">HTML automático</text:span></text:p>
      <text:p text:style-name="P90">Sem escrever um único card manualmente.</text:p>
      <text:p text:style-name="P93"/>
      <text:h text:style-name="P97" text:outline-level="2">Depois disso</text:h>
      <text:p text:style-name="P90">Quando converteres o terceiro...</text:p>
      <text:p text:style-name="P91"><text:span text:style-name="Source_20_Text">livros.json</text:span></text:p>
      <text:p text:style-name="P91"/>
      <text:p text:style-name="P91"><text:span text:style-name="Source_20_Text">Livro 1</text:span></text:p>
      <text:p text:style-name="P91"><text:span text:style-name="Source_20_Text">Livro 2</text:span></text:p>
      <text:p text:style-name="P91"><text:span text:style-name="Source_20_Text">Livro 3</text:span></text:p>
      <text:p text:style-name="P91"><text:span text:style-name="Source_20_Text">Livro 4</text:span></text:p>
      <text:p text:style-name="P91"><text:span text:style-name="Source_20_Text">Livro 5</text:span></text:p>
      <text:p text:style-name="P91"><text:span text:style-name="Source_20_Text">Livro 6</text:span></text:p>
      <text:p text:style-name="P91"><text:span text:style-name="Source_20_Text">Livro 20</text:span></text:p>
      <text:p text:style-name="P91"><text:span text:style-name="Source_20_Text">Livro 100</text:span></text:p>
      <text:p text:style-name="P90">A página continuará exatamente igual.</text:p>
      <text:p text:style-name="P90">Ela apenas mostrará mais cartões.</text:p>
      <text:p text:style-name="P90">Não será necessário alterar o HTML.</text:p>
      <text:p text:style-name="P93"/>
      <text:h text:style-name="P97" text:outline-level="2">Depois virá o Sprint 3</text:h>
      <text:p text:style-name="P90">Como os livros já estarão carregados em memória, a Home poderá simplesmente fazer:</text:p>
      <text:p text:style-name="P91"><text:span text:style-name="Source_20_Text">const destaques = livros.filter(l =&gt; l.destaque);</text:span></text:p>
      <text:p text:style-name="P90">e o slider será preenchido automaticamente.</text:p>
      <text:p text:style-name="P90">Ou seja, <text:span text:style-name="Strong_20_Emphasis">a Home e a Biblioteca vão utilizar exatamente a mesma fonte de dados</text:span> (<text:span text:style-name="Source_20_Text">livros.json</text:span>).</text:p>
      <text:p text:style-name="P93"/>
      <text:h text:style-name="P94" text:outline-level="1">O nosso próximo objetivo</text:h>
      <text:p text:style-name="P90">Agora vamos criar o <text:span text:style-name="Strong_20_Emphasis">renderizador automático da Biblioteca</text:span>, que será um dos módulos mais importantes de todo o projeto.</text:p>
      <text:p text:style-name="P90"><text:soft-page-break/>A partir desse momento, <text:span text:style-name="Strong_20_Emphasis">nunca mais escreveremos um card de livro em HTML</text:span>. Tudo será gerado automaticamente a partir do JSON, tornando a plataforma escalável e muito mais profissional.</text:p>
      <text:p text:style-name="P89"/>
      <text:p text:style-name="P7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9:03:34.568484422</meta:creation-date>
    <dc:date>2026-07-12T21:14:54.030079492</dc:date>
    <dc:creator>João António</dc:creator>
    <meta:editing-duration>PT14H48M35S</meta:editing-duration>
    <meta:editing-cycles>24</meta:editing-cycles>
    <meta:generator>LibreOffice/26.2.4.2$Linux_X86_64 LibreOffice_project/620$Build-2</meta:generator>
    <meta:document-statistic meta:table-count="5" meta:image-count="0" meta:object-count="0" meta:page-count="79" meta:paragraph-count="2149" meta:word-count="7592" meta:character-count="59580" meta:non-whitespace-character-count="51050"/>
  </office:meta>
</office:document-meta>
</file>