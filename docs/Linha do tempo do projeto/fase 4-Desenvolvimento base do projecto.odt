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P98" style:family="paragraph" style:parent-style-name="Text_20_body">
      <style:text-properties officeooo:rsid="0033dcdd" officeooo:paragraph-rsid="0033dcdd"/>
    </style:style>
    <style:style style:name="P99" style:family="paragraph" style:parent-style-name="Text_20_body" style:list-style-name="L65">
      <style:paragraph-properties fo:margin-top="0cm" fo:margin-bottom="0cm" style:contextual-spacing="false"/>
      <style:text-properties officeooo:rsid="0033dcdd"/>
    </style:style>
    <style:style style:name="P100" style:family="paragraph" style:parent-style-name="Text_20_body" style:list-style-name="L66">
      <style:paragraph-properties fo:margin-top="0cm" fo:margin-bottom="0cm" style:contextual-spacing="false"/>
      <style:text-properties officeooo:rsid="0033dcdd"/>
    </style:style>
    <style:style style:name="P101" style:family="paragraph" style:parent-style-name="Text_20_body" style:list-style-name="L67">
      <style:paragraph-properties fo:margin-top="0cm" fo:margin-bottom="0cm" style:contextual-spacing="false"/>
      <style:text-properties officeooo:rsid="0033dcdd"/>
    </style:style>
    <style:style style:name="P102" style:family="paragraph" style:parent-style-name="Text_20_body" style:list-style-name="L68">
      <style:paragraph-properties fo:margin-top="0cm" fo:margin-bottom="0cm" style:contextual-spacing="false"/>
      <style:text-properties officeooo:rsid="0033dcdd"/>
    </style:style>
    <style:style style:name="P103" style:family="paragraph" style:parent-style-name="Text_20_body" style:list-style-name="L69">
      <style:text-properties officeooo:rsid="0033dcdd"/>
    </style:style>
    <style:style style:name="P104" style:family="paragraph" style:parent-style-name="Heading_20_1">
      <style:text-properties officeooo:rsid="0033dcdd"/>
    </style:style>
    <style:style style:name="P105" style:family="paragraph" style:parent-style-name="Text_20_body">
      <style:text-properties officeooo:rsid="0033dcdd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33dcdd"/>
    </style:style>
    <style:style style:name="P107" style:family="paragraph" style:parent-style-name="Preformatted_20_Text">
      <style:paragraph-properties fo:margin-top="0cm" fo:margin-bottom="0.247cm" style:contextual-spacing="false" fo:line-height="115%"/>
      <style:text-properties officeooo:rsid="0033dcdd"/>
    </style:style>
    <style:style style:name="P108" style:family="paragraph" style:parent-style-name="Horizontal_20_Line">
      <style:paragraph-properties fo:margin-top="0cm" fo:margin-bottom="0.247cm" style:contextual-spacing="false" fo:line-height="115%"/>
      <style:text-properties officeooo:rsid="0033dcdd"/>
    </style:style>
    <style:style style:name="P109" style:family="paragraph" style:parent-style-name="Heading_20_1">
      <style:paragraph-properties fo:margin-top="0cm" fo:margin-bottom="0.247cm" style:contextual-spacing="false" fo:line-height="115%"/>
      <style:text-properties officeooo:rsid="0033dcdd"/>
    </style:style>
    <style:style style:name="P110" style:family="paragraph" style:parent-style-name="Text_20_body" style:list-style-name="L70">
      <style:paragraph-properties fo:margin-top="0cm" fo:margin-bottom="0cm" style:contextual-spacing="false"/>
      <style:text-properties officeooo:rsid="0033dcdd"/>
    </style:style>
    <style:style style:name="P111" style:family="paragraph" style:parent-style-name="Text_20_body" style:list-style-name="L70">
      <style:text-properties officeooo:rsid="0033dcdd"/>
    </style:style>
    <style:style style:name="P112" style:family="paragraph" style:parent-style-name="Heading_20_2">
      <style:paragraph-properties fo:margin-top="0cm" fo:margin-bottom="0.247cm" style:contextual-spacing="false" fo:line-height="115%"/>
      <style:text-properties officeooo:rsid="0033dcdd"/>
    </style:style>
    <style:style style:name="P113" style:family="paragraph" style:parent-style-name="Heading_20_3">
      <style:paragraph-properties fo:margin-top="0cm" fo:margin-bottom="0.247cm" style:contextual-spacing="false" fo:line-height="115%"/>
      <style:text-properties officeooo:rsid="0033dcdd"/>
    </style:style>
    <style:style style:name="P114" style:family="paragraph" style:parent-style-name="Heading_20_2">
      <style:text-properties officeooo:rsid="0033dcdd"/>
    </style:style>
    <style:style style:name="P115" style:family="paragraph" style:parent-style-name="Text_20_body" style:list-style-name="L71">
      <style:paragraph-properties fo:margin-top="0cm" fo:margin-bottom="0cm" style:contextual-spacing="false"/>
      <style:text-properties officeooo:rsid="0033dcdd"/>
    </style:style>
    <style:style style:name="P116" style:family="paragraph" style:parent-style-name="Text_20_body" style:list-style-name="L71">
      <style:text-properties officeooo:rsid="0033dcdd"/>
    </style:style>
    <style:style style:name="P117" style:family="paragraph" style:parent-style-name="Preformatted_20_Text">
      <style:paragraph-properties fo:margin-top="0cm" fo:margin-bottom="0.247cm" style:contextual-spacing="false" fo:line-height="115%"/>
      <style:text-properties officeooo:rsid="0033dcdd" officeooo:paragraph-rsid="003f2fc0"/>
    </style:style>
    <style:style style:name="P118" style:family="paragraph" style:parent-style-name="Heading_20_3">
      <style:text-properties officeooo:rsid="0033dcdd"/>
    </style:style>
    <style:style style:name="P119" style:family="paragraph" style:parent-style-name="Heading_20_1">
      <style:text-properties officeooo:rsid="0040dddc" officeooo:paragraph-rsid="0040dddc"/>
    </style:style>
    <style:style style:name="P120" style:family="paragraph" style:parent-style-name="Heading_20_2">
      <style:paragraph-properties fo:margin-top="0cm" fo:margin-bottom="0.247cm" style:contextual-spacing="false" fo:line-height="115%"/>
      <style:text-properties officeooo:rsid="0040dddc"/>
    </style:style>
    <style:style style:name="P121" style:family="paragraph" style:parent-style-name="Text_20_body" style:list-style-name="L72">
      <style:paragraph-properties fo:margin-top="0cm" fo:margin-bottom="0cm" style:contextual-spacing="false"/>
      <style:text-properties officeooo:rsid="0040dddc"/>
    </style:style>
    <style:style style:name="P122" style:family="paragraph" style:parent-style-name="Text_20_body" style:list-style-name="L72">
      <style:text-properties officeooo:rsid="0040dddc"/>
    </style:style>
    <style:style style:name="P123" style:family="paragraph" style:parent-style-name="Horizontal_20_Line">
      <style:paragraph-properties fo:margin-top="0cm" fo:margin-bottom="0.247cm" style:contextual-spacing="false" fo:line-height="115%"/>
      <style:text-properties officeooo:rsid="0040dddc"/>
    </style:style>
    <style:style style:name="P124" style:family="paragraph" style:parent-style-name="Text_20_body">
      <style:text-properties officeooo:rsid="0040dddc"/>
    </style:style>
    <style:style style:name="P12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40dddc"/>
    </style:style>
    <style:style style:name="P126" style:family="paragraph" style:parent-style-name="Preformatted_20_Text">
      <style:paragraph-properties fo:margin-top="0cm" fo:margin-bottom="0.247cm" style:contextual-spacing="false" fo:line-height="115%"/>
      <style:text-properties officeooo:rsid="0040dddc"/>
    </style:style>
    <style:style style:name="P127" style:family="paragraph" style:parent-style-name="Heading_20_3">
      <style:paragraph-properties fo:margin-top="0cm" fo:margin-bottom="0.247cm" style:contextual-spacing="false" fo:line-height="115%"/>
      <style:text-properties officeooo:rsid="0040dddc"/>
    </style:style>
    <style:style style:name="P128" style:family="paragraph" style:parent-style-name="Text_20_body" style:list-style-name="L73">
      <style:paragraph-properties fo:margin-top="0cm" fo:margin-bottom="0cm" style:contextual-spacing="false"/>
      <style:text-properties officeooo:rsid="0040dddc"/>
    </style:style>
    <style:style style:name="P129" style:family="paragraph" style:parent-style-name="Text_20_body" style:list-style-name="L73">
      <style:text-properties officeooo:rsid="0040dddc"/>
    </style:style>
    <style:style style:name="P130" style:family="paragraph" style:parent-style-name="Text_20_body" style:list-style-name="L74">
      <style:paragraph-properties fo:margin-top="0cm" fo:margin-bottom="0cm" style:contextual-spacing="false"/>
      <style:text-properties officeooo:rsid="0040dddc"/>
    </style:style>
    <style:style style:name="P131" style:family="paragraph" style:parent-style-name="Text_20_body" style:list-style-name="L74">
      <style:text-properties officeooo:rsid="0040dddc"/>
    </style:style>
    <style:style style:name="P132" style:family="paragraph" style:parent-style-name="Text_20_body">
      <style:text-properties officeooo:rsid="0040dddc" officeooo:paragraph-rsid="0040dddc"/>
    </style:style>
    <style:style style:name="P133" style:family="paragraph" style:parent-style-name="Heading_20_1">
      <style:paragraph-properties fo:margin-top="0cm" fo:margin-bottom="0.247cm" style:contextual-spacing="false" fo:line-height="115%"/>
      <style:text-properties officeooo:rsid="0040dddc"/>
    </style:style>
    <style:style style:name="P134" style:family="paragraph" style:parent-style-name="Text_20_body" style:list-style-name="L75">
      <style:paragraph-properties fo:margin-top="0cm" fo:margin-bottom="0cm" style:contextual-spacing="false"/>
      <style:text-properties officeooo:rsid="0040dddc"/>
    </style:style>
    <style:style style:name="P135" style:family="paragraph" style:parent-style-name="Text_20_body" style:list-style-name="L75">
      <style:text-properties officeooo:rsid="0040dddc"/>
    </style:style>
    <style:style style:name="P136" style:family="paragraph" style:parent-style-name="Quotations">
      <style:paragraph-properties fo:margin-top="0cm" fo:margin-bottom="0.247cm" style:contextual-spacing="false" fo:line-height="115%"/>
      <style:text-properties officeooo:rsid="0040dddc"/>
    </style:style>
    <style:style style:name="P137" style:family="paragraph" style:parent-style-name="Text_20_body" style:list-style-name="L76">
      <style:paragraph-properties fo:margin-top="0cm" fo:margin-bottom="0cm" style:contextual-spacing="false"/>
      <style:text-properties officeooo:rsid="0040dddc"/>
    </style:style>
    <style:style style:name="P138" style:family="paragraph" style:parent-style-name="Text_20_body" style:list-style-name="L76">
      <style:text-properties officeooo:rsid="0040dddc"/>
    </style:style>
    <style:style style:name="P139" style:family="paragraph" style:parent-style-name="Text_20_body" style:list-style-name="L77">
      <style:paragraph-properties fo:margin-top="0cm" fo:margin-bottom="0cm" style:contextual-spacing="false"/>
      <style:text-properties officeooo:rsid="0040dddc"/>
    </style:style>
    <style:style style:name="P140" style:family="paragraph" style:parent-style-name="Text_20_body" style:list-style-name="L77">
      <style:text-properties officeooo:rsid="0040dddc"/>
    </style:style>
    <style:style style:name="P141" style:family="paragraph" style:parent-style-name="Text_20_body" style:list-style-name="L78">
      <style:paragraph-properties fo:margin-top="0cm" fo:margin-bottom="0cm" style:contextual-spacing="false"/>
      <style:text-properties officeooo:rsid="0040dddc"/>
    </style:style>
    <style:style style:name="P142" style:family="paragraph" style:parent-style-name="Text_20_body" style:list-style-name="L78">
      <style:text-properties officeooo:rsid="0040dddc"/>
    </style:style>
    <style:style style:name="T1" style:family="text">
      <style:text-properties officeooo:rsid="001ce0e6"/>
    </style:style>
    <style:style style:name="T2" style:family="text">
      <style:text-properties officeooo:rsid="003f2fc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425_2631705103"/><text:bookmark-start text:name="__DdeLink__6842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425_2631705103"/><text:bookmark-end text:name="__DdeLink__6842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>Excelente. Agora vamos construir a página <text:span text:style-name="Strong_20_Emphasis">Biblioteca</text:span> da forma como um projeto profissional faria.</text:p>
      <text:p text:style-name="P79">O objetivo é este:</text:p>
      <text:p text:style-name="P81"><text:span text:style-name="Source_20_Text">livros.json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LivrosService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biblioteca.js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Renderiza todos os cards automaticamente</text:span></text:p>
      <text:p text:style-name="P82"/>
      <text:h text:style-name="P83" text:outline-level="1">Etapa 1 — Preparar o HTML</text:h>
      <text:p text:style-name="P79">Na página <text:span text:style-name="Strong_20_Emphasis">biblioteca.html</text:span>, substitui todos os cards escritos manualmente por apenas um container.</text:p>
      <text:p text:style-name="P81"><text:span text:style-name="Source_20_Text">&lt;main class="biblioteca-page"&gt;</text:span></text:p>
      <text:p text:style-name="P81"/>
      <text:p text:style-name="P81"><text:span text:style-name="Source_20_Text"><text:s text:c="4"/>&lt;section class="library"&gt;</text:span></text:p>
      <text:p text:style-name="P81"/>
      <text:p text:style-name="P81"><text:span text:style-name="Source_20_Text"><text:s text:c="8"/>&lt;div class="container"&gt;</text:span></text:p>
      <text:p text:style-name="P81"/>
      <text:p text:style-name="P81"><text:span text:style-name="Source_20_Text"><text:s text:c="12"/>&lt;div class="section-header"&gt;</text:span></text:p>
      <text:p text:style-name="P81"><text:span text:style-name="Source_20_Text"><text:s text:c="16"/>&lt;h1&gt;Biblioteca&lt;/h1&gt;</text:span></text:p>
      <text:p text:style-name="P81"><text:span text:style-name="Source_20_Text"><text:s text:c="16"/>&lt;p&gt;Explore os textos disponíveis na plataforma.&lt;/p&gt;</text:span></text:p>
      <text:p text:style-name="P81"><text:span text:style-name="Source_20_Text"><text:s text:c="12"/>&lt;/div&gt;</text:span></text:p>
      <text:p text:style-name="P81"/>
      <text:p text:style-name="P81"><text:span text:style-name="Source_20_Text"><text:s text:c="12"/>&lt;div</text:span></text:p>
      <text:p text:style-name="P81"><text:span text:style-name="Source_20_Text"><text:s text:c="16"/>id="booksContainer"</text:span></text:p>
      <text:p text:style-name="P81"><text:span text:style-name="Source_20_Text"><text:s text:c="16"/>class="books-grid"&gt;</text:span></text:p>
      <text:p text:style-name="P81"><text:span text:style-name="Source_20_Text"><text:s text:c="12"/>&lt;/div&gt;</text:span></text:p>
      <text:p text:style-name="P81"/>
      <text:p text:style-name="P81"><text:soft-page-break/><text:span text:style-name="Source_20_Text"><text:s text:c="8"/>&lt;/div&gt;</text:span></text:p>
      <text:p text:style-name="P81"/>
      <text:p text:style-name="P81"><text:span text:style-name="Source_20_Text"><text:s text:c="4"/>&lt;/section&gt;</text:span></text:p>
      <text:p text:style-name="P81"/>
      <text:p text:style-name="P81"><text:span text:style-name="Source_20_Text">&lt;/main&gt;</text:span></text:p>
      <text:p text:style-name="P81"/>
      <text:p text:style-name="P81"><text:span text:style-name="Source_20_Text">&lt;script src="../assets/js/services/LivrosService.js"&gt;&lt;/script&gt;</text:span></text:p>
      <text:p text:style-name="P81"><text:span text:style-name="Source_20_Text">&lt;script src="../assets/js/biblioteca.js"&gt;&lt;/script&gt;</text:span></text:p>
      <text:p text:style-name="P79">Repara que o HTML deixa de conhecer os livros.</text:p>
      <text:p text:style-name="P79">Ele apenas fornece um espaço onde eles serão colocados.</text:p>
      <text:p text:style-name="P82"/>
      <text:h text:style-name="P83" text:outline-level="1">Etapa 2 — biblioteca.js</text:h>
      <text:p text:style-name="P79">Agora cria (ou substitui) o ficheiro inteiro por este:</text:p>
      <text:p text:style-name="P81"><text:span text:style-name="Source_20_Text">document.addEventListener("DOMContentLoaded", async () =&gt; {</text:span></text:p>
      <text:p text:style-name="P81"/>
      <text:p text:style-name="P81"><text:span text:style-name="Source_20_Text"><text:s text:c="4"/>const container = document.getElementById("booksContainer");</text:span></text:p>
      <text:p text:style-name="P81"/>
      <text:p text:style-name="P81"><text:span text:style-name="Source_20_Text"><text:s text:c="4"/>if (!container) return;</text:span></text:p>
      <text:p text:style-name="P81"/>
      <text:p text:style-name="P81"><text:span text:style-name="Source_20_Text"><text:s text:c="4"/>const livros = await livrosService.getLivros();</text:span></text:p>
      <text:p text:style-name="P81"/>
      <text:p text:style-name="P81"><text:span text:style-name="Source_20_Text"><text:s text:c="4"/>livros.forEach(livro =&gt; {</text:span></text:p>
      <text:p text:style-name="P81"/>
      <text:p text:style-name="P81"><text:span text:style-name="Source_20_Text"><text:s text:c="8"/>const card = criarCard(livro);</text:span></text:p>
      <text:p text:style-name="P81"/>
      <text:p text:style-name="P81"><text:span text:style-name="Source_20_Text"><text:s text:c="8"/>container.appendChild(card);</text:span></text:p>
      <text:p text:style-name="P81"/>
      <text:p text:style-name="P81"><text:span text:style-name="Source_20_Text"><text:s text:c="4"/>});</text:span></text:p>
      <text:p text:style-name="P81"/>
      <text:p text:style-name="P81"><text:span text:style-name="Source_20_Text">});</text:span></text:p>
      <text:p text:style-name="P81"/>
      <text:p text:style-name="P81"><text:span text:style-name="Source_20_Text">function criarCard(livro){</text:span></text:p>
      <text:p text:style-name="P81"/>
      <text:p text:style-name="P81"><text:span text:style-name="Source_20_Text"><text:s text:c="4"/>const article = document.createElement("article");</text:span></text:p>
      <text:p text:style-name="P81"/>
      <text:p text:style-name="P81"><text:soft-page-break/><text:span text:style-name="Source_20_Text"><text:s text:c="4"/>article.className = "book-card";</text:span></text:p>
      <text:p text:style-name="P81"/>
      <text:p text:style-name="P81"><text:span text:style-name="Source_20_Text"><text:s text:c="4"/>article.innerHTML = `</text:span></text:p>
      <text:p text:style-name="P81"/>
      <text:p text:style-name="P81"><text:span text:style-name="Source_20_Text"><text:s text:c="8"/>&lt;h3&gt;${livro.titulo}&lt;/h3&gt;</text:span></text:p>
      <text:p text:style-name="P81"/>
      <text:p text:style-name="P81"><text:span text:style-name="Source_20_Text"><text:s text:c="8"/>&lt;p&gt;${livro.descricao}&lt;/p&gt;</text:span></text:p>
      <text:p text:style-name="P81"/>
      <text:p text:style-name="P81"><text:span text:style-name="Source_20_Text"><text:s text:c="8"/>&lt;a</text:span></text:p>
      <text:p text:style-name="P81"><text:span text:style-name="Source_20_Text"><text:s text:c="12"/>href="leitura.html?id=${livro.id}"</text:span></text:p>
      <text:p text:style-name="P81"><text:span text:style-name="Source_20_Text"><text:s text:c="12"/>class="button-primary"&gt;</text:span></text:p>
      <text:p text:style-name="P81"/>
      <text:p text:style-name="P81"><text:span text:style-name="Source_20_Text"><text:s text:c="12"/>Ler Obra</text:span></text:p>
      <text:p text:style-name="P81"/>
      <text:p text:style-name="P81"><text:span text:style-name="Source_20_Text"><text:s text:c="8"/>&lt;/a&gt;</text:span></text:p>
      <text:p text:style-name="P81"/>
      <text:p text:style-name="P81"><text:span text:style-name="Source_20_Text"><text:s text:c="4"/>`;</text:span></text:p>
      <text:p text:style-name="P81"/>
      <text:p text:style-name="P81"><text:span text:style-name="Source_20_Text"><text:s text:c="4"/>return article;</text:span></text:p>
      <text:p text:style-name="P81"/>
      <text:p text:style-name="P81"><text:span text:style-name="Source_20_Text">}</text:span></text:p>
      <text:p text:style-name="P82"/>
      <text:h text:style-name="P83" text:outline-level="1">O que acontece agora</text:h>
      <text:p text:style-name="P79">O JavaScript faz isto:</text:p>
      <text:p text:style-name="P81"><text:span text:style-name="Source_20_Text">livros.json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[</text:span></text:p>
      <text:p text:style-name="P81"><text:span text:style-name="Source_20_Text"><text:s/>João,</text:span></text:p>
      <text:p text:style-name="P81"><text:span text:style-name="Source_20_Text"><text:s/>Filipe</text:span></text:p>
      <text:p text:style-name="P81"><text:span text:style-name="Source_20_Text">]</text:span></text:p>
      <text:p text:style-name="P81"/>
      <text:p text:style-name="P81"><text:span text:style-name="Source_20_Text">↓</text:span></text:p>
      <text:p text:style-name="P81"/>
      <text:p text:style-name="P81"><text:soft-page-break/><text:span text:style-name="Source_20_Text">criarCar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&lt;article&gt;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appendChil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Página pronta</text:span></text:p>
      <text:p text:style-name="P79">Sem escrever um único card em HTML.</text:p>
      <text:p text:style-name="P82"/>
      <text:h text:style-name="P83" text:outline-level="1">Resultado</text:h>
      <text:p text:style-name="P79">Se amanhã adicionares um terceiro livro:</text:p>
      <text:p text:style-name="P81"><text:span text:style-name="Source_20_Text">{</text:span></text:p>
      <text:p text:style-name="P81"><text:span text:style-name="Source_20_Text"><text:s text:c="4"/>"id":"tom-003",</text:span></text:p>
      <text:p text:style-name="P81"><text:span text:style-name="Source_20_Text"><text:s text:c="4"/>"titulo":"Evangelho de Tomé",</text:span></text:p>
      <text:p text:style-name="P81"><text:span text:style-name="Source_20_Text"><text:s text:c="4"/>...</text:span></text:p>
      <text:p text:style-name="P81"><text:span text:style-name="Source_20_Text">}</text:span></text:p>
      <text:p text:style-name="P79">A página passa automaticamente para:</text:p>
      <text:p text:style-name="P81"><text:span text:style-name="Source_20_Text">Apócrifo de João</text:span></text:p>
      <text:p text:style-name="P81"/>
      <text:p text:style-name="P81"><text:span text:style-name="Source_20_Text">Evangelho de Filipe</text:span></text:p>
      <text:p text:style-name="P81"/>
      <text:p text:style-name="P81"><text:span text:style-name="Source_20_Text">Evangelho de Tomé</text:span></text:p>
      <text:p text:style-name="P79">Sem alterar absolutamente nada no HTML.</text:p>
      <text:p text:style-name="P82"/>
      <text:h text:style-name="P83" text:outline-level="1">Etapa 3 (a próxima)</text:h>
      <text:p text:style-name="P79">Quando isto estiver a funcionar, vamos melhorar os cartões.</text:p>
      <text:p text:style-name="P79">Em vez de mostrar apenas:</text:p>
      <text:p text:style-name="P81"><text:span text:style-name="Source_20_Text">Título</text:span></text:p>
      <text:p text:style-name="P81"><text:soft-page-break/></text:p>
      <text:p text:style-name="P81"><text:span text:style-name="Source_20_Text">Descrição</text:span></text:p>
      <text:p text:style-name="P81"/>
      <text:p text:style-name="P81"><text:span text:style-name="Source_20_Text">Botão</text:span></text:p>
      <text:p text:style-name="P79">Eles passarão a apresentar algo como:</text:p>
      <text:p text:style-name="P81"><text:span text:style-name="Source_20_Text">📖 Capa</text:span></text:p>
      <text:p text:style-name="P81"/>
      <text:p text:style-name="P81"><text:span text:style-name="Source_20_Text">Título</text:span></text:p>
      <text:p text:style-name="P81"/>
      <text:p text:style-name="P81"><text:span text:style-name="Source_20_Text">Autor</text:span></text:p>
      <text:p text:style-name="P81"/>
      <text:p text:style-name="P81"><text:span text:style-name="Source_20_Text">Categoria</text:span></text:p>
      <text:p text:style-name="P81"/>
      <text:p text:style-name="P81"><text:span text:style-name="Source_20_Text">Descrição</text:span></text:p>
      <text:p text:style-name="P81"/>
      <text:p text:style-name="P81"><text:span text:style-name="Source_20_Text">Tempo de leitura</text:span></text:p>
      <text:p text:style-name="P81"/>
      <text:p text:style-name="P81"><text:span text:style-name="Source_20_Text">Botão "Ler Obra"</text:span></text:p>
      <text:p text:style-name="P79">Ou seja, vamos transformar os cartões numa interface semelhante à de bibliotecas digitais modernas, mantendo o código totalmente alimentado pelo <text:span text:style-name="Source_20_Text">livros.json</text:span>.</text:p>
      <text:p text:style-name="P79">Este será o próximo passo para deixar a Biblioteca Apócrifa com um aspeto verdadeiramente profissional.</text:p>
      <text:p text:style-name="P98">📖 <text:bookmark-start text:name="__DdeLink__18476_2597948309"/>Uma pequena capa (mesmo que seja um placeholder <text:bookmark-end text:name="__DdeLink__18476_2597948309"/>enquanto não tens imagens). </text:p>
      <text:list text:style-name="L65">
        <text:list-item>
          <text:p text:style-name="P99">🏷️ Categoria como um selo (badge). </text:p>
        </text:list-item>
      </text:list>
      <text:list text:style-name="L66">
        <text:list-item>
          <text:p text:style-name="P100">📚 Título. </text:p>
        </text:list-item>
      </text:list>
      <text:list text:style-name="L67">
        <text:list-item>
          <text:p text:style-name="P101">📝 Descrição resumida (máximo de 3 linhas). </text:p>
        </text:list-item>
      </text:list>
      <text:list text:style-name="L68">
        <text:list-item>
          <text:p text:style-name="P102">ℹ️ Dois ou três metadados importantes (coleção e ano, por exemplo). </text:p>
        </text:list-item>
      </text:list>
      <text:list text:style-name="L69">
        <text:list-item>
          <text:p text:style-name="P103">🔵 Botão <text:span text:style-name="Strong_20_Emphasis">Ler Obra</text:span> alinhado ao fundo.</text:p>
        </text:list-item>
      </text:list>
      <text:h text:style-name="P104" text:outline-level="1">Objetivo do Sprint 3</text:h>
      <text:p text:style-name="P105">A seção <text:span text:style-name="Strong_20_Emphasis">"Obras em destaque"</text:span> deverá ser preenchida automaticamente.</text:p>
      <text:p text:style-name="P105">Em vez de escrevermos:</text:p>
      <text:section text:style-name="Sect1" text:name="Seção3">
        <text:p text:style-name="P106"><text:bookmark text:name="code-block-viewer Copia 2"/><text:span text:style-name="Source_20_Text">&lt;article class="book-card"&gt;</text:span></text:p>
        <text:p text:style-name="P107"><text:span text:style-name="Source_20_Text">...</text:span></text:p>
        <text:p text:style-name="P107"><text:span text:style-name="Source_20_Text">&lt;/article&gt;</text:span></text:p>
      </text:section>
      <text:p text:style-name="P105">o HTML ficará apenas com o container.</text:p>
      <text:section text:style-name="Sect1" text:name="Seção4">
        <text:p text:style-name="P106"><text:bookmark text:name="code-block-viewer Copia 3"/><text:soft-page-break/><text:span text:style-name="Source_20_Text">&lt;section class="featured-books"&gt;</text:span></text:p>
        <text:p text:style-name="P107"/>
        <text:p text:style-name="P107"><text:span text:style-name="Source_20_Text"><text:s text:c="4"/>&lt;div class="container"&gt;</text:span></text:p>
        <text:p text:style-name="P107"/>
        <text:p text:style-name="P107"><text:span text:style-name="Source_20_Text"><text:s text:c="8"/>&lt;div class="section-header"&gt;</text:span></text:p>
        <text:p text:style-name="P107"/>
        <text:p text:style-name="P107"><text:span text:style-name="Source_20_Text"><text:s text:c="12"/>&lt;h2&gt;Obras em destaque&lt;/h2&gt;</text:span></text:p>
        <text:p text:style-name="P107"/>
        <text:p text:style-name="P107"><text:span text:style-name="Source_20_Text"><text:s text:c="12"/>&lt;div class="slider-controls"&gt;</text:span></text:p>
        <text:p text:style-name="P107"/>
        <text:p text:style-name="P107"><text:span text:style-name="Source_20_Text"><text:s text:c="16"/>&lt;button class="slider-button slider-prev"&gt;</text:span></text:p>
        <text:p text:style-name="P107"><text:span text:style-name="Source_20_Text"><text:s text:c="20"/>←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6"/>&lt;button class="slider-button slider-next"&gt;</text:span></text:p>
        <text:p text:style-name="P107"><text:span text:style-name="Source_20_Text"><text:s text:c="20"/>→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8"/>&lt;div class="books-slider"&gt;</text:span></text:p>
        <text:p text:style-name="P107"/>
        <text:p text:style-name="P107"><text:span text:style-name="Source_20_Text"><text:s text:c="12"/>&lt;div class="books-track"&gt;</text:span></text:p>
        <text:p text:style-name="P107"/>
        <text:p text:style-name="P107"><text:span text:style-name="Source_20_Text"><text:s text:c="16"/>&lt;!-- JavaScript renderiza aqui --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4"/>&lt;/div&gt;</text:span></text:p>
        <text:p text:style-name="P107"/>
        <text:p text:style-name="P107"><text:span text:style-name="Source_20_Text">&lt;/section&gt;</text:span></text:p>
      </text:section>
      <text:p text:style-name="P108"/>
      <text:h text:style-name="P109" text:outline-level="1"><text:soft-page-break/>Arquitetura</text:h>
      <text:p text:style-name="P105">Vamos criar um ficheiro próprio.</text:p>
      <text:section text:style-name="Sect1" text:name="Seção5">
        <text:p text:style-name="P106"><text:bookmark text:name="code-block-viewer Copia 4"/><text:span text:style-name="Source_20_Text">assets/js/</text:span></text:p>
        <text:p text:style-name="P107"/>
        <text:p text:style-name="P107"><text:span text:style-name="Source_20_Text">home.js</text:span></text:p>
      </text:section>
      <text:p text:style-name="P105">Ele será responsável apenas pela Home.</text:p>
      <text:p text:style-name="P108"/>
      <text:h text:style-name="P109" text:outline-level="1">O fluxo será</text:h>
      <text:section text:style-name="Sect1" text:name="Seção6">
        <text:p text:style-name="P106"><text:bookmark text:name="code-block-viewer Copia 5"/><text:span text:style-name="Source_20_Text">index.html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home.j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Service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.json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renderizar card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slider.js</text:span></text:p>
      </text:section>
      <text:p text:style-name="P105">Repara que <text:span text:style-name="Strong_20_Emphasis">slider.js</text:span> deixa de criar os cards.</text:p>
      <text:p text:style-name="P105">Ele apenas faz deslizar.</text:p>
      <text:p text:style-name="P105">Essa separação é muito importante.</text:p>
      <text:p text:style-name="P108"/>
      <text:h text:style-name="P109" text:outline-level="1"><text:soft-page-break/>O home.js ficará responsável por</text:h>
      <text:list text:style-name="L70">
        <text:list-item>
          <text:p text:style-name="P110">carregar livros </text:p>
        </text:list-item>
        <text:list-item>
          <text:p text:style-name="P110">selecionar os destaques </text:p>
        </text:list-item>
        <text:list-item>
          <text:p text:style-name="P110">criar os cards </text:p>
        </text:list-item>
        <text:list-item>
          <text:p text:style-name="P111">inserir no <text:span text:style-name="Source_20_Text">.books-track</text:span> </text:p>
        </text:list-item>
      </text:list>
      <text:p text:style-name="P105">Depois:</text:p>
      <text:section text:style-name="Sect1" text:name="Seção7">
        <text:p text:style-name="P106"><text:bookmark text:name="code-block-viewer Copia 6"/><text:span text:style-name="Source_20_Text">new Slider(".featured-books");</text:span></text:p>
      </text:section>
      <text:p text:style-name="P108"/>
      <text:h text:style-name="P109" text:outline-level="1">Como escolher os destaques?</text:h>
      <text:p text:style-name="P105">Temos várias opções.</text:p>
      <text:h text:style-name="P112" text:outline-level="2">Opção 1</text:h>
      <text:p text:style-name="P105">Mostrar os primeiros livros.</text:p>
      <text:section text:style-name="Sect1" text:name="Seção8">
        <text:p text:style-name="P106"><text:bookmark text:name="code-block-viewer Copia 7"/><text:span text:style-name="Source_20_Text">const destaques = livros.slice(0,6);</text:span></text:p>
      </text:section>
      <text:p text:style-name="P108"/>
      <text:h text:style-name="P112" text:outline-level="2">Opção 2 (a melhor)</text:h>
      <text:p text:style-name="P105">Adicionar um campo no JSON.</text:p>
      <text:section text:style-name="Sect1" text:name="Seção9">
        <text:p text:style-name="P106"><text:bookmark text:name="code-block-viewer Copia 8"/><text:span text:style-name="Source_20_Text">{</text:span></text:p>
        <text:p text:style-name="P107"><text:span text:style-name="Source_20_Text"><text:s text:c="4"/>"id":"apj-001",</text:span></text:p>
        <text:p text:style-name="P107"><text:span text:style-name="Source_20_Text"><text:s text:c="4"/>"titulo":"Apócrifo de João",</text:span></text:p>
        <text:p text:style-name="P107"/>
        <text:p text:style-name="P107"><text:span text:style-name="Source_20_Text"><text:s text:c="4"/>"destaque":true</text:span></text:p>
        <text:p text:style-name="P107"><text:span text:style-name="Source_20_Text">}</text:span></text:p>
      </text:section>
      <text:p text:style-name="P105">Depois:</text:p>
      <text:section text:style-name="Sect1" text:name="Seção10">
        <text:p text:style-name="P106"><text:bookmark text:name="code-block-viewer Copia 9"/><text:span text:style-name="Source_20_Text">const destaques =</text:span></text:p>
        <text:p text:style-name="P107"><text:span text:style-name="Source_20_Text">livros.filter(</text:span></text:p>
        <text:p text:style-name="P107"><text:span text:style-name="Source_20_Text"><text:s text:c="4"/>livro =&gt; livro.destaque</text:span></text:p>
        <text:p text:style-name="P107"><text:span text:style-name="Source_20_Text">);</text:span></text:p>
      </text:section>
      <text:p text:style-name="P105">Assim podes controlar quais aparecem na Home.</text:p>
      <text:p text:style-name="P105">Eu faria desta forma.</text:p>
      <text:p text:style-name="P108"/>
      <text:h text:style-name="P109" text:outline-level="1">O card da Home</text:h>
      <text:p text:style-name="P105">Não deve ser igual ao card da Biblioteca.</text:p>
      <text:p text:style-name="P105"><text:soft-page-break/>Na Home queremos algo compacto.</text:p>
      <text:section text:style-name="Sect1" text:name="Seção11">
        <text:p text:style-name="P106"><text:bookmark text:name="code-block-viewer Copia 10"/><text:span text:style-name="Source_20_Text">┌──────────────────────┐</text:span></text:p>
        <text:p text:style-name="P107"><text:span text:style-name="Source_20_Text">│ <text:s text:c="6"/>CAPA <text:s text:c="10"/>│</text:span></text:p>
        <text:p text:style-name="P107"><text:span text:style-name="Source_20_Text">│ <text:s text:c="21"/>│</text:span></text:p>
        <text:p text:style-name="P107"><text:span text:style-name="Source_20_Text">├──────────────────────┤</text:span></text:p>
        <text:p text:style-name="P107"><text:span text:style-name="Source_20_Text">│ Apócrifo de João <text:s text:c="4"/>│</text:span></text:p>
        <text:p text:style-name="P107"><text:span text:style-name="Source_20_Text">│ <text:s text:c="21"/>│</text:span></text:p>
        <text:p text:style-name="P107"><text:span text:style-name="Source_20_Text">│ Cosmologia Gnóstica <text:s/>│</text:span></text:p>
        <text:p text:style-name="P107"><text:span text:style-name="Source_20_Text">│ <text:s text:c="21"/>│</text:span></text:p>
        <text:p text:style-name="P107"><text:span text:style-name="Source_20_Text">│ Ler obra <text:s text:c="12"/>│</text:span></text:p>
        <text:p text:style-name="P107"><text:span text:style-name="Source_20_Text">└──────────────────────┘</text:span></text:p>
      </text:section>
      <text:p text:style-name="P105">Enquanto na Biblioteca mostramos mais informações.</text:p>
      <text:p text:style-name="P108"/>
      <text:h text:style-name="P109" text:outline-level="1">Organização</text:h>
      <text:p text:style-name="P105">Ficará assim:</text:p>
      <text:section text:style-name="Sect1" text:name="Seção12">
        <text:p text:style-name="P106"><text:bookmark text:name="code-block-viewer Copia 11"/><text:span text:style-name="Source_20_Text">assets/js</text:span></text:p>
        <text:p text:style-name="P107"/>
        <text:p text:style-name="P107"><text:span text:style-name="Source_20_Text">home.js</text:span></text:p>
        <text:p text:style-name="P107"><text:span text:style-name="Source_20_Text">biblioteca.js</text:span></text:p>
        <text:p text:style-name="P107"><text:span text:style-name="Source_20_Text">leitura.js</text:span></text:p>
        <text:p text:style-name="P107"><text:span text:style-name="Source_20_Text">slider.js</text:span></text:p>
      </text:section>
      <text:p text:style-name="P105">Cada página possui o seu próprio controlador.</text:p>
      <text:p text:style-name="P105">É exatamente assim que projetos profissionais costumam ser organizados.</text:p>
      <text:p text:style-name="P108"/>
      <text:h text:style-name="P112" text:outline-level="2">Plano do Sprint 3</text:h>
      <text:p text:style-name="P105">Vamos dividir em três pequenas etapas:</text:p>
      <text:h text:style-name="P113" text:outline-level="3"><text:bookmark-start text:name="__DdeLink__9775_883439581"/>✅ Etapa 1</text:h>
      <text:p text:style-name="P105">Criar o <text:span text:style-name="Source_20_Text">home.js</text:span> e renderizar automaticamente os livros em destaque.<text:bookmark-end text:name="__DdeLink__9775_883439581"/></text:p>
      <text:h text:style-name="P114" text:outline-level="2">O próximo passo</text:h>
      <text:p text:style-name="P105">Agora vamos criar um <text:span text:style-name="Strong_20_Emphasis"><text:span text:style-name="Source_20_Text">home.js</text:span></text:span><text:span text:style-name="Strong_20_Emphasis"> muito simples</text:span>, com cerca de 40 linhas, apenas para:</text:p>
      <text:list text:style-name="L71">
        <text:list-item>
          <text:p text:style-name="P115">Carregar o <text:span text:style-name="Source_20_Text">livros.json</text:span>. </text:p>
        </text:list-item>
        <text:list-item>
          <text:p text:style-name="P115">Filtrar os livros marcados com <text:span text:style-name="Source_20_Text">"destaque": true</text:span>. </text:p>
        </text:list-item>
        <text:list-item>
          <text:p text:style-name="P115">Criar os cards. </text:p>
        </text:list-item>
        <text:list-item>
          <text:p text:style-name="P116"><text:soft-page-break/>Inseri-los na <text:span text:style-name="Source_20_Text">.books-track</text:span>. </text:p>
        </text:list-item>
      </text:list>
      <text:p text:style-name="P105">Só depois ligaremos o <text:span text:style-name="Source_20_Text">slider.js</text:span>.</text:p>
      <text:p text:style-name="P105">Essa ordem vai deixar o desenvolvimento muito mais simples e facilitar a depuração caso apareça algum problema.</text:p>
      <text:p text:style-name="P105"/>
      <text:h text:style-name="P113" text:outline-level="3">✅ Etapa 2</text:h>
      <text:p text:style-name="P105">Integrar o <text:span text:style-name="Source_20_Text">slider.js</text:span> para navegar pelos cards.</text:p>
      <text:h text:style-name="P113" text:outline-level="3">✅ Etapa 3</text:h>
      <text:p text:style-name="P105">Tornar o slider totalmente responsivo (1, 2, 3 ou 4 cards conforme a largura da tela).</text:p>
      <text:p text:style-name="P105">Excelente. Na verdade, nós já começamos essa arquitetura sem perceber.</text:p>
      <text:p text:style-name="P105">Hoje o projeto já possui:</text:p>
      <text:section text:style-name="Sect1" text:name="Seção13">
        <text:p text:style-name="P106"><text:bookmark text:name="code-block-viewer Copia 12"/><text:span text:style-name="Source_20_Text">assets/</text:span></text:p>
        <text:p text:style-name="P107"><text:span text:style-name="Source_20_Text">│</text:span></text:p>
        <text:p text:style-name="P107"><text:span text:style-name="Source_20_Text">├── dados/</text:span></text:p>
        <text:p text:style-name="P107"><text:span text:style-name="Source_20_Text">│ <text:s text:c="2"/>├── livros/</text:span></text:p>
        <text:p text:style-name="P10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/</text:span></text:p>
        <text:p text:style-name="P107"><text:span text:style-name="Source_20_Text">│ <text:s text:c="2"/>├── services/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└── leitur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biblioteca.js</text:span></text:p>
        <text:p text:style-name="P107"><text:span text:style-name="Source_20_Text">│ <text:s text:c="2"/>├── home.js</text:span></text:p>
        <text:p text:style-name="P107"><text:span text:style-name="Source_20_Text">│ <text:s text:c="2"/>├── leitura.js</text:span></text:p>
        <text:p text:style-name="P107"><text:span text:style-name="Source_20_Text">│ <text:s text:c="2"/>├── menu.js</text:span></text:p>
        <text:p text:style-name="P107"><text:span text:style-name="Source_20_Text">│ <text:s text:c="2"/>├── slider.js</text:span></text:p>
        <text:p text:style-name="P107"><text:span text:style-name="Source_20_Text">│ <text:s text:c="2"/>├── navigation.js</text:span></text:p>
        <text:p text:style-name="P107"><text:span text:style-name="Source_20_Text">│ <text:s text:c="2"/>└── componentes.js</text:span></text:p>
      </text:section>
      <text:p text:style-name="P105">Ou seja, já saímos daquele modelo onde todo o JavaScript ficava em um único arquivo.</text:p>
      <text:p text:style-name="P105">Mas ainda falta dar o passo que transforma isso em uma arquitetura realmente escalável.</text:p>
      <text:p text:style-name="P108"/>
      <text:h text:style-name="P109" text:outline-level="1">O objetivo da Fase 4</text:h>
      <text:p text:style-name="P105">Não é adicionar funcionalidades.</text:p>
      <text:p text:style-name="P105"><text:soft-page-break/>É organizar o projeto para que, quando tivermos <text:span text:style-name="Strong_20_Emphasis">100 livros, favoritos, login, comentários, pesquisa avançada e APIs</text:span>, nada precise ser reescrito.</text:p>
      <text:p text:style-name="P108"/>
      <text:h text:style-name="P109" text:outline-level="1">A arquitetura que eu faria</text:h>
      <text:section text:style-name="Sect1" text:name="Seção14">
        <text:p text:style-name="P106"><text:bookmark text:name="code-block-viewer Copia 13"/><text:span text:style-name="Source_20_Text">assets</text:span></text:p>
        <text:p text:style-name="P107"><text:span text:style-name="Source_20_Text">│</text:span></text:p>
        <text:p text:style-name="P107"><text:span text:style-name="Source_20_Text">├── dados</text:span></text:p>
        <text:p text:style-name="P107"><text:span text:style-name="Source_20_Text">│ <text:s text:c="2"/>├── livros</text:span></text:p>
        <text:p text:style-name="P11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</text:span></text:p>
        <text:p text:style-name="P107"><text:span text:style-name="Source_20_Text">│</text:span></text:p>
        <text:p text:style-name="P107"><text:span text:style-name="Source_20_Text">│ <text:s text:c="2"/>├── core</text:span></text:p>
        <text:p text:style-name="P107"><text:span text:style-name="Source_20_Text">│ <text:s text:c="2"/>│ <text:s text:c="2"/>├── app.js</text:span></text:p>
        <text:p text:style-name="P107"><text:span text:style-name="Source_20_Text">│ <text:s text:c="2"/>│ <text:s text:c="2"/>├── config.js</text:span></text:p>
        <text:p text:style-name="P107"><text:span text:style-name="Source_20_Text">│ <text:s text:c="2"/>│ <text:s text:c="2"/>├── router.js</text:span></text:p>
        <text:p text:style-name="P107"><text:span text:style-name="Source_20_Text">│ <text:s text:c="2"/>│ <text:s text:c="2"/>└── storage.js</text:span></text:p>
        <text:p text:style-name="P117"><text:span text:style-name="Source_20_Text"><text:span text:style-name="T2">| <text:s text:c="2"/>| <text:s text:c="2"/>|__ mai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services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├── leituraService.js</text:span></text:p>
        <text:p text:style-name="P107"><text:span text:style-name="Source_20_Text">│ <text:s text:c="2"/>│ <text:s text:c="2"/>├── favoritosService.js</text:span></text:p>
        <text:p text:style-name="P107"><text:span text:style-name="Source_20_Text">│ <text:s text:c="2"/>│ <text:s text:c="2"/>└── pesquis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components</text:span></text:p>
        <text:p text:style-name="P107"><text:span text:style-name="Source_20_Text">│ <text:s text:c="2"/>│ <text:s text:c="2"/>├── slider.js</text:span></text:p>
        <text:p text:style-name="P107"><text:span text:style-name="Source_20_Text">│ <text:s text:c="2"/>│ <text:s text:c="2"/>├── cardLivro.js</text:span></text:p>
        <text:p text:style-name="P107"><text:span text:style-name="Source_20_Text">│ <text:s text:c="2"/>│ <text:s text:c="2"/>├── modal.js</text:span></text:p>
        <text:p text:style-name="P107"><text:span text:style-name="Source_20_Text">│ <text:s text:c="2"/>│ <text:s text:c="2"/>├── menu.js</text:span></text:p>
        <text:p text:style-name="P107"><text:bookmark-start text:name="__DdeLink__9852_2210137533"/><text:span text:style-name="Source_20_Text">│ <text:s text:c="2"/>│ <text:s text:c="2"/>└── pagination.js</text:span><text:bookmark-end text:name="__DdeLink__9852_2210137533"/></text:p>
        <text:p text:style-name="P117"><text:span text:style-name="Source_20_Text">│ <text:s text:c="2"/>│ <text:s text:c="2"/>└── </text:span><text:span text:style-name="Source_20_Text"><text:span text:style-name="T2">navigatio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pages</text:span></text:p>
        <text:p text:style-name="P107"><text:span text:style-name="Source_20_Text">│ <text:s text:c="2"/>│ <text:s text:c="2"/>├── home.js</text:span></text:p>
        <text:p text:style-name="P107"><text:span text:style-name="Source_20_Text">│ <text:s text:c="2"/>│ <text:s text:c="2"/>├── biblioteca.js</text:span></text:p>
        <text:p text:style-name="P107"><text:soft-page-break/><text:span text:style-name="Source_20_Text">│ <text:s text:c="2"/>│ <text:s text:c="2"/>├── leitura.js</text:span></text:p>
        <text:p text:style-name="P107"><text:span text:style-name="Source_20_Text">│ <text:s text:c="2"/>│ <text:s text:c="2"/>├── comunidade.js</text:span></text:p>
        <text:p text:style-name="P107"><text:span text:style-name="Source_20_Text">│ <text:s text:c="2"/>│ <text:s text:c="2"/>└── perfil.js</text:span></text:p>
        <text:p text:style-name="P107"><text:span text:style-name="Source_20_Text">│ <text:s text:c="2"/>│</text:span></text:p>
        <text:p text:style-name="P107"><text:span text:style-name="Source_20_Text">│ <text:s text:c="2"/>├── utils</text:span></text:p>
        <text:p text:style-name="P107"><text:span text:style-name="Source_20_Text">│ <text:s text:c="2"/>│ <text:s text:c="2"/>├── dom.js</text:span></text:p>
        <text:p text:style-name="P107"><text:span text:style-name="Source_20_Text">│ <text:s text:c="2"/>│ <text:s text:c="2"/>├── format.js</text:span></text:p>
        <text:p text:style-name="P107"><text:span text:style-name="Source_20_Text">│ <text:s text:c="2"/>│ <text:s text:c="2"/>├── helpers.js</text:span></text:p>
        <text:p text:style-name="P107"><text:bookmark-start text:name="__DdeLink__9854_2210137533"/><text:span text:style-name="Source_20_Text">│ <text:s text:c="2"/>│ <text:s text:c="2"/>└── validators.js</text:span><text:bookmark-end text:name="__DdeLink__9854_2210137533"/></text:p>
        <text:p text:style-name="P117"><text:span text:style-name="Source_20_Text">│ <text:s text:c="2"/>│ <text:s text:c="2"/>└── </text:span><text:span text:style-name="Source_20_Text"><text:span text:style-name="T2">utils</text:span></text:span><text:span text:style-name="Source_20_Text">.js</text:span></text:p>
      </text:section>
      <text:p text:style-name="P105">Essa é praticamente a estrutura utilizada em aplicações JavaScript profissionais.</text:p>
      <text:p text:style-name="P108"/>
      <text:h text:style-name="P109" text:outline-level="1">O que cada pasta faz</text:h>
      <text:h text:style-name="P112" text:outline-level="2">core</text:h>
      <text:p text:style-name="P105">Inicialização do sistema.</text:p>
      <text:section text:style-name="Sect1" text:name="Seção15">
        <text:p text:style-name="P106"><text:bookmark text:name="code-block-viewer Copia 14"/><text:span text:style-name="Source_20_Text">core/</text:span></text:p>
      </text:section>
      <text:p text:style-name="P105">Exemplo</text:p>
      <text:section text:style-name="Sect1" text:name="Seção16">
        <text:p text:style-name="P106"><text:bookmark text:name="code-block-viewer Copia 15"/><text:span text:style-name="Source_20_Text">app.js</text:span></text:p>
      </text:section>
      <text:p text:style-name="P105">inicia todo o projeto.</text:p>
      <text:p text:style-name="P108"/>
      <text:h text:style-name="P112" text:outline-level="2">services</text:h>
      <text:p text:style-name="P105">Responsável pelos dados.</text:p>
      <text:p text:style-name="P105">Hoje já temos.</text:p>
      <text:section text:style-name="Sect1" text:name="Seção17">
        <text:p text:style-name="P106"><text:bookmark text:name="code-block-viewer Copia 16"/><text:span text:style-name="Source_20_Text">LivrosService</text:span></text:p>
        <text:p text:style-name="P107"/>
        <text:p text:style-name="P107"><text:span text:style-name="Source_20_Text">LeituraService</text:span></text:p>
      </text:section>
      <text:p text:style-name="P105">Mais tarde teremos</text:p>
      <text:section text:style-name="Sect1" text:name="Seção18">
        <text:p text:style-name="P106"><text:bookmark text:name="code-block-viewer Copia 17"/><text:span text:style-name="Source_20_Text">FavoritosService</text:span></text:p>
        <text:p text:style-name="P107"/>
        <text:p text:style-name="P107"><text:span text:style-name="Source_20_Text">UsuarioService</text:span></text:p>
        <text:p text:style-name="P107"/>
        <text:p text:style-name="P107"><text:span text:style-name="Source_20_Text">PesquisaService</text:span></text:p>
      </text:section>
      <text:p text:style-name="P108"/>
      <text:h text:style-name="P112" text:outline-level="2"><text:soft-page-break/>components</text:h>
      <text:p text:style-name="P105">Tudo que pode ser reutilizado.</text:p>
      <text:p text:style-name="P105">Hoje temos</text:p>
      <text:section text:style-name="Sect1" text:name="Seção19">
        <text:p text:style-name="P106"><text:bookmark text:name="code-block-viewer Copia 18"/><text:span text:style-name="Source_20_Text">Slider</text:span></text:p>
        <text:p text:style-name="P107"/>
        <text:p text:style-name="P107"><text:span text:style-name="Source_20_Text">Menu</text:span></text:p>
      </text:section>
      <text:p text:style-name="P105">Depois teremos</text:p>
      <text:section text:style-name="Sect1" text:name="Seção20">
        <text:p text:style-name="P106"><text:bookmark text:name="code-block-viewer Copia 19"/><text:span text:style-name="Source_20_Text">CardLivro</text:span></text:p>
        <text:p text:style-name="P107"/>
        <text:p text:style-name="P107"><text:span text:style-name="Source_20_Text">Toast</text:span></text:p>
        <text:p text:style-name="P107"/>
        <text:p text:style-name="P107"><text:span text:style-name="Source_20_Text">Modal</text:span></text:p>
        <text:p text:style-name="P107"/>
        <text:p text:style-name="P107"><text:span text:style-name="Source_20_Text">Paginação</text:span></text:p>
        <text:p text:style-name="P107"/>
        <text:p text:style-name="P107"><text:span text:style-name="Source_20_Text">Tabs</text:span></text:p>
        <text:p text:style-name="P107"/>
        <text:p text:style-name="P107"><text:span text:style-name="Source_20_Text">Accordion</text:span></text:p>
      </text:section>
      <text:p text:style-name="P108"/>
      <text:h text:style-name="P112" text:outline-level="2">pages</text:h>
      <text:p text:style-name="P105">Cada página possui seu controlador.</text:p>
      <text:section text:style-name="Sect1" text:name="Seção21">
        <text:p text:style-name="P106"><text:bookmark text:name="code-block-viewer Copia 20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5">Sem misturar lógica.</text:p>
      <text:p text:style-name="P108"/>
      <text:h text:style-name="P112" text:outline-level="2">utils</text:h>
      <text:p text:style-name="P105">Funções auxiliares.</text:p>
      <text:p text:style-name="P105">Por exemplo</text:p>
      <text:section text:style-name="Sect1" text:name="Seção22">
        <text:p text:style-name="P106"><text:bookmark text:name="code-block-viewer Copia 21"/><text:span text:style-name="Source_20_Text">formatarData()</text:span></text:p>
        <text:p text:style-name="P107"/>
        <text:p text:style-name="P107"><text:span text:style-name="Source_20_Text">escapeHTML()</text:span></text:p>
        <text:p text:style-name="P107"><text:soft-page-break/></text:p>
        <text:p text:style-name="P107"><text:span text:style-name="Source_20_Text">criarElemento()</text:span></text:p>
        <text:p text:style-name="P107"/>
        <text:p text:style-name="P107"><text:span text:style-name="Source_20_Text">debounce()</text:span></text:p>
        <text:p text:style-name="P107"/>
        <text:p text:style-name="P107"><text:span text:style-name="Source_20_Text">throttle()</text:span></text:p>
      </text:section>
      <text:p text:style-name="P108"/>
      <text:h text:style-name="P109" text:outline-level="1">O que devemos fazer agora</text:h>
      <text:p text:style-name="P105">Como ainda estamos no começo, eu <text:span text:style-name="Strong_20_Emphasis">não moveria tudo de uma vez</text:span>. Em vez disso, faria uma reorganização gradual.</text:p>
      <text:h text:style-name="P113" text:outline-level="3">Passo 1</text:h>
      <text:p text:style-name="P105">Criar:</text:p>
      <text:section text:style-name="Sect1" text:name="Seção23">
        <text:p text:style-name="P106"><text:bookmark text:name="code-block-viewer Copia 22"/><text:span text:style-name="Source_20_Text">assets/js/pages</text:span></text:p>
      </text:section>
      <text:p text:style-name="P105">e mover</text:p>
      <text:section text:style-name="Sect1" text:name="Seção24">
        <text:p text:style-name="P106"><text:bookmark text:name="code-block-viewer Copia 23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8"/>
      <text:h text:style-name="P113" text:outline-level="3">Passo 2</text:h>
      <text:p text:style-name="P105">Criar</text:p>
      <text:section text:style-name="Sect1" text:name="Seção25">
        <text:p text:style-name="P106"><text:bookmark text:name="code-block-viewer Copia 24"/><text:span text:style-name="Source_20_Text">assets/js/components</text:span></text:p>
      </text:section>
      <text:p text:style-name="P105">Mover</text:p>
      <text:section text:style-name="Sect1" text:name="Seção26">
        <text:p text:style-name="P106"><text:bookmark text:name="code-block-viewer Copia 25"/><text:span text:style-name="Source_20_Text">slider.js</text:span></text:p>
        <text:p text:style-name="P107"/>
        <text:p text:style-name="P107"><text:span text:style-name="Source_20_Text">menu.js</text:span></text:p>
      </text:section>
      <text:p text:style-name="P108"/>
      <text:h text:style-name="P113" text:outline-level="3">Passo 3</text:h>
      <text:p text:style-name="P105">Criar</text:p>
      <text:section text:style-name="Sect1" text:name="Seção27">
        <text:p text:style-name="P106"><text:bookmark text:name="code-block-viewer Copia 26"/><text:span text:style-name="Source_20_Text">assets/js/core</text:span></text:p>
      </text:section>
      <text:p text:style-name="P105">e colocar</text:p>
      <text:section text:style-name="Sect1" text:name="Seção28">
        <text:p text:style-name="P106"><text:bookmark text:name="code-block-viewer Copia 27"/><text:span text:style-name="Source_20_Text">app.js</text:span></text:p>
      </text:section>
      <text:p text:style-name="P108"/>
      <text:h text:style-name="P113" text:outline-level="3"><text:soft-page-break/>Passo 4</text:h>
      <text:p text:style-name="P105">Criar</text:p>
      <text:section text:style-name="Sect1" text:name="Seção29">
        <text:p text:style-name="P106"><text:bookmark text:name="code-block-viewer Copia 28"/><text:span text:style-name="Source_20_Text">assets/js/utils</text:span></text:p>
      </text:section>
      <text:p text:style-name="P105">Mover</text:p>
      <text:section text:style-name="Sect1" text:name="Seção30">
        <text:p text:style-name="P106"><text:bookmark text:name="code-block-viewer Copia 29"/><text:span text:style-name="Source_20_Text">utils.js</text:span></text:p>
      </text:section>
      <text:p text:style-name="P108"/>
      <text:h text:style-name="P109" text:outline-level="1">Resultado</text:h>
      <text:p text:style-name="P105">Ao final da Fase 4, seu projeto deixará de parecer um conjunto de scripts independentes e passará a ter uma arquitetura em camadas, semelhante à usada em projetos profissionais. Isso facilitará muito a evolução para as próximas fases do roadmap, quando adicionarmos autenticação, favoritos, comunidade, APIs e outras funcionalidades sem precisar reorganizar tudo novamente.</text:p>
      <text:p text:style-name="P105">Essa organização será uma base sólida para o restante do desenvolvimento da <text:span text:style-name="Strong_20_Emphasis">Biblioteca Apócrifa</text:span>.</text:p>
      <text:h text:style-name="P118" text:outline-level="3">O próximo objetivo</text:h>
      <text:p text:style-name="P105">Agora que a arquitetura está definida, eu faria uma refatoração importante: mover toda a lógica de criação dos cards para <text:span text:style-name="Source_20_Text">components/cardLivro.js</text:span>. Assim, <text:span text:style-name="Source_20_Text">home.js</text:span>, <text:span text:style-name="Source_20_Text">biblioteca.js</text:span> e, futuramente, <text:span text:style-name="Source_20_Text">favoritos.js</text:span> apenas chamariam a mesma função para renderizar livros, evitando duplicação de código e facilitando a manutenção.</text:p>
      <text:h text:style-name="P119" text:outline-level="1">📖 Manual de Arquitetura da Biblioteca Apócrifa</text:h>
      <text:h text:style-name="P120" text:outline-level="2">Capítulo 1 — Visão Geral do Projeto</text:h>
      <text:list text:style-name="L72">
        <text:list-item>
          <text:p text:style-name="P121">Objetivo da Biblioteca Apócrifa </text:p>
        </text:list-item>
        <text:list-item>
          <text:p text:style-name="P121">Tecnologias utilizadas </text:p>
        </text:list-item>
        <text:list-item>
          <text:p text:style-name="P121">Filosofia do projeto </text:p>
        </text:list-item>
        <text:list-item>
          <text:p text:style-name="P122">Organização geral </text:p>
        </text:list-item>
      </text:list>
      <text:p text:style-name="P123"/>
      <text:h text:style-name="P120" text:outline-level="2">Capítulo 2 — Estrutura do Projeto</text:h>
      <text:p text:style-name="P124">Árvore completa</text:p>
      <text:section text:style-name="Sect1" text:name="Seção31">
        <text:p text:style-name="P125"><text:bookmark text:name="code-block-viewer Copia 30"/><text:span text:style-name="Source_20_Text">assets/</text:span></text:p>
        <text:p text:style-name="P126"><text:span text:style-name="Source_20_Text">componentes/</text:span></text:p>
        <text:p text:style-name="P126"><text:span text:style-name="Source_20_Text">docs/</text:span></text:p>
        <text:p text:style-name="P126"><text:span text:style-name="Source_20_Text">paginas/</text:span></text:p>
        <text:p text:style-name="P126"><text:span text:style-name="Source_20_Text">...</text:span></text:p>
      </text:section>
      <text:p text:style-name="P124">Explicação de cada pasta.</text:p>
      <text:p text:style-name="P123"><text:soft-page-break/></text:p>
      <text:h text:style-name="P120" text:outline-level="2">Capítulo 3 — Arquitetura JavaScript</text:h>
      <text:p text:style-name="P124">Explicação completa de</text:p>
      <text:section text:style-name="Sect1" text:name="Seção32">
        <text:p text:style-name="P125"><text:bookmark text:name="code-block-viewer Copia 31"/><text:span text:style-name="Source_20_Text">core/</text:span></text:p>
        <text:p text:style-name="P126"><text:span text:style-name="Source_20_Text">services/</text:span></text:p>
        <text:p text:style-name="P126"><text:span text:style-name="Source_20_Text">layouts/</text:span></text:p>
        <text:p text:style-name="P126"><text:span text:style-name="Source_20_Text">components/</text:span></text:p>
        <text:p text:style-name="P126"><text:span text:style-name="Source_20_Text">pages/</text:span></text:p>
        <text:p text:style-name="P126"><text:span text:style-name="Source_20_Text">utils/</text:span></text:p>
      </text:section>
      <text:p text:style-name="P123"/>
      <text:h text:style-name="P120" text:outline-level="2">Capítulo 4 — Responsabilidade de cada arquivo</text:h>
      <text:p text:style-name="P124">Por exemplo</text:p>
      <text:h text:style-name="P127" text:outline-level="3">LivrosService.js</text:h>
      <text:p text:style-name="P124">Responsabilidade</text:p>
      <text:p text:style-name="P124">Nunca deve renderizar HTML.</text:p>
      <text:p text:style-name="P124">Deve apenas carregar livros.</text:p>
      <text:p text:style-name="P124">Métodos</text:p>
      <text:section text:style-name="Sect1" text:name="Seção33">
        <text:p text:style-name="P125"><text:bookmark text:name="code-block-viewer Copia 32"/><text:span text:style-name="Source_20_Text">carregar()</text:span></text:p>
        <text:p text:style-name="P126"/>
        <text:p text:style-name="P126"><text:span text:style-name="Source_20_Text">getTodos()</text:span></text:p>
        <text:p text:style-name="P126"/>
        <text:p text:style-name="P126"><text:span text:style-name="Source_20_Text">getPorId()</text:span></text:p>
      </text:section>
      <text:p text:style-name="P123"/>
      <text:h text:style-name="P127" text:outline-level="3">Home.js</text:h>
      <text:p text:style-name="P124">Responsabilidade</text:p>
      <text:p text:style-name="P124">Renderizar a Home.</text:p>
      <text:p text:style-name="P124">Nunca carregar JSON diretamente.</text:p>
      <text:p text:style-name="P124">Sempre utilizar Services.</text:p>
      <text:p text:style-name="P123"/>
      <text:h text:style-name="P127" text:outline-level="3">CardLivro.js</text:h>
      <text:p text:style-name="P124">Responsabilidade</text:p>
      <text:p text:style-name="P124">Criar um card.</text:p>
      <text:p text:style-name="P124">Receber um objeto Livro.</text:p>
      <text:p text:style-name="P124"><text:soft-page-break/>Nunca acessar o DOM da página.</text:p>
      <text:p text:style-name="P123"/>
      <text:p text:style-name="P124">E assim por diante.</text:p>
      <text:p text:style-name="P123"/>
      <text:h text:style-name="P120" text:outline-level="2">Capítulo 5 — Fluxo da aplicação</text:h>
      <text:p text:style-name="P124">Algo como</text:p>
      <text:section text:style-name="Sect1" text:name="Seção34">
        <text:p text:style-name="P125"><text:bookmark text:name="code-block-viewer Copia 33"/><text:span text:style-name="Source_20_Text">Home</text:span></text:p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LivrosService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JSON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CardLivro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DOM</text:span></text:p>
      </text:section>
      <text:p text:style-name="P124">Depois outro diagrama</text:p>
      <text:section text:style-name="Sect1" text:name="Seção35">
        <text:p text:style-name="P125"><text:bookmark text:name="code-block-viewer Copia 34"/><text:span text:style-name="Source_20_Text">Biblioteca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Pesquisa</text:span></text:p>
        <text:p text:style-name="P126"><text:soft-page-break/></text:p>
        <text:p text:style-name="P126"><text:span text:style-name="Source_20_Text"><text:s text:c="6"/>│</text:span></text:p>
        <text:p text:style-name="P126"/>
        <text:p text:style-name="P126"><text:span text:style-name="Source_20_Text">Filtro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LivrosService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Cards</text:span></text:p>
      </text:section>
      <text:p text:style-name="P123"/>
      <text:h text:style-name="P120" text:outline-level="2">Capítulo 6 — Convenções</text:h>
      <text:p text:style-name="P124">Como nomear</text:p>
      <text:p text:style-name="P124">Pastas</text:p>
      <text:p text:style-name="P124">Arquivos</text:p>
      <text:p text:style-name="P124">Classes</text:p>
      <text:p text:style-name="P124">Funções</text:p>
      <text:p text:style-name="P124">Variáveis</text:p>
      <text:p text:style-name="P124">IDs</text:p>
      <text:p text:style-name="P124">Classes CSS</text:p>
      <text:p text:style-name="P124">Exemplo</text:p>
      <text:section text:style-name="Sect1" text:name="Seção36">
        <text:p text:style-name="P125"><text:bookmark text:name="code-block-viewer Copia 35"/><text:span text:style-name="Source_20_Text">criarCardLivro()</text:span></text:p>
        <text:p text:style-name="P126"/>
        <text:p text:style-name="P126"><text:span text:style-name="Source_20_Text">renderizarLivros()</text:span></text:p>
        <text:p text:style-name="P126"/>
        <text:p text:style-name="P126"><text:span text:style-name="Source_20_Text">buscarLivro()</text:span></text:p>
      </text:section>
      <text:p text:style-name="P124">Nunca</text:p>
      <text:section text:style-name="Sect1" text:name="Seção37">
        <text:p text:style-name="P125"><text:bookmark text:name="code-block-viewer Copia 36"/><text:span text:style-name="Source_20_Text">abc()</text:span></text:p>
        <text:p text:style-name="P126"/>
        <text:p text:style-name="P126"><text:span text:style-name="Source_20_Text">teste()</text:span></text:p>
        <text:p text:style-name="P126"/>
        <text:p text:style-name="P126"><text:span text:style-name="Source_20_Text">funcao1()</text:span></text:p>
      </text:section>
      <text:p text:style-name="P123"/>
      <text:h text:style-name="P120" text:outline-level="2"><text:soft-page-break/>Capítulo 7 — Componentes</text:h>
      <text:p text:style-name="P124">Cada componente terá uma ficha.</text:p>
      <text:p text:style-name="P124">Por exemplo</text:p>
      <text:h text:style-name="P127" text:outline-level="3">Slider</text:h>
      <text:p text:style-name="P124">Responsabilidade</text:p>
      <text:p text:style-name="P124">Entradas</text:p>
      <text:p text:style-name="P124">Saídas</text:p>
      <text:p text:style-name="P124">Eventos</text:p>
      <text:p text:style-name="P124">Exemplo de uso</text:p>
      <text:p text:style-name="P123"/>
      <text:h text:style-name="P127" text:outline-level="3">Menu</text:h>
      <text:p text:style-name="P124">Responsabilidade</text:p>
      <text:p text:style-name="P124">Eventos</text:p>
      <text:p text:style-name="P124">Classes CSS utilizadas</text:p>
      <text:p text:style-name="P123"/>
      <text:h text:style-name="P127" text:outline-level="3">CardLivro</text:h>
      <text:p text:style-name="P124">Campos obrigatórios</text:p>
      <text:p text:style-name="P124">Campos opcionais</text:p>
      <text:p text:style-name="P124">Exemplo</text:p>
      <text:p text:style-name="P123"/>
      <text:h text:style-name="P120" text:outline-level="2">Capítulo 8 — Estrutura dos JSON</text:h>
      <text:p text:style-name="P124">Livro Resumido</text:p>
      <text:p text:style-name="P124">Livro Completo</text:p>
      <text:p text:style-name="P124">Capítulos</text:p>
      <text:p text:style-name="P124">Conteúdo</text:p>
      <text:p text:style-name="P124">Exegese</text:p>
      <text:p text:style-name="P124">Referências</text:p>
      <text:p text:style-name="P124">Coleções</text:p>
      <text:p text:style-name="P124">Tudo documentado.</text:p>
      <text:p text:style-name="P123"/>
      <text:h text:style-name="P120" text:outline-level="2">Capítulo 9 — Guia para adicionar um novo livro</text:h>
      <text:p text:style-name="P124">Passo 1</text:p>
      <text:p text:style-name="P124"><text:soft-page-break/>Converter HTML</text:p>
      <text:p text:style-name="P124">↓</text:p>
      <text:p text:style-name="P124">Passo 2</text:p>
      <text:p text:style-name="P124">Validar JSON</text:p>
      <text:p text:style-name="P124">↓</text:p>
      <text:p text:style-name="P124">Passo 3</text:p>
      <text:p text:style-name="P124">Salvar</text:p>
      <text:p text:style-name="P124">↓</text:p>
      <text:p text:style-name="P124">Passo 4</text:p>
      <text:p text:style-name="P124">Atualizar livros.json</text:p>
      <text:p text:style-name="P124">↓</text:p>
      <text:p text:style-name="P124">Passo 5</text:p>
      <text:p text:style-name="P124">Testar Biblioteca</text:p>
      <text:p text:style-name="P124">↓</text:p>
      <text:p text:style-name="P124">Passo 6</text:p>
      <text:p text:style-name="P124">Testar Home</text:p>
      <text:p text:style-name="P124">↓</text:p>
      <text:p text:style-name="P124">Passo 7</text:p>
      <text:p text:style-name="P124">Testar Área de Leitura</text:p>
      <text:p text:style-name="P123"/>
      <text:h text:style-name="P120" text:outline-level="2">Capítulo 10 — Boas práticas</text:h>
      <text:p text:style-name="P124">O que fazer</text:p>
      <text:p text:style-name="P124">O que evitar</text:p>
      <text:p text:style-name="P124">Como escrever código</text:p>
      <text:p text:style-name="P124">Como organizar arquivos</text:p>
      <text:p text:style-name="P124">Como comentar</text:p>
      <text:p text:style-name="P124">Como documentar</text:p>
      <text:p text:style-name="P123"/>
      <text:h text:style-name="P120" text:outline-level="2">Capítulo 11 — Roadmap</text:h>
      <text:p text:style-name="P124">Registrar tudo que já fizemos.</text:p>
      <text:p text:style-name="P124">Fase 1</text:p>
      <text:p text:style-name="P124">✔</text:p>
      <text:p text:style-name="P124"><text:soft-page-break/>Fase 2</text:p>
      <text:p text:style-name="P124">✔</text:p>
      <text:p text:style-name="P124">Fase 3</text:p>
      <text:p text:style-name="P124">✔</text:p>
      <text:p text:style-name="P124">Fase 4</text:p>
      <text:p text:style-name="P124">✔</text:p>
      <text:p text:style-name="P124">Fase 5</text:p>
      <text:p text:style-name="P124">...</text:p>
      <text:p text:style-name="P123"/>
      <text:h text:style-name="P120" text:outline-level="2">Capítulo 12 — Histórico das decisões arquiteturais</text:h>
      <text:p text:style-name="P124">Este é um capítulo que muitos projetos não têm, mas faz muita diferença.</text:p>
      <text:p text:style-name="P124">Nele registramos <text:span text:style-name="Strong_20_Emphasis">por que</text:span> determinadas decisões foram tomadas. Por exemplo:</text:p>
      <text:list text:style-name="L73">
        <text:list-item>
          <text:p text:style-name="P128">Por que usamos <text:span text:style-name="Source_20_Text">services</text:span> para acessar os dados. </text:p>
        </text:list-item>
        <text:list-item>
          <text:p text:style-name="P128">Por que centralizamos a renderização dos cards em <text:span text:style-name="Source_20_Text">cardLivro.js</text:span>. </text:p>
        </text:list-item>
        <text:list-item>
          <text:p text:style-name="P128">Por que escolhemos JSON em vez de HTML estático. </text:p>
        </text:list-item>
        <text:list-item>
          <text:p text:style-name="P128">Por que separamos <text:span text:style-name="Source_20_Text">layouts</text:span> de <text:span text:style-name="Source_20_Text">components</text:span>. </text:p>
        </text:list-item>
        <text:list-item>
          <text:p text:style-name="P129">Quando uma decisão mudou e qual foi o motivo. </text:p>
        </text:list-item>
      </text:list>
      <text:p text:style-name="P124">Isso ajuda muito quando o projeto evolui ou quando você precisa retomar uma parte meses depois.</text:p>
      <text:p text:style-name="P123"/>
      <text:h text:style-name="P120" text:outline-level="2">O formato do manual</text:h>
      <text:p text:style-name="P124">Eu faria esse manual com aparência de documentação técnica profissional, incluindo:</text:p>
      <text:list text:style-name="L74">
        <text:list-item>
          <text:p text:style-name="P130">Capa. </text:p>
        </text:list-item>
        <text:list-item>
          <text:p text:style-name="P130">Índice automático. </text:p>
        </text:list-item>
        <text:list-item>
          <text:p text:style-name="P130">Diagramas de arquitetura. </text:p>
        </text:list-item>
        <text:list-item>
          <text:p text:style-name="P130">Fluxogramas. </text:p>
        </text:list-item>
        <text:list-item>
          <text:p text:style-name="P130">Árvores de diretórios. </text:p>
        </text:list-item>
        <text:list-item>
          <text:p text:style-name="P130">Exemplos de código. </text:p>
        </text:list-item>
        <text:list-item>
          <text:p text:style-name="P130">Observações e boas práticas. </text:p>
        </text:list-item>
        <text:list-item>
          <text:p text:style-name="P131">Histórico de alterações. </text:p>
        </text:list-item>
      </text:list>
      <text:p text:style-name="P124">O resultado seria um documento de aproximadamente <text:span text:style-name="Strong_20_Emphasis">40 a 60 páginas</text:span>, que serviria como a documentação oficial da <text:span text:style-name="Strong_20_Emphasis">Biblioteca Apócrifa</text:span> durante todo o desenvolvimento.</text:p>
      <text:p text:style-name="P124">Na minha opinião, vale a pena construí-lo <text:span text:style-name="Strong_20_Emphasis">junto com o projeto</text:span>. A cada etapa concluída, atualizamos o manual. Assim, ele nunca fica desatualizado e passa a ser uma referência técnica fiel da arquitetura e das decisões do projeto.</text:p>
      <text:p text:style-name="P132">Sim. E eu faria algo ainda melhor.</text:p>
      <text:p text:style-name="P124"><text:soft-page-break/>Em vez de criar apenas um PDF estático, vamos criar um <text:span text:style-name="Strong_20_Emphasis">Manual Técnico Oficial da Biblioteca Apócrifa</text:span> que será mantido durante todo o projeto. Sempre que terminarmos uma fase do roadmap, atualizamos esse documento. No final, ele será praticamente um livro técnico do projeto.</text:p>
      <text:h text:style-name="P120" text:outline-level="2">Minha proposta</text:h>
      <text:p text:style-name="P124">Criar uma pasta própria para documentação.</text:p>
      <text:section text:style-name="Sect1" text:name="Seção38">
        <text:p text:style-name="P125"><text:bookmark text:name="code-block-viewer Copia 37"/><text:span text:style-name="Source_20_Text">Biblioteca-Apocrifa</text:span></text:p>
        <text:p text:style-name="P126"><text:span text:style-name="Source_20_Text">│</text:span></text:p>
        <text:p text:style-name="P126"><text:span text:style-name="Source_20_Text">├── assets/</text:span></text:p>
        <text:p text:style-name="P126"><text:span text:style-name="Source_20_Text">├── componentes/</text:span></text:p>
        <text:p text:style-name="P126"><text:span text:style-name="Source_20_Text">├── paginas/</text:span></text:p>
        <text:p text:style-name="P126"><text:span text:style-name="Source_20_Text">│</text:span></text:p>
        <text:p text:style-name="P126"><text:span text:style-name="Source_20_Text">├── docs/</text:span></text:p>
        <text:p text:style-name="P126"><text:span text:style-name="Source_20_Text">│ <text:s text:c="2"/>├── Manual_Arquitetura_Biblioteca_Apocrifa.pdf</text:span></text:p>
        <text:p text:style-name="P126"><text:span text:style-name="Source_20_Text">│ <text:s text:c="2"/>├── Roadmap.pdf</text:span></text:p>
        <text:p text:style-name="P126"><text:span text:style-name="Source_20_Text">│ <text:s text:c="2"/>├── Estrutura_JSON.pdf</text:span></text:p>
        <text:p text:style-name="P126"><text:span text:style-name="Source_20_Text">│ <text:s text:c="2"/>├── Componentes.pdf</text:span></text:p>
        <text:p text:style-name="P126"><text:span text:style-name="Source_20_Text">│ <text:s text:c="2"/>├── Convencoes.pdf</text:span></text:p>
        <text:p text:style-name="P126"><text:span text:style-name="Source_20_Text">│ <text:s text:c="2"/>└── CHANGELOG.md</text:span></text:p>
        <text:p text:style-name="P126"><text:span text:style-name="Source_20_Text">│</text:span></text:p>
        <text:p text:style-name="P126"><text:span text:style-name="Source_20_Text">├── README.md</text:span></text:p>
        <text:p text:style-name="P126"><text:span text:style-name="Source_20_Text">└── index.html</text:span></text:p>
      </text:section>
      <text:p text:style-name="P124">Observe que o manual passa a fazer parte do projeto.</text:p>
      <text:p text:style-name="P123"/>
      <text:h text:style-name="P133" text:outline-level="1">Índice do Manual</text:h>
      <text:p text:style-name="P124">Eu já deixaria o índice praticamente fechado.</text:p>
      <text:h text:style-name="P120" text:outline-level="2">Capa</text:h>
      <text:p text:style-name="P124">Biblioteca Apócrifa</text:p>
      <text:p text:style-name="P124">Manual Técnico de Arquitetura</text:p>
      <text:p text:style-name="P124">Versão</text:p>
      <text:p text:style-name="P124">Data</text:p>
      <text:p text:style-name="P124">Autor</text:p>
      <text:p text:style-name="P123"/>
      <text:h text:style-name="P120" text:outline-level="2"><text:soft-page-break/>Capítulo 1</text:h>
      <text:p text:style-name="P124">Apresentação do projeto</text:p>
      <text:list text:style-name="L75">
        <text:list-item>
          <text:p text:style-name="P134">Objetivo </text:p>
        </text:list-item>
        <text:list-item>
          <text:p text:style-name="P134">Público </text:p>
        </text:list-item>
        <text:list-item>
          <text:p text:style-name="P134">Tecnologias </text:p>
        </text:list-item>
        <text:list-item>
          <text:p text:style-name="P135">Filosofia </text:p>
        </text:list-item>
      </text:list>
      <text:p text:style-name="P123"/>
      <text:h text:style-name="P120" text:outline-level="2">Capítulo 2</text:h>
      <text:p text:style-name="P124">Arquitetura Geral</text:p>
      <text:p text:style-name="P124">Árvore completa do projeto.</text:p>
      <text:p text:style-name="P124">Explicação de cada pasta.</text:p>
      <text:p text:style-name="P123"/>
      <text:h text:style-name="P120" text:outline-level="2">Capítulo 3</text:h>
      <text:p text:style-name="P124">Arquitetura JavaScript</text:p>
      <text:section text:style-name="Sect1" text:name="Seção39">
        <text:p text:style-name="P125"><text:bookmark text:name="code-block-viewer Copia 38"/><text:span text:style-name="Source_20_Text">core</text:span></text:p>
        <text:p text:style-name="P126"><text:span text:style-name="Source_20_Text">services</text:span></text:p>
        <text:p text:style-name="P126"><text:span text:style-name="Source_20_Text">layouts</text:span></text:p>
        <text:p text:style-name="P126"><text:span text:style-name="Source_20_Text">components</text:span></text:p>
        <text:p text:style-name="P126"><text:span text:style-name="Source_20_Text">pages</text:span></text:p>
        <text:p text:style-name="P126"><text:span text:style-name="Source_20_Text">utils</text:span></text:p>
      </text:section>
      <text:p text:style-name="P124">Responsabilidade de cada uma.</text:p>
      <text:p text:style-name="P123"/>
      <text:h text:style-name="P120" text:outline-level="2">Capítulo 4</text:h>
      <text:p text:style-name="P124">Fluxo da aplicação</text:p>
      <text:p text:style-name="P124">Diagramas.</text:p>
      <text:p text:style-name="P124">Por exemplo</text:p>
      <text:section text:style-name="Sect1" text:name="Seção40">
        <text:p text:style-name="P125"><text:bookmark text:name="code-block-viewer Copia 39"/><text:span text:style-name="Source_20_Text">Página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Page Controller</text:span></text:p>
        <text:p text:style-name="P126"/>
        <text:p text:style-name="P126"><text:span text:style-name="Source_20_Text">↓</text:span></text:p>
        <text:p text:style-name="P126"/>
        <text:p text:style-name="P126"><text:soft-page-break/><text:span text:style-name="Source_20_Text">Service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JSON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Component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DOM</text:span></text:p>
      </text:section>
      <text:p text:style-name="P123"/>
      <text:h text:style-name="P120" text:outline-level="2">Capítulo 5</text:h>
      <text:p text:style-name="P124">Padrões do Projeto</text:p>
      <text:p text:style-name="P124">Como escrever</text:p>
      <text:p text:style-name="P124">HTML</text:p>
      <text:p text:style-name="P124">CSS</text:p>
      <text:p text:style-name="P124">JavaScript</text:p>
      <text:p text:style-name="P124">JSON</text:p>
      <text:p text:style-name="P123"/>
      <text:h text:style-name="P120" text:outline-level="2">Capítulo 6</text:h>
      <text:p text:style-name="P124">Componentes</text:p>
      <text:p text:style-name="P124">Cada componente terá uma ficha.</text:p>
      <text:p text:style-name="P124">Slider</text:p>
      <text:p text:style-name="P124">Menu</text:p>
      <text:p text:style-name="P124">Navbar</text:p>
      <text:p text:style-name="P124">Footer</text:p>
      <text:p text:style-name="P124">Header</text:p>
      <text:p text:style-name="P124">CardLivro</text:p>
      <text:p text:style-name="P124">Modal</text:p>
      <text:p text:style-name="P124">Paginação</text:p>
      <text:p text:style-name="P123"/>
      <text:h text:style-name="P120" text:outline-level="2"><text:soft-page-break/>Capítulo 7</text:h>
      <text:p text:style-name="P124">Services</text:p>
      <text:p text:style-name="P124">Cada Service documentado.</text:p>
      <text:p text:style-name="P123"/>
      <text:h text:style-name="P120" text:outline-level="2">Capítulo 8</text:h>
      <text:p text:style-name="P124">Estrutura JSON</text:p>
      <text:p text:style-name="P124">Livro resumido</text:p>
      <text:p text:style-name="P124">Livro completo</text:p>
      <text:p text:style-name="P124">Capítulo</text:p>
      <text:p text:style-name="P124">Parágrafo</text:p>
      <text:p text:style-name="P124">Exegese</text:p>
      <text:p text:style-name="P124">Referências</text:p>
      <text:p text:style-name="P124">Coleções</text:p>
      <text:p text:style-name="P123"/>
      <text:h text:style-name="P120" text:outline-level="2">Capítulo 9</text:h>
      <text:p text:style-name="P124">Fluxo de criação de um livro</text:p>
      <text:p text:style-name="P124">Conversor</text:p>
      <text:p text:style-name="P124">↓</text:p>
      <text:p text:style-name="P124">Validação</text:p>
      <text:p text:style-name="P124">↓</text:p>
      <text:p text:style-name="P124">Livro JSON</text:p>
      <text:p text:style-name="P124">↓</text:p>
      <text:p text:style-name="P124">livros.json</text:p>
      <text:p text:style-name="P124">↓</text:p>
      <text:p text:style-name="P124">Biblioteca</text:p>
      <text:p text:style-name="P124">↓</text:p>
      <text:p text:style-name="P124">Home</text:p>
      <text:p text:style-name="P124">↓</text:p>
      <text:p text:style-name="P124">Área de Leitura</text:p>
      <text:p text:style-name="P123"/>
      <text:h text:style-name="P120" text:outline-level="2"><text:soft-page-break/>Capítulo 10</text:h>
      <text:p text:style-name="P124">Boas práticas</text:p>
      <text:p text:style-name="P124">Nomenclatura</text:p>
      <text:p text:style-name="P124">Comentários</text:p>
      <text:p text:style-name="P124">Organização</text:p>
      <text:p text:style-name="P124">Performance</text:p>
      <text:p text:style-name="P124">Acessibilidade</text:p>
      <text:p text:style-name="P124">Responsividade</text:p>
      <text:p text:style-name="P123"/>
      <text:h text:style-name="P120" text:outline-level="2">Capítulo 11</text:h>
      <text:p text:style-name="P124">Roadmap</text:p>
      <text:p text:style-name="P124">Todas as fases.</text:p>
      <text:p text:style-name="P124">Com data.</text:p>
      <text:p text:style-name="P124">Status.</text:p>
      <text:p text:style-name="P123"/>
      <text:h text:style-name="P120" text:outline-level="2">Capítulo 12</text:h>
      <text:p text:style-name="P124">Histórico arquitetural</text:p>
      <text:p text:style-name="P124">Por que as decisões foram tomadas.</text:p>
      <text:p text:style-name="P123"/>
      <text:h text:style-name="P133" text:outline-level="1">Um arquivo que vale ouro</text:h>
      <text:p text:style-name="P124">Há um arquivo que considero ainda mais importante do que o PDF.</text:p>
      <text:p text:style-name="P124">Criar na raiz do projeto:</text:p>
      <text:section text:style-name="Sect1" text:name="Seção41">
        <text:p text:style-name="P125"><text:bookmark text:name="code-block-viewer Copia 40"/><text:span text:style-name="Source_20_Text">ARCHITECTURE.md</text:span></text:p>
      </text:section>
      <text:p text:style-name="P124">Esse arquivo será o "cérebro" da aplicação.</text:p>
      <text:p text:style-name="P124">Nele documentamos decisões como:</text:p>
      <text:section text:style-name="Sect1" text:name="Seção42">
        <text:p text:style-name="P125"><text:bookmark text:name="code-block-viewer Copia 41"/><text:span text:style-name="Source_20_Text"># 12/07/2026</text:span></text:p>
        <text:p text:style-name="P126"/>
        <text:p text:style-name="P126"><text:span text:style-name="Source_20_Text">Foi criado o LivrosService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Centralizar toda leitura do JSON.</text:span></text:p>
        <text:p text:style-name="P126"><text:soft-page-break/></text:p>
        <text:p text:style-name="P126"><text:span text:style-name="Source_20_Text">---</text:span></text:p>
        <text:p text:style-name="P126"/>
        <text:p text:style-name="P126"><text:span text:style-name="Source_20_Text"># 15/07/2026</text:span></text:p>
        <text:p text:style-name="P126"/>
        <text:p text:style-name="P126"><text:span text:style-name="Source_20_Text">Foi criado CardLivro.js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Eliminar duplicação entre Home e Biblioteca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 20/07/2026</text:span></text:p>
        <text:p text:style-name="P126"/>
        <text:p text:style-name="P126"><text:span text:style-name="Source_20_Text">Foi criada a pasta layouts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Separar componentes estruturais dos reutilizáveis.</text:span></text:p>
      </text:section>
      <text:p text:style-name="P124">Esse histórico é extremamente útil quando o projeto cresce, pois registra não apenas <text:span text:style-name="Strong_20_Emphasis">o que</text:span> foi feito, mas <text:span text:style-name="Strong_20_Emphasis">por que</text:span> foi feito.</text:p>
      <text:h text:style-name="P120" text:outline-level="2">Minha recomendação</text:h>
      <text:p text:style-name="P124">Em vez de manter apenas um PDF, eu estruturaria a documentação em uma pasta <text:span text:style-name="Source_20_Text">docs/</text:span> com documentos específicos e um <text:span text:style-name="Source_20_Text">ARCHITECTURE.md</text:span> na raiz para registrar as decisões arquiteturais. O PDF serviria como a versão consolidada e mais agradável para consulta, enquanto os arquivos Markdown seriam atualizados continuamente ao longo do desenvolvimento. Assim, sua documentação evolui junto com a Biblioteca Apócrifa e permanece sempre útil e atualizada.</text:p>
      <text:p text:style-name="P132">Excelente. A partir de agora, vamos tratar a <text:span text:style-name="Strong_20_Emphasis">Biblioteca Apócrifa</text:span> como um software profissional. Isso significa que, além do código, teremos uma documentação técnica que evolui junto com o projeto.</text:p>
      <text:h text:style-name="P120" text:outline-level="2">Estrutura da documentação</text:h>
      <text:p text:style-name="P124">Primeiro, crie esta pasta na raiz do projeto:</text:p>
      <text:section text:style-name="Sect1" text:name="Seção43">
        <text:p text:style-name="P125"><text:bookmark text:name="code-block-viewer Copia 42"/><text:span text:style-name="Source_20_Text">Biblioteca-Apocrifa/</text:span></text:p>
        <text:p text:style-name="P126"><text:span text:style-name="Source_20_Text">│</text:span></text:p>
        <text:p text:style-name="P126"><text:span text:style-name="Source_20_Text">├── assets/</text:span></text:p>
        <text:p text:style-name="P126"><text:soft-page-break/><text:span text:style-name="Source_20_Text">├── componentes/</text:span></text:p>
        <text:p text:style-name="P126"><text:span text:style-name="Source_20_Text">├── paginas/</text:span></text:p>
        <text:p text:style-name="P126"><text:span text:style-name="Source_20_Text">├── docs/</text:span></text:p>
        <text:p text:style-name="P126"><text:span text:style-name="Source_20_Text">│ <text:s text:c="2"/>├── Manual_Arquitetura.md</text:span></text:p>
        <text:p text:style-name="P126"><text:span text:style-name="Source_20_Text">│ <text:s text:c="2"/>├── Roadmap.md</text:span></text:p>
        <text:p text:style-name="P126"><text:span text:style-name="Source_20_Text">│ <text:s text:c="2"/>├── Estrutura_JSON.md</text:span></text:p>
        <text:p text:style-name="P126"><text:span text:style-name="Source_20_Text">│ <text:s text:c="2"/>├── Componentes.md</text:span></text:p>
        <text:p text:style-name="P126"><text:span text:style-name="Source_20_Text">│ <text:s text:c="2"/>├── Convencoes.md</text:span></text:p>
        <text:p text:style-name="P126"><text:span text:style-name="Source_20_Text">│ <text:s text:c="2"/>└── CHANGELOG.md</text:span></text:p>
        <text:p text:style-name="P126"><text:span text:style-name="Source_20_Text">│</text:span></text:p>
        <text:p text:style-name="P126"><text:span text:style-name="Source_20_Text">├── ARCHITECTURE.md</text:span></text:p>
        <text:p text:style-name="P126"><text:span text:style-name="Source_20_Text">├── README.md</text:span></text:p>
        <text:p text:style-name="P126"><text:span text:style-name="Source_20_Text">└── index.html</text:span></text:p>
      </text:section>
      <text:p text:style-name="P136"><text:span text:style-name="Strong_20_Emphasis">Observação:</text:span> vamos escrever tudo em <text:span text:style-name="Strong_20_Emphasis">Markdown (.md)</text:span>. É mais fácil de atualizar durante o desenvolvimento. Depois, quando o projeto estiver mais maduro, geramos a versão em PDF.</text:p>
      <text:p text:style-name="P123"/>
      <text:h text:style-name="P133" text:outline-level="1">Documento 1 — <text:span text:style-name="Source_20_Text">ARCHITECTURE.md</text:span></text:h>
      <text:p text:style-name="P124">Este será o documento mais importante do projeto.</text:p>
      <text:p text:style-name="P124">Escreva exatamente o seguinte:</text:p>
      <text:section text:style-name="Sect1" text:name="Seção44">
        <text:p text:style-name="P125"><text:bookmark text:name="code-block-viewer Copia 43"/><text:span text:style-name="Source_20_Text"># Arquitetura da Biblioteca Apócrifa</text:span></text:p>
        <text:p text:style-name="P126"/>
        <text:p text:style-name="P126"><text:span text:style-name="Source_20_Text">## Objetivo</text:span></text:p>
        <text:p text:style-name="P126"/>
        <text:p text:style-name="P126"><text:span text:style-name="Source_20_Text">Este documento registra todas as decisões arquiteturais tomadas durante o desenvolvimento da Biblioteca Apócrifa.</text:span></text:p>
        <text:p text:style-name="P126"/>
        <text:p text:style-name="P126"><text:span text:style-name="Source_20_Text">Seu objetivo é documentar:</text:span></text:p>
        <text:p text:style-name="P126"/>
        <text:p text:style-name="P126"><text:span text:style-name="Source_20_Text">- a organização do projeto;</text:span></text:p>
        <text:p text:style-name="P126"><text:span text:style-name="Source_20_Text">- a responsabilidade de cada módulo;</text:span></text:p>
        <text:p text:style-name="P126"><text:span text:style-name="Source_20_Text">- as decisões de arquitetura;</text:span></text:p>
        <text:p text:style-name="P126"><text:span text:style-name="Source_20_Text">- as alterações estruturais realizadas ao longo do desenvolvimento.</text:span></text:p>
        <text:p text:style-name="P126"/>
        <text:p text:style-name="P126"><text:span text:style-name="Source_20_Text">---</text:span></text:p>
        <text:p text:style-name="P126"/>
        <text:p text:style-name="P126"><text:soft-page-break/><text:span text:style-name="Source_20_Text"># Histórico Arquitetural</text:span></text:p>
        <text:p text:style-name="P126"/>
        <text:p text:style-name="P126"><text:span text:style-name="Source_20_Text">## Versão 0.1</text:span></text:p>
        <text:p text:style-name="P126"/>
        <text:p text:style-name="P126"><text:span text:style-name="Source_20_Text">### Estrutura inicial</text:span></text:p>
        <text:p text:style-name="P126"/>
        <text:p text:style-name="P126"><text:span text:style-name="Source_20_Text">Foi criada a arquitetura baseada em camadas para separar responsabilidades.</text:span></text:p>
        <text:p text:style-name="P126"/>
        <text:p text:style-name="P126"><text:span text:style-name="Source_20_Text">A estrutura principal ficou organizada em:</text:span></text:p>
        <text:p text:style-name="P126"/>
        <text:p text:style-name="P126"><text:span text:style-name="Source_20_Text">- core</text:span></text:p>
        <text:p text:style-name="P126"><text:span text:style-name="Source_20_Text">- services</text:span></text:p>
        <text:p text:style-name="P126"><text:span text:style-name="Source_20_Text">- layouts</text:span></text:p>
        <text:p text:style-name="P126"><text:span text:style-name="Source_20_Text">- components</text:span></text:p>
        <text:p text:style-name="P126"><text:span text:style-name="Source_20_Text">- pages</text:span></text:p>
        <text:p text:style-name="P126"><text:span text:style-name="Source_20_Text">- utils</text:span></text:p>
        <text:p text:style-name="P126"/>
        <text:p text:style-name="P126"><text:span text:style-name="Source_20_Text">Objetivo:</text:span></text:p>
        <text:p text:style-name="P126"/>
        <text:p text:style-name="P126"><text:span text:style-name="Source_20_Text">- evitar código duplicado;</text:span></text:p>
        <text:p text:style-name="P126"><text:span text:style-name="Source_20_Text">- facilitar manutenção;</text:span></text:p>
        <text:p text:style-name="P126"><text:span text:style-name="Source_20_Text">- permitir crescimento do projet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Services</text:span></text:p>
        <text:p text:style-name="P126"/>
        <text:p text:style-name="P126"><text:span text:style-name="Source_20_Text">Foi criado o LivrosService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Carregar o índice geral de livros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Foi criado o LeituraService.</text:span></text:p>
        <text:p text:style-name="P126"><text:soft-page-break/></text:p>
        <text:p text:style-name="P126"><text:span text:style-name="Source_20_Text">Responsabilidade:</text:span></text:p>
        <text:p text:style-name="P126"/>
        <text:p text:style-name="P126"><text:span text:style-name="Source_20_Text">Carregar o conteúdo completo de um livr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Components</text:span></text:p>
        <text:p text:style-name="P126"/>
        <text:p text:style-name="P126"><text:span text:style-name="Source_20_Text">Foi criado Slider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Renderizar sliders reutilizáveis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Foi criado CardLivro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Renderizar qualquer card de livro utilizado na aplicaçã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Pages</text:span></text:p>
        <text:p text:style-name="P126"/>
        <text:p text:style-name="P126"><text:span text:style-name="Source_20_Text">Cada página possui seu próprio controlador JavaScript.</text:span></text:p>
        <text:p text:style-name="P126"/>
        <text:p text:style-name="P126"><text:span text:style-name="Source_20_Text">Exemplos:</text:span></text:p>
        <text:p text:style-name="P126"/>
        <text:p text:style-name="P126"><text:span text:style-name="Source_20_Text">- home.js</text:span></text:p>
        <text:p text:style-name="P126"><text:span text:style-name="Source_20_Text">- biblioteca.js</text:span></text:p>
        <text:p text:style-name="P126"><text:span text:style-name="Source_20_Text">- leitura.js</text:span></text:p>
        <text:p text:style-name="P126"/>
        <text:p text:style-name="P126"><text:span text:style-name="Source_20_Text">Cada arquivo controla apenas sua página.</text:span></text:p>
        <text:p text:style-name="P126"><text:soft-page-break/></text:p>
        <text:p text:style-name="P126"><text:span text:style-name="Source_20_Text">---</text:span></text:p>
        <text:p text:style-name="P126"/>
        <text:p text:style-name="P126"><text:span text:style-name="Source_20_Text">## Princípios adotados</text:span></text:p>
        <text:p text:style-name="P126"/>
        <text:p text:style-name="P126"><text:span text:style-name="Source_20_Text">Cada arquivo possui uma única responsabilidade.</text:span></text:p>
        <text:p text:style-name="P126"/>
        <text:p text:style-name="P126"><text:span text:style-name="Source_20_Text">Services nunca renderizam HTML.</text:span></text:p>
        <text:p text:style-name="P126"/>
        <text:p text:style-name="P126"><text:span text:style-name="Source_20_Text">Pages nunca acessam diretamente o JSON.</text:span></text:p>
        <text:p text:style-name="P126"/>
        <text:p text:style-name="P126"><text:span text:style-name="Source_20_Text">Components nunca conhecem a página onde estão sendo utilizados.</text:span></text:p>
        <text:p text:style-name="P126"/>
        <text:p text:style-name="P126"><text:span text:style-name="Source_20_Text">Utils apenas auxiliam outras partes da aplicação.</text:span></text:p>
        <text:p text:style-name="P126"/>
        <text:p text:style-name="P126"><text:span text:style-name="Source_20_Text">Toda renderização reutilizável deve ficar em Components.</text:span></text:p>
      </text:section>
      <text:p text:style-name="P123"/>
      <text:h text:style-name="P133" text:outline-level="1">O que faremos depois</text:h>
      <text:p text:style-name="P124">Depois de criar este documento, vamos escrever o <text:span text:style-name="Strong_20_Emphasis">Manual de Arquitetura</text:span>, que será muito mais completo (cerca de 40–60 páginas ao final do projeto). Nele documentaremos toda a estrutura, padrões e fluxo da aplicação.</text:p>
      <text:p text:style-name="P124">Esse manual será atualizado conforme avançarmos no roadmap, tornando-se a documentação oficial da <text:span text:style-name="Strong_20_Emphasis">Biblioteca Apócrifa</text:span>.</text:p>
      <text:h text:style-name="P119" text:outline-level="1">Manual de Arquitetura</text:h>
      <text:h text:style-name="P120" text:outline-level="2">Biblioteca Apócrifa</text:h>
      <text:h text:style-name="P127" text:outline-level="3">Versão</text:h>
      <text:section text:style-name="Sect1" text:name="Seção45">
        <text:p text:style-name="P125"><text:bookmark text:name="code-block-viewer Copia 44"/><text:span text:style-name="Source_20_Text">1.0.0</text:span></text:p>
      </text:section>
      <text:p text:style-name="P123"/>
      <text:h text:style-name="P133" text:outline-level="1">Índice</text:h>
      <text:h text:style-name="P120" text:outline-level="2">Parte I — Introdução</text:h>
      <text:h text:style-name="P127" text:outline-level="3"><text:bookmark-start text:name="__DdeLink__10464_2061558498"/>Capítulo 1 — Sobre o Projeto</text:h>
      <text:list text:style-name="L76">
        <text:list-item>
          <text:p text:style-name="P137">Objetivo </text:p>
        </text:list-item>
        <text:list-item>
          <text:p text:style-name="P137"><text:soft-page-break/>Filosofia </text:p>
        </text:list-item>
        <text:list-item>
          <text:p text:style-name="P137">Público-alvo </text:p>
        </text:list-item>
        <text:list-item>
          <text:p text:style-name="P137">Tecnologias utilizadas </text:p>
        </text:list-item>
        <text:list-item>
          <text:p text:style-name="P138">Estrutura geral <text:bookmark-end text:name="__DdeLink__10464_2061558498"/></text:p>
        </text:list-item>
      </text:list>
      <text:p text:style-name="P123"/>
      <text:h text:style-name="P120" text:outline-level="2">Parte II — Arquitetura</text:h>
      <text:h text:style-name="P127" text:outline-level="3">Capítulo 2 — Arquitetura Geral</text:h>
      <text:p text:style-name="P124">Aqui ficará a árvore completa do projeto.</text:p>
      <text:p text:style-name="P124">Exemplo:</text:p>
      <text:section text:style-name="Sect1" text:name="Seção46">
        <text:p text:style-name="P125"><text:bookmark text:name="code-block-viewer Copia 45"/><text:span text:style-name="Source_20_Text">Biblioteca-Apócrifa</text:span></text:p>
        <text:p text:style-name="P126"><text:span text:style-name="Source_20_Text">│</text:span></text:p>
        <text:p text:style-name="P126"><text:span text:style-name="Source_20_Text">├── assets</text:span></text:p>
        <text:p text:style-name="P126"><text:span text:style-name="Source_20_Text">├── componentes</text:span></text:p>
        <text:p text:style-name="P126"><text:span text:style-name="Source_20_Text">├── paginas</text:span></text:p>
        <text:p text:style-name="P126"><text:span text:style-name="Source_20_Text">├── docs</text:span></text:p>
        <text:p text:style-name="P126"><text:span text:style-name="Source_20_Text">└── index.html</text:span></text:p>
      </text:section>
      <text:p text:style-name="P124">Explicaremos cada pasta.</text:p>
      <text:p text:style-name="P123"/>
      <text:h text:style-name="P127" text:outline-level="3">Capítulo 3 — Arquitetura JavaScript</text:h>
      <text:p text:style-name="P124">Este será um dos maiores capítulos.</text:p>
      <text:p text:style-name="P124">Explicaremos profundamente:</text:p>
      <text:section text:style-name="Sect1" text:name="Seção47">
        <text:p text:style-name="P125"><text:bookmark text:name="code-block-viewer Copia 46"/><text:span text:style-name="Source_20_Text">core</text:span></text:p>
        <text:p text:style-name="P126"><text:span text:style-name="Source_20_Text">services</text:span></text:p>
        <text:p text:style-name="P126"><text:span text:style-name="Source_20_Text">layouts</text:span></text:p>
        <text:p text:style-name="P126"><text:span text:style-name="Source_20_Text">components</text:span></text:p>
        <text:p text:style-name="P126"><text:span text:style-name="Source_20_Text">pages</text:span></text:p>
        <text:p text:style-name="P126"><text:span text:style-name="Source_20_Text">utils</text:span></text:p>
      </text:section>
      <text:p text:style-name="P124">Não apenas "o que são", mas principalmente:</text:p>
      <text:list text:style-name="L77">
        <text:list-item>
          <text:p text:style-name="P139">quando utilizar; </text:p>
        </text:list-item>
        <text:list-item>
          <text:p text:style-name="P139">quando não utilizar; </text:p>
        </text:list-item>
        <text:list-item>
          <text:p text:style-name="P139">exemplos; </text:p>
        </text:list-item>
        <text:list-item>
          <text:p text:style-name="P140">boas práticas. </text:p>
        </text:list-item>
      </text:list>
      <text:p text:style-name="P123"/>
      <text:h text:style-name="P127" text:outline-level="3">Capítulo 4 — Fluxo da Aplicação</text:h>
      <text:p text:style-name="P124">Este capítulo terá diagramas como:</text:p>
      <text:section text:style-name="Sect1" text:name="Seção48">
        <text:p text:style-name="P125"><text:bookmark text:name="code-block-viewer Copia 47"/><text:span text:style-name="Source_20_Text">Página</text:span></text:p>
        <text:p text:style-name="P126"><text:soft-page-break/></text:p>
        <text:p text:style-name="P126"><text:span text:style-name="Source_20_Text">↓</text:span></text:p>
        <text:p text:style-name="P126"/>
        <text:p text:style-name="P126"><text:span text:style-name="Source_20_Text">Page Controller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Service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JSON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Component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DOM</text:span></text:p>
      </text:section>
      <text:p text:style-name="P124">Depois teremos outro fluxo para leitura.</text:p>
      <text:p text:style-name="P124">Outro para pesquisa.</text:p>
      <text:p text:style-name="P124">Outro para favoritos.</text:p>
      <text:p text:style-name="P123"/>
      <text:h text:style-name="P120" text:outline-level="2">Parte III — Estrutura dos Dados</text:h>
      <text:h text:style-name="P127" text:outline-level="3">Capítulo 5 — Organização dos JSON</text:h>
      <text:p text:style-name="P124">Aqui documentaremos:</text:p>
      <text:section text:style-name="Sect1" text:name="Seção49">
        <text:p text:style-name="P125"><text:bookmark text:name="code-block-viewer Copia 48"/><text:span text:style-name="Source_20_Text">livros.json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Livro completo</text:span></text:p>
        <text:p text:style-name="P126"/>
        <text:p text:style-name="P126"><text:span text:style-name="Source_20_Text">↓</text:span></text:p>
        <text:p text:style-name="P126"/>
        <text:p text:style-name="P126"><text:soft-page-break/><text:span text:style-name="Source_20_Text">Capítulos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Conteúdo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Exegese</text:span></text:p>
      </text:section>
      <text:p text:style-name="P124">Também documentaremos cada propriedade.</text:p>
      <text:p text:style-name="P124">Por exemplo:</text:p>
      <text:section text:style-name="Sect1" text:name="Seção50">
        <text:p text:style-name="P125"><text:bookmark text:name="code-block-viewer Copia 49"/><text:span text:style-name="Source_20_Text">titulo</text:span></text:p>
        <text:p text:style-name="P126"/>
        <text:p text:style-name="P126"><text:span text:style-name="Source_20_Text">Descrição:</text:span></text:p>
        <text:p text:style-name="P126"/>
        <text:p text:style-name="P126"><text:span text:style-name="Source_20_Text">Nome oficial da obra.</text:span></text:p>
      </text:section>
      <text:section text:style-name="Sect1" text:name="Seção51">
        <text:p text:style-name="P125"><text:bookmark text:name="code-block-viewer Copia 50"/><text:span text:style-name="Source_20_Text">categoria.principal</text:span></text:p>
        <text:p text:style-name="P126"/>
        <text:p text:style-name="P126"><text:span text:style-name="Source_20_Text">Descrição:</text:span></text:p>
        <text:p text:style-name="P126"/>
        <text:p text:style-name="P126"><text:span text:style-name="Source_20_Text">Categoria principal utilizada nos filtros.</text:span></text:p>
      </text:section>
      <text:p text:style-name="P124">Tudo documentado.</text:p>
      <text:p text:style-name="P123"/>
      <text:h text:style-name="P120" text:outline-level="2">Parte IV — Componentes</text:h>
      <text:h text:style-name="P127" text:outline-level="3">Capítulo 6 — Componentes Reutilizáveis</text:h>
      <text:p text:style-name="P124">Cada componente terá uma ficha.</text:p>
      <text:p text:style-name="P124">Exemplo:</text:p>
      <text:p text:style-name="P123"/>
      <text:h text:style-name="P127" text:outline-level="3">Slider</text:h>
      <text:p text:style-name="P124">Responsabilidade</text:p>
      <text:p text:style-name="P124">Entradas</text:p>
      <text:p text:style-name="P124">Saídas</text:p>
      <text:p text:style-name="P124">Métodos</text:p>
      <text:p text:style-name="P124">Eventos</text:p>
      <text:p text:style-name="P124"><text:soft-page-break/>Classes CSS</text:p>
      <text:p text:style-name="P124">Exemplo de uso</text:p>
      <text:p text:style-name="P123"/>
      <text:h text:style-name="P127" text:outline-level="3">CardLivro</text:h>
      <text:p text:style-name="P124">Responsabilidade</text:p>
      <text:p text:style-name="P124">Estrutura HTML</text:p>
      <text:p text:style-name="P124">Campos obrigatórios</text:p>
      <text:p text:style-name="P124">Campos opcionais</text:p>
      <text:p text:style-name="P124">Exemplo</text:p>
      <text:p text:style-name="P123"/>
      <text:h text:style-name="P127" text:outline-level="3">Menu</text:h>
      <text:p text:style-name="P124">Responsabilidade</text:p>
      <text:p text:style-name="P124">Eventos</text:p>
      <text:p text:style-name="P124">Responsividade</text:p>
      <text:p text:style-name="P124">Fluxo</text:p>
      <text:p text:style-name="P123"/>
      <text:h text:style-name="P120" text:outline-level="2">Parte V — Services</text:h>
      <text:h text:style-name="P127" text:outline-level="3">Capítulo 7</text:h>
      <text:p text:style-name="P124">Cada Service terá uma documentação completa.</text:p>
      <text:p text:style-name="P124">Por exemplo</text:p>
      <text:p text:style-name="P123"/>
      <text:h text:style-name="P127" text:outline-level="3">LivrosService</text:h>
      <text:p text:style-name="P124">Responsabilidade</text:p>
      <text:p text:style-name="P124">Métodos</text:p>
      <text:p text:style-name="P124">Retorno</text:p>
      <text:p text:style-name="P124">Fluxo</text:p>
      <text:p text:style-name="P124">Nunca deve fazer:</text:p>
      <text:list text:style-name="L78">
        <text:list-item>
          <text:p text:style-name="P141">renderização; </text:p>
        </text:list-item>
        <text:list-item>
          <text:p text:style-name="P142">manipulação de DOM. </text:p>
        </text:list-item>
      </text:list>
      <text:p text:style-name="P123"/>
      <text:h text:style-name="P127" text:outline-level="3">LeituraService</text:h>
      <text:p text:style-name="P124">Fluxo</text:p>
      <text:p text:style-name="P124">↓</text:p>
      <text:p text:style-name="P124"><text:soft-page-break/>Busca JSON</text:p>
      <text:p text:style-name="P124">↓</text:p>
      <text:p text:style-name="P124">Retorna Objeto</text:p>
      <text:p text:style-name="P123"/>
      <text:h text:style-name="P120" text:outline-level="2">Parte VI — Pages</text:h>
      <text:h text:style-name="P127" text:outline-level="3">Capítulo 8</text:h>
      <text:p text:style-name="P124">Cada página documentada.</text:p>
      <text:p text:style-name="P124">Home</text:p>
      <text:p text:style-name="P124">Biblioteca</text:p>
      <text:p text:style-name="P124">Leitura</text:p>
      <text:p text:style-name="P124">Comunidade</text:p>
      <text:p text:style-name="P124">Perfil</text:p>
      <text:p text:style-name="P123"/>
      <text:h text:style-name="P120" text:outline-level="2">Parte VII — Convenções</text:h>
      <text:h text:style-name="P127" text:outline-level="3">Capítulo 9</text:h>
      <text:p text:style-name="P124">Como escrever</text:p>
      <text:p text:style-name="P124">HTML</text:p>
      <text:p text:style-name="P124">CSS</text:p>
      <text:p text:style-name="P124">JavaScript</text:p>
      <text:p text:style-name="P124">JSON</text:p>
      <text:p text:style-name="P124">Comentários</text:p>
      <text:p text:style-name="P124">Nomenclatura</text:p>
      <text:p text:style-name="P124">Organização</text:p>
      <text:p text:style-name="P124">Indentação</text:p>
      <text:p text:style-name="P124">Responsabilidade única</text:p>
      <text:p text:style-name="P123"/>
      <text:h text:style-name="P120" text:outline-level="2">Parte VIII — Desenvolvimento</text:h>
      <text:h text:style-name="P127" text:outline-level="3">Capítulo 10</text:h>
      <text:p text:style-name="P124">Como criar um novo livro.</text:p>
      <text:p text:style-name="P124">Fluxograma completo.</text:p>
      <text:p text:style-name="P124">Como criar um novo componente.</text:p>
      <text:p text:style-name="P124"><text:soft-page-break/>Como criar uma nova página.</text:p>
      <text:p text:style-name="P124">Como criar um novo Service.</text:p>
      <text:p text:style-name="P123"/>
      <text:h text:style-name="P120" text:outline-level="2">Parte IX — Histórico</text:h>
      <text:h text:style-name="P127" text:outline-level="3">Capítulo 11</text:h>
      <text:p text:style-name="P124">Mudanças arquiteturais.</text:p>
      <text:p text:style-name="P124">Cada decisão importante ficará registrada.</text:p>
      <text:p text:style-name="P123"/>
      <text:h text:style-name="P120" text:outline-level="2">Parte X — Roadmap</text:h>
      <text:h text:style-name="P127" text:outline-level="3">Capítulo 12</text:h>
      <text:p text:style-name="P124">Todo o roadmap atualizado.</text:p>
      <text:p text:style-name="P124">Fases</text:p>
      <text:p text:style-name="P124">Sprints</text:p>
      <text:p text:style-name="P124">Conclusões</text:p>
      <text:p text:style-name="P124">Próximos passos.</text:p>
      <text:p text:style-name="P123"/>
      <text:h text:style-name="P133" text:outline-level="1">Apêndices</text:h>
      <text:h text:style-name="P120" text:outline-level="2">A</text:h>
      <text:p text:style-name="P124">Glossário</text:p>
      <text:h text:style-name="P120" text:outline-level="2">B</text:h>
      <text:p text:style-name="P124">Estrutura completa do projeto</text:p>
      <text:h text:style-name="P120" text:outline-level="2">C</text:h>
      <text:p text:style-name="P124">Checklist para novos módulos</text:p>
      <text:h text:style-name="P120" text:outline-level="2">D</text:h>
      <text:p text:style-name="P124">Checklist para publicação</text:p>
      <text:h text:style-name="P120" text:outline-level="2">E</text:h>
      <text:p text:style-name="P124">Referências</text:p>
      <text:p text:style-name="P1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7T21:44:21.322324747</dc:date>
    <dc:creator>João António</dc:creator>
    <meta:editing-duration>PT22H11M50S</meta:editing-duration>
    <meta:editing-cycles>34</meta:editing-cycles>
    <meta:generator>LibreOffice/26.2.4.2$Linux_X86_64 LibreOffice_project/620$Build-2</meta:generator>
    <meta:document-statistic meta:table-count="5" meta:image-count="0" meta:object-count="0" meta:page-count="115" meta:paragraph-count="3078" meta:word-count="10493" meta:character-count="79412" meta:non-whitespace-character-count="67991"/>
  </office:meta>
</office:document-meta>
</file>