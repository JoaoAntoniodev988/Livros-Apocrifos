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P89" style:family="paragraph" style:parent-style-name="Text_20_body">
      <style:text-properties officeooo:rsid="0031ce28" officeooo:paragraph-rsid="0031ce28"/>
    </style:style>
    <style:style style:name="P90" style:family="paragraph" style:parent-style-name="Text_20_body">
      <style:text-properties officeooo:rsid="0031ce28"/>
    </style:style>
    <style:style style:name="P91" style:family="paragraph" style:parent-style-name="Preformatted_20_Text">
      <style:paragraph-properties fo:margin-top="0cm" fo:margin-bottom="0.247cm" style:contextual-spacing="false" fo:line-height="115%"/>
      <style:text-properties officeooo:rsid="0031ce28"/>
    </style:style>
    <style:style style:name="P92" style:family="paragraph" style:parent-style-name="Text_20_body" style:list-style-name="L63">
      <style:text-properties officeooo:rsid="0031ce28"/>
    </style:style>
    <style:style style:name="P93" style:family="paragraph" style:parent-style-name="Horizontal_20_Line">
      <style:paragraph-properties fo:margin-top="0cm" fo:margin-bottom="0.247cm" style:contextual-spacing="false" fo:line-height="115%"/>
      <style:text-properties officeooo:rsid="0031ce28"/>
    </style:style>
    <style:style style:name="P94" style:family="paragraph" style:parent-style-name="Heading_20_1">
      <style:paragraph-properties fo:margin-top="0cm" fo:margin-bottom="0.247cm" style:contextual-spacing="false" fo:line-height="115%"/>
      <style:text-properties officeooo:rsid="0031ce28"/>
    </style:style>
    <style:style style:name="P95" style:family="paragraph" style:parent-style-name="Heading_20_3">
      <style:paragraph-properties fo:margin-top="0cm" fo:margin-bottom="0.247cm" style:contextual-spacing="false" fo:line-height="115%"/>
      <style:text-properties officeooo:rsid="0031ce28"/>
    </style:style>
    <style:style style:name="P96" style:family="paragraph" style:parent-style-name="Text_20_body" style:list-style-name="L64">
      <style:text-properties officeooo:rsid="0031ce28"/>
    </style:style>
    <style:style style:name="P97" style:family="paragraph" style:parent-style-name="Heading_20_2">
      <style:paragraph-properties fo:margin-top="0cm" fo:margin-bottom="0.247cm" style:contextual-spacing="false" fo:line-height="115%"/>
      <style:text-properties officeooo:rsid="0031ce28"/>
    </style:style>
    <style:style style:name="P98" style:family="paragraph" style:parent-style-name="Text_20_body">
      <style:text-properties officeooo:rsid="0033dcdd" officeooo:paragraph-rsid="0033dcdd"/>
    </style:style>
    <style:style style:name="P99" style:family="paragraph" style:parent-style-name="Text_20_body" style:list-style-name="L65">
      <style:paragraph-properties fo:margin-top="0cm" fo:margin-bottom="0cm" style:contextual-spacing="false"/>
      <style:text-properties officeooo:rsid="0033dcdd"/>
    </style:style>
    <style:style style:name="P100" style:family="paragraph" style:parent-style-name="Text_20_body" style:list-style-name="L66">
      <style:paragraph-properties fo:margin-top="0cm" fo:margin-bottom="0cm" style:contextual-spacing="false"/>
      <style:text-properties officeooo:rsid="0033dcdd"/>
    </style:style>
    <style:style style:name="P101" style:family="paragraph" style:parent-style-name="Text_20_body" style:list-style-name="L67">
      <style:paragraph-properties fo:margin-top="0cm" fo:margin-bottom="0cm" style:contextual-spacing="false"/>
      <style:text-properties officeooo:rsid="0033dcdd"/>
    </style:style>
    <style:style style:name="P102" style:family="paragraph" style:parent-style-name="Text_20_body" style:list-style-name="L68">
      <style:paragraph-properties fo:margin-top="0cm" fo:margin-bottom="0cm" style:contextual-spacing="false"/>
      <style:text-properties officeooo:rsid="0033dcdd"/>
    </style:style>
    <style:style style:name="P103" style:family="paragraph" style:parent-style-name="Text_20_body" style:list-style-name="L69">
      <style:text-properties officeooo:rsid="0033dcdd"/>
    </style:style>
    <style:style style:name="P104" style:family="paragraph" style:parent-style-name="Heading_20_1">
      <style:text-properties officeooo:rsid="0033dcdd"/>
    </style:style>
    <style:style style:name="P105" style:family="paragraph" style:parent-style-name="Text_20_body">
      <style:text-properties officeooo:rsid="0033dcdd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33dcdd"/>
    </style:style>
    <style:style style:name="P107" style:family="paragraph" style:parent-style-name="Preformatted_20_Text">
      <style:paragraph-properties fo:margin-top="0cm" fo:margin-bottom="0.247cm" style:contextual-spacing="false" fo:line-height="115%"/>
      <style:text-properties officeooo:rsid="0033dcdd"/>
    </style:style>
    <style:style style:name="P108" style:family="paragraph" style:parent-style-name="Horizontal_20_Line">
      <style:paragraph-properties fo:margin-top="0cm" fo:margin-bottom="0.247cm" style:contextual-spacing="false" fo:line-height="115%"/>
      <style:text-properties officeooo:rsid="0033dcdd"/>
    </style:style>
    <style:style style:name="P109" style:family="paragraph" style:parent-style-name="Heading_20_1">
      <style:paragraph-properties fo:margin-top="0cm" fo:margin-bottom="0.247cm" style:contextual-spacing="false" fo:line-height="115%"/>
      <style:text-properties officeooo:rsid="0033dcdd"/>
    </style:style>
    <style:style style:name="P110" style:family="paragraph" style:parent-style-name="Text_20_body" style:list-style-name="L70">
      <style:paragraph-properties fo:margin-top="0cm" fo:margin-bottom="0cm" style:contextual-spacing="false"/>
      <style:text-properties officeooo:rsid="0033dcdd"/>
    </style:style>
    <style:style style:name="P111" style:family="paragraph" style:parent-style-name="Text_20_body" style:list-style-name="L70">
      <style:text-properties officeooo:rsid="0033dcdd"/>
    </style:style>
    <style:style style:name="P112" style:family="paragraph" style:parent-style-name="Heading_20_2">
      <style:paragraph-properties fo:margin-top="0cm" fo:margin-bottom="0.247cm" style:contextual-spacing="false" fo:line-height="115%"/>
      <style:text-properties officeooo:rsid="0033dcdd"/>
    </style:style>
    <style:style style:name="P113" style:family="paragraph" style:parent-style-name="Heading_20_3">
      <style:paragraph-properties fo:margin-top="0cm" fo:margin-bottom="0.247cm" style:contextual-spacing="false" fo:line-height="115%"/>
      <style:text-properties officeooo:rsid="0033dcdd"/>
    </style:style>
    <style:style style:name="P114" style:family="paragraph" style:parent-style-name="Heading_20_2">
      <style:text-properties officeooo:rsid="0033dcdd"/>
    </style:style>
    <style:style style:name="P115" style:family="paragraph" style:parent-style-name="Text_20_body" style:list-style-name="L71">
      <style:paragraph-properties fo:margin-top="0cm" fo:margin-bottom="0cm" style:contextual-spacing="false"/>
      <style:text-properties officeooo:rsid="0033dcdd"/>
    </style:style>
    <style:style style:name="P116" style:family="paragraph" style:parent-style-name="Text_20_body" style:list-style-name="L71">
      <style:text-properties officeooo:rsid="0033dcdd"/>
    </style:style>
    <style:style style:name="P117" style:family="paragraph" style:parent-style-name="Preformatted_20_Text">
      <style:paragraph-properties fo:margin-top="0cm" fo:margin-bottom="0.247cm" style:contextual-spacing="false" fo:line-height="115%"/>
      <style:text-properties officeooo:rsid="0033dcdd" officeooo:paragraph-rsid="003f2fc0"/>
    </style:style>
    <style:style style:name="T1" style:family="text">
      <style:text-properties officeooo:rsid="001ce0e6"/>
    </style:style>
    <style:style style:name="T2" style:family="text">
      <style:text-properties officeooo:rsid="003f2fc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842_2631705103"/><text:bookmark-start text:name="__DdeLink__6425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842_2631705103"/><text:bookmark-end text:name="__DdeLink__6425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89">Perfeito! 🎉 Isso confirma que o <text:span text:style-name="Source_20_Text">LivrosService</text:span> já está a funcionar corretamente.</text:p>
      <text:p text:style-name="P90">O resultado:</text:p>
      <text:p text:style-name="P91"><text:span text:style-name="Source_20_Text">(2) [{...}, {...}]</text:span></text:p>
      <text:p text:style-name="P90">significa que:</text:p>
      <text:list text:style-name="L63">
        <text:list-item>
          <text:p text:style-name="P92">✅ O <text:span text:style-name="Source_20_Text">fetch()</text:span> está correto.</text:p>
        </text:list-item>
        <text:list-item>
          <text:p text:style-name="P92">✅ O <text:span text:style-name="Source_20_Text">livros.json</text:span> está a ser encontrado.</text:p>
        </text:list-item>
        <text:list-item>
          <text:p text:style-name="P92">✅ O JSON está válido.</text:p>
        </text:list-item>
        <text:list-item>
          <text:p text:style-name="P92">✅ Os dados estão a ser convertidos para objetos JavaScript.</text:p>
        </text:list-item>
        <text:list-item>
          <text:p text:style-name="P92">✅ O <text:span text:style-name="Source_20_Text">LivrosService</text:span> está concluído.</text:p>
        </text:list-item>
      </text:list>
      <text:p text:style-name="P90"><text:span text:style-name="Strong_20_Emphasis">Na prática, acabámos de concluir o Sprint 1.</text:span></text:p>
      <text:p text:style-name="P93"/>
      <text:h text:style-name="P94" text:outline-level="1">O que já foi implementado</text:h>
      <text:h text:style-name="P95" text:outline-level="3">✔ Estrutura de dados</text:h>
      <text:p text:style-name="P91"><text:span text:style-name="Source_20_Text">assets/</text:span></text:p>
      <text:p text:style-name="P91"><text:span text:style-name="Source_20_Text">│</text:span></text:p>
      <text:p text:style-name="P91"><text:span text:style-name="Source_20_Text">├── dados/</text:span></text:p>
      <text:p text:style-name="P91"><text:span text:style-name="Source_20_Text">│ <text:s text:c="2"/>├── livros.json</text:span></text:p>
      <text:p text:style-name="P91"><text:span text:style-name="Source_20_Text">│ <text:s text:c="2"/>└── livros/</text:span></text:p>
      <text:p text:style-name="P91"><text:span text:style-name="Source_20_Text">│</text:span></text:p>
      <text:p text:style-name="P91"><text:span text:style-name="Source_20_Text">├── js/</text:span></text:p>
      <text:p text:style-name="P91"><text:span text:style-name="Source_20_Text">│ <text:s text:c="2"/>└── services/</text:span></text:p>
      <text:p text:style-name="P91"><text:span text:style-name="Source_20_Text">│ <text:s text:c="6"/>└── LivrosService.js</text:span></text:p>
      <text:p text:style-name="P93"/>
      <text:h text:style-name="P95" text:outline-level="3">✔ LivrosService</text:h>
      <text:p text:style-name="P90">Ele já consegue:</text:p>
      <text:list text:style-name="L64">
        <text:list-item>
          <text:p text:style-name="P96">carregar o JSON</text:p>
        </text:list-item>
        <text:list-item>
          <text:p text:style-name="P96">devolver um array de livros</text:p>
        </text:list-item>
        <text:list-item>
          <text:p text:style-name="P96">ser reutilizado por qualquer página</text:p>
        </text:list-item>
      </text:list>
      <text:p text:style-name="P90"><text:soft-page-break/>Exemplo:</text:p>
      <text:p text:style-name="P91"><text:span text:style-name="Source_20_Text">const livros = await livrosService.getLivros();</text:span></text:p>
      <text:p text:style-name="P93"/>
      <text:h text:style-name="P95" text:outline-level="3">✔ JSON</text:h>
      <text:p text:style-name="P90">O primeiro livro foi convertido.</text:p>
      <text:p text:style-name="P90">Agora basta ir adicionando os restantes.</text:p>
      <text:p text:style-name="P93"/>
      <text:h text:style-name="P94" text:outline-level="1">Agora começa a parte interessante.</text:h>
      <text:p text:style-name="P90">Até aqui apenas carregámos os dados.</text:p>
      <text:p text:style-name="P90">Agora vamos utilizá-los para construir a interface automaticamente.</text:p>
      <text:p text:style-name="P90">Entramos oficialmente no <text:span text:style-name="Strong_20_Emphasis">Sprint 2</text:span>.</text:p>
      <text:h text:style-name="P97" text:outline-level="2">Sprint 2 — Biblioteca dinâmica</text:h>
      <text:p text:style-name="P90">Em vez de escrever isto:</text:p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0">vamos fazer isto:</text:p>
      <text:p text:style-name="P91"><text:span text:style-name="Source_20_Text">const livros = await livrosService.getLivros();</text:span></text:p>
      <text:p text:style-name="P91"/>
      <text:p text:style-name="P91"><text:span text:style-name="Source_20_Text">livros.forEach(livro =&gt; {</text:span></text:p>
      <text:p text:style-name="P91"/>
      <text:p text:style-name="P91"><text:span text:style-name="Source_20_Text"><text:s text:c="4"/>// cria automaticamente um card</text:span></text:p>
      <text:p text:style-name="P91"/>
      <text:p text:style-name="P91"><text:span text:style-name="Source_20_Text">});</text:span></text:p>
      <text:p text:style-name="P90">Ou seja,</text:p>
      <text:p text:style-name="P91"><text:span text:style-name="Source_20_Text">livros.json</text:span></text:p>
      <text:p text:style-name="P91"><text:soft-page-break/><text:span text:style-name="Source_20_Text"><text:s text:c="8"/>↓</text:span></text:p>
      <text:p text:style-name="P91"><text:span text:style-name="Source_20_Text">LivrosService</text:span></text:p>
      <text:p text:style-name="P91"><text:span text:style-name="Source_20_Text"><text:s text:c="8"/>↓</text:span></text:p>
      <text:p text:style-name="P91"><text:span text:style-name="Source_20_Text">biblioteca.js</text:span></text:p>
      <text:p text:style-name="P91"><text:span text:style-name="Source_20_Text"><text:s text:c="8"/>↓</text:span></text:p>
      <text:p text:style-name="P91"><text:span text:style-name="Source_20_Text">HTML automático</text:span></text:p>
      <text:p text:style-name="P90">Sem escrever um único card manualmente.</text:p>
      <text:p text:style-name="P93"/>
      <text:h text:style-name="P97" text:outline-level="2">Depois disso</text:h>
      <text:p text:style-name="P90">Quando converteres o terceiro...</text:p>
      <text:p text:style-name="P91"><text:span text:style-name="Source_20_Text">livros.json</text:span></text:p>
      <text:p text:style-name="P91"/>
      <text:p text:style-name="P91"><text:span text:style-name="Source_20_Text">Livro 1</text:span></text:p>
      <text:p text:style-name="P91"><text:span text:style-name="Source_20_Text">Livro 2</text:span></text:p>
      <text:p text:style-name="P91"><text:span text:style-name="Source_20_Text">Livro 3</text:span></text:p>
      <text:p text:style-name="P91"><text:span text:style-name="Source_20_Text">Livro 4</text:span></text:p>
      <text:p text:style-name="P91"><text:span text:style-name="Source_20_Text">Livro 5</text:span></text:p>
      <text:p text:style-name="P91"><text:span text:style-name="Source_20_Text">Livro 6</text:span></text:p>
      <text:p text:style-name="P91"><text:span text:style-name="Source_20_Text">Livro 20</text:span></text:p>
      <text:p text:style-name="P91"><text:span text:style-name="Source_20_Text">Livro 100</text:span></text:p>
      <text:p text:style-name="P90">A página continuará exatamente igual.</text:p>
      <text:p text:style-name="P90">Ela apenas mostrará mais cartões.</text:p>
      <text:p text:style-name="P90">Não será necessário alterar o HTML.</text:p>
      <text:p text:style-name="P93"/>
      <text:h text:style-name="P97" text:outline-level="2">Depois virá o Sprint 3</text:h>
      <text:p text:style-name="P90">Como os livros já estarão carregados em memória, a Home poderá simplesmente fazer:</text:p>
      <text:p text:style-name="P91"><text:span text:style-name="Source_20_Text">const destaques = livros.filter(l =&gt; l.destaque);</text:span></text:p>
      <text:p text:style-name="P90">e o slider será preenchido automaticamente.</text:p>
      <text:p text:style-name="P90">Ou seja, <text:span text:style-name="Strong_20_Emphasis">a Home e a Biblioteca vão utilizar exatamente a mesma fonte de dados</text:span> (<text:span text:style-name="Source_20_Text">livros.json</text:span>).</text:p>
      <text:p text:style-name="P93"/>
      <text:h text:style-name="P94" text:outline-level="1">O nosso próximo objetivo</text:h>
      <text:p text:style-name="P90">Agora vamos criar o <text:span text:style-name="Strong_20_Emphasis">renderizador automático da Biblioteca</text:span>, que será um dos módulos mais importantes de todo o projeto.</text:p>
      <text:p text:style-name="P90"><text:soft-page-break/>A partir desse momento, <text:span text:style-name="Strong_20_Emphasis">nunca mais escreveremos um card de livro em HTML</text:span>. Tudo será gerado automaticamente a partir do JSON, tornando a plataforma escalável e muito mais profissional.</text:p>
      <text:p text:style-name="P89"/>
      <text:p text:style-name="P77">Excelente. Agora vamos construir a página <text:span text:style-name="Strong_20_Emphasis">Biblioteca</text:span> da forma como um projeto profissional faria.</text:p>
      <text:p text:style-name="P79">O objetivo é este:</text:p>
      <text:p text:style-name="P81"><text:span text:style-name="Source_20_Text">livros.json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LivrosService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biblioteca.js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Renderiza todos os cards automaticamente</text:span></text:p>
      <text:p text:style-name="P82"/>
      <text:h text:style-name="P83" text:outline-level="1">Etapa 1 — Preparar o HTML</text:h>
      <text:p text:style-name="P79">Na página <text:span text:style-name="Strong_20_Emphasis">biblioteca.html</text:span>, substitui todos os cards escritos manualmente por apenas um container.</text:p>
      <text:p text:style-name="P81"><text:span text:style-name="Source_20_Text">&lt;main class="biblioteca-page"&gt;</text:span></text:p>
      <text:p text:style-name="P81"/>
      <text:p text:style-name="P81"><text:span text:style-name="Source_20_Text"><text:s text:c="4"/>&lt;section class="library"&gt;</text:span></text:p>
      <text:p text:style-name="P81"/>
      <text:p text:style-name="P81"><text:span text:style-name="Source_20_Text"><text:s text:c="8"/>&lt;div class="container"&gt;</text:span></text:p>
      <text:p text:style-name="P81"/>
      <text:p text:style-name="P81"><text:span text:style-name="Source_20_Text"><text:s text:c="12"/>&lt;div class="section-header"&gt;</text:span></text:p>
      <text:p text:style-name="P81"><text:span text:style-name="Source_20_Text"><text:s text:c="16"/>&lt;h1&gt;Biblioteca&lt;/h1&gt;</text:span></text:p>
      <text:p text:style-name="P81"><text:span text:style-name="Source_20_Text"><text:s text:c="16"/>&lt;p&gt;Explore os textos disponíveis na plataforma.&lt;/p&gt;</text:span></text:p>
      <text:p text:style-name="P81"><text:span text:style-name="Source_20_Text"><text:s text:c="12"/>&lt;/div&gt;</text:span></text:p>
      <text:p text:style-name="P81"/>
      <text:p text:style-name="P81"><text:span text:style-name="Source_20_Text"><text:s text:c="12"/>&lt;div</text:span></text:p>
      <text:p text:style-name="P81"><text:span text:style-name="Source_20_Text"><text:s text:c="16"/>id="booksContainer"</text:span></text:p>
      <text:p text:style-name="P81"><text:span text:style-name="Source_20_Text"><text:s text:c="16"/>class="books-grid"&gt;</text:span></text:p>
      <text:p text:style-name="P81"><text:span text:style-name="Source_20_Text"><text:s text:c="12"/>&lt;/div&gt;</text:span></text:p>
      <text:p text:style-name="P81"/>
      <text:p text:style-name="P81"><text:soft-page-break/><text:span text:style-name="Source_20_Text"><text:s text:c="8"/>&lt;/div&gt;</text:span></text:p>
      <text:p text:style-name="P81"/>
      <text:p text:style-name="P81"><text:span text:style-name="Source_20_Text"><text:s text:c="4"/>&lt;/section&gt;</text:span></text:p>
      <text:p text:style-name="P81"/>
      <text:p text:style-name="P81"><text:span text:style-name="Source_20_Text">&lt;/main&gt;</text:span></text:p>
      <text:p text:style-name="P81"/>
      <text:p text:style-name="P81"><text:span text:style-name="Source_20_Text">&lt;script src="../assets/js/services/LivrosService.js"&gt;&lt;/script&gt;</text:span></text:p>
      <text:p text:style-name="P81"><text:span text:style-name="Source_20_Text">&lt;script src="../assets/js/biblioteca.js"&gt;&lt;/script&gt;</text:span></text:p>
      <text:p text:style-name="P79">Repara que o HTML deixa de conhecer os livros.</text:p>
      <text:p text:style-name="P79">Ele apenas fornece um espaço onde eles serão colocados.</text:p>
      <text:p text:style-name="P82"/>
      <text:h text:style-name="P83" text:outline-level="1">Etapa 2 — biblioteca.js</text:h>
      <text:p text:style-name="P79">Agora cria (ou substitui) o ficheiro inteiro por este:</text:p>
      <text:p text:style-name="P81"><text:span text:style-name="Source_20_Text">document.addEventListener("DOMContentLoaded", async () =&gt; {</text:span></text:p>
      <text:p text:style-name="P81"/>
      <text:p text:style-name="P81"><text:span text:style-name="Source_20_Text"><text:s text:c="4"/>const container = document.getElementById("booksContainer");</text:span></text:p>
      <text:p text:style-name="P81"/>
      <text:p text:style-name="P81"><text:span text:style-name="Source_20_Text"><text:s text:c="4"/>if (!container) return;</text:span></text:p>
      <text:p text:style-name="P81"/>
      <text:p text:style-name="P81"><text:span text:style-name="Source_20_Text"><text:s text:c="4"/>const livros = await livrosService.getLivros();</text:span></text:p>
      <text:p text:style-name="P81"/>
      <text:p text:style-name="P81"><text:span text:style-name="Source_20_Text"><text:s text:c="4"/>livros.forEach(livro =&gt; {</text:span></text:p>
      <text:p text:style-name="P81"/>
      <text:p text:style-name="P81"><text:span text:style-name="Source_20_Text"><text:s text:c="8"/>const card = criarCard(livro);</text:span></text:p>
      <text:p text:style-name="P81"/>
      <text:p text:style-name="P81"><text:span text:style-name="Source_20_Text"><text:s text:c="8"/>container.appendChild(card);</text:span></text:p>
      <text:p text:style-name="P81"/>
      <text:p text:style-name="P81"><text:span text:style-name="Source_20_Text"><text:s text:c="4"/>});</text:span></text:p>
      <text:p text:style-name="P81"/>
      <text:p text:style-name="P81"><text:span text:style-name="Source_20_Text">});</text:span></text:p>
      <text:p text:style-name="P81"/>
      <text:p text:style-name="P81"><text:span text:style-name="Source_20_Text">function criarCard(livro){</text:span></text:p>
      <text:p text:style-name="P81"/>
      <text:p text:style-name="P81"><text:span text:style-name="Source_20_Text"><text:s text:c="4"/>const article = document.createElement("article");</text:span></text:p>
      <text:p text:style-name="P81"/>
      <text:p text:style-name="P81"><text:soft-page-break/><text:span text:style-name="Source_20_Text"><text:s text:c="4"/>article.className = "book-card";</text:span></text:p>
      <text:p text:style-name="P81"/>
      <text:p text:style-name="P81"><text:span text:style-name="Source_20_Text"><text:s text:c="4"/>article.innerHTML = `</text:span></text:p>
      <text:p text:style-name="P81"/>
      <text:p text:style-name="P81"><text:span text:style-name="Source_20_Text"><text:s text:c="8"/>&lt;h3&gt;${livro.titulo}&lt;/h3&gt;</text:span></text:p>
      <text:p text:style-name="P81"/>
      <text:p text:style-name="P81"><text:span text:style-name="Source_20_Text"><text:s text:c="8"/>&lt;p&gt;${livro.descricao}&lt;/p&gt;</text:span></text:p>
      <text:p text:style-name="P81"/>
      <text:p text:style-name="P81"><text:span text:style-name="Source_20_Text"><text:s text:c="8"/>&lt;a</text:span></text:p>
      <text:p text:style-name="P81"><text:span text:style-name="Source_20_Text"><text:s text:c="12"/>href="leitura.html?id=${livro.id}"</text:span></text:p>
      <text:p text:style-name="P81"><text:span text:style-name="Source_20_Text"><text:s text:c="12"/>class="button-primary"&gt;</text:span></text:p>
      <text:p text:style-name="P81"/>
      <text:p text:style-name="P81"><text:span text:style-name="Source_20_Text"><text:s text:c="12"/>Ler Obra</text:span></text:p>
      <text:p text:style-name="P81"/>
      <text:p text:style-name="P81"><text:span text:style-name="Source_20_Text"><text:s text:c="8"/>&lt;/a&gt;</text:span></text:p>
      <text:p text:style-name="P81"/>
      <text:p text:style-name="P81"><text:span text:style-name="Source_20_Text"><text:s text:c="4"/>`;</text:span></text:p>
      <text:p text:style-name="P81"/>
      <text:p text:style-name="P81"><text:span text:style-name="Source_20_Text"><text:s text:c="4"/>return article;</text:span></text:p>
      <text:p text:style-name="P81"/>
      <text:p text:style-name="P81"><text:span text:style-name="Source_20_Text">}</text:span></text:p>
      <text:p text:style-name="P82"/>
      <text:h text:style-name="P83" text:outline-level="1">O que acontece agora</text:h>
      <text:p text:style-name="P79">O JavaScript faz isto:</text:p>
      <text:p text:style-name="P81"><text:span text:style-name="Source_20_Text">livros.json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[</text:span></text:p>
      <text:p text:style-name="P81"><text:span text:style-name="Source_20_Text"><text:s/>João,</text:span></text:p>
      <text:p text:style-name="P81"><text:span text:style-name="Source_20_Text"><text:s/>Filipe</text:span></text:p>
      <text:p text:style-name="P81"><text:span text:style-name="Source_20_Text">]</text:span></text:p>
      <text:p text:style-name="P81"/>
      <text:p text:style-name="P81"><text:span text:style-name="Source_20_Text">↓</text:span></text:p>
      <text:p text:style-name="P81"/>
      <text:p text:style-name="P81"><text:soft-page-break/><text:span text:style-name="Source_20_Text">criarCar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&lt;article&gt;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appendChil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Página pronta</text:span></text:p>
      <text:p text:style-name="P79">Sem escrever um único card em HTML.</text:p>
      <text:p text:style-name="P82"/>
      <text:h text:style-name="P83" text:outline-level="1">Resultado</text:h>
      <text:p text:style-name="P79">Se amanhã adicionares um terceiro livro:</text:p>
      <text:p text:style-name="P81"><text:span text:style-name="Source_20_Text">{</text:span></text:p>
      <text:p text:style-name="P81"><text:span text:style-name="Source_20_Text"><text:s text:c="4"/>"id":"tom-003",</text:span></text:p>
      <text:p text:style-name="P81"><text:span text:style-name="Source_20_Text"><text:s text:c="4"/>"titulo":"Evangelho de Tomé",</text:span></text:p>
      <text:p text:style-name="P81"><text:span text:style-name="Source_20_Text"><text:s text:c="4"/>...</text:span></text:p>
      <text:p text:style-name="P81"><text:span text:style-name="Source_20_Text">}</text:span></text:p>
      <text:p text:style-name="P79">A página passa automaticamente para:</text:p>
      <text:p text:style-name="P81"><text:span text:style-name="Source_20_Text">Apócrifo de João</text:span></text:p>
      <text:p text:style-name="P81"/>
      <text:p text:style-name="P81"><text:span text:style-name="Source_20_Text">Evangelho de Filipe</text:span></text:p>
      <text:p text:style-name="P81"/>
      <text:p text:style-name="P81"><text:span text:style-name="Source_20_Text">Evangelho de Tomé</text:span></text:p>
      <text:p text:style-name="P79">Sem alterar absolutamente nada no HTML.</text:p>
      <text:p text:style-name="P82"/>
      <text:h text:style-name="P83" text:outline-level="1">Etapa 3 (a próxima)</text:h>
      <text:p text:style-name="P79">Quando isto estiver a funcionar, vamos melhorar os cartões.</text:p>
      <text:p text:style-name="P79">Em vez de mostrar apenas:</text:p>
      <text:p text:style-name="P81"><text:span text:style-name="Source_20_Text">Título</text:span></text:p>
      <text:p text:style-name="P81"><text:soft-page-break/></text:p>
      <text:p text:style-name="P81"><text:span text:style-name="Source_20_Text">Descrição</text:span></text:p>
      <text:p text:style-name="P81"/>
      <text:p text:style-name="P81"><text:span text:style-name="Source_20_Text">Botão</text:span></text:p>
      <text:p text:style-name="P79">Eles passarão a apresentar algo como:</text:p>
      <text:p text:style-name="P81"><text:span text:style-name="Source_20_Text">📖 Capa</text:span></text:p>
      <text:p text:style-name="P81"/>
      <text:p text:style-name="P81"><text:span text:style-name="Source_20_Text">Título</text:span></text:p>
      <text:p text:style-name="P81"/>
      <text:p text:style-name="P81"><text:span text:style-name="Source_20_Text">Autor</text:span></text:p>
      <text:p text:style-name="P81"/>
      <text:p text:style-name="P81"><text:span text:style-name="Source_20_Text">Categoria</text:span></text:p>
      <text:p text:style-name="P81"/>
      <text:p text:style-name="P81"><text:span text:style-name="Source_20_Text">Descrição</text:span></text:p>
      <text:p text:style-name="P81"/>
      <text:p text:style-name="P81"><text:span text:style-name="Source_20_Text">Tempo de leitura</text:span></text:p>
      <text:p text:style-name="P81"/>
      <text:p text:style-name="P81"><text:span text:style-name="Source_20_Text">Botão "Ler Obra"</text:span></text:p>
      <text:p text:style-name="P79">Ou seja, vamos transformar os cartões numa interface semelhante à de bibliotecas digitais modernas, mantendo o código totalmente alimentado pelo <text:span text:style-name="Source_20_Text">livros.json</text:span>.</text:p>
      <text:p text:style-name="P79">Este será o próximo passo para deixar a Biblioteca Apócrifa com um aspeto verdadeiramente profissional.</text:p>
      <text:p text:style-name="P98">📖 <text:bookmark-start text:name="__DdeLink__18476_2597948309"/>Uma pequena capa (mesmo que seja um placeholder <text:bookmark-end text:name="__DdeLink__18476_2597948309"/>enquanto não tens imagens). </text:p>
      <text:list text:style-name="L65">
        <text:list-item>
          <text:p text:style-name="P99">🏷️ Categoria como um selo (badge). </text:p>
        </text:list-item>
      </text:list>
      <text:list text:style-name="L66">
        <text:list-item>
          <text:p text:style-name="P100">📚 Título. </text:p>
        </text:list-item>
      </text:list>
      <text:list text:style-name="L67">
        <text:list-item>
          <text:p text:style-name="P101">📝 Descrição resumida (máximo de 3 linhas). </text:p>
        </text:list-item>
      </text:list>
      <text:list text:style-name="L68">
        <text:list-item>
          <text:p text:style-name="P102">ℹ️ Dois ou três metadados importantes (coleção e ano, por exemplo). </text:p>
        </text:list-item>
      </text:list>
      <text:list text:style-name="L69">
        <text:list-item>
          <text:p text:style-name="P103">🔵 Botão <text:span text:style-name="Strong_20_Emphasis">Ler Obra</text:span> alinhado ao fundo.</text:p>
        </text:list-item>
      </text:list>
      <text:h text:style-name="P104" text:outline-level="1">Objetivo do Sprint 3</text:h>
      <text:p text:style-name="P105">A seção <text:span text:style-name="Strong_20_Emphasis">"Obras em destaque"</text:span> deverá ser preenchida automaticamente.</text:p>
      <text:p text:style-name="P105">Em vez de escrevermos:</text:p>
      <text:section text:style-name="Sect1" text:name="Seção3">
        <text:p text:style-name="P106"><text:bookmark text:name="code-block-viewer Copia 2"/><text:span text:style-name="Source_20_Text">&lt;article class="book-card"&gt;</text:span></text:p>
        <text:p text:style-name="P107"><text:span text:style-name="Source_20_Text">...</text:span></text:p>
        <text:p text:style-name="P107"><text:span text:style-name="Source_20_Text">&lt;/article&gt;</text:span></text:p>
      </text:section>
      <text:p text:style-name="P105">o HTML ficará apenas com o container.</text:p>
      <text:section text:style-name="Sect1" text:name="Seção4">
        <text:p text:style-name="P106"><text:bookmark text:name="code-block-viewer Copia 3"/><text:soft-page-break/><text:span text:style-name="Source_20_Text">&lt;section class="featured-books"&gt;</text:span></text:p>
        <text:p text:style-name="P107"/>
        <text:p text:style-name="P107"><text:span text:style-name="Source_20_Text"><text:s text:c="4"/>&lt;div class="container"&gt;</text:span></text:p>
        <text:p text:style-name="P107"/>
        <text:p text:style-name="P107"><text:span text:style-name="Source_20_Text"><text:s text:c="8"/>&lt;div class="section-header"&gt;</text:span></text:p>
        <text:p text:style-name="P107"/>
        <text:p text:style-name="P107"><text:span text:style-name="Source_20_Text"><text:s text:c="12"/>&lt;h2&gt;Obras em destaque&lt;/h2&gt;</text:span></text:p>
        <text:p text:style-name="P107"/>
        <text:p text:style-name="P107"><text:span text:style-name="Source_20_Text"><text:s text:c="12"/>&lt;div class="slider-controls"&gt;</text:span></text:p>
        <text:p text:style-name="P107"/>
        <text:p text:style-name="P107"><text:span text:style-name="Source_20_Text"><text:s text:c="16"/>&lt;button class="slider-button slider-prev"&gt;</text:span></text:p>
        <text:p text:style-name="P107"><text:span text:style-name="Source_20_Text"><text:s text:c="20"/>←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6"/>&lt;button class="slider-button slider-next"&gt;</text:span></text:p>
        <text:p text:style-name="P107"><text:span text:style-name="Source_20_Text"><text:s text:c="20"/>→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8"/>&lt;div class="books-slider"&gt;</text:span></text:p>
        <text:p text:style-name="P107"/>
        <text:p text:style-name="P107"><text:span text:style-name="Source_20_Text"><text:s text:c="12"/>&lt;div class="books-track"&gt;</text:span></text:p>
        <text:p text:style-name="P107"/>
        <text:p text:style-name="P107"><text:span text:style-name="Source_20_Text"><text:s text:c="16"/>&lt;!-- JavaScript renderiza aqui --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4"/>&lt;/div&gt;</text:span></text:p>
        <text:p text:style-name="P107"/>
        <text:p text:style-name="P107"><text:span text:style-name="Source_20_Text">&lt;/section&gt;</text:span></text:p>
      </text:section>
      <text:p text:style-name="P108"/>
      <text:h text:style-name="P109" text:outline-level="1"><text:soft-page-break/>Arquitetura</text:h>
      <text:p text:style-name="P105">Vamos criar um ficheiro próprio.</text:p>
      <text:section text:style-name="Sect1" text:name="Seção5">
        <text:p text:style-name="P106"><text:bookmark text:name="code-block-viewer Copia 4"/><text:span text:style-name="Source_20_Text">assets/js/</text:span></text:p>
        <text:p text:style-name="P107"/>
        <text:p text:style-name="P107"><text:span text:style-name="Source_20_Text">home.js</text:span></text:p>
      </text:section>
      <text:p text:style-name="P105">Ele será responsável apenas pela Home.</text:p>
      <text:p text:style-name="P108"/>
      <text:h text:style-name="P109" text:outline-level="1">O fluxo será</text:h>
      <text:section text:style-name="Sect1" text:name="Seção6">
        <text:p text:style-name="P106"><text:bookmark text:name="code-block-viewer Copia 5"/><text:span text:style-name="Source_20_Text">index.html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home.j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Service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.json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renderizar card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slider.js</text:span></text:p>
      </text:section>
      <text:p text:style-name="P105">Repara que <text:span text:style-name="Strong_20_Emphasis">slider.js</text:span> deixa de criar os cards.</text:p>
      <text:p text:style-name="P105">Ele apenas faz deslizar.</text:p>
      <text:p text:style-name="P105">Essa separação é muito importante.</text:p>
      <text:p text:style-name="P108"/>
      <text:h text:style-name="P109" text:outline-level="1"><text:soft-page-break/>O home.js ficará responsável por</text:h>
      <text:list text:style-name="L70">
        <text:list-item>
          <text:p text:style-name="P110">carregar livros </text:p>
        </text:list-item>
        <text:list-item>
          <text:p text:style-name="P110">selecionar os destaques </text:p>
        </text:list-item>
        <text:list-item>
          <text:p text:style-name="P110">criar os cards </text:p>
        </text:list-item>
        <text:list-item>
          <text:p text:style-name="P111">inserir no <text:span text:style-name="Source_20_Text">.books-track</text:span> </text:p>
        </text:list-item>
      </text:list>
      <text:p text:style-name="P105">Depois:</text:p>
      <text:section text:style-name="Sect1" text:name="Seção7">
        <text:p text:style-name="P106"><text:bookmark text:name="code-block-viewer Copia 6"/><text:span text:style-name="Source_20_Text">new Slider(".featured-books");</text:span></text:p>
      </text:section>
      <text:p text:style-name="P108"/>
      <text:h text:style-name="P109" text:outline-level="1">Como escolher os destaques?</text:h>
      <text:p text:style-name="P105">Temos várias opções.</text:p>
      <text:h text:style-name="P112" text:outline-level="2">Opção 1</text:h>
      <text:p text:style-name="P105">Mostrar os primeiros livros.</text:p>
      <text:section text:style-name="Sect1" text:name="Seção8">
        <text:p text:style-name="P106"><text:bookmark text:name="code-block-viewer Copia 7"/><text:span text:style-name="Source_20_Text">const destaques = livros.slice(0,6);</text:span></text:p>
      </text:section>
      <text:p text:style-name="P108"/>
      <text:h text:style-name="P112" text:outline-level="2">Opção 2 (a melhor)</text:h>
      <text:p text:style-name="P105">Adicionar um campo no JSON.</text:p>
      <text:section text:style-name="Sect1" text:name="Seção9">
        <text:p text:style-name="P106"><text:bookmark text:name="code-block-viewer Copia 8"/><text:span text:style-name="Source_20_Text">{</text:span></text:p>
        <text:p text:style-name="P107"><text:span text:style-name="Source_20_Text"><text:s text:c="4"/>"id":"apj-001",</text:span></text:p>
        <text:p text:style-name="P107"><text:span text:style-name="Source_20_Text"><text:s text:c="4"/>"titulo":"Apócrifo de João",</text:span></text:p>
        <text:p text:style-name="P107"/>
        <text:p text:style-name="P107"><text:span text:style-name="Source_20_Text"><text:s text:c="4"/>"destaque":true</text:span></text:p>
        <text:p text:style-name="P107"><text:span text:style-name="Source_20_Text">}</text:span></text:p>
      </text:section>
      <text:p text:style-name="P105">Depois:</text:p>
      <text:section text:style-name="Sect1" text:name="Seção10">
        <text:p text:style-name="P106"><text:bookmark text:name="code-block-viewer Copia 9"/><text:span text:style-name="Source_20_Text">const destaques =</text:span></text:p>
        <text:p text:style-name="P107"><text:span text:style-name="Source_20_Text">livros.filter(</text:span></text:p>
        <text:p text:style-name="P107"><text:span text:style-name="Source_20_Text"><text:s text:c="4"/>livro =&gt; livro.destaque</text:span></text:p>
        <text:p text:style-name="P107"><text:span text:style-name="Source_20_Text">);</text:span></text:p>
      </text:section>
      <text:p text:style-name="P105">Assim podes controlar quais aparecem na Home.</text:p>
      <text:p text:style-name="P105">Eu faria desta forma.</text:p>
      <text:p text:style-name="P108"/>
      <text:h text:style-name="P109" text:outline-level="1">O card da Home</text:h>
      <text:p text:style-name="P105">Não deve ser igual ao card da Biblioteca.</text:p>
      <text:p text:style-name="P105"><text:soft-page-break/>Na Home queremos algo compacto.</text:p>
      <text:section text:style-name="Sect1" text:name="Seção11">
        <text:p text:style-name="P106"><text:bookmark text:name="code-block-viewer Copia 10"/><text:span text:style-name="Source_20_Text">┌──────────────────────┐</text:span></text:p>
        <text:p text:style-name="P107"><text:span text:style-name="Source_20_Text">│ <text:s text:c="6"/>CAPA <text:s text:c="10"/>│</text:span></text:p>
        <text:p text:style-name="P107"><text:span text:style-name="Source_20_Text">│ <text:s text:c="21"/>│</text:span></text:p>
        <text:p text:style-name="P107"><text:span text:style-name="Source_20_Text">├──────────────────────┤</text:span></text:p>
        <text:p text:style-name="P107"><text:span text:style-name="Source_20_Text">│ Apócrifo de João <text:s text:c="4"/>│</text:span></text:p>
        <text:p text:style-name="P107"><text:span text:style-name="Source_20_Text">│ <text:s text:c="21"/>│</text:span></text:p>
        <text:p text:style-name="P107"><text:span text:style-name="Source_20_Text">│ Cosmologia Gnóstica <text:s/>│</text:span></text:p>
        <text:p text:style-name="P107"><text:span text:style-name="Source_20_Text">│ <text:s text:c="21"/>│</text:span></text:p>
        <text:p text:style-name="P107"><text:span text:style-name="Source_20_Text">│ Ler obra <text:s text:c="12"/>│</text:span></text:p>
        <text:p text:style-name="P107"><text:span text:style-name="Source_20_Text">└──────────────────────┘</text:span></text:p>
      </text:section>
      <text:p text:style-name="P105">Enquanto na Biblioteca mostramos mais informações.</text:p>
      <text:p text:style-name="P108"/>
      <text:h text:style-name="P109" text:outline-level="1">Organização</text:h>
      <text:p text:style-name="P105">Ficará assim:</text:p>
      <text:section text:style-name="Sect1" text:name="Seção12">
        <text:p text:style-name="P106"><text:bookmark text:name="code-block-viewer Copia 11"/><text:span text:style-name="Source_20_Text">assets/js</text:span></text:p>
        <text:p text:style-name="P107"/>
        <text:p text:style-name="P107"><text:span text:style-name="Source_20_Text">home.js</text:span></text:p>
        <text:p text:style-name="P107"><text:span text:style-name="Source_20_Text">biblioteca.js</text:span></text:p>
        <text:p text:style-name="P107"><text:span text:style-name="Source_20_Text">leitura.js</text:span></text:p>
        <text:p text:style-name="P107"><text:span text:style-name="Source_20_Text">slider.js</text:span></text:p>
      </text:section>
      <text:p text:style-name="P105">Cada página possui o seu próprio controlador.</text:p>
      <text:p text:style-name="P105">É exatamente assim que projetos profissionais costumam ser organizados.</text:p>
      <text:p text:style-name="P108"/>
      <text:h text:style-name="P112" text:outline-level="2">Plano do Sprint 3</text:h>
      <text:p text:style-name="P105">Vamos dividir em três pequenas etapas:</text:p>
      <text:h text:style-name="P113" text:outline-level="3"><text:bookmark-start text:name="__DdeLink__9775_883439581"/>✅ Etapa 1</text:h>
      <text:p text:style-name="P105">Criar o <text:span text:style-name="Source_20_Text">home.js</text:span> e renderizar automaticamente os livros em destaque.<text:bookmark-end text:name="__DdeLink__9775_883439581"/></text:p>
      <text:h text:style-name="P114" text:outline-level="2">O próximo passo</text:h>
      <text:p text:style-name="P105">Agora vamos criar um <text:span text:style-name="Strong_20_Emphasis"><text:span text:style-name="Source_20_Text">home.js</text:span></text:span><text:span text:style-name="Strong_20_Emphasis"> muito simples</text:span>, com cerca de 40 linhas, apenas para:</text:p>
      <text:list text:style-name="L71">
        <text:list-item>
          <text:p text:style-name="P115">Carregar o <text:span text:style-name="Source_20_Text">livros.json</text:span>. </text:p>
        </text:list-item>
        <text:list-item>
          <text:p text:style-name="P115">Filtrar os livros marcados com <text:span text:style-name="Source_20_Text">"destaque": true</text:span>. </text:p>
        </text:list-item>
        <text:list-item>
          <text:p text:style-name="P115">Criar os cards. </text:p>
        </text:list-item>
        <text:list-item>
          <text:p text:style-name="P116"><text:soft-page-break/>Inseri-los na <text:span text:style-name="Source_20_Text">.books-track</text:span>. </text:p>
        </text:list-item>
      </text:list>
      <text:p text:style-name="P105">Só depois ligaremos o <text:span text:style-name="Source_20_Text">slider.js</text:span>.</text:p>
      <text:p text:style-name="P105">Essa ordem vai deixar o desenvolvimento muito mais simples e facilitar a depuração caso apareça algum problema.</text:p>
      <text:p text:style-name="P105"/>
      <text:h text:style-name="P113" text:outline-level="3">✅ Etapa 2</text:h>
      <text:p text:style-name="P105">Integrar o <text:span text:style-name="Source_20_Text">slider.js</text:span> para navegar pelos cards.</text:p>
      <text:h text:style-name="P113" text:outline-level="3">✅ Etapa 3</text:h>
      <text:p text:style-name="P105">Tornar o slider totalmente responsivo (1, 2, 3 ou 4 cards conforme a largura da tela).</text:p>
      <text:p text:style-name="P105">Excelente. Na verdade, nós já começamos essa arquitetura sem perceber.</text:p>
      <text:p text:style-name="P105">Hoje o projeto já possui:</text:p>
      <text:section text:style-name="Sect1" text:name="Seção13">
        <text:p text:style-name="P106"><text:bookmark text:name="code-block-viewer Copia 12"/><text:span text:style-name="Source_20_Text">assets/</text:span></text:p>
        <text:p text:style-name="P107"><text:span text:style-name="Source_20_Text">│</text:span></text:p>
        <text:p text:style-name="P107"><text:span text:style-name="Source_20_Text">├── dados/</text:span></text:p>
        <text:p text:style-name="P107"><text:span text:style-name="Source_20_Text">│ <text:s text:c="2"/>├── livros/</text:span></text:p>
        <text:p text:style-name="P107"><text:span text:style-name="Source_20_Text">│ <text:s text:c="2"/>└── livros.json</text:span></text:p>
        <text:p text:style-name="P107"><text:span text:style-name="Source_20_Text">│</text:span></text:p>
        <text:p text:style-name="P107"><text:span text:style-name="Source_20_Text">├── js/</text:span></text:p>
        <text:p text:style-name="P107"><text:span text:style-name="Source_20_Text">│ <text:s text:c="2"/>├── services/</text:span></text:p>
        <text:p text:style-name="P107"><text:span text:style-name="Source_20_Text">│ <text:s text:c="2"/>│ <text:s text:c="2"/>├── livrosService.js</text:span></text:p>
        <text:p text:style-name="P107"><text:span text:style-name="Source_20_Text">│ <text:s text:c="2"/>│ <text:s text:c="2"/>└── leituraService.js</text:span></text:p>
        <text:p text:style-name="P107"><text:span text:style-name="Source_20_Text">│ <text:s text:c="2"/>│</text:span></text:p>
        <text:p text:style-name="P107"><text:span text:style-name="Source_20_Text">│ <text:s text:c="2"/>├── biblioteca.js</text:span></text:p>
        <text:p text:style-name="P107"><text:span text:style-name="Source_20_Text">│ <text:s text:c="2"/>├── home.js</text:span></text:p>
        <text:p text:style-name="P107"><text:span text:style-name="Source_20_Text">│ <text:s text:c="2"/>├── leitura.js</text:span></text:p>
        <text:p text:style-name="P107"><text:span text:style-name="Source_20_Text">│ <text:s text:c="2"/>├── menu.js</text:span></text:p>
        <text:p text:style-name="P107"><text:span text:style-name="Source_20_Text">│ <text:s text:c="2"/>├── slider.js</text:span></text:p>
        <text:p text:style-name="P107"><text:span text:style-name="Source_20_Text">│ <text:s text:c="2"/>├── navigation.js</text:span></text:p>
        <text:p text:style-name="P107"><text:span text:style-name="Source_20_Text">│ <text:s text:c="2"/>└── componentes.js</text:span></text:p>
      </text:section>
      <text:p text:style-name="P105">Ou seja, já saímos daquele modelo onde todo o JavaScript ficava em um único arquivo.</text:p>
      <text:p text:style-name="P105">Mas ainda falta dar o passo que transforma isso em uma arquitetura realmente escalável.</text:p>
      <text:p text:style-name="P108"/>
      <text:h text:style-name="P109" text:outline-level="1">O objetivo da Fase 4</text:h>
      <text:p text:style-name="P105">Não é adicionar funcionalidades.</text:p>
      <text:p text:style-name="P105"><text:soft-page-break/>É organizar o projeto para que, quando tivermos <text:span text:style-name="Strong_20_Emphasis">100 livros, favoritos, login, comentários, pesquisa avançada e APIs</text:span>, nada precise ser reescrito.</text:p>
      <text:p text:style-name="P108"/>
      <text:h text:style-name="P109" text:outline-level="1">A arquitetura que eu faria</text:h>
      <text:section text:style-name="Sect1" text:name="Seção14">
        <text:p text:style-name="P106"><text:bookmark text:name="code-block-viewer Copia 13"/><text:span text:style-name="Source_20_Text">assets</text:span></text:p>
        <text:p text:style-name="P107"><text:span text:style-name="Source_20_Text">│</text:span></text:p>
        <text:p text:style-name="P107"><text:span text:style-name="Source_20_Text">├── dados</text:span></text:p>
        <text:p text:style-name="P107"><text:span text:style-name="Source_20_Text">│ <text:s text:c="2"/>├── livros</text:span></text:p>
        <text:p text:style-name="P117"><text:span text:style-name="Source_20_Text">│ <text:s text:c="2"/>└── livros.json</text:span></text:p>
        <text:p text:style-name="P107"><text:span text:style-name="Source_20_Text">│</text:span></text:p>
        <text:p text:style-name="P107"><text:span text:style-name="Source_20_Text">├── js</text:span></text:p>
        <text:p text:style-name="P107"><text:span text:style-name="Source_20_Text">│</text:span></text:p>
        <text:p text:style-name="P107"><text:span text:style-name="Source_20_Text">│ <text:s text:c="2"/>├── core</text:span></text:p>
        <text:p text:style-name="P107"><text:span text:style-name="Source_20_Text">│ <text:s text:c="2"/>│ <text:s text:c="2"/>├── app.js</text:span></text:p>
        <text:p text:style-name="P107"><text:span text:style-name="Source_20_Text">│ <text:s text:c="2"/>│ <text:s text:c="2"/>├── config.js</text:span></text:p>
        <text:p text:style-name="P107"><text:span text:style-name="Source_20_Text">│ <text:s text:c="2"/>│ <text:s text:c="2"/>├── router.js</text:span></text:p>
        <text:p text:style-name="P107"><text:span text:style-name="Source_20_Text">│ <text:s text:c="2"/>│ <text:s text:c="2"/>└── storage.js</text:span></text:p>
        <text:p text:style-name="P117"><text:span text:style-name="Source_20_Text"><text:span text:style-name="T2">| <text:s text:c="2"/>| <text:s text:c="2"/>|__ main.js</text:span></text:span></text:p>
        <text:p text:style-name="P107"><text:span text:style-name="Source_20_Text">│ <text:s text:c="2"/>│</text:span></text:p>
        <text:p text:style-name="P107"><text:span text:style-name="Source_20_Text">│ <text:s text:c="2"/>├── services</text:span></text:p>
        <text:p text:style-name="P107"><text:span text:style-name="Source_20_Text">│ <text:s text:c="2"/>│ <text:s text:c="2"/>├── livrosService.js</text:span></text:p>
        <text:p text:style-name="P107"><text:span text:style-name="Source_20_Text">│ <text:s text:c="2"/>│ <text:s text:c="2"/>├── leituraService.js</text:span></text:p>
        <text:p text:style-name="P107"><text:span text:style-name="Source_20_Text">│ <text:s text:c="2"/>│ <text:s text:c="2"/>├── favoritosService.js</text:span></text:p>
        <text:p text:style-name="P107"><text:span text:style-name="Source_20_Text">│ <text:s text:c="2"/>│ <text:s text:c="2"/>└── pesquisaService.js</text:span></text:p>
        <text:p text:style-name="P107"><text:span text:style-name="Source_20_Text">│ <text:s text:c="2"/>│</text:span></text:p>
        <text:p text:style-name="P107"><text:span text:style-name="Source_20_Text">│ <text:s text:c="2"/>├── components</text:span></text:p>
        <text:p text:style-name="P107"><text:span text:style-name="Source_20_Text">│ <text:s text:c="2"/>│ <text:s text:c="2"/>├── slider.js</text:span></text:p>
        <text:p text:style-name="P107"><text:span text:style-name="Source_20_Text">│ <text:s text:c="2"/>│ <text:s text:c="2"/>├── cardLivro.js</text:span></text:p>
        <text:p text:style-name="P107"><text:span text:style-name="Source_20_Text">│ <text:s text:c="2"/>│ <text:s text:c="2"/>├── modal.js</text:span></text:p>
        <text:p text:style-name="P107"><text:span text:style-name="Source_20_Text">│ <text:s text:c="2"/>│ <text:s text:c="2"/>├── menu.js</text:span></text:p>
        <text:p text:style-name="P107"><text:bookmark-start text:name="__DdeLink__9852_2210137533"/><text:span text:style-name="Source_20_Text">│ <text:s text:c="2"/>│ <text:s text:c="2"/>└── pagination.js</text:span><text:bookmark-end text:name="__DdeLink__9852_2210137533"/></text:p>
        <text:p text:style-name="P117"><text:span text:style-name="Source_20_Text">│ <text:s text:c="2"/>│ <text:s text:c="2"/>└── </text:span><text:span text:style-name="Source_20_Text"><text:span text:style-name="T2">navigation.js</text:span></text:span></text:p>
        <text:p text:style-name="P107"><text:span text:style-name="Source_20_Text">│ <text:s text:c="2"/>│</text:span></text:p>
        <text:p text:style-name="P107"><text:span text:style-name="Source_20_Text">│ <text:s text:c="2"/>├── pages</text:span></text:p>
        <text:p text:style-name="P107"><text:span text:style-name="Source_20_Text">│ <text:s text:c="2"/>│ <text:s text:c="2"/>├── home.js</text:span></text:p>
        <text:p text:style-name="P107"><text:span text:style-name="Source_20_Text">│ <text:s text:c="2"/>│ <text:s text:c="2"/>├── biblioteca.js</text:span></text:p>
        <text:p text:style-name="P107"><text:soft-page-break/><text:span text:style-name="Source_20_Text">│ <text:s text:c="2"/>│ <text:s text:c="2"/>├── leitura.js</text:span></text:p>
        <text:p text:style-name="P107"><text:span text:style-name="Source_20_Text">│ <text:s text:c="2"/>│ <text:s text:c="2"/>├── comunidade.js</text:span></text:p>
        <text:p text:style-name="P107"><text:span text:style-name="Source_20_Text">│ <text:s text:c="2"/>│ <text:s text:c="2"/>└── perfil.js</text:span></text:p>
        <text:p text:style-name="P107"><text:span text:style-name="Source_20_Text">│ <text:s text:c="2"/>│</text:span></text:p>
        <text:p text:style-name="P107"><text:span text:style-name="Source_20_Text">│ <text:s text:c="2"/>├── utils</text:span></text:p>
        <text:p text:style-name="P107"><text:span text:style-name="Source_20_Text">│ <text:s text:c="2"/>│ <text:s text:c="2"/>├── dom.js</text:span></text:p>
        <text:p text:style-name="P107"><text:span text:style-name="Source_20_Text">│ <text:s text:c="2"/>│ <text:s text:c="2"/>├── format.js</text:span></text:p>
        <text:p text:style-name="P107"><text:span text:style-name="Source_20_Text">│ <text:s text:c="2"/>│ <text:s text:c="2"/>├── helpers.js</text:span></text:p>
        <text:p text:style-name="P107"><text:bookmark-start text:name="__DdeLink__9854_2210137533"/><text:span text:style-name="Source_20_Text">│ <text:s text:c="2"/>│ <text:s text:c="2"/>└── validators.js</text:span><text:bookmark-end text:name="__DdeLink__9854_2210137533"/></text:p>
        <text:p text:style-name="P117"><text:span text:style-name="Source_20_Text">│ <text:s text:c="2"/>│ <text:s text:c="2"/>└── </text:span><text:span text:style-name="Source_20_Text"><text:span text:style-name="T2">utils</text:span></text:span><text:span text:style-name="Source_20_Text">.js</text:span></text:p>
      </text:section>
      <text:p text:style-name="P105">Essa é praticamente a estrutura utilizada em aplicações JavaScript profissionais.</text:p>
      <text:p text:style-name="P108"/>
      <text:h text:style-name="P109" text:outline-level="1">O que cada pasta faz</text:h>
      <text:h text:style-name="P112" text:outline-level="2">core</text:h>
      <text:p text:style-name="P105">Inicialização do sistema.</text:p>
      <text:section text:style-name="Sect1" text:name="Seção15">
        <text:p text:style-name="P106"><text:bookmark text:name="code-block-viewer Copia 14"/><text:span text:style-name="Source_20_Text">core/</text:span></text:p>
      </text:section>
      <text:p text:style-name="P105">Exemplo</text:p>
      <text:section text:style-name="Sect1" text:name="Seção16">
        <text:p text:style-name="P106"><text:bookmark text:name="code-block-viewer Copia 15"/><text:span text:style-name="Source_20_Text">app.js</text:span></text:p>
      </text:section>
      <text:p text:style-name="P105">inicia todo o projeto.</text:p>
      <text:p text:style-name="P108"/>
      <text:h text:style-name="P112" text:outline-level="2">services</text:h>
      <text:p text:style-name="P105">Responsável pelos dados.</text:p>
      <text:p text:style-name="P105">Hoje já temos.</text:p>
      <text:section text:style-name="Sect1" text:name="Seção17">
        <text:p text:style-name="P106"><text:bookmark text:name="code-block-viewer Copia 16"/><text:span text:style-name="Source_20_Text">LivrosService</text:span></text:p>
        <text:p text:style-name="P107"/>
        <text:p text:style-name="P107"><text:span text:style-name="Source_20_Text">LeituraService</text:span></text:p>
      </text:section>
      <text:p text:style-name="P105">Mais tarde teremos</text:p>
      <text:section text:style-name="Sect1" text:name="Seção18">
        <text:p text:style-name="P106"><text:bookmark text:name="code-block-viewer Copia 17"/><text:span text:style-name="Source_20_Text">FavoritosService</text:span></text:p>
        <text:p text:style-name="P107"/>
        <text:p text:style-name="P107"><text:span text:style-name="Source_20_Text">UsuarioService</text:span></text:p>
        <text:p text:style-name="P107"/>
        <text:p text:style-name="P107"><text:span text:style-name="Source_20_Text">PesquisaService</text:span></text:p>
      </text:section>
      <text:p text:style-name="P108"/>
      <text:h text:style-name="P112" text:outline-level="2"><text:soft-page-break/>components</text:h>
      <text:p text:style-name="P105">Tudo que pode ser reutilizado.</text:p>
      <text:p text:style-name="P105">Hoje temos</text:p>
      <text:section text:style-name="Sect1" text:name="Seção19">
        <text:p text:style-name="P106"><text:bookmark text:name="code-block-viewer Copia 18"/><text:span text:style-name="Source_20_Text">Slider</text:span></text:p>
        <text:p text:style-name="P107"/>
        <text:p text:style-name="P107"><text:span text:style-name="Source_20_Text">Menu</text:span></text:p>
      </text:section>
      <text:p text:style-name="P105">Depois teremos</text:p>
      <text:section text:style-name="Sect1" text:name="Seção20">
        <text:p text:style-name="P106"><text:bookmark text:name="code-block-viewer Copia 19"/><text:span text:style-name="Source_20_Text">CardLivro</text:span></text:p>
        <text:p text:style-name="P107"/>
        <text:p text:style-name="P107"><text:span text:style-name="Source_20_Text">Toast</text:span></text:p>
        <text:p text:style-name="P107"/>
        <text:p text:style-name="P107"><text:span text:style-name="Source_20_Text">Modal</text:span></text:p>
        <text:p text:style-name="P107"/>
        <text:p text:style-name="P107"><text:span text:style-name="Source_20_Text">Paginação</text:span></text:p>
        <text:p text:style-name="P107"/>
        <text:p text:style-name="P107"><text:span text:style-name="Source_20_Text">Tabs</text:span></text:p>
        <text:p text:style-name="P107"/>
        <text:p text:style-name="P107"><text:span text:style-name="Source_20_Text">Accordion</text:span></text:p>
      </text:section>
      <text:p text:style-name="P108"/>
      <text:h text:style-name="P112" text:outline-level="2">pages</text:h>
      <text:p text:style-name="P105">Cada página possui seu controlador.</text:p>
      <text:section text:style-name="Sect1" text:name="Seção21">
        <text:p text:style-name="P106"><text:bookmark text:name="code-block-viewer Copia 20"/><text:span text:style-name="Source_20_Text">home.js</text:span></text:p>
        <text:p text:style-name="P107"/>
        <text:p text:style-name="P107"><text:span text:style-name="Source_20_Text">biblioteca.js</text:span></text:p>
        <text:p text:style-name="P107"/>
        <text:p text:style-name="P107"><text:span text:style-name="Source_20_Text">leitura.js</text:span></text:p>
      </text:section>
      <text:p text:style-name="P105">Sem misturar lógica.</text:p>
      <text:p text:style-name="P108"/>
      <text:h text:style-name="P112" text:outline-level="2">utils</text:h>
      <text:p text:style-name="P105">Funções auxiliares.</text:p>
      <text:p text:style-name="P105">Por exemplo</text:p>
      <text:section text:style-name="Sect1" text:name="Seção22">
        <text:p text:style-name="P106"><text:bookmark text:name="code-block-viewer Copia 21"/><text:span text:style-name="Source_20_Text">formatarData()</text:span></text:p>
        <text:p text:style-name="P107"/>
        <text:p text:style-name="P107"><text:span text:style-name="Source_20_Text">escapeHTML()</text:span></text:p>
        <text:p text:style-name="P107"><text:soft-page-break/></text:p>
        <text:p text:style-name="P107"><text:span text:style-name="Source_20_Text">criarElemento()</text:span></text:p>
        <text:p text:style-name="P107"/>
        <text:p text:style-name="P107"><text:span text:style-name="Source_20_Text">debounce()</text:span></text:p>
        <text:p text:style-name="P107"/>
        <text:p text:style-name="P107"><text:span text:style-name="Source_20_Text">throttle()</text:span></text:p>
      </text:section>
      <text:p text:style-name="P108"/>
      <text:h text:style-name="P109" text:outline-level="1">O que devemos fazer agora</text:h>
      <text:p text:style-name="P105">Como ainda estamos no começo, eu <text:span text:style-name="Strong_20_Emphasis">não moveria tudo de uma vez</text:span>. Em vez disso, faria uma reorganização gradual.</text:p>
      <text:h text:style-name="P113" text:outline-level="3">Passo 1</text:h>
      <text:p text:style-name="P105">Criar:</text:p>
      <text:section text:style-name="Sect1" text:name="Seção23">
        <text:p text:style-name="P106"><text:bookmark text:name="code-block-viewer Copia 22"/><text:span text:style-name="Source_20_Text">assets/js/pages</text:span></text:p>
      </text:section>
      <text:p text:style-name="P105">e mover</text:p>
      <text:section text:style-name="Sect1" text:name="Seção24">
        <text:p text:style-name="P106"><text:bookmark text:name="code-block-viewer Copia 23"/><text:span text:style-name="Source_20_Text">home.js</text:span></text:p>
        <text:p text:style-name="P107"/>
        <text:p text:style-name="P107"><text:span text:style-name="Source_20_Text">biblioteca.js</text:span></text:p>
        <text:p text:style-name="P107"/>
        <text:p text:style-name="P107"><text:span text:style-name="Source_20_Text">leitura.js</text:span></text:p>
      </text:section>
      <text:p text:style-name="P108"/>
      <text:h text:style-name="P113" text:outline-level="3">Passo 2</text:h>
      <text:p text:style-name="P105">Criar</text:p>
      <text:section text:style-name="Sect1" text:name="Seção25">
        <text:p text:style-name="P106"><text:bookmark text:name="code-block-viewer Copia 24"/><text:span text:style-name="Source_20_Text">assets/js/components</text:span></text:p>
      </text:section>
      <text:p text:style-name="P105">Mover</text:p>
      <text:section text:style-name="Sect1" text:name="Seção26">
        <text:p text:style-name="P106"><text:bookmark text:name="code-block-viewer Copia 25"/><text:span text:style-name="Source_20_Text">slider.js</text:span></text:p>
        <text:p text:style-name="P107"/>
        <text:p text:style-name="P107"><text:span text:style-name="Source_20_Text">menu.js</text:span></text:p>
      </text:section>
      <text:p text:style-name="P108"/>
      <text:h text:style-name="P113" text:outline-level="3">Passo 3</text:h>
      <text:p text:style-name="P105">Criar</text:p>
      <text:section text:style-name="Sect1" text:name="Seção27">
        <text:p text:style-name="P106"><text:bookmark text:name="code-block-viewer Copia 26"/><text:span text:style-name="Source_20_Text">assets/js/core</text:span></text:p>
      </text:section>
      <text:p text:style-name="P105">e colocar</text:p>
      <text:section text:style-name="Sect1" text:name="Seção28">
        <text:p text:style-name="P106"><text:bookmark text:name="code-block-viewer Copia 27"/><text:span text:style-name="Source_20_Text">app.js</text:span></text:p>
      </text:section>
      <text:p text:style-name="P108"/>
      <text:h text:style-name="P113" text:outline-level="3"><text:soft-page-break/>Passo 4</text:h>
      <text:p text:style-name="P105">Criar</text:p>
      <text:section text:style-name="Sect1" text:name="Seção29">
        <text:p text:style-name="P106"><text:bookmark text:name="code-block-viewer Copia 28"/><text:span text:style-name="Source_20_Text">assets/js/utils</text:span></text:p>
      </text:section>
      <text:p text:style-name="P105">Mover</text:p>
      <text:section text:style-name="Sect1" text:name="Seção30">
        <text:p text:style-name="P106"><text:bookmark text:name="code-block-viewer Copia 29"/><text:span text:style-name="Source_20_Text">utils.js</text:span></text:p>
      </text:section>
      <text:p text:style-name="P108"/>
      <text:h text:style-name="P109" text:outline-level="1">Resultado</text:h>
      <text:p text:style-name="P105">Ao final da Fase 4, seu projeto deixará de parecer um conjunto de scripts independentes e passará a ter uma arquitetura em camadas, semelhante à usada em projetos profissionais. Isso facilitará muito a evolução para as próximas fases do roadmap, quando adicionarmos autenticação, favoritos, comunidade, APIs e outras funcionalidades sem precisar reorganizar tudo novamente.</text:p>
      <text:p text:style-name="P105">Essa organização será uma base sólida para o restante do desenvolvimento da <text:span text:style-name="Strong_20_Emphasis">Biblioteca Apócrifa</text:span>.</text:p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7T17:47:12.946641099</dc:date>
    <dc:creator>João António</dc:creator>
    <meta:editing-duration>PT19H56M16S</meta:editing-duration>
    <meta:editing-cycles>29</meta:editing-cycles>
    <meta:generator>LibreOffice/26.2.4.2$Linux_X86_64 LibreOffice_project/620$Build-2</meta:generator>
    <meta:document-statistic meta:table-count="5" meta:image-count="0" meta:object-count="0" meta:page-count="93" meta:paragraph-count="2508" meta:word-count="8776" meta:character-count="68111" meta:non-whitespace-character-count="57961"/>
  </office:meta>
</office:document-meta>
</file>