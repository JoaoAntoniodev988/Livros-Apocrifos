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567cm" table:align="left"/>
    </style:style>
    <style:style style:name="Tabela5.A" style:family="table-column">
      <style:table-column-properties style:column-width="1.812cm"/>
    </style:style>
    <style:style style:name="Tabela5.B" style:family="table-column">
      <style:table-column-properties style:column-width="3.75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>
      <style:text-properties officeooo:rsid="002a372b" officeooo:paragraph-rsid="002a372b"/>
    </style:style>
    <style:style style:name="P57" style:family="paragraph" style:parent-style-name="Heading_20_2">
      <style:paragraph-properties fo:margin-top="0cm" fo:margin-bottom="0.247cm" style:contextual-spacing="false" fo:line-height="115%"/>
      <style:text-properties officeooo:rsid="002a372b"/>
    </style:style>
    <style:style style:name="P58" style:family="paragraph" style:parent-style-name="Text_20_body">
      <style:text-properties officeooo:rsid="002a372b"/>
    </style:style>
    <style:style style:name="P59" style:family="paragraph" style:parent-style-name="Text_20_body" style:list-style-name="L49">
      <style:paragraph-properties fo:margin-top="0cm" fo:margin-bottom="0cm" style:contextual-spacing="false"/>
      <style:text-properties officeooo:rsid="002a372b"/>
    </style:style>
    <style:style style:name="P60" style:family="paragraph" style:parent-style-name="Text_20_body" style:list-style-name="L49">
      <style:text-properties officeooo:rsid="002a372b"/>
    </style:style>
    <style:style style:name="P61" style:family="paragraph" style:parent-style-name="Horizontal_20_Line">
      <style:paragraph-properties fo:margin-top="0cm" fo:margin-bottom="0.247cm" style:contextual-spacing="false" fo:line-height="115%"/>
      <style:text-properties officeooo:rsid="002a372b"/>
    </style:style>
    <style:style style:name="P6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a372b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2a372b"/>
    </style:style>
    <style:style style:name="P64" style:family="paragraph" style:parent-style-name="Text_20_body" style:list-style-name="L50">
      <style:paragraph-properties fo:margin-top="0cm" fo:margin-bottom="0cm" style:contextual-spacing="false"/>
      <style:text-properties officeooo:rsid="002a372b"/>
    </style:style>
    <style:style style:name="P65" style:family="paragraph" style:parent-style-name="Text_20_body" style:list-style-name="L50">
      <style:text-properties officeooo:rsid="002a372b"/>
    </style:style>
    <style:style style:name="P66" style:family="paragraph" style:parent-style-name="Heading_20_3">
      <style:paragraph-properties fo:margin-top="0cm" fo:margin-bottom="0.247cm" style:contextual-spacing="false" fo:line-height="115%"/>
      <style:text-properties officeooo:rsid="002a372b"/>
    </style:style>
    <style:style style:name="P67" style:family="paragraph" style:parent-style-name="Text_20_body" style:list-style-name="L51">
      <style:paragraph-properties fo:margin-top="0cm" fo:margin-bottom="0cm" style:contextual-spacing="false"/>
      <style:text-properties officeooo:rsid="002a372b"/>
    </style:style>
    <style:style style:name="P68" style:family="paragraph" style:parent-style-name="Text_20_body" style:list-style-name="L51">
      <style:text-properties officeooo:rsid="002a372b"/>
    </style:style>
    <style:style style:name="P69" style:family="paragraph" style:parent-style-name="Text_20_body" style:list-style-name="L52">
      <style:paragraph-properties fo:margin-top="0cm" fo:margin-bottom="0cm" style:contextual-spacing="false"/>
      <style:text-properties officeooo:rsid="002a372b"/>
    </style:style>
    <style:style style:name="P70" style:family="paragraph" style:parent-style-name="Text_20_body" style:list-style-name="L52">
      <style:text-properties officeooo:rsid="002a372b"/>
    </style:style>
    <style:style style:name="P71" style:family="paragraph" style:parent-style-name="Heading_20_1">
      <style:paragraph-properties fo:margin-top="0cm" fo:margin-bottom="0.247cm" style:contextual-spacing="false" fo:line-height="115%"/>
      <style:text-properties officeooo:rsid="002a372b"/>
    </style:style>
    <style:style style:name="P72" style:family="paragraph" style:parent-style-name="Text_20_body" style:list-style-name="L53">
      <style:text-properties officeooo:rsid="002a372b"/>
    </style:style>
    <style:style style:name="P73" style:family="paragraph" style:parent-style-name="Text_20_body" style:list-style-name="L54">
      <style:text-properties officeooo:rsid="002a372b"/>
    </style:style>
    <style:style style:name="P74" style:family="paragraph" style:parent-style-name="Text_20_body" style:list-style-name="L55">
      <style:text-properties officeooo:rsid="002a372b"/>
    </style:style>
    <style:style style:name="P75" style:family="paragraph" style:parent-style-name="Text_20_body" style:list-style-name="L56">
      <style:text-properties officeooo:rsid="002a372b"/>
    </style:style>
    <style:style style:name="P76" style:family="paragraph" style:parent-style-name="Text_20_body" style:list-style-name="L57">
      <style:text-properties officeooo:rsid="002a372b"/>
    </style:style>
    <style:style style:name="T1" style:family="text">
      <style:text-properties officeooo:rsid="001ce0e6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bookmark-start text:name="__DdeLink__6425_2631705103"/><text:bookmark-start text:name="__DdeLink__6842_2631705103"/><text:span text:style-name="Strong_20_Emphasis">Finalizar o componente </text:span><text:span text:style-name="Strong_20_Emphasis"><text:span text:style-name="Source_20_Text">slider.js</text:span></text:span>, tornando-o totalmente funcional e reutilizável.<text:bookmark-end text:name="__DdeLink__6425_2631705103"/><text:bookmark-end text:name="__DdeLink__6842_2631705103"/>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P56">Perfeito. Agora o Sprint da responsividade ficou praticamente concluído. O próximo passo é muito interessante porque vamos criar um componente JavaScript realmente reutilizável.</text:p>
      <text:h text:style-name="P57" text:outline-level="2">Objetivo do <text:span text:style-name="Source_20_Text">slider.js</text:span></text:h>
      <text:p text:style-name="P58">Queremos um componente que funcione para qualquer lista de cartões, não apenas para "Obras em Destaque".</text:p>
      <text:p text:style-name="P58">Ele deverá permitir:</text:p>
      <text:list text:style-name="L49">
        <text:list-item>
          <text:p text:style-name="P59">✅ Navegar para o próximo item. </text:p>
        </text:list-item>
        <text:list-item>
          <text:p text:style-name="P59">✅ Navegar para o item anterior. </text:p>
        </text:list-item>
        <text:list-item>
          <text:p text:style-name="P59">✅ Definir quantos cartões aparecem por vez. </text:p>
        </text:list-item>
        <text:list-item>
          <text:p text:style-name="P59">✅ Adaptar-se automaticamente ao tamanho da tela. </text:p>
        </text:list-item>
        <text:list-item>
          <text:p text:style-name="P60">✅ Poder ser usado em qualquer página apenas adicionando uma classe HTML. </text:p>
        </text:list-item>
      </text:list>
      <text:p text:style-name="P61"/>
      <text:h text:style-name="P57" text:outline-level="2">Estrutura HTML padrão</text:h>
      <text:p text:style-name="P58">Em qualquer página bastará escrever:</text:p>
      <text:section text:style-name="Sect1" text:name="code-block-viewer">
        <text:p text:style-name="P62"><text:span text:style-name="Source_20_Text">&lt;section class="books-slider"&gt;</text:span></text:p>
        <text:p text:style-name="P63"/>
        <text:p text:style-name="P63"><text:span text:style-name="Source_20_Text"><text:s text:c="4"/>&lt;div class="slider-header"&gt;</text:span></text:p>
        <text:p text:style-name="P63"/>
        <text:p text:style-name="P63"><text:span text:style-name="Source_20_Text"><text:s text:c="8"/>&lt;h2&gt;Obras em Destaque&lt;/h2&gt;</text:span></text:p>
        <text:p text:style-name="P63"/>
        <text:p text:style-name="P63"><text:span text:style-name="Source_20_Text"><text:s text:c="8"/>&lt;div class="slider-controls"&gt;</text:span></text:p>
        <text:p text:style-name="P63"/>
        <text:p text:style-name="P63"><text:span text:style-name="Source_20_Text"><text:s text:c="12"/>&lt;button class="slider-button prev"&gt;</text:span></text:p>
        <text:p text:style-name="P63"><text:span text:style-name="Source_20_Text"><text:s text:c="16"/>←</text:span></text:p>
        <text:p text:style-name="P63"><text:span text:style-name="Source_20_Text"><text:s text:c="12"/>&lt;/button&gt;</text:span></text:p>
        <text:p text:style-name="P63"><text:soft-page-break/></text:p>
        <text:p text:style-name="P63"><text:span text:style-name="Source_20_Text"><text:s text:c="12"/>&lt;button class="slider-button next"&gt;</text:span></text:p>
        <text:p text:style-name="P63"><text:span text:style-name="Source_20_Text"><text:s text:c="16"/>→</text:span></text:p>
        <text:p text:style-name="P63"><text:span text:style-name="Source_20_Text"><text:s text:c="12"/>&lt;/button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<text:s text:c="4"/>&lt;div class="slider-window"&gt;</text:span></text:p>
        <text:p text:style-name="P63"/>
        <text:p text:style-name="P63"><text:span text:style-name="Source_20_Text"><text:s text:c="8"/>&lt;div class="books-track"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&lt;/section&gt;</text:span></text:p>
      </text:section>
      <text:p text:style-name="P61"/>
      <text:h text:style-name="P57" text:outline-level="2">Estrutura CSS</text:h>
      <text:p text:style-name="P58">O CSS já está praticamente preparado, apenas vamos ajustar para este formato:</text:p>
      <text:section text:style-name="Sect1" text:name="Seção1">
        <text:p text:style-name="P62"><text:bookmark text:name="code-block-viewer"/><text:span text:style-name="Source_20_Text">books-slider</text:span></text:p>
        <text:p text:style-name="P63"><text:span text:style-name="Source_20_Text">│</text:span></text:p>
        <text:p text:style-name="P63"><text:span text:style-name="Source_20_Text">├── slider-header</text:span></text:p>
        <text:p text:style-name="P63"><text:soft-page-break/><text:span text:style-name="Source_20_Text">│ <text:s text:c="5"/>├── título</text:span></text:p>
        <text:p text:style-name="P63"><text:span text:style-name="Source_20_Text">│ <text:s text:c="5"/>└── botões</text:span></text:p>
        <text:p text:style-name="P63"><text:span text:style-name="Source_20_Text">│</text:span></text:p>
        <text:p text:style-name="P63"><text:span text:style-name="Source_20_Text">└── slider-window</text:span></text:p>
        <text:p text:style-name="P63"><text:span text:style-name="Source_20_Text"><text:s text:c="8"/>│</text:span></text:p>
        <text:p text:style-name="P63"><text:span text:style-name="Source_20_Text"><text:s text:c="8"/>└── books-track</text:span></text:p>
        <text:p text:style-name="P63"><text:span text:style-name="Source_20_Text"><text:s text:c="16"/>├── card</text:span></text:p>
        <text:p text:style-name="P63"><text:span text:style-name="Source_20_Text"><text:s text:c="16"/>├── card</text:span></text:p>
        <text:p text:style-name="P63"><text:span text:style-name="Source_20_Text"><text:s text:c="16"/>└── card</text:span></text:p>
      </text:section>
      <text:p text:style-name="P58">O <text:span text:style-name="Source_20_Text">slider-window</text:span> será responsável por esconder os cartões que ficam fora da área visível (<text:span text:style-name="Source_20_Text">overflow: hidden</text:span>), enquanto o <text:span text:style-name="Source_20_Text">books-track</text:span> será movido com <text:span text:style-name="Source_20_Text">transform: translateX(...)</text:span>.</text:p>
      <text:p text:style-name="P61"/>
      <text:h text:style-name="P57" text:outline-level="2">Arquitetura do <text:span text:style-name="Source_20_Text">slider.js</text:span></text:h>
      <text:p text:style-name="P58">Vamos criar uma classe reutilizável:</text:p>
      <text:section text:style-name="Sect1" text:name="Seção2">
        <text:p text:style-name="P62"><text:bookmark text:name="code-block-viewer Copia 1"/><text:span text:style-name="Source_20_Text">class Slider {</text:span></text:p>
        <text:p text:style-name="P63"/>
        <text:p text:style-name="P63"><text:span text:style-name="Source_20_Text"><text:s text:c="4"/>constructor(element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ini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nex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previous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update(){</text:span></text:p>
        <text:p text:style-name="P63"/>
        <text:p text:style-name="P63"><text:span text:style-name="Source_20_Text"><text:s text:c="4"/>}</text:span></text:p>
        <text:p text:style-name="P63"><text:soft-page-break/></text:p>
        <text:p text:style-name="P63"><text:span text:style-name="Source_20_Text">}</text:span></text:p>
      </text:section>
      <text:p text:style-name="P58">Essa abordagem tem várias vantagens:</text:p>
      <text:list text:style-name="L50">
        <text:list-item>
          <text:p text:style-name="P64">Um único ficheiro controla todos os sliders. </text:p>
        </text:list-item>
        <text:list-item>
          <text:p text:style-name="P64">Podemos ter vários sliders na mesma página. </text:p>
        </text:list-item>
        <text:list-item>
          <text:p text:style-name="P65">O código fica organizado e fácil de expandir. </text:p>
        </text:list-item>
      </text:list>
      <text:p text:style-name="P61"/>
      <text:h text:style-name="P57" text:outline-level="2">Funcionalidades que implementaremos</text:h>
      <text:h text:style-name="P66" text:outline-level="3">Sprint 1</text:h>
      <text:list text:style-name="L51">
        <text:list-item>
          <text:p text:style-name="P67">Navegação por botões. </text:p>
        </text:list-item>
        <text:list-item>
          <text:p text:style-name="P67">Movimento suave. </text:p>
        </text:list-item>
        <text:list-item>
          <text:p text:style-name="P67">Responsivo. </text:p>
        </text:list-item>
        <text:list-item>
          <text:p text:style-name="P68">Limites do slider. </text:p>
        </text:list-item>
      </text:list>
      <text:h text:style-name="P66" text:outline-level="3">Sprint 2</text:h>
      <text:list text:style-name="L52">
        <text:list-item>
          <text:p text:style-name="P69">Arrastar com o dedo (touch). </text:p>
        </text:list-item>
        <text:list-item>
          <text:p text:style-name="P69">Arrastar com o rato. </text:p>
        </text:list-item>
        <text:list-item>
          <text:p text:style-name="P69">Auto-play opcional. </text:p>
        </text:list-item>
        <text:list-item>
          <text:p text:style-name="P69">Navegação por teclado. </text:p>
        </text:list-item>
        <text:list-item>
          <text:p text:style-name="P70">Indicadores (● ○ ○ ○). </text:p>
        </text:list-item>
      </text:list>
      <text:p text:style-name="P61"/>
      <text:h text:style-name="P66" text:outline-level="3">Minha recomendação</text:h>
      <text:p text:style-name="P58">Em vez de escrever um <text:span text:style-name="Source_20_Text">slider.js</text:span> simples com poucas linhas, vamos tratá-lo como um componente profissional, da mesma forma que fizemos com <text:span text:style-name="Source_20_Text">componentes.js</text:span>, <text:span text:style-name="Source_20_Text">navigation.js</text:span> e <text:span text:style-name="Source_20_Text">menu.js</text:span>.</text:p>
      <text:p text:style-name="P58">Assim, no final da Biblioteca Apócrifa terás uma pequena biblioteca própria de componentes JavaScript reutilizáveis, o que agrega muito valor ao projeto e ao teu portfólio.</text:p>
      <text:p text:style-name="P56">Excelente. Este é um dos pontos mais importantes do projeto. A partir daqui, a Biblioteca Apócrifa deixa de ser um conjunto de páginas estáticas e começa a comportar-se como uma aplicação.</text:p>
      <text:h text:style-name="P57" text:outline-level="2">O objetivo desta etapa</text:h>
      <text:p text:style-name="P58">Em vez de escrevermos os livros diretamente no HTML:</text:p>
      <text:p text:style-name="P63"><text:span text:style-name="Source_20_Text">&lt;article class="book-card"&gt;</text:span></text:p>
      <text:p text:style-name="P63"><text:span text:style-name="Source_20_Text"><text:s text:c="4"/>&lt;h3&gt;Evangelho de Tomé&lt;/h3&gt;</text:span></text:p>
      <text:p text:style-name="P63"><text:span text:style-name="Source_20_Text"><text:s text:c="4"/>&lt;p&gt;Texto gnóstico encontrado em Nag Hammadi.&lt;/p&gt;</text:span></text:p>
      <text:p text:style-name="P63"><text:span text:style-name="Source_20_Text">&lt;/article&gt;</text:span></text:p>
      <text:p text:style-name="P58">o HTML ficará apenas com um local onde os livros serão inseridos:</text:p>
      <text:p text:style-name="P63"><text:span text:style-name="Source_20_Text">&lt;div class="books-grid"&gt;&lt;/div&gt;</text:span></text:p>
      <text:p text:style-name="P58"><text:soft-page-break/>E todo o conteúdo será carregado a partir de um ficheiro JSON.</text:p>
      <text:p text:style-name="P61"/>
      <text:h text:style-name="P71" text:outline-level="1">Arquitetura que recomendo</text:h>
      <text:p text:style-name="P63"><text:span text:style-name="Source_20_Text">assets/</text:span></text:p>
      <text:p text:style-name="P63"/>
      <text:p text:style-name="P63"><text:span text:style-name="Source_20_Text">│</text:span></text:p>
      <text:p text:style-name="P63"><text:span text:style-name="Source_20_Text">├── data/</text:span></text:p>
      <text:p text:style-name="P63"><text:span text:style-name="Source_20_Text">│ <text:s text:c="5"/>livros.json</text:span></text:p>
      <text:p text:style-name="P63"><text:span text:style-name="Source_20_Text">│</text:span></text:p>
      <text:p text:style-name="P63"><text:span text:style-name="Source_20_Text">├── js/</text:span></text:p>
      <text:p text:style-name="P63"><text:span text:style-name="Source_20_Text">│ <text:s text:c="5"/>componentes.js</text:span></text:p>
      <text:p text:style-name="P63"><text:span text:style-name="Source_20_Text">│ <text:s text:c="5"/>navigation.js</text:span></text:p>
      <text:p text:style-name="P63"><text:span text:style-name="Source_20_Text">│ <text:s text:c="5"/>menu.js</text:span></text:p>
      <text:p text:style-name="P63"><text:span text:style-name="Source_20_Text">│ <text:s text:c="5"/>livros.js <text:s text:c="9"/>← novo</text:span></text:p>
      <text:p text:style-name="P63"><text:span text:style-name="Source_20_Text">│</text:span></text:p>
      <text:p text:style-name="P63"><text:span text:style-name="Source_20_Text">├── css/</text:span></text:p>
      <text:p text:style-name="P61"/>
      <text:h text:style-name="P71" text:outline-level="1">Passo 1 — Criar o <text:span text:style-name="Source_20_Text">livros.json</text:span></text:h>
      <text:p text:style-name="P58">Primeiro vamos definir um modelo de dados sólido. Não vamos criar apenas o necessário para hoje, mas algo que sirva para todo o projeto.</text:p>
      <text:p text:style-name="P58">Exemplo:</text:p>
      <text:p text:style-name="P63"><text:span text:style-name="Source_20_Text">[</text:span></text:p>
      <text:p text:style-name="P63"><text:span text:style-name="Source_20_Text"><text:s text:c="4"/>{</text:span></text:p>
      <text:p text:style-name="P63"><text:span text:style-name="Source_20_Text"><text:s text:c="8"/>"id": 1,</text:span></text:p>
      <text:p text:style-name="P63"><text:span text:style-name="Source_20_Text"><text:s text:c="8"/>"titulo": "Evangelho de Tomé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Coleção de 114 ditos atribuídos a Jesus.",</text:span></text:p>
      <text:p text:style-name="P63"><text:span text:style-name="Source_20_Text"><text:s text:c="8"/>"imagem": "assets/img/livros/tome.jpg",</text:span></text:p>
      <text:p text:style-name="P63"><text:span text:style-name="Source_20_Text"><text:s text:c="8"/>"arquivo": "tome.html",</text:span></text:p>
      <text:p text:style-name="P63"><text:span text:style-name="Source_20_Text"><text:s text:c="8"/>"destaque": true</text:span></text:p>
      <text:p text:style-name="P63"><text:span text:style-name="Source_20_Text"><text:s text:c="4"/>},</text:span></text:p>
      <text:p text:style-name="P63"><text:span text:style-name="Source_20_Text"><text:s text:c="4"/>{</text:span></text:p>
      <text:p text:style-name="P63"><text:span text:style-name="Source_20_Text"><text:s text:c="8"/>"id": 2,</text:span></text:p>
      <text:p text:style-name="P63"><text:soft-page-break/><text:span text:style-name="Source_20_Text"><text:s text:c="8"/>"titulo": "Evangelho de Maria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Texto gnóstico atribuído a Maria Madalena.",</text:span></text:p>
      <text:p text:style-name="P63"><text:span text:style-name="Source_20_Text"><text:s text:c="8"/>"imagem": "assets/img/livros/maria.jpg",</text:span></text:p>
      <text:p text:style-name="P63"><text:span text:style-name="Source_20_Text"><text:s text:c="8"/>"arquivo": "maria.html",</text:span></text:p>
      <text:p text:style-name="P63"><text:span text:style-name="Source_20_Text"><text:s text:c="8"/>"destaque": true</text:span></text:p>
      <text:p text:style-name="P63"><text:span text:style-name="Source_20_Text"><text:s text:c="4"/>}</text:span></text:p>
      <text:p text:style-name="P63"><text:span text:style-name="Source_20_Text">]</text:span></text:p>
      <text:p text:style-name="P61"/>
      <text:h text:style-name="P71" text:outline-level="1">Por que estes campos?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Utiliz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dentificar o livro</text:p>
          </table:table-cell>
        </table:table-row>
        <table:table-row>
          <table:table-cell table:style-name="Tabela5.A1" office:value-type="string">
            <text:p text:style-name="Table_20_Contents">titulo</text:p>
          </table:table-cell>
          <table:table-cell table:style-name="Tabela5.A1" office:value-type="string">
            <text:p text:style-name="Table_20_Contents">nome</text:p>
          </table:table-cell>
        </table:table-row>
        <table:table-row>
          <table:table-cell table:style-name="Tabela5.A1" office:value-type="string">
            <text:p text:style-name="Table_20_Contents">autor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categoria</text:p>
          </table:table-cell>
          <table:table-cell table:style-name="Tabela5.A1" office:value-type="string">
            <text:p text:style-name="Table_20_Contents">filtros</text:p>
          </table:table-cell>
        </table:table-row>
        <table:table-row>
          <table:table-cell table:style-name="Tabela5.A1" office:value-type="string">
            <text:p text:style-name="Table_20_Contents">epoca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descricao</text:p>
          </table:table-cell>
          <table:table-cell table:style-name="Tabela5.A1" office:value-type="string">
            <text:p text:style-name="Table_20_Contents">cartão</text:p>
          </table:table-cell>
        </table:table-row>
        <table:table-row>
          <table:table-cell table:style-name="Tabela5.A1" office:value-type="string">
            <text:p text:style-name="Table_20_Contents">imagem</text:p>
          </table:table-cell>
          <table:table-cell table:style-name="Tabela5.A1" office:value-type="string">
            <text:p text:style-name="Table_20_Contents">capa</text:p>
          </table:table-cell>
        </table:table-row>
        <table:table-row>
          <table:table-cell table:style-name="Tabela5.A1" office:value-type="string">
            <text:p text:style-name="Table_20_Contents">arquivo</text:p>
          </table:table-cell>
          <table:table-cell table:style-name="Tabela5.A1" office:value-type="string">
            <text:p text:style-name="Table_20_Contents">página de leitura</text:p>
          </table:table-cell>
        </table:table-row>
        <table:table-row>
          <table:table-cell table:style-name="Tabela5.A1" office:value-type="string">
            <text:p text:style-name="Table_20_Contents">destaque</text:p>
          </table:table-cell>
          <table:table-cell table:style-name="Tabela5.A1" office:value-type="string">
            <text:p text:style-name="Table_20_Contents">slider da Home</text:p>
          </table:table-cell>
        </table:table-row>
      </table:table>
      <text:p text:style-name="P58">Mais tarde ainda podemos adicionar:</text:p>
      <text:p text:style-name="P63"><text:span text:style-name="Source_20_Text">"idioma": "Copta",</text:span></text:p>
      <text:p text:style-name="P63"><text:span text:style-name="Source_20_Text">"colecao": "Nag Hammadi",</text:span></text:p>
      <text:p text:style-name="P63"><text:span text:style-name="Source_20_Text">"anoDescoberta": 1945,</text:span></text:p>
      <text:p text:style-name="P63"><text:span text:style-name="Source_20_Text">"tags":[]</text:span></text:p>
      <text:p text:style-name="P58">sem alterar o sistema.</text:p>
      <text:p text:style-name="P61"/>
      <text:h text:style-name="P71" text:outline-level="1">Passo 2 — Criar <text:span text:style-name="Source_20_Text">livros.js</text:span></text:h>
      <text:p text:style-name="P58">Este ficheiro ficará responsável por:</text:p>
      <text:list text:style-name="L53">
        <text:list-item>
          <text:p text:style-name="P72">carregar o JSON;</text:p>
        </text:list-item>
        <text:list-item>
          <text:p text:style-name="P72">guardar os livros em memória;</text:p>
        </text:list-item>
        <text:list-item>
          <text:p text:style-name="P72">disponibilizar funções para o resto da aplicação.</text:p>
        </text:list-item>
      </text:list>
      <text:p text:style-name="P58">Não será apenas um <text:span text:style-name="Source_20_Text">fetch()</text:span>. Vamos criar uma pequena camada de acesso aos dados.</text:p>
      <text:p text:style-name="P61"/>
      <text:h text:style-name="P71" text:outline-level="1"><text:soft-page-break/>Estrutura</text:h>
      <text:p text:style-name="P63"><text:span text:style-name="Source_20_Text">class LivrosService {</text:span></text:p>
      <text:p text:style-name="P63"/>
      <text:p text:style-name="P63"><text:span text:style-name="Source_20_Text"><text:s text:c="4"/>async carregar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Todo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Destaque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Categoria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Id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}</text:span></text:p>
      <text:p text:style-name="P58">Esta abordagem é muito melhor do que espalhar <text:span text:style-name="Source_20_Text">fetch()</text:span> pelo projeto inteiro.</text:p>
      <text:p text:style-name="P61"/>
      <text:h text:style-name="P71" text:outline-level="1">No futuro</text:h>
      <text:p text:style-name="P58">Todas as páginas utilizarão este mesmo serviço.</text:p>
      <text:p text:style-name="P58">A Home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Destaques()</text:span></text:p>
      <text:p text:style-name="P63"><text:span text:style-name="Source_20_Text"><text:s text:c="6"/>↓</text:span></text:p>
      <text:p text:style-name="P63"><text:span text:style-name="Source_20_Text">renderizar cards</text:span></text:p>
      <text:p text:style-name="P58"><text:soft-page-break/>A Bibliotec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Todos()</text:span></text:p>
      <text:p text:style-name="P63"><text:span text:style-name="Source_20_Text"><text:s text:c="6"/>↓</text:span></text:p>
      <text:p text:style-name="P63"><text:span text:style-name="Source_20_Text">renderizar todos</text:span></text:p>
      <text:p text:style-name="P58">A Pesquis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Categoria()</text:span></text:p>
      <text:p text:style-name="P58">A Página de leitur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Id()</text:span></text:p>
      <text:p text:style-name="P58">Percebe a vantagem? O JSON é carregado apenas uma vez e todas as páginas reutilizam a mesma fonte de dados.</text:p>
      <text:p text:style-name="P61"/>
      <text:h text:style-name="P71" text:outline-level="1"><text:bookmark-start text:name="__DdeLink__6856_2631705103"/>Roadmap desta funcionalidade</text:h>
      <text:p text:style-name="P58">Eu dividiria este desenvolvimento em quatro pequenos sprints:</text:p>
      <text:h text:style-name="P66" text:outline-level="3">Sprint 1 (agora)</text:h>
      <text:list text:style-name="L54">
        <text:list-item>
          <text:p text:style-name="P73">✅ Criar <text:span text:style-name="Source_20_Text">livros.json</text:span>.</text:p>
        </text:list-item>
        <text:list-item>
          <text:p text:style-name="P73">✅ Criar <text:span text:style-name="Source_20_Text">LivrosService</text:span>.</text:p>
        </text:list-item>
        <text:list-item>
          <text:p text:style-name="P73">✅ Carregar o JSON com <text:span text:style-name="Source_20_Text">fetch()</text:span>.</text:p>
        </text:list-item>
        <text:list-item>
          <text:p text:style-name="P73">✅ Disponibilizar os dados para o projeto.</text:p>
        </text:list-item>
      </text:list>
      <text:h text:style-name="P66" text:outline-level="3">Sprint 2</text:h>
      <text:list text:style-name="L55">
        <text:list-item>
          <text:p text:style-name="P74">Renderizar automaticamente os livros na página <text:span text:style-name="Strong_20_Emphasis">Biblioteca</text:span>.</text:p>
        </text:list-item>
      </text:list>
      <text:h text:style-name="P66" text:outline-level="3">Sprint 3</text:h>
      <text:list text:style-name="L56">
        <text:list-item>
          <text:p text:style-name="P75">Renderizar automaticamente os <text:span text:style-name="Strong_20_Emphasis">destaques</text:span> na Home.</text:p>
        </text:list-item>
      </text:list>
      <text:h text:style-name="P66" text:outline-level="3">Sprint 4</text:h>
      <text:list text:style-name="L57">
        <text:list-item>
          <text:p text:style-name="P76">Implementar filtros, pesquisa e categorias.<text:bookmark-end text:name="__DdeLink__6856_2631705103"/></text:p>
        </text:list-item>
      </text:list>
      <text:p text:style-name="P61"/>
      <text:p text:style-name="P58"><text:soft-page-break/>Na minha opinião, esta é a melhor arquitetura para o projeto. Ela separa claramente <text:span text:style-name="Strong_20_Emphasis">dados (JSON)</text:span>, <text:span text:style-name="Strong_20_Emphasis">lógica (JavaScript)</text:span> e <text:span text:style-name="Strong_20_Emphasis">apresentação (HTML/CSS)</text:span>, tornando a Biblioteca Apócrifa muito mais próxima da estrutura utilizada em aplicações profissionais.</text:p>
      <text:p text:style-name="P56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11T18:06:46.433140457</dc:date>
    <dc:creator>João António</dc:creator>
    <meta:editing-duration>PT11H41M45S</meta:editing-duration>
    <meta:editing-cycles>19</meta:editing-cycles>
    <meta:generator>LibreOffice/26.2.4.2$Linux_X86_64 LibreOffice_project/620$Build-2</meta:generator>
    <meta:document-statistic meta:table-count="5" meta:image-count="0" meta:object-count="0" meta:page-count="63" meta:paragraph-count="1748" meta:word-count="5970" meta:character-count="48281" meta:non-whitespace-character-count="41546"/>
  </office:meta>
</office:document-meta>
</file>