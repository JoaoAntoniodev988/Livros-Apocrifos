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ela1" style:family="table">
      <style:table-properties style:width="16.006cm" table:align="left"/>
    </style:style>
    <style:style style:name="Tabela1.A" style:family="table-column">
      <style:table-column-properties style:column-width="3.769cm"/>
    </style:style>
    <style:style style:name="Tabela1.B" style:family="table-column">
      <style:table-column-properties style:column-width="12.236cm"/>
    </style:style>
    <style:style style:name="Tabela1.A1" style:family="table-cell">
      <style:table-cell-properties style:vertical-align="middle" fo:padding="0.049cm" fo:border="none"/>
    </style:style>
    <style:style style:name="Tabela2" style:family="table">
      <style:table-properties style:width="11.063cm" table:align="left"/>
    </style:style>
    <style:style style:name="Tabela2.A" style:family="table-column">
      <style:table-column-properties style:column-width="3.769cm"/>
    </style:style>
    <style:style style:name="Tabela2.B" style:family="table-column">
      <style:table-column-properties style:column-width="7.294cm"/>
    </style:style>
    <style:style style:name="Tabela2.A1" style:family="table-cell">
      <style:table-cell-properties style:vertical-align="middle" fo:padding="0.049cm" fo:border="none"/>
    </style:style>
    <style:style style:name="Tabela3" style:family="table">
      <style:table-properties style:width="12.324cm" table:align="left"/>
    </style:style>
    <style:style style:name="Tabela3.A" style:family="table-column">
      <style:table-column-properties style:column-width="5.293cm"/>
    </style:style>
    <style:style style:name="Tabela3.B" style:family="table-column">
      <style:table-column-properties style:column-width="7.031cm"/>
    </style:style>
    <style:style style:name="Tabela3.A1" style:family="table-cell">
      <style:table-cell-properties style:vertical-align="middle" fo:padding="0.049cm" fo:border="none"/>
    </style:style>
    <style:style style:name="P1" style:family="paragraph" style:parent-style-name="Text_20_body" style:list-style-name="L1"/>
    <style:style style:name="P2" style:family="paragraph" style:parent-style-name="Preformatted_20_Text">
      <style:paragraph-properties fo:margin-top="0cm" fo:margin-bottom="0.499cm" style:contextual-spacing="false"/>
    </style:style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Preformatted_20_Text">
      <style:paragraph-properties fo:margin-top="0cm" fo:margin-bottom="0.247cm" style:contextual-spacing="false" fo:line-height="115%"/>
    </style:style>
    <style:style style:name="P6" style:family="paragraph" style:parent-style-name="Horizontal_20_Line">
      <style:paragraph-properties fo:margin-top="0cm" fo:margin-bottom="0.247cm" style:contextual-spacing="false" fo:line-height="115%"/>
    </style:style>
    <style:style style:name="P7" style:family="paragraph" style:parent-style-name="Heading_20_2">
      <style:paragraph-properties fo:margin-top="0cm" fo:margin-bottom="0.247cm" style:contextual-spacing="false" fo:line-height="115%"/>
    </style:style>
    <style:style style:name="P8" style:family="paragraph" style:parent-style-name="Heading_20_3">
      <style:paragraph-properties fo:margin-top="0cm" fo:margin-bottom="0.247cm" style:contextual-spacing="false" fo:line-height="115%"/>
    </style:style>
    <style:style style:name="P9" style:family="paragraph" style:parent-style-name="Text_20_body" style:list-style-name="L4"/>
    <style:style style:name="P10" style:family="paragraph" style:parent-style-name="Text_20_body" style:list-style-name="L5"/>
    <style:style style:name="P11" style:family="paragraph" style:parent-style-name="Text_20_body" style:list-style-name="L6"/>
    <style:style style:name="P12" style:family="paragraph" style:parent-style-name="Heading_20_1">
      <style:paragraph-properties fo:margin-top="0cm" fo:margin-bottom="0.247cm" style:contextual-spacing="false" fo:line-height="115%"/>
    </style:style>
    <style:style style:name="P13" style:family="paragraph" style:parent-style-name="Text_20_body" style:list-style-name="L7"/>
    <style:style style:name="P14" style:family="paragraph" style:parent-style-name="Text_20_body" style:list-style-name="L8"/>
    <style:style style:name="P15" style:family="paragraph" style:parent-style-name="Text_20_body" style:list-style-name="L9"/>
    <style:style style:name="P16" style:family="paragraph" style:parent-style-name="Text_20_body" style:list-style-name="L10"/>
    <style:style style:name="P17" style:family="paragraph" style:parent-style-name="Quotations" style:list-style-name="L11"/>
    <style:style style:name="P18" style:family="paragraph" style:parent-style-name="Text_20_body" style:list-style-name="L12"/>
    <style:style style:name="P19" style:family="paragraph" style:parent-style-name="Text_20_body" style:list-style-name="L13"/>
    <style:style style:name="P20" style:family="paragraph" style:parent-style-name="Text_20_body" style:list-style-name="L14"/>
    <style:style style:name="P21" style:family="paragraph" style:parent-style-name="Text_20_body" style:list-style-name="L15"/>
    <style:style style:name="P22" style:family="paragraph" style:parent-style-name="Text_20_body" style:list-style-name="L16"/>
    <style:style style:name="P23" style:family="paragraph" style:parent-style-name="Text_20_body" style:list-style-name="L17"/>
    <style:style style:name="P24" style:family="paragraph" style:parent-style-name="Text_20_body" style:list-style-name="L18"/>
    <style:style style:name="P25" style:family="paragraph" style:parent-style-name="Text_20_body" style:list-style-name="L19"/>
    <style:style style:name="P26" style:family="paragraph" style:parent-style-name="Text_20_body" style:list-style-name="L20"/>
    <style:style style:name="P27" style:family="paragraph" style:parent-style-name="Text_20_body" style:list-style-name="L21"/>
    <style:style style:name="P28" style:family="paragraph" style:parent-style-name="Text_20_body" style:list-style-name="L22"/>
    <style:style style:name="P29" style:family="paragraph" style:parent-style-name="Text_20_body" style:list-style-name="L23">
      <style:paragraph-properties fo:margin-top="0cm" fo:margin-bottom="0cm" style:contextual-spacing="false"/>
    </style:style>
    <style:style style:name="P30" style:family="paragraph" style:parent-style-name="Text_20_body" style:list-style-name="L23"/>
    <style:style style:name="P31" style:family="paragraph" style:parent-style-name="Text_20_body" style:list-style-name="L24"/>
    <style:style style:name="P32" style:family="paragraph" style:parent-style-name="Text_20_body" style:list-style-name="L25"/>
    <style:style style:name="P33" style:family="paragraph" style:parent-style-name="Text_20_body" style:list-style-name="L26"/>
    <style:style style:name="P34" style:family="paragraph" style:parent-style-name="Text_20_body" style:list-style-name="L27"/>
    <style:style style:name="P35" style:family="paragraph" style:parent-style-name="Text_20_body" style:list-style-name="L28"/>
    <style:style style:name="P36" style:family="paragraph" style:parent-style-name="Text_20_body" style:list-style-name="L29"/>
    <style:style style:name="P37" style:family="paragraph" style:parent-style-name="Text_20_body" style:list-style-name="L30"/>
    <style:style style:name="P38" style:family="paragraph" style:parent-style-name="Text_20_body" style:list-style-name="L31"/>
    <style:style style:name="P39" style:family="paragraph" style:parent-style-name="Text_20_body" style:list-style-name="L32"/>
    <style:style style:name="P40" style:family="paragraph" style:parent-style-name="Text_20_body" style:list-style-name="L33"/>
    <style:style style:name="P41" style:family="paragraph" style:parent-style-name="Text_20_body" style:list-style-name="L34"/>
    <style:style style:name="P42" style:family="paragraph" style:parent-style-name="Text_20_body" style:list-style-name="L35"/>
    <style:style style:name="T1" style:family="text">
      <style:text-properties officeooo:rsid="001ce0e6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Perfeito. Agora entramos realmente na <text:span text:style-name="Strong_20_Emphasis">Fase 4 — Desenvolvimento da Base</text:span>.</text:p>
      <text:p text:style-name="Text_20_body">Antes de mexer no código, quero reforçar uma decisão importante de engenharia:</text:p>
      <text:p text:style-name="Text_20_body">O seu <text:span text:style-name="Source_20_Text">index.html</text:span> atual <text:span text:style-name="Strong_20_Emphasis">já possui conteúdo valioso</text:span>, principalmente a parte histórica. Nós não vamos apagar isso. Vamos <text:span text:style-name="Strong_20_Emphasis">refatorar e adaptar para a nova arquitetura do projeto</text:span>.</text:p>
      <text:p text:style-name="Text_20_body">O objetivo desta primeira entrega é:</text:p>
      <text:h text:style-name="Heading_20_1" text:outline-level="1">Sprint 4.1 — Desenvolver a Página Inicial</text:h>
      <text:h text:style-name="Heading_20_2" text:outline-level="2">Meta</text:h>
      <text:p text:style-name="Text_20_body">Transformar o <text:span text:style-name="Source_20_Text">index.html</text:span> em uma página inicial de uma <text:span text:style-name="Strong_20_Emphasis">plataforma de estudo</text:span>, não apenas em um artigo histórico.</text:p>
      <text:p text:style-name="Text_20_body">Hoje ele funciona como uma página informativa. Precisamos transformar em:</text:p>
      <text:p text:style-name="Quotations">Uma porta de entrada para uma biblioteca digital de pesquisa e estudo.</text:p>
      <text:p text:style-name="Horizontal_20_Line"/>
      <text:h text:style-name="Heading_20_1" text:outline-level="1">Problemas atuais encontrados no index</text:h>
      <text:h text:style-name="Heading_20_2" text:outline-level="2">1. O conteúdo está misturado</text:h>
      <text:p text:style-name="Text_20_body">Hoje temos:</text:p>
      <text:list text:style-name="L1">
        <text:list-item>
          <text:p text:style-name="P1">estrutura da página;</text:p>
        </text:list-item>
        <text:list-item>
          <text:p text:style-name="P1">conteúdo histórico;</text:p>
        </text:list-item>
        <text:list-item>
          <text:p text:style-name="P1">navegação;</text:p>
        </text:list-item>
        <text:list-item>
          <text:p text:style-name="P1">rodapé;</text:p>
        </text:list-item>
      </text:list>
      <text:p text:style-name="Text_20_body">tudo dentro do mesmo arquivo.</text:p>
      <text:p text:style-name="Text_20_body">No futuro isso dificulta manutenção.</text:p>
      <text:p text:style-name="Horizontal_20_Line"/>
      <text:h text:style-name="Heading_20_2" text:outline-level="2">2. Falta uma hierarquia de página inicial</text:h>
      <text:p text:style-name="Text_20_body">Pelo wireframe definido, a Home precisa ter:</text:p>
      <text:p text:style-name="Preformatted_20_Text"><text:span text:style-name="Source_20_Text">Navbar</text:span></text:p>
      <text:p text:style-name="Preformatted_20_Text"/>
      <text:p text:style-name="Preformatted_20_Text"><text:span text:style-name="Source_20_Text">Hero (apresentação)</text:span></text:p>
      <text:p text:style-name="Preformatted_20_Text"/>
      <text:p text:style-name="Preformatted_20_Text"><text:span text:style-name="Source_20_Text">Introdução histórica</text:span></text:p>
      <text:p text:style-name="Preformatted_20_Text"/>
      <text:p text:style-name="Preformatted_20_Text"><text:span text:style-name="Source_20_Text">Como funciona a plataforma</text:span></text:p>
      <text:p text:style-name="Preformatted_20_Text"/>
      <text:p text:style-name="Preformatted_20_Text"><text:span text:style-name="Source_20_Text">Obras em destaque</text:span></text:p>
      <text:p text:style-name="Preformatted_20_Text"><text:soft-page-break/></text:p>
      <text:p text:style-name="Preformatted_20_Text"><text:span text:style-name="Source_20_Text">Nota do editor</text:span></text:p>
      <text:p text:style-name="Preformatted_20_Text"/>
      <text:p text:style-name="P2"><text:span text:style-name="Source_20_Text">Footer</text:span></text:p>
      <text:p text:style-name="Text_20_body">Hoje temos:</text:p>
      <text:p text:style-name="Preformatted_20_Text"><text:span text:style-name="Source_20_Text">Navbar</text:span></text:p>
      <text:p text:style-name="Preformatted_20_Text"/>
      <text:p text:style-name="Preformatted_20_Text"><text:span text:style-name="Source_20_Text">Texto gigante</text:span></text:p>
      <text:p text:style-name="Preformatted_20_Text"/>
      <text:p text:style-name="Preformatted_20_Text"><text:span text:style-name="Source_20_Text">Gnose</text:span></text:p>
      <text:p text:style-name="Preformatted_20_Text"/>
      <text:p text:style-name="Preformatted_20_Text"><text:span text:style-name="Source_20_Text">Nota</text:span></text:p>
      <text:p text:style-name="Preformatted_20_Text"/>
      <text:p text:style-name="P2"><text:span text:style-name="Source_20_Text">Footer</text:span></text:p>
      <text:p text:style-name="Horizontal_20_Line"/>
      <text:h text:style-name="Heading_20_2" text:outline-level="2">3. Conteúdo histórico precisa virar uma seção</text:h>
      <text:p text:style-name="Text_20_body">O conteúdo atual é excelente, mas ele deve ser organizado.</text:p>
      <text:p text:style-name="Text_20_body">Exemplo:</text:p>
      <text:p text:style-name="Text_20_body">Antes:</text:p>
      <text:p text:style-name="Preformatted_20_Text"><text:span text:style-name="Source_20_Text">&lt;h2&gt;A grande descoberta: Nag Hammadi&lt;/h2&gt;</text:span></text:p>
      <text:p text:style-name="Preformatted_20_Text"/>
      <text:p text:style-name="P2"><text:span text:style-name="Source_20_Text">&lt;p&gt;Texto...&lt;/p&gt;</text:span></text:p>
      <text:p text:style-name="Text_20_body">Depois:</text:p>
      <text:p text:style-name="Preformatted_20_Text"><text:span text:style-name="Source_20_Text">&lt;section class="history-section"&gt;</text:span></text:p>
      <text:p text:style-name="Preformatted_20_Text"/>
      <text:p text:style-name="Preformatted_20_Text"><text:span text:style-name="Source_20_Text">&lt;h2&gt;A grande descoberta: Nag Hammadi&lt;/h2&gt;</text:span></text:p>
      <text:p text:style-name="Preformatted_20_Text"/>
      <text:p text:style-name="Preformatted_20_Text"><text:span text:style-name="Source_20_Text">&lt;p&gt;</text:span></text:p>
      <text:p text:style-name="Preformatted_20_Text"><text:span text:style-name="Source_20_Text">Texto...</text:span></text:p>
      <text:p text:style-name="Preformatted_20_Text"><text:span text:style-name="Source_20_Text">&lt;/p&gt;</text:span></text:p>
      <text:p text:style-name="Preformatted_20_Text"/>
      <text:p text:style-name="P2"><text:span text:style-name="Source_20_Text">&lt;/section&gt;</text:span></text:p>
      <text:p text:style-name="Text_20_body">Isso facilita:</text:p>
      <text:list text:style-name="L2">
        <text:list-item>
          <text:p text:style-name="P3">CSS;</text:p>
        </text:list-item>
        <text:list-item>
          <text:p text:style-name="P3">leitura;</text:p>
        </text:list-item>
        <text:list-item>
          <text:p text:style-name="P3">responsividade;</text:p>
        </text:list-item>
        <text:list-item>
          <text:p text:style-name="P3">acessibilidade.</text:p>
        </text:list-item>
      </text:list>
      <text:p text:style-name="Horizontal_20_Line"/>
      <text:h text:style-name="Heading_20_1" text:outline-level="1">Nova estrutura planejada para o index.html</text:h>
      <text:p text:style-name="Text_20_body">A nova versão ficará assim:</text:p>
      <text:p text:style-name="Preformatted_20_Text"><text:span text:style-name="Source_20_Text">&lt;body&gt;</text:span></text:p>
      <text:p text:style-name="Preformatted_20_Text"><text:soft-page-break/></text:p>
      <text:p text:style-name="Preformatted_20_Text"><text:span text:style-name="Source_20_Text">&lt;header&gt;</text:span></text:p>
      <text:p text:style-name="Preformatted_20_Text"><text:span text:style-name="Source_20_Text"><text:s text:c="4"/>Navbar</text:span></text:p>
      <text:p text:style-name="Preformatted_20_Text"><text:span text:style-name="Source_20_Text">&lt;/header&gt;</text:span></text:p>
      <text:p text:style-name="Preformatted_20_Text"/>
      <text:p text:style-name="Preformatted_20_Text"/>
      <text:p text:style-name="Preformatted_20_Text"><text:span text:style-name="Source_20_Text">&lt;main&gt;</text:span></text:p>
      <text:p text:style-name="Preformatted_20_Text"/>
      <text:p text:style-name="Preformatted_20_Text"><text:span text:style-name="Source_20_Text">&lt;section class="hero"&gt;</text:span></text:p>
      <text:p text:style-name="Preformatted_20_Text"/>
      <text:p text:style-name="Preformatted_20_Text"><text:span text:style-name="Source_20_Text"><text:s text:c="4"/>Título da plataforma</text:span></text:p>
      <text:p text:style-name="Preformatted_20_Text"/>
      <text:p text:style-name="Preformatted_20_Text"><text:span text:style-name="Source_20_Text"><text:s text:c="4"/>Descrição</text:span></text:p>
      <text:p text:style-name="Preformatted_20_Text"/>
      <text:p text:style-name="Preformatted_20_Text"><text:span text:style-name="Source_20_Text"><text:s text:c="4"/>Botão explorar biblioteca</text:span></text:p>
      <text:p text:style-name="Preformatted_20_Text"/>
      <text:p text:style-name="Preformatted_20_Text"><text:span text:style-name="Source_20_Text">&lt;/section&gt;</text:span></text:p>
      <text:p text:style-name="Preformatted_20_Text"/>
      <text:p text:style-name="Preformatted_20_Text"/>
      <text:p text:style-name="Preformatted_20_Text"/>
      <text:p text:style-name="Preformatted_20_Text"><text:span text:style-name="Source_20_Text">&lt;section class="intro"&gt;</text:span></text:p>
      <text:p text:style-name="Preformatted_20_Text"/>
      <text:p text:style-name="Preformatted_20_Text"><text:span text:style-name="Source_20_Text"><text:s text:c="4"/>O que são textos apócrifos?</text:span></text:p>
      <text:p text:style-name="Preformatted_20_Text"/>
      <text:p text:style-name="Preformatted_20_Text"><text:span text:style-name="Source_20_Text">&lt;/section&gt;</text:span></text:p>
      <text:p text:style-name="Preformatted_20_Text"/>
      <text:p text:style-name="Preformatted_20_Text"/>
      <text:p text:style-name="Preformatted_20_Text"/>
      <text:p text:style-name="Preformatted_20_Text"><text:span text:style-name="Source_20_Text">&lt;section class="history"&gt;</text:span></text:p>
      <text:p text:style-name="Preformatted_20_Text"/>
      <text:p text:style-name="Preformatted_20_Text"><text:span text:style-name="Source_20_Text"><text:s text:c="4"/>Origem histórica</text:span></text:p>
      <text:p text:style-name="Preformatted_20_Text"/>
      <text:p text:style-name="Preformatted_20_Text"><text:span text:style-name="Source_20_Text"><text:s text:c="4"/>Nag Hammadi</text:span></text:p>
      <text:p text:style-name="Preformatted_20_Text"/>
      <text:p text:style-name="Preformatted_20_Text"><text:span text:style-name="Source_20_Text"><text:s text:c="4"/>Manuscritos do Mar Morto</text:span></text:p>
      <text:p text:style-name="Preformatted_20_Text"/>
      <text:p text:style-name="Preformatted_20_Text"><text:span text:style-name="Source_20_Text">&lt;/section&gt;</text:span></text:p>
      <text:p text:style-name="Preformatted_20_Text"/>
      <text:p text:style-name="Preformatted_20_Text"/>
      <text:p text:style-name="Preformatted_20_Text"/>
      <text:p text:style-name="Preformatted_20_Text"><text:span text:style-name="Source_20_Text">&lt;section class="platform"&gt;</text:span></text:p>
      <text:p text:style-name="Preformatted_20_Text"/>
      <text:p text:style-name="Preformatted_20_Text"><text:span text:style-name="Source_20_Text"><text:s text:c="4"/>Como funciona?</text:span></text:p>
      <text:p text:style-name="Preformatted_20_Text"/>
      <text:p text:style-name="Preformatted_20_Text"><text:span text:style-name="Source_20_Text"><text:s text:c="4"/>Biblioteca</text:span></text:p>
      <text:p text:style-name="Preformatted_20_Text"><text:span text:style-name="Source_20_Text"><text:s text:c="4"/>Leitura</text:span></text:p>
      <text:p text:style-name="Preformatted_20_Text"><text:span text:style-name="Source_20_Text"><text:s text:c="4"/>Pesquisa</text:span></text:p>
      <text:p text:style-name="Preformatted_20_Text"/>
      <text:p text:style-name="Preformatted_20_Text"><text:span text:style-name="Source_20_Text">&lt;/section&gt;</text:span></text:p>
      <text:p text:style-name="Preformatted_20_Text"/>
      <text:p text:style-name="Preformatted_20_Text"/>
      <text:p text:style-name="Preformatted_20_Text"/>
      <text:p text:style-name="Preformatted_20_Text"><text:span text:style-name="Source_20_Text">&lt;section class="featured-books"&gt;</text:span></text:p>
      <text:p text:style-name="Preformatted_20_Text"/>
      <text:p text:style-name="Preformatted_20_Text"><text:span text:style-name="Source_20_Text"><text:s text:c="4"/>Obras em destaque</text:span></text:p>
      <text:p text:style-name="Preformatted_20_Text"/>
      <text:p text:style-name="Preformatted_20_Text"><text:span text:style-name="Source_20_Text">&lt;/section&gt;</text:span></text:p>
      <text:p text:style-name="Preformatted_20_Text"/>
      <text:p text:style-name="Preformatted_20_Text"/>
      <text:p text:style-name="Preformatted_20_Text"/>
      <text:p text:style-name="Preformatted_20_Text"><text:span text:style-name="Source_20_Text">&lt;section class="editor-note"&gt;</text:span></text:p>
      <text:p text:style-name="Preformatted_20_Text"/>
      <text:p text:style-name="Preformatted_20_Text"><text:span text:style-name="Source_20_Text"><text:s text:c="4"/>Nota do editor</text:span></text:p>
      <text:p text:style-name="Preformatted_20_Text"/>
      <text:p text:style-name="Preformatted_20_Text"><text:soft-page-break/><text:span text:style-name="Source_20_Text">&lt;/section&gt;</text:span></text:p>
      <text:p text:style-name="Preformatted_20_Text"/>
      <text:p text:style-name="Preformatted_20_Text"/>
      <text:p text:style-name="Preformatted_20_Text"><text:span text:style-name="Source_20_Text">&lt;/main&gt;</text:span></text:p>
      <text:p text:style-name="Preformatted_20_Text"/>
      <text:p text:style-name="Preformatted_20_Text"/>
      <text:p text:style-name="Preformatted_20_Text"><text:span text:style-name="Source_20_Text">&lt;footer&gt;</text:span></text:p>
      <text:p text:style-name="Preformatted_20_Text"/>
      <text:p text:style-name="Preformatted_20_Text"><text:span text:style-name="Source_20_Text">&lt;/footer&gt;</text:span></text:p>
      <text:p text:style-name="Preformatted_20_Text"/>
      <text:p text:style-name="Preformatted_20_Text"/>
      <text:p text:style-name="P2"><text:span text:style-name="Source_20_Text">&lt;/body&gt;</text:span></text:p>
      <text:p text:style-name="Horizontal_20_Line"/>
      <text:h text:style-name="Heading_20_1" text:outline-level="1">Alterações que faremos no seu conteúdo</text:h>
      <text:h text:style-name="Heading_20_2" text:outline-level="2">O texto inicial será transformado em Hero</text:h>
      <text:p text:style-name="Text_20_body">Atual:</text:p>
      <text:p text:style-name="Quotations">Início</text:p>
      <text:p text:style-name="Text_20_body">Será substituído por algo mais alinhado ao projeto:</text:p>
      <text:p text:style-name="Text_20_body">Exemplo:</text:p>
      <text:p text:style-name="Preformatted_20_Text"><text:span text:style-name="Source_20_Text">Biblioteca Apócrifa</text:span></text:p>
      <text:p text:style-name="Preformatted_20_Text"/>
      <text:p text:style-name="Preformatted_20_Text"><text:span text:style-name="Source_20_Text">Uma plataforma digital dedicada ao estudo,</text:span></text:p>
      <text:p text:style-name="Preformatted_20_Text"><text:span text:style-name="Source_20_Text">preservação e pesquisa de textos antigos.</text:span></text:p>
      <text:p text:style-name="Preformatted_20_Text"/>
      <text:p text:style-name="Preformatted_20_Text"><text:span text:style-name="Source_20_Text">Explore manuscritos, evangelhos apócrifos</text:span></text:p>
      <text:p text:style-name="Preformatted_20_Text"><text:span text:style-name="Source_20_Text">e literatura gnóstica em uma experiência</text:span></text:p>
      <text:p text:style-name="P2"><text:span text:style-name="Source_20_Text">organizada de leitura.</text:span></text:p>
      <text:p text:style-name="Horizontal_20_Line"/>
      <text:h text:style-name="Heading_20_1" text:outline-level="1">Nova seção: Como funciona</text:h>
      <text:p text:style-name="Text_20_body">Essa parte ainda não existe no seu código.</text:p>
      <text:p text:style-name="Text_20_body">Vamos adicionar:</text:p>
      <text:p text:style-name="Preformatted_20_Text"><text:span text:style-name="Source_20_Text">📚 Biblioteca</text:span></text:p>
      <text:p text:style-name="Preformatted_20_Text"/>
      <text:p text:style-name="Preformatted_20_Text"><text:span text:style-name="Source_20_Text">Encontre textos históricos organizados.</text:span></text:p>
      <text:p text:style-name="Preformatted_20_Text"/>
      <text:p text:style-name="Preformatted_20_Text"/>
      <text:p text:style-name="Preformatted_20_Text"><text:span text:style-name="Source_20_Text"> Área de leitura</text:span></text:p>
      <text:p text:style-name="Preformatted_20_Text"/>
      <text:p text:style-name="Preformatted_20_Text"><text:span text:style-name="Source_20_Text">Leia cada obra dividida por seções.</text:span></text:p>
      <text:p text:style-name="Preformatted_20_Text"/>
      <text:p text:style-name="Preformatted_20_Text"/>
      <text:p text:style-name="Preformatted_20_Text"><text:span text:style-name="Source_20_Text"> Pesquisa</text:span></text:p>
      <text:p text:style-name="Preformatted_20_Text"/>
      <text:p text:style-name="P2"><text:span text:style-name="Source_20_Text">Explore contexto histórico e comentários.</text:span></text:p>
      <text:p text:style-name="Text_20_body"><text:soft-page-break/>Isso conecta o usuário com a proposta da plataforma.</text:p>
      <text:p text:style-name="Horizontal_20_Line"/>
      <text:h text:style-name="Heading_20_1" text:outline-level="1">Nova seção: Obras em destaque</text:h>
      <text:p text:style-name="Text_20_body">Hoje existe:</text:p>
      <text:p text:style-name="Preformatted_20_Text"><text:span text:style-name="Source_20_Text">&lt;section class="livros-destaque"&gt;</text:span></text:p>
      <text:p text:style-name="Preformatted_20_Text"><text:span text:style-name="Source_20_Text">&lt;h2&gt;Gnose&lt;/h2&gt;</text:span></text:p>
      <text:p text:style-name="P2"><text:span text:style-name="Source_20_Text">&lt;/section&gt;</text:span></text:p>
      <text:p text:style-name="Text_20_body">Está muito vazio.</text:p>
      <text:p text:style-name="Text_20_body">Vamos preparar para receber futuramente dados do:</text:p>
      <text:p text:style-name="P2"><text:span text:style-name="Source_20_Text">assets/dados/livros.json</text:span></text:p>
      <text:p text:style-name="Text_20_body">Estrutura:</text:p>
      <text:p text:style-name="Preformatted_20_Text"><text:span text:style-name="Source_20_Text">Obras em destaque</text:span></text:p>
      <text:p text:style-name="Preformatted_20_Text"/>
      <text:p text:style-name="Preformatted_20_Text"><text:span text:style-name="Source_20_Text">[ Evangelho de Tomé ]</text:span></text:p>
      <text:p text:style-name="Preformatted_20_Text"/>
      <text:p text:style-name="Preformatted_20_Text"><text:span text:style-name="Source_20_Text">[ Evangelho de Maria ]</text:span></text:p>
      <text:p text:style-name="Preformatted_20_Text"/>
      <text:p text:style-name="P2"><text:span text:style-name="Source_20_Text">[ Apócrifo de João ]</text:span></text:p>
      <text:p text:style-name="Horizontal_20_Line"/>
      <text:h text:style-name="Heading_20_1" text:outline-level="1">O que NÃO vamos fazer agora</text:h>
      <text:p text:style-name="Text_20_body">Para manter o foco:</text:p>
      <text:p text:style-name="Text_20_body">❌ Não criar JavaScript ainda.</text:p>
      <text:p text:style-name="Text_20_body">❌ Não ligar JSON ainda.</text:p>
      <text:p text:style-name="Text_20_body">❌ Não criar cards dinâmicos ainda.</text:p>
      <text:p text:style-name="Text_20_body">❌ Não fazer PWA ainda.</text:p>
      <text:p text:style-name="Text_20_body">Primeiro:</text:p>
      <text:p text:style-name="Text_20_body">HTML sólido.</text:p>
      <text:p text:style-name="Horizontal_20_Line"/>
      <text:h text:style-name="Heading_20_1" text:outline-level="1">Próximo passo prático</text:h>
      <text:p text:style-name="Text_20_body">Vou fazer a primeira refatoração do seu <text:span text:style-name="Source_20_Text">index.html</text:span>.</text:p>
      <text:p text:style-name="Text_20_body">A entrega será:</text:p>
      <text:p text:style-name="Text_20_body">✅ HTML5 semântico.<text:line-break/>✅ Estrutura baseada no wireframe.<text:line-break/><text:soft-page-break/>✅ Conteúdo histórico preservado.<text:line-break/>✅ Classes preparadas para o CSS do Design System.<text:line-break/>✅ Compatível com a arquitetura definida.</text:p>
      <text:p text:style-name="Text_20_body">Depois dessa etapa validamos o HTML e só então avançamos para o CSS da Home (<text:span text:style-name="Source_20_Text">home.css</text:span>).</text:p>
      <text:p text:style-name="Text_20_body">Perfeito. Fiz a primeira refatoração do seu <text:span text:style-name="Source_20_Text">index.html</text:span> seguindo a arquitetura que definimos.</text:p>
      <text:p text:style-name="Text_20_body">Nesta versão eu mantive o conteúdo histórico como patrimônio do projeto, mas reorganizei para funcionar como <text:span text:style-name="Strong_20_Emphasis">página inicial de uma plataforma de estudo</text:span>.</text:p>
      <text:p text:style-name="Text_20_body">Principais mudanças:</text:p>
      <text:list text:style-name="L3">
        <text:list-item>
          <text:p text:style-name="P4">Removido o excesso de texto direto no <text:span text:style-name="Source_20_Text">&lt;main&gt;</text:span>.</text:p>
        </text:list-item>
        <text:list-item>
          <text:p text:style-name="P4">Criada uma seção <text:span text:style-name="Strong_20_Emphasis">Hero</text:span> para apresentar a plataforma.</text:p>
        </text:list-item>
        <text:list-item>
          <text:p text:style-name="P4">Conteúdo histórico organizado em blocos.</text:p>
        </text:list-item>
        <text:list-item>
          <text:p text:style-name="P4">Criada uma seção "Como funciona".</text:p>
        </text:list-item>
        <text:list-item>
          <text:p text:style-name="P4">Criada uma área preparada para livros em destaque.</text:p>
        </text:list-item>
        <text:list-item>
          <text:p text:style-name="P4">Mantida a navegação atual.</text:p>
        </text:list-item>
        <text:list-item>
          <text:p text:style-name="P4">Mantida a estrutura preparada para o nosso CSS (<text:span text:style-name="Source_20_Text">home.css</text:span>).</text:p>
        </text:list-item>
        <text:list-item>
          <text:p text:style-name="P4">Melhorada a semântica HTML.</text:p>
        </text:list-item>
      </text:list>
      <text:p text:style-name="P5"><text:span text:style-name="Source_20_Text">&lt;!DOCTYPE html&gt;</text:span></text:p>
      <text:p text:style-name="P5"><text:span text:style-name="Source_20_Text">&lt;html lang="pt-br"&gt;</text:span></text:p>
      <text:p text:style-name="P5"/>
      <text:p text:style-name="P5"><text:span text:style-name="Source_20_Text">&lt;head&gt;</text:span></text:p>
      <text:p text:style-name="P5"><text:span text:style-name="Source_20_Text"><text:s text:c="4"/>&lt;meta charset="UTF-8"&gt;</text:span></text:p>
      <text:p text:style-name="P5"><text:span text:style-name="Source_20_Text"><text:s text:c="4"/>&lt;meta name="viewport" content="width=device-width, initial-scale=1.0"&gt;</text:span></text:p>
      <text:p text:style-name="P5"/>
      <text:p text:style-name="P5"><text:span text:style-name="Source_20_Text"><text:s text:c="4"/>&lt;title&gt;Biblioteca Apócrifa | Plataforma de Estudo&lt;/title&gt;</text:span></text:p>
      <text:p text:style-name="P5"/>
      <text:p text:style-name="P5"><text:span text:style-name="Source_20_Text"><text:s text:c="4"/>&lt;!-- Google Fonts --&gt;</text:span></text:p>
      <text:p text:style-name="P5"><text:span text:style-name="Source_20_Text"><text:s text:c="4"/>&lt;link rel="preconnect" href="https://fonts.googleapis.com"&gt;</text:span></text:p>
      <text:p text:style-name="P5"><text:span text:style-name="Source_20_Text"><text:s text:c="4"/>&lt;link rel="preconnect" href="https://fonts.gstatic.com" crossorigin&gt;</text:span></text:p>
      <text:p text:style-name="P5"/>
      <text:p text:style-name="P5"><text:span text:style-name="Source_20_Text"><text:s text:c="4"/>&lt;link href="https://fonts.googleapis.com/css2?family=Merriweather:wght@300;400;700&amp;family=Open+Sans:wght@300;400;600;700&amp;display=swap" rel="stylesheet"&gt;</text:span></text:p>
      <text:p text:style-name="P5"/>
      <text:p text:style-name="P5"/>
      <text:p text:style-name="P5"><text:span text:style-name="Source_20_Text"><text:s text:c="4"/>&lt;!-- CSS Global --&gt;</text:span></text:p>
      <text:p text:style-name="P5"><text:span text:style-name="Source_20_Text"><text:s text:c="4"/>&lt;link rel="stylesheet" href="assets/css/variables.css"&gt;</text:span></text:p>
      <text:p text:style-name="P5"><text:soft-page-break/><text:span text:style-name="Source_20_Text"><text:s text:c="4"/>&lt;link rel="stylesheet" href="assets/css/base.css"&gt;</text:span></text:p>
      <text:p text:style-name="P5"><text:span text:style-name="Source_20_Text"><text:s text:c="4"/>&lt;link rel="stylesheet" href="assets/css/layout.css"&gt;</text:span></text:p>
      <text:p text:style-name="P5"><text:span text:style-name="Source_20_Text"><text:s text:c="4"/>&lt;link rel="stylesheet" href="assets/css/components.css"&gt;</text:span></text:p>
      <text:p text:style-name="P5"/>
      <text:p text:style-name="P5"><text:span text:style-name="Source_20_Text"><text:s text:c="4"/>&lt;!-- CSS da Página --&gt;</text:span></text:p>
      <text:p text:style-name="P5"><text:span text:style-name="Source_20_Text"><text:s text:c="4"/>&lt;link rel="stylesheet" href="assets/css/home.css"&gt;</text:span></text:p>
      <text:p text:style-name="P5"/>
      <text:p text:style-name="P5"><text:span text:style-name="Source_20_Text">&lt;/head&gt;</text:span></text:p>
      <text:p text:style-name="P5"/>
      <text:p text:style-name="P5"/>
      <text:p text:style-name="P5"><text:span text:style-name="Source_20_Text">&lt;body&gt;</text:span></text:p>
      <text:p text:style-name="P5"/>
      <text:p text:style-name="P5"/>
      <text:p text:style-name="P5"><text:span text:style-name="Source_20_Text">&lt;header class="app-header"&gt;</text:span></text:p>
      <text:p text:style-name="P5"/>
      <text:p text:style-name="P5"><text:span text:style-name="Source_20_Text"><text:s text:c="4"/>&lt;div class="container app-header__container"&gt;</text:span></text:p>
      <text:p text:style-name="P5"/>
      <text:p text:style-name="P5"><text:span text:style-name="Source_20_Text"><text:s text:c="8"/>&lt;a href="index.html" class="app-header__logo"&gt;</text:span></text:p>
      <text:p text:style-name="P5"><text:span text:style-name="Source_20_Text"><text:s text:c="12"/>Biblioteca Apócrifa</text:span></text:p>
      <text:p text:style-name="P5"><text:span text:style-name="Source_20_Text"><text:s text:c="8"/>&lt;/a&gt;</text:span></text:p>
      <text:p text:style-name="P5"/>
      <text:p text:style-name="P5"/>
      <text:p text:style-name="P5"><text:span text:style-name="Source_20_Text"><text:s text:c="8"/>&lt;nav class="app-header__nav"&gt;</text:span></text:p>
      <text:p text:style-name="P5"/>
      <text:p text:style-name="P5"><text:span text:style-name="Source_20_Text"><text:s text:c="12"/>&lt;a href="index.html"&gt;</text:span></text:p>
      <text:p text:style-name="P5"><text:span text:style-name="Source_20_Text"><text:s text:c="16"/>Início</text:span></text:p>
      <text:p text:style-name="P5"><text:span text:style-name="Source_20_Text"><text:s text:c="12"/>&lt;/a&gt;</text:span></text:p>
      <text:p text:style-name="P5"/>
      <text:p text:style-name="P5"><text:span text:style-name="Source_20_Text"><text:s text:c="12"/>&lt;a href="paginas/biblioteca.html"&gt;</text:span></text:p>
      <text:p text:style-name="P5"><text:span text:style-name="Source_20_Text"><text:s text:c="16"/>Biblioteca</text:span></text:p>
      <text:p text:style-name="P5"><text:span text:style-name="Source_20_Text"><text:s text:c="12"/>&lt;/a&gt;</text:span></text:p>
      <text:p text:style-name="P5"/>
      <text:p text:style-name="P5"><text:span text:style-name="Source_20_Text"><text:s text:c="12"/>&lt;a href="paginas/leitura.html"&gt;</text:span></text:p>
      <text:p text:style-name="P5"><text:span text:style-name="Source_20_Text"><text:s text:c="16"/>Área de Leitura</text:span></text:p>
      <text:p text:style-name="P5"><text:span text:style-name="Source_20_Text"><text:s text:c="12"/>&lt;/a&gt;</text:span></text:p>
      <text:p text:style-name="P5"/>
      <text:p text:style-name="P5"><text:soft-page-break/><text:span text:style-name="Source_20_Text"><text:s text:c="12"/>&lt;a href="paginas/comunidade.html"&gt;</text:span></text:p>
      <text:p text:style-name="P5"><text:span text:style-name="Source_20_Text"><text:s text:c="16"/>Comunidade</text:span></text:p>
      <text:p text:style-name="P5"><text:span text:style-name="Source_20_Text"><text:s text:c="12"/>&lt;/a&gt;</text:span></text:p>
      <text:p text:style-name="P5"/>
      <text:p text:style-name="P5"><text:span text:style-name="Source_20_Text"><text:s text:c="12"/>&lt;a href="paginas/perfil.html"&gt;</text:span></text:p>
      <text:p text:style-name="P5"><text:span text:style-name="Source_20_Text"><text:s text:c="16"/>Perfil</text:span></text:p>
      <text:p text:style-name="P5"><text:span text:style-name="Source_20_Text"><text:s text:c="12"/>&lt;/a&gt;</text:span></text:p>
      <text:p text:style-name="P5"/>
      <text:p text:style-name="P5"><text:span text:style-name="Source_20_Text"><text:s text:c="8"/>&lt;/nav&gt;</text:span></text:p>
      <text:p text:style-name="P5"/>
      <text:p text:style-name="P5"/>
      <text:p text:style-name="P5"><text:span text:style-name="Source_20_Text"><text:s text:c="8"/>&lt;div class="app-header__actions"&gt;</text:span></text:p>
      <text:p text:style-name="P5"/>
      <text:p text:style-name="P5"><text:span text:style-name="Source_20_Text"><text:s text:c="12"/>&lt;button class="icon-button" aria-label="Pesquisar"&gt;</text:span></text:p>
      <text:p text:style-name="P5"><text:span text:style-name="Source_20_Text"><text:s text:c="16"/>🔍</text:span></text:p>
      <text:p text:style-name="P5"><text:span text:style-name="Source_20_Text"><text:s text:c="12"/>&lt;/button&gt;</text:span></text:p>
      <text:p text:style-name="P5"/>
      <text:p text:style-name="P5"/>
      <text:p text:style-name="P5"><text:span text:style-name="Source_20_Text"><text:s text:c="12"/>&lt;button class="icon-button" aria-label="Perfil"&gt;</text:span></text:p>
      <text:p text:style-name="P5"><text:span text:style-name="Source_20_Text"><text:s text:c="16"/>👤</text:span></text:p>
      <text:p text:style-name="P5"><text:span text:style-name="Source_20_Text"><text:s text:c="12"/>&lt;/button&gt;</text:span></text:p>
      <text:p text:style-name="P5"/>
      <text:p text:style-name="P5"><text:span text:style-name="Source_20_Text"><text:s text:c="8"/>&lt;/div&gt;</text:span></text:p>
      <text:p text:style-name="P5"/>
      <text:p text:style-name="P5"><text:span text:style-name="Source_20_Text"><text:s text:c="4"/>&lt;/div&gt;</text:span></text:p>
      <text:p text:style-name="P5"/>
      <text:p text:style-name="P5"><text:span text:style-name="Source_20_Text">&lt;/header&gt;</text:span></text:p>
      <text:p text:style-name="P5"/>
      <text:p text:style-name="P5"/>
      <text:p text:style-name="P5"/>
      <text:p text:style-name="P5"><text:span text:style-name="Source_20_Text">&lt;main&gt;</text:span></text:p>
      <text:p text:style-name="P5"/>
      <text:p text:style-name="P5"/>
      <text:p text:style-name="P5"><text:span text:style-name="Source_20_Text">&lt;!-- HERO --&gt;</text:span></text:p>
      <text:p text:style-name="P5"/>
      <text:p text:style-name="P5"><text:span text:style-name="Source_20_Text">&lt;section class="hero"&gt;</text:span></text:p>
      <text:p text:style-name="P5"><text:soft-page-break/></text:p>
      <text:p text:style-name="P5"><text:span text:style-name="Source_20_Text"><text:s text:c="4"/>&lt;div class="container"&gt;</text:span></text:p>
      <text:p text:style-name="P5"/>
      <text:p text:style-name="P5"><text:span text:style-name="Source_20_Text"><text:s text:c="8"/>&lt;h1&gt;</text:span></text:p>
      <text:p text:style-name="P5"><text:span text:style-name="Source_20_Text"><text:s text:c="12"/>Biblioteca Apócrifa</text:span></text:p>
      <text:p text:style-name="P5"><text:span text:style-name="Source_20_Text"><text:s text:c="8"/>&lt;/h1&gt;</text:span></text:p>
      <text:p text:style-name="P5"/>
      <text:p text:style-name="P5"/>
      <text:p text:style-name="P5"><text:span text:style-name="Source_20_Text"><text:s text:c="8"/>&lt;p&gt;</text:span></text:p>
      <text:p text:style-name="P5"><text:span text:style-name="Source_20_Text"><text:s text:c="12"/>Uma plataforma digital dedicada ao estudo,</text:span></text:p>
      <text:p text:style-name="P5"><text:span text:style-name="Source_20_Text"><text:s text:c="12"/>preservação e pesquisa de textos antigos,</text:span></text:p>
      <text:p text:style-name="P5"><text:span text:style-name="Source_20_Text"><text:s text:c="12"/>apócrifos e gnósticos.</text:span></text:p>
      <text:p text:style-name="P5"><text:span text:style-name="Source_20_Text"><text:s text:c="8"/>&lt;/p&gt;</text:span></text:p>
      <text:p text:style-name="P5"/>
      <text:p text:style-name="P5"/>
      <text:p text:style-name="P5"><text:span text:style-name="Source_20_Text"><text:s text:c="8"/>&lt;a href="paginas/biblioteca.html" class="button-primary"&gt;</text:span></text:p>
      <text:p text:style-name="P5"><text:span text:style-name="Source_20_Text"><text:s text:c="12"/>Explorar Biblioteca</text:span></text:p>
      <text:p text:style-name="P5"><text:span text:style-name="Source_20_Text"><text:s text:c="8"/>&lt;/a&gt;</text:span></text:p>
      <text:p text:style-name="P5"/>
      <text:p text:style-name="P5"><text:span text:style-name="Source_20_Text"><text:s text:c="4"/>&lt;/div&gt;</text:span></text:p>
      <text:p text:style-name="P5"/>
      <text:p text:style-name="P5"><text:span text:style-name="Source_20_Text">&lt;/section&gt;</text:span></text:p>
      <text:p text:style-name="P5"/>
      <text:p text:style-name="P5"/>
      <text:p text:style-name="P5"/>
      <text:p text:style-name="P5"/>
      <text:p text:style-name="P5"><text:span text:style-name="Source_20_Text">&lt;!-- INTRODUÇÃO --&gt;</text:span></text:p>
      <text:p text:style-name="P5"/>
      <text:p text:style-name="P5"><text:span text:style-name="Source_20_Text">&lt;section class="intro"&gt;</text:span></text:p>
      <text:p text:style-name="P5"/>
      <text:p text:style-name="P5"><text:span text:style-name="Source_20_Text">&lt;div class="container"&gt;</text:span></text:p>
      <text:p text:style-name="P5"/>
      <text:p text:style-name="P5"/>
      <text:p text:style-name="P5"><text:span text:style-name="Source_20_Text">&lt;h2&gt;</text:span></text:p>
      <text:p text:style-name="P5"><text:span text:style-name="Source_20_Text">O que são textos apócrifos?</text:span></text:p>
      <text:p text:style-name="P5"><text:span text:style-name="Source_20_Text">&lt;/h2&gt;</text:span></text:p>
      <text:p text:style-name="P5"><text:soft-page-break/></text:p>
      <text:p text:style-name="P5"/>
      <text:p text:style-name="P5"><text:span text:style-name="Source_20_Text">&lt;p&gt;</text:span></text:p>
      <text:p text:style-name="P5"><text:span text:style-name="Source_20_Text">A palavra "apócrifo" origina-se do grego</text:span></text:p>
      <text:p text:style-name="P5"><text:span text:style-name="Source_20_Text">&lt;em&gt;apokryphos&lt;/em&gt;, que significa</text:span></text:p>
      <text:p text:style-name="P5"><text:span text:style-name="Source_20_Text">"oculto" ou "secreto".</text:span></text:p>
      <text:p text:style-name="P5"><text:span text:style-name="Source_20_Text">&lt;/p&gt;</text:span></text:p>
      <text:p text:style-name="P5"/>
      <text:p text:style-name="P5"/>
      <text:p text:style-name="P5"><text:span text:style-name="Source_20_Text">&lt;p&gt;</text:span></text:p>
      <text:p text:style-name="P5"><text:span text:style-name="Source_20_Text">Ao longo da história, diversos textos religiosos</text:span></text:p>
      <text:p text:style-name="P5"><text:span text:style-name="Source_20_Text">e literários ficaram fora dos cânones oficiais,</text:span></text:p>
      <text:p text:style-name="P5"><text:span text:style-name="Source_20_Text">mas continuam sendo importantes fontes para o</text:span></text:p>
      <text:p text:style-name="P5"><text:span text:style-name="Source_20_Text">estudo histórico, cultural e religioso.</text:span></text:p>
      <text:p text:style-name="P5"><text:span text:style-name="Source_20_Text">&lt;/p&gt;</text:span></text:p>
      <text:p text:style-name="P5"/>
      <text:p text:style-name="P5"/>
      <text:p text:style-name="P5"><text:span text:style-name="Source_20_Text">&lt;/div&gt;</text:span></text:p>
      <text:p text:style-name="P5"/>
      <text:p text:style-name="P5"><text:span text:style-name="Source_20_Text">&lt;/section&gt;</text:span></text:p>
      <text:p text:style-name="P5"/>
      <text:p text:style-name="P5"/>
      <text:p text:style-name="P5"/>
      <text:p text:style-name="P5"/>
      <text:p text:style-name="P5"/>
      <text:p text:style-name="P5"><text:span text:style-name="Source_20_Text">&lt;!-- HISTÓRIA --&gt;</text:span></text:p>
      <text:p text:style-name="P5"/>
      <text:p text:style-name="P5"><text:span text:style-name="Source_20_Text">&lt;section class="history"&gt;</text:span></text:p>
      <text:p text:style-name="P5"/>
      <text:p text:style-name="P5"><text:span text:style-name="Source_20_Text">&lt;div class="container"&gt;</text:span></text:p>
      <text:p text:style-name="P5"/>
      <text:p text:style-name="P5"/>
      <text:p text:style-name="P5"><text:span text:style-name="Source_20_Text">&lt;h2&gt;</text:span></text:p>
      <text:p text:style-name="P5"><text:span text:style-name="Source_20_Text">Contexto Histórico</text:span></text:p>
      <text:p text:style-name="P5"><text:span text:style-name="Source_20_Text">&lt;/h2&gt;</text:span></text:p>
      <text:p text:style-name="P5"/>
      <text:p text:style-name="P5"><text:soft-page-break/></text:p>
      <text:p text:style-name="P5"/>
      <text:p text:style-name="P5"><text:span text:style-name="Source_20_Text">&lt;article&gt;</text:span></text:p>
      <text:p text:style-name="P5"/>
      <text:p text:style-name="P5"><text:span text:style-name="Source_20_Text">&lt;h3&gt;</text:span></text:p>
      <text:p text:style-name="P5"><text:span text:style-name="Source_20_Text">Origem dos textos apócrifos</text:span></text:p>
      <text:p text:style-name="P5"><text:span text:style-name="Source_20_Text">&lt;/h3&gt;</text:span></text:p>
      <text:p text:style-name="P5"/>
      <text:p text:style-name="P5"/>
      <text:p text:style-name="P5"><text:span text:style-name="Source_20_Text">&lt;p&gt;</text:span></text:p>
      <text:p text:style-name="P5"><text:span text:style-name="Source_20_Text">Os textos apócrifos surgiram principalmente entre</text:span></text:p>
      <text:p text:style-name="P5"><text:span text:style-name="Source_20_Text">os séculos III a.C. e I d.C., durante um período</text:span></text:p>
      <text:p text:style-name="P5"><text:span text:style-name="Source_20_Text">de grandes transformações culturais e religiosas.</text:span></text:p>
      <text:p text:style-name="P5"><text:span text:style-name="Source_20_Text">&lt;/p&gt;</text:span></text:p>
      <text:p text:style-name="P5"/>
      <text:p text:style-name="P5"/>
      <text:p text:style-name="P5"><text:span text:style-name="Source_20_Text">&lt;/article&gt;</text:span></text:p>
      <text:p text:style-name="P5"/>
      <text:p text:style-name="P5"/>
      <text:p text:style-name="P5"/>
      <text:p text:style-name="P5"/>
      <text:p text:style-name="P5"><text:span text:style-name="Source_20_Text">&lt;article&gt;</text:span></text:p>
      <text:p text:style-name="P5"/>
      <text:p text:style-name="P5"><text:span text:style-name="Source_20_Text">&lt;h3&gt;</text:span></text:p>
      <text:p text:style-name="P5"><text:span text:style-name="Source_20_Text">A descoberta de Nag Hammadi</text:span></text:p>
      <text:p text:style-name="P5"><text:span text:style-name="Source_20_Text">&lt;/h3&gt;</text:span></text:p>
      <text:p text:style-name="P5"/>
      <text:p text:style-name="P5"/>
      <text:p text:style-name="P5"><text:span text:style-name="Source_20_Text">&lt;p&gt;</text:span></text:p>
      <text:p text:style-name="P5"><text:span text:style-name="Source_20_Text">Em 1945, a descoberta da Biblioteca de Nag Hammadi,</text:span></text:p>
      <text:p text:style-name="P5"><text:span text:style-name="Source_20_Text">no Egito, revelou uma coleção de textos gnósticos</text:span></text:p>
      <text:p text:style-name="P5"><text:span text:style-name="Source_20_Text">que trouxe novas informações sobre diferentes</text:span></text:p>
      <text:p text:style-name="P5"><text:span text:style-name="Source_20_Text">correntes do cristianismo primitivo.</text:span></text:p>
      <text:p text:style-name="P5"><text:span text:style-name="Source_20_Text">&lt;/p&gt;</text:span></text:p>
      <text:p text:style-name="P5"/>
      <text:p text:style-name="P5"/>
      <text:p text:style-name="P5"><text:soft-page-break/><text:span text:style-name="Source_20_Text">&lt;/article&gt;</text:span></text:p>
      <text:p text:style-name="P5"/>
      <text:p text:style-name="P5"/>
      <text:p text:style-name="P5"/>
      <text:p text:style-name="P5"/>
      <text:p text:style-name="P5"/>
      <text:p text:style-name="P5"><text:span text:style-name="Source_20_Text">&lt;article&gt;</text:span></text:p>
      <text:p text:style-name="P5"/>
      <text:p text:style-name="P5"><text:span text:style-name="Source_20_Text">&lt;h3&gt;</text:span></text:p>
      <text:p text:style-name="P5"><text:span text:style-name="Source_20_Text">Os Manuscritos do Mar Morto</text:span></text:p>
      <text:p text:style-name="P5"><text:span text:style-name="Source_20_Text">&lt;/h3&gt;</text:span></text:p>
      <text:p text:style-name="P5"/>
      <text:p text:style-name="P5"/>
      <text:p text:style-name="P5"><text:span text:style-name="Source_20_Text">&lt;p&gt;</text:span></text:p>
      <text:p text:style-name="P5"><text:span text:style-name="Source_20_Text">Descobertos em 1947, os Manuscritos do Mar Morto</text:span></text:p>
      <text:p text:style-name="P5"><text:span text:style-name="Source_20_Text">ampliaram o conhecimento sobre comunidades judaicas</text:span></text:p>
      <text:p text:style-name="P5"><text:span text:style-name="Source_20_Text">antigas e seus textos religiosos.</text:span></text:p>
      <text:p text:style-name="P5"><text:span text:style-name="Source_20_Text">&lt;/p&gt;</text:span></text:p>
      <text:p text:style-name="P5"/>
      <text:p text:style-name="P5"/>
      <text:p text:style-name="P5"><text:span text:style-name="Source_20_Text">&lt;/article&gt;</text:span></text:p>
      <text:p text:style-name="P5"/>
      <text:p text:style-name="P5"/>
      <text:p text:style-name="P5"/>
      <text:p text:style-name="P5"><text:span text:style-name="Source_20_Text">&lt;/div&gt;</text:span></text:p>
      <text:p text:style-name="P5"/>
      <text:p text:style-name="P5"/>
      <text:p text:style-name="P5"><text:span text:style-name="Source_20_Text">&lt;/section&gt;</text:span></text:p>
      <text:p text:style-name="P5"/>
      <text:p text:style-name="P5"/>
      <text:p text:style-name="P5"/>
      <text:p text:style-name="P5"/>
      <text:p text:style-name="P5"/>
      <text:p text:style-name="P5"/>
      <text:p text:style-name="P5"><text:span text:style-name="Source_20_Text">&lt;!-- COMO FUNCIONA --&gt;</text:span></text:p>
      <text:p text:style-name="P5"/>
      <text:p text:style-name="P5"><text:soft-page-break/><text:span text:style-name="Source_20_Text">&lt;section class="platform"&gt;</text:span></text:p>
      <text:p text:style-name="P5"/>
      <text:p text:style-name="P5"><text:span text:style-name="Source_20_Text">&lt;div class="container"&gt;</text:span></text:p>
      <text:p text:style-name="P5"/>
      <text:p text:style-name="P5"/>
      <text:p text:style-name="P5"><text:span text:style-name="Source_20_Text">&lt;h2&gt;</text:span></text:p>
      <text:p text:style-name="P5"><text:span text:style-name="Source_20_Text">Como funciona a plataforma?</text:span></text:p>
      <text:p text:style-name="P5"><text:span text:style-name="Source_20_Text">&lt;/h2&gt;</text:span></text:p>
      <text:p text:style-name="P5"/>
      <text:p text:style-name="P5"/>
      <text:p text:style-name="P5"/>
      <text:p text:style-name="P5"><text:span text:style-name="Source_20_Text">&lt;div class="platform-grid"&gt;</text:span></text:p>
      <text:p text:style-name="P5"/>
      <text:p text:style-name="P5"/>
      <text:p text:style-name="P5"><text:span text:style-name="Source_20_Text">&lt;article class="feature-card"&gt;</text:span></text:p>
      <text:p text:style-name="P5"/>
      <text:p text:style-name="P5"><text:span text:style-name="Source_20_Text">&lt;h3&gt;</text:span></text:p>
      <text:p text:style-name="P5"><text:span text:style-name="Source_20_Text"> Biblioteca</text:span></text:p>
      <text:p text:style-name="P5"><text:span text:style-name="Source_20_Text">&lt;/h3&gt;</text:span></text:p>
      <text:p text:style-name="P5"/>
      <text:p text:style-name="P5"><text:span text:style-name="Source_20_Text">&lt;p&gt;</text:span></text:p>
      <text:p text:style-name="P5"><text:span text:style-name="Source_20_Text">Explore obras organizadas por categoria,</text:span></text:p>
      <text:p text:style-name="P5"><text:span text:style-name="Source_20_Text">autor e contexto histórico.</text:span></text:p>
      <text:p text:style-name="P5"><text:span text:style-name="Source_20_Text">&lt;/p&gt;</text:span></text:p>
      <text:p text:style-name="P5"/>
      <text:p text:style-name="P5"><text:span text:style-name="Source_20_Text">&lt;/article&gt;</text:span></text:p>
      <text:p text:style-name="P5"/>
      <text:p text:style-name="P5"/>
      <text:p text:style-name="P5"/>
      <text:p text:style-name="P5"><text:span text:style-name="Source_20_Text">&lt;article class="feature-card"&gt;</text:span></text:p>
      <text:p text:style-name="P5"/>
      <text:p text:style-name="P5"><text:span text:style-name="Source_20_Text">&lt;h3&gt;</text:span></text:p>
      <text:p text:style-name="P5"><text:span text:style-name="Source_20_Text"> Área de leitura</text:span></text:p>
      <text:p text:style-name="P5"><text:span text:style-name="Source_20_Text">&lt;/h3&gt;</text:span></text:p>
      <text:p text:style-name="P5"/>
      <text:p text:style-name="P5"><text:span text:style-name="Source_20_Text">&lt;p&gt;</text:span></text:p>
      <text:p text:style-name="P5"><text:soft-page-break/><text:span text:style-name="Source_20_Text">Leia textos divididos por seções,</text:span></text:p>
      <text:p text:style-name="P5"><text:span text:style-name="Source_20_Text">acompanhados de comentários e análises.</text:span></text:p>
      <text:p text:style-name="P5"><text:span text:style-name="Source_20_Text">&lt;/p&gt;</text:span></text:p>
      <text:p text:style-name="P5"/>
      <text:p text:style-name="P5"><text:span text:style-name="Source_20_Text">&lt;/article&gt;</text:span></text:p>
      <text:p text:style-name="P5"/>
      <text:p text:style-name="P5"/>
      <text:p text:style-name="P5"/>
      <text:p text:style-name="P5"/>
      <text:p text:style-name="P5"><text:span text:style-name="Source_20_Text">&lt;article class="feature-card"&gt;</text:span></text:p>
      <text:p text:style-name="P5"/>
      <text:p text:style-name="P5"><text:span text:style-name="Source_20_Text">&lt;h3&gt;</text:span></text:p>
      <text:p text:style-name="P5"><text:span text:style-name="Source_20_Text"> Pesquisa</text:span></text:p>
      <text:p text:style-name="P5"><text:span text:style-name="Source_20_Text">&lt;/h3&gt;</text:span></text:p>
      <text:p text:style-name="P5"/>
      <text:p text:style-name="P5"><text:span text:style-name="Source_20_Text">&lt;p&gt;</text:span></text:p>
      <text:p text:style-name="P5"><text:span text:style-name="Source_20_Text">Estude diferentes documentos históricos</text:span></text:p>
      <text:p text:style-name="P5"><text:span text:style-name="Source_20_Text">em uma experiência organizada.</text:span></text:p>
      <text:p text:style-name="P5"><text:span text:style-name="Source_20_Text">&lt;/p&gt;</text:span></text:p>
      <text:p text:style-name="P5"/>
      <text:p text:style-name="P5"><text:span text:style-name="Source_20_Text">&lt;/article&gt;</text:span></text:p>
      <text:p text:style-name="P5"/>
      <text:p text:style-name="P5"/>
      <text:p text:style-name="P5"><text:span text:style-name="Source_20_Text">&lt;/div&gt;</text:span></text:p>
      <text:p text:style-name="P5"/>
      <text:p text:style-name="P5"/>
      <text:p text:style-name="P5"><text:span text:style-name="Source_20_Text">&lt;/div&gt;</text:span></text:p>
      <text:p text:style-name="P5"/>
      <text:p text:style-name="P5"><text:span text:style-name="Source_20_Text">&lt;/section&gt;</text:span></text:p>
      <text:p text:style-name="P5"/>
      <text:p text:style-name="P5"/>
      <text:p text:style-name="P5"/>
      <text:p text:style-name="P5"/>
      <text:p text:style-name="P5"/>
      <text:p text:style-name="P5"/>
      <text:p text:style-name="P5"><text:span text:style-name="Source_20_Text">&lt;!-- LIVROS EM DESTAQUE --&gt;</text:span></text:p>
      <text:p text:style-name="P5"><text:soft-page-break/></text:p>
      <text:p text:style-name="P5"><text:span text:style-name="Source_20_Text">&lt;section class="featured-books"&gt;</text:span></text:p>
      <text:p text:style-name="P5"/>
      <text:p text:style-name="P5"><text:span text:style-name="Source_20_Text">&lt;div class="container"&gt;</text:span></text:p>
      <text:p text:style-name="P5"/>
      <text:p text:style-name="P5"/>
      <text:p text:style-name="P5"><text:span text:style-name="Source_20_Text">&lt;h2&gt;</text:span></text:p>
      <text:p text:style-name="P5"><text:span text:style-name="Source_20_Text">Obras em destaque</text:span></text:p>
      <text:p text:style-name="P5"><text:span text:style-name="Source_20_Text">&lt;/h2&gt;</text:span></text:p>
      <text:p text:style-name="P5"/>
      <text:p text:style-name="P5"/>
      <text:p text:style-name="P5"><text:span text:style-name="Source_20_Text">&lt;div class="books-grid"&gt;</text:span></text:p>
      <text:p text:style-name="P5"/>
      <text:p text:style-name="P5"/>
      <text:p text:style-name="P5"><text:span text:style-name="Source_20_Text">&lt;!-- Futuramente renderizado pelo livros.json --&gt;</text:span></text:p>
      <text:p text:style-name="P5"/>
      <text:p text:style-name="P5"/>
      <text:p text:style-name="P5"><text:span text:style-name="Source_20_Text">&lt;article class="book-card"&gt;</text:span></text:p>
      <text:p text:style-name="P5"/>
      <text:p text:style-name="P5"><text:span text:style-name="Source_20_Text">&lt;h3&gt;</text:span></text:p>
      <text:p text:style-name="P5"><text:span text:style-name="Source_20_Text">Evangelho de Tomé</text:span></text:p>
      <text:p text:style-name="P5"><text:span text:style-name="Source_20_Text">&lt;/h3&gt;</text:span></text:p>
      <text:p text:style-name="P5"/>
      <text:p text:style-name="P5"><text:span text:style-name="Source_20_Text">&lt;p&gt;</text:span></text:p>
      <text:p text:style-name="P5"><text:span text:style-name="Source_20_Text">Texto gnóstico encontrado na Biblioteca de Nag Hammadi.</text:span></text:p>
      <text:p text:style-name="P5"><text:span text:style-name="Source_20_Text">&lt;/p&gt;</text:span></text:p>
      <text:p text:style-name="P5"/>
      <text:p text:style-name="P5"/>
      <text:p text:style-name="P5"><text:span text:style-name="Source_20_Text">&lt;a href="paginas/leitura.html"&gt;</text:span></text:p>
      <text:p text:style-name="P5"><text:span text:style-name="Source_20_Text">Começar estudo</text:span></text:p>
      <text:p text:style-name="P5"><text:span text:style-name="Source_20_Text">&lt;/a&gt;</text:span></text:p>
      <text:p text:style-name="P5"/>
      <text:p text:style-name="P5"/>
      <text:p text:style-name="P5"><text:span text:style-name="Source_20_Text">&lt;/article&gt;</text:span></text:p>
      <text:p text:style-name="P5"/>
      <text:p text:style-name="P5"/>
      <text:p text:style-name="P5"><text:soft-page-break/><text:span text:style-name="Source_20_Text">&lt;/div&gt;</text:span></text:p>
      <text:p text:style-name="P5"/>
      <text:p text:style-name="P5"/>
      <text:p text:style-name="P5"><text:span text:style-name="Source_20_Text">&lt;/div&gt;</text:span></text:p>
      <text:p text:style-name="P5"/>
      <text:p text:style-name="P5"/>
      <text:p text:style-name="P5"><text:span text:style-name="Source_20_Text">&lt;/section&gt;</text:span></text:p>
      <text:p text:style-name="P5"/>
      <text:p text:style-name="P5"/>
      <text:p text:style-name="P5"/>
      <text:p text:style-name="P5"/>
      <text:p text:style-name="P5"/>
      <text:p text:style-name="P5"/>
      <text:p text:style-name="P5"><text:span text:style-name="Source_20_Text">&lt;!-- NOTA DO EDITOR --&gt;</text:span></text:p>
      <text:p text:style-name="P5"/>
      <text:p text:style-name="P5"><text:span text:style-name="Source_20_Text">&lt;section class="editor-note"&gt;</text:span></text:p>
      <text:p text:style-name="P5"/>
      <text:p text:style-name="P5"><text:span text:style-name="Source_20_Text">&lt;div class="container"&gt;</text:span></text:p>
      <text:p text:style-name="P5"/>
      <text:p text:style-name="P5"/>
      <text:p text:style-name="P5"><text:span text:style-name="Source_20_Text">&lt;h2&gt;</text:span></text:p>
      <text:p text:style-name="P5"><text:span text:style-name="Source_20_Text">Nota do Editor</text:span></text:p>
      <text:p text:style-name="P5"><text:span text:style-name="Source_20_Text">&lt;/h2&gt;</text:span></text:p>
      <text:p text:style-name="P5"/>
      <text:p text:style-name="P5"/>
      <text:p text:style-name="P5"><text:span text:style-name="Source_20_Text">&lt;p&gt;</text:span></text:p>
      <text:p text:style-name="P5"><text:span text:style-name="Source_20_Text">Este site possui fins puramente históricos,</text:span></text:p>
      <text:p text:style-name="P5"><text:span text:style-name="Source_20_Text">literários e académicos. O objetivo é preservar</text:span></text:p>
      <text:p text:style-name="P5"><text:span text:style-name="Source_20_Text">e disponibilizar o acesso à literatura antiga.</text:span></text:p>
      <text:p text:style-name="P5"><text:span text:style-name="Source_20_Text">&lt;/p&gt;</text:span></text:p>
      <text:p text:style-name="P5"/>
      <text:p text:style-name="P5"/>
      <text:p text:style-name="P5"><text:span text:style-name="Source_20_Text">&lt;/div&gt;</text:span></text:p>
      <text:p text:style-name="P5"/>
      <text:p text:style-name="P5"><text:span text:style-name="Source_20_Text">&lt;/section&gt;</text:span></text:p>
      <text:p text:style-name="P5"/>
      <text:p text:style-name="P5"><text:soft-page-break/></text:p>
      <text:p text:style-name="P5"/>
      <text:p text:style-name="P5"><text:span text:style-name="Source_20_Text">&lt;/main&gt;</text:span></text:p>
      <text:p text:style-name="P5"/>
      <text:p text:style-name="P5"/>
      <text:p text:style-name="P5"/>
      <text:p text:style-name="P5"/>
      <text:p text:style-name="P5"/>
      <text:p text:style-name="P5"/>
      <text:p text:style-name="P5"><text:span text:style-name="Source_20_Text">&lt;footer class="footer"&gt;</text:span></text:p>
      <text:p text:style-name="P5"/>
      <text:p text:style-name="P5"/>
      <text:p text:style-name="P5"><text:span text:style-name="Source_20_Text">&lt;div class="container"&gt;</text:span></text:p>
      <text:p text:style-name="P5"/>
      <text:p text:style-name="P5"/>
      <text:p text:style-name="P5"><text:span text:style-name="Source_20_Text">&lt;p&gt;</text:span></text:p>
      <text:p text:style-name="P5"><text:span text:style-name="Source_20_Text">© 2026 Biblioteca Apócrifa.</text:span></text:p>
      <text:p text:style-name="P5"><text:span text:style-name="Source_20_Text">Projeto desenvolvido para fins históricos,</text:span></text:p>
      <text:p text:style-name="P5"><text:span text:style-name="Source_20_Text">literários e académicos.</text:span></text:p>
      <text:p text:style-name="P5"><text:span text:style-name="Source_20_Text">&lt;/p&gt;</text:span></text:p>
      <text:p text:style-name="P5"/>
      <text:p text:style-name="P5"/>
      <text:p text:style-name="P5"><text:span text:style-name="Source_20_Text">&lt;p&gt;</text:span></text:p>
      <text:p text:style-name="P5"><text:span text:style-name="Source_20_Text">Autor:</text:span></text:p>
      <text:p text:style-name="P5"><text:span text:style-name="Source_20_Text">&lt;em&gt;João de Sousa António&lt;/em&gt;</text:span></text:p>
      <text:p text:style-name="P5"><text:span text:style-name="Source_20_Text">&lt;/p&gt;</text:span></text:p>
      <text:p text:style-name="P5"/>
      <text:p text:style-name="P5"/>
      <text:p text:style-name="P5"><text:span text:style-name="Source_20_Text">&lt;/div&gt;</text:span></text:p>
      <text:p text:style-name="P5"/>
      <text:p text:style-name="P5"/>
      <text:p text:style-name="P5"><text:span text:style-name="Source_20_Text">&lt;/footer&gt;</text:span></text:p>
      <text:p text:style-name="P5"/>
      <text:p text:style-name="P5"/>
      <text:p text:style-name="P5"/>
      <text:p text:style-name="P5"/>
      <text:p text:style-name="P5"><text:soft-page-break/><text:span text:style-name="Source_20_Text">&lt;/body&gt;</text:span></text:p>
      <text:p text:style-name="P5"/>
      <text:p text:style-name="P5"><text:span text:style-name="Source_20_Text">&lt;/html&gt;</text:span></text:p>
      <text:p text:style-name="P6"/>
      <text:h text:style-name="P7" text:outline-level="2">O que foi construído nesta etapa</text:h>
      <text:p text:style-name="Text_20_body">Agora o <text:span text:style-name="Source_20_Text">index.html</text:span> já está alinhado com o projeto:</text:p>
      <text:h text:style-name="P8" text:outline-level="3">Antes:</text:h>
      <text:p text:style-name="Text_20_body">Era uma página de texto histórico.</text:p>
      <text:h text:style-name="P8" text:outline-level="3">Agora:</text:h>
      <text:p text:style-name="Text_20_body">É uma <text:span text:style-name="Strong_20_Emphasis">landing page de uma plataforma de estudo</text:span>.</text:p>
      <text:p text:style-name="Text_20_body">A estrutura já conversa com:</text:p>
      <text:list text:style-name="L4">
        <text:list-item>
          <text:p text:style-name="P9">Design System;</text:p>
        </text:list-item>
        <text:list-item>
          <text:p text:style-name="P9">Wireframe;</text:p>
        </text:list-item>
        <text:list-item>
          <text:p text:style-name="P9">Arquitetura de componentes;</text:p>
        </text:list-item>
        <text:list-item>
          <text:p text:style-name="P9">Futuro consumo do <text:span text:style-name="Source_20_Text">livros.json</text:span>.</text:p>
        </text:list-item>
      </text:list>
      <text:p text:style-name="P6"/>
      <text:h text:style-name="P7" text:outline-level="2">Próximo passo da Fase 4.1</text:h>
      <text:p text:style-name="Text_20_body">Antes de avançarmos para outra página, precisamos fechar a Home.</text:p>
      <text:p text:style-name="Text_20_body">A sequência correta será:</text:p>
      <text:list text:style-name="L5">
        <text:list-item>
          <text:p text:style-name="P10">✅ Estrutura HTML da Home (concluído)</text:p>
        </text:list-item>
        <text:list-item>
          <text:p text:style-name="P10">⏳ Implementar o CSS da Home (<text:span text:style-name="Source_20_Text">home.css</text:span>)</text:p>
        </text:list-item>
        <text:list-item>
          <text:p text:style-name="P10"><text:bookmark-start text:name="__DdeLink__3366_829906918"/>⏳ Testar responsividade</text:p>
        </text:list-item>
        <text:list-item>
          <text:p text:style-name="P10">⏳ Ajustar detalhes visuais<text:bookmark-end text:name="__DdeLink__3366_829906918"/></text:p>
        </text:list-item>
      </text:list>
      <text:p text:style-name="Text_20_body">Só depois disso vamos para:</text:p>
      <text:p text:style-name="Text_20_body"><text:span text:style-name="Strong_20_Emphasis">Fase 4.2 — Desenvolver a Biblioteca (</text:span><text:span text:style-name="Strong_20_Emphasis"><text:span text:style-name="Source_20_Text">biblioteca.html</text:span></text:span><text:span text:style-name="Strong_20_Emphasis">)</text:span></text:p>
      <text:p text:style-name="Text_20_body">Então o próximo trabalho será transformar esse HTML em uma interface visual usando o nosso Design System.</text:p>
      <text:p text:style-name="Text_20_body">Perfeito. Esse é exatamente o fluxo que eu seguiria em um projeto profissional.</text:p>
      <text:p text:style-name="Text_20_body">A partir de agora, vamos seguir esta regra:</text:p>
      <text:list text:style-name="L6">
        <text:list-item>
          <text:p text:style-name="P11">Primeiro definimos o Design System (já concluído).</text:p>
        </text:list-item>
        <text:list-item>
          <text:p text:style-name="P11">Depois implementamos esse Design System em CSS.</text:p>
        </text:list-item>
        <text:list-item>
          <text:p text:style-name="P11">Só depois estilizamos as páginas (<text:span text:style-name="Source_20_Text">home.css</text:span>, <text:span text:style-name="Source_20_Text">biblioteca.css</text:span>, etc.).</text:p>
        </text:list-item>
      </text:list>
      <text:p text:style-name="Text_20_body"><text:soft-page-break/>Assim evitamos retrabalho.</text:p>
      <text:p text:style-name="P6"/>
      <text:h text:style-name="P12" text:outline-level="1">Objetivo do <text:span text:style-name="Source_20_Text">base.css</text:span></text:h>
      <text:p text:style-name="Text_20_body">O <text:span text:style-name="Source_20_Text">base.css</text:span> <text:span text:style-name="Strong_20_Emphasis">não é para criar componentes</text:span> nem definir cores específicas da Home. Ele é responsável apenas pelos estilos globais da aplicação.</text:p>
      <text:p text:style-name="Text_20_body">Sua responsabilidade será:</text:p>
      <text:list text:style-name="L7">
        <text:list-item>
          <text:p text:style-name="P13">Reset básico.</text:p>
        </text:list-item>
        <text:list-item>
          <text:p text:style-name="P13">Configuração do <text:span text:style-name="Source_20_Text">html</text:span> e <text:span text:style-name="Source_20_Text">body</text:span>.</text:p>
        </text:list-item>
        <text:list-item>
          <text:p text:style-name="P13">Tipografia global.</text:p>
        </text:list-item>
        <text:list-item>
          <text:p text:style-name="P13">Links.</text:p>
        </text:list-item>
        <text:list-item>
          <text:p text:style-name="P13">Imagens.</text:p>
        </text:list-item>
        <text:list-item>
          <text:p text:style-name="P13">Listas.</text:p>
        </text:list-item>
        <text:list-item>
          <text:p text:style-name="P13">Seleção de texto.</text:p>
        </text:list-item>
        <text:list-item>
          <text:p text:style-name="P13">Comportamentos padrão.</text:p>
        </text:list-item>
      </text:list>
      <text:p text:style-name="Text_20_body">Tudo que for botão, card, navbar, footer ou hero ficará em <text:span text:style-name="Source_20_Text">components.css</text:span>.</text:p>
      <text:p text:style-name="P6"/>
      <text:h text:style-name="P7" text:outline-level="2"><text:span text:style-name="Source_20_Text">assets/css/base.css</text:span></text:h>
      <text:p text:style-name="P5"><text:span text:style-name="Source_20_Text">/* ==========================================================</text:span></text:p>
      <text:p text:style-name="P5"><text:span text:style-name="Source_20_Text"><text:s text:c="3"/>RESET</text:span></text:p>
      <text:p text:style-name="P5"><text:span text:style-name="Source_20_Text">========================================================== */</text:span></text:p>
      <text:p text:style-name="P5"/>
      <text:p text:style-name="P5"><text:span text:style-name="Source_20_Text">*,</text:span></text:p>
      <text:p text:style-name="P5"><text:span text:style-name="Source_20_Text">*::before,</text:span></text:p>
      <text:p text:style-name="P5"><text:span text:style-name="Source_20_Text">*::after {</text:span></text:p>
      <text:p text:style-name="P5"><text:span text:style-name="Source_20_Text"><text:s text:c="4"/>margin: 0;</text:span></text:p>
      <text:p text:style-name="P5"><text:span text:style-name="Source_20_Text"><text:s text:c="4"/>padding: 0;</text:span></text:p>
      <text:p text:style-name="P5"><text:span text:style-name="Source_20_Text"><text:s text:c="4"/>box-sizing: border-box;</text:span></text:p>
      <text:p text:style-name="P5"><text:span text:style-name="Source_20_Text">}</text:span></text:p>
      <text:p text:style-name="P5"/>
      <text:p text:style-name="P5"><text:span text:style-name="Source_20_Text">/* ==========================================================</text:span></text:p>
      <text:p text:style-name="P5"><text:span text:style-name="Source_20_Text"><text:s text:c="3"/>DOCUMENTO</text:span></text:p>
      <text:p text:style-name="P5"><text:span text:style-name="Source_20_Text">========================================================== */</text:span></text:p>
      <text:p text:style-name="P5"/>
      <text:p text:style-name="P5"><text:span text:style-name="Source_20_Text">html {</text:span></text:p>
      <text:p text:style-name="P5"><text:soft-page-break/><text:span text:style-name="Source_20_Text"><text:s text:c="4"/>font-size: 100%;</text:span></text:p>
      <text:p text:style-name="P5"><text:span text:style-name="Source_20_Text"><text:s text:c="4"/>scroll-behavior: smooth;</text:span></text:p>
      <text:p text:style-name="P5"><text:span text:style-name="Source_20_Text">}</text:span></text:p>
      <text:p text:style-name="P5"/>
      <text:p text:style-name="P5"><text:span text:style-name="Source_20_Text">body {</text:span></text:p>
      <text:p text:style-name="P5"><text:span text:style-name="Source_20_Text"><text:s text:c="4"/>font-family: var(--font-interface);</text:span></text:p>
      <text:p text:style-name="P5"><text:span text:style-name="Source_20_Text"><text:s text:c="4"/>font-size: var(--font-size-body);</text:span></text:p>
      <text:p text:style-name="P5"><text:span text:style-name="Source_20_Text"><text:s text:c="4"/>line-height: 1.7;</text:span></text:p>
      <text:p text:style-name="P5"/>
      <text:p text:style-name="P5"><text:span text:style-name="Source_20_Text"><text:s text:c="4"/>color: var(--color-text);</text:span></text:p>
      <text:p text:style-name="P5"><text:span text:style-name="Source_20_Text"><text:s text:c="4"/>background-color: var(--color-background);</text:span></text:p>
      <text:p text:style-name="P5"/>
      <text:p text:style-name="P5"><text:span text:style-name="Source_20_Text"><text:s text:c="4"/>text-rendering: optimizeLegibility;</text:span></text:p>
      <text:p text:style-name="P5"><text:span text:style-name="Source_20_Text"><text:s text:c="4"/>-webkit-font-smoothing: antialiased;</text:span></text:p>
      <text:p text:style-name="P5"><text:span text:style-name="Source_20_Text">}</text:span></text:p>
      <text:p text:style-name="P5"/>
      <text:p text:style-name="P5"><text:span text:style-name="Source_20_Text">/* ==========================================================</text:span></text:p>
      <text:p text:style-name="P5"><text:span text:style-name="Source_20_Text"><text:s text:c="3"/>TIPOGRAFIA</text:span></text:p>
      <text:p text:style-name="P5"><text:span text:style-name="Source_20_Text">========================================================== */</text:span></text:p>
      <text:p text:style-name="P5"/>
      <text:p text:style-name="P5"><text:span text:style-name="Source_20_Text">h1,</text:span></text:p>
      <text:p text:style-name="P5"><text:span text:style-name="Source_20_Text">h2,</text:span></text:p>
      <text:p text:style-name="P5"><text:span text:style-name="Source_20_Text">h3,</text:span></text:p>
      <text:p text:style-name="P5"><text:span text:style-name="Source_20_Text">h4,</text:span></text:p>
      <text:p text:style-name="P5"><text:span text:style-name="Source_20_Text">h5,</text:span></text:p>
      <text:p text:style-name="P5"><text:span text:style-name="Source_20_Text">h6 {</text:span></text:p>
      <text:p text:style-name="P5"><text:span text:style-name="Source_20_Text"><text:s text:c="4"/>font-family: var(--font-reading);</text:span></text:p>
      <text:p text:style-name="P5"><text:span text:style-name="Source_20_Text"><text:s text:c="4"/>font-weight: 700;</text:span></text:p>
      <text:p text:style-name="P5"><text:span text:style-name="Source_20_Text"><text:s text:c="4"/>line-height: 1.3;</text:span></text:p>
      <text:p text:style-name="P5"><text:span text:style-name="Source_20_Text"><text:s text:c="4"/>color: var(--color-text);</text:span></text:p>
      <text:p text:style-name="P5"><text:span text:style-name="Source_20_Text">}</text:span></text:p>
      <text:p text:style-name="P5"/>
      <text:p text:style-name="P5"><text:span text:style-name="Source_20_Text">h1 {</text:span></text:p>
      <text:p text:style-name="P5"><text:span text:style-name="Source_20_Text"><text:s text:c="4"/>font-size: var(--font-size-h1);</text:span></text:p>
      <text:p text:style-name="P5"><text:span text:style-name="Source_20_Text">}</text:span></text:p>
      <text:p text:style-name="P5"/>
      <text:p text:style-name="P5"><text:soft-page-break/><text:span text:style-name="Source_20_Text">h2 {</text:span></text:p>
      <text:p text:style-name="P5"><text:span text:style-name="Source_20_Text"><text:s text:c="4"/>font-size: var(--font-size-h2);</text:span></text:p>
      <text:p text:style-name="P5"><text:span text:style-name="Source_20_Text">}</text:span></text:p>
      <text:p text:style-name="P5"/>
      <text:p text:style-name="P5"><text:span text:style-name="Source_20_Text">h3 {</text:span></text:p>
      <text:p text:style-name="P5"><text:span text:style-name="Source_20_Text"><text:s text:c="4"/>font-size: var(--font-size-h3);</text:span></text:p>
      <text:p text:style-name="P5"><text:span text:style-name="Source_20_Text">}</text:span></text:p>
      <text:p text:style-name="P5"/>
      <text:p text:style-name="P5"><text:span text:style-name="Source_20_Text">p {</text:span></text:p>
      <text:p text:style-name="P5"><text:span text:style-name="Source_20_Text"><text:s text:c="4"/>margin-bottom: var(--space-md);</text:span></text:p>
      <text:p text:style-name="P5"><text:span text:style-name="Source_20_Text">}</text:span></text:p>
      <text:p text:style-name="P5"/>
      <text:p text:style-name="P5"><text:span text:style-name="Source_20_Text">small {</text:span></text:p>
      <text:p text:style-name="P5"><text:span text:style-name="Source_20_Text"><text:s text:c="4"/>font-size: var(--font-size-small);</text:span></text:p>
      <text:p text:style-name="P5"><text:span text:style-name="Source_20_Text">}</text:span></text:p>
      <text:p text:style-name="P5"/>
      <text:p text:style-name="P5"><text:span text:style-name="Source_20_Text">/* ==========================================================</text:span></text:p>
      <text:p text:style-name="P5"><text:span text:style-name="Source_20_Text"><text:s text:c="3"/>LINKS</text:span></text:p>
      <text:p text:style-name="P5"><text:span text:style-name="Source_20_Text">========================================================== */</text:span></text:p>
      <text:p text:style-name="P5"/>
      <text:p text:style-name="P5"><text:span text:style-name="Source_20_Text">a {</text:span></text:p>
      <text:p text:style-name="P5"><text:span text:style-name="Source_20_Text"><text:s text:c="4"/>color: inherit;</text:span></text:p>
      <text:p text:style-name="P5"><text:span text:style-name="Source_20_Text"><text:s text:c="4"/>text-decoration: none;</text:span></text:p>
      <text:p text:style-name="P5"><text:span text:style-name="Source_20_Text"><text:s text:c="4"/>transition: color .3s ease;</text:span></text:p>
      <text:p text:style-name="P5"><text:span text:style-name="Source_20_Text">}</text:span></text:p>
      <text:p text:style-name="P5"/>
      <text:p text:style-name="P5"><text:span text:style-name="Source_20_Text">a:hover {</text:span></text:p>
      <text:p text:style-name="P5"><text:span text:style-name="Source_20_Text"><text:s text:c="4"/>color: var(--color-primary);</text:span></text:p>
      <text:p text:style-name="P5"><text:span text:style-name="Source_20_Text">}</text:span></text:p>
      <text:p text:style-name="P5"/>
      <text:p text:style-name="P5"><text:span text:style-name="Source_20_Text">/* ==========================================================</text:span></text:p>
      <text:p text:style-name="P5"><text:span text:style-name="Source_20_Text"><text:s text:c="3"/>LISTAS</text:span></text:p>
      <text:p text:style-name="P5"><text:span text:style-name="Source_20_Text">========================================================== */</text:span></text:p>
      <text:p text:style-name="P5"/>
      <text:p text:style-name="P5"><text:span text:style-name="Source_20_Text">ul,</text:span></text:p>
      <text:p text:style-name="P5"><text:span text:style-name="Source_20_Text">ol {</text:span></text:p>
      <text:p text:style-name="P5"><text:soft-page-break/><text:span text:style-name="Source_20_Text"><text:s text:c="4"/>list-style: none;</text:span></text:p>
      <text:p text:style-name="P5"><text:span text:style-name="Source_20_Text">}</text:span></text:p>
      <text:p text:style-name="P5"/>
      <text:p text:style-name="P5"><text:span text:style-name="Source_20_Text">/* ==========================================================</text:span></text:p>
      <text:p text:style-name="P5"><text:span text:style-name="Source_20_Text"><text:s text:c="3"/>IMAGENS</text:span></text:p>
      <text:p text:style-name="P5"><text:span text:style-name="Source_20_Text">========================================================== */</text:span></text:p>
      <text:p text:style-name="P5"/>
      <text:p text:style-name="P5"><text:span text:style-name="Source_20_Text">img {</text:span></text:p>
      <text:p text:style-name="P5"><text:span text:style-name="Source_20_Text"><text:s text:c="4"/>display: block;</text:span></text:p>
      <text:p text:style-name="P5"><text:span text:style-name="Source_20_Text"><text:s text:c="4"/>max-width: 100%;</text:span></text:p>
      <text:p text:style-name="P5"><text:span text:style-name="Source_20_Text"><text:s text:c="4"/>height: auto;</text:span></text:p>
      <text:p text:style-name="P5"><text:span text:style-name="Source_20_Text">}</text:span></text:p>
      <text:p text:style-name="P5"/>
      <text:p text:style-name="P5"><text:span text:style-name="Source_20_Text">/* ==========================================================</text:span></text:p>
      <text:p text:style-name="P5"><text:span text:style-name="Source_20_Text"><text:s text:c="3"/>FORMULÁRIOS</text:span></text:p>
      <text:p text:style-name="P5"><text:span text:style-name="Source_20_Text">========================================================== */</text:span></text:p>
      <text:p text:style-name="P5"/>
      <text:p text:style-name="P5"><text:span text:style-name="Source_20_Text">button,</text:span></text:p>
      <text:p text:style-name="P5"><text:span text:style-name="Source_20_Text">input,</text:span></text:p>
      <text:p text:style-name="P5"><text:span text:style-name="Source_20_Text">textarea,</text:span></text:p>
      <text:p text:style-name="P5"><text:span text:style-name="Source_20_Text">select {</text:span></text:p>
      <text:p text:style-name="P5"><text:span text:style-name="Source_20_Text"><text:s text:c="4"/>font: inherit;</text:span></text:p>
      <text:p text:style-name="P5"><text:span text:style-name="Source_20_Text">}</text:span></text:p>
      <text:p text:style-name="P5"/>
      <text:p text:style-name="P5"><text:span text:style-name="Source_20_Text">/* ==========================================================</text:span></text:p>
      <text:p text:style-name="P5"><text:span text:style-name="Source_20_Text"><text:s text:c="3"/>SELEÇÃO DE TEXTO</text:span></text:p>
      <text:p text:style-name="P5"><text:span text:style-name="Source_20_Text">========================================================== */</text:span></text:p>
      <text:p text:style-name="P5"/>
      <text:p text:style-name="P5"><text:span text:style-name="Source_20_Text">::selection {</text:span></text:p>
      <text:p text:style-name="P5"><text:span text:style-name="Source_20_Text"><text:s text:c="4"/>background-color: var(--color-secondary);</text:span></text:p>
      <text:p text:style-name="P5"><text:span text:style-name="Source_20_Text"><text:s text:c="4"/>color: #ffffff;</text:span></text:p>
      <text:p text:style-name="P5"><text:span text:style-name="Source_20_Text">}</text:span></text:p>
      <text:p text:style-name="P6"/>
      <text:h text:style-name="P7" text:outline-level="2">O que este arquivo NÃO terá</text:h>
      <text:p text:style-name="Text_20_body">Não colocaremos aqui:</text:p>
      <text:list text:style-name="L8">
        <text:list-item>
          <text:p text:style-name="P14"><text:span text:style-name="Source_20_Text">.hero</text:span></text:p>
        </text:list-item>
        <text:list-item>
          <text:p text:style-name="P14"><text:soft-page-break/><text:span text:style-name="Source_20_Text">.button-primary</text:span></text:p>
        </text:list-item>
        <text:list-item>
          <text:p text:style-name="P14"><text:span text:style-name="Source_20_Text">.book-card</text:span></text:p>
        </text:list-item>
        <text:list-item>
          <text:p text:style-name="P14"><text:span text:style-name="Source_20_Text">.feature-card</text:span></text:p>
        </text:list-item>
        <text:list-item>
          <text:p text:style-name="P14"><text:span text:style-name="Source_20_Text">.footer</text:span></text:p>
        </text:list-item>
        <text:list-item>
          <text:p text:style-name="P14"><text:span text:style-name="Source_20_Text">.navbar</text:span></text:p>
        </text:list-item>
        <text:list-item>
          <text:p text:style-name="P14"><text:span text:style-name="Source_20_Text">.container</text:span></text:p>
        </text:list-item>
      </text:list>
      <text:p text:style-name="Text_20_body">Esses pertencem a outros arquivos da arquitetura.</text:p>
      <text:p text:style-name="P6"/>
      <text:h text:style-name="P8" text:outline-level="3">Próximo passo</text:h>
      <text:p text:style-name="Text_20_body">Depois do <text:span text:style-name="Source_20_Text">base.css</text:span>, minha sugestão é seguir esta ordem:</text:p>
      <text:list text:style-name="L9">
        <text:list-item>
          <text:p text:style-name="P15">✅ <text:span text:style-name="Source_20_Text">variables.css</text:span> (implementando todas as variáveis do Design System)</text:p>
        </text:list-item>
        <text:list-item>
          <text:p text:style-name="P15">✅ <text:span text:style-name="Source_20_Text">layout.css</text:span> (container, grids, seções)</text:p>
        </text:list-item>
        <text:list-item>
          <text:p text:style-name="P15">✅ <text:span text:style-name="Source_20_Text">components.css</text:span> (botões, cards, header, footer e componentes reutilizáveis)</text:p>
        </text:list-item>
        <text:list-item>
          <text:p text:style-name="P15">✅ <text:span text:style-name="Source_20_Text">home.css</text:span> (estilos exclusivos da página inicial)</text:p>
        </text:list-item>
      </text:list>
      <text:p text:style-name="Text_20_body">Essa sequência mantém a arquitetura limpa, escalável e fácil de evoluir conforme a plataforma crescer.</text:p>
      <text:p text:style-name="Text_20_body">Excelente. Agora vamos criar o arquivo mais importante do projeto: <text:span text:style-name="Strong_20_Emphasis"><text:span text:style-name="Source_20_Text">variables.css</text:span></text:span>.</text:p>
      <text:p text:style-name="Text_20_body">Ele será a base de todo o Design System. Nenhum outro arquivo CSS deverá possuir valores "mágicos" como <text:span text:style-name="Source_20_Text">#243447</text:span>, <text:span text:style-name="Source_20_Text">16px</text:span> ou <text:span text:style-name="Source_20_Text">1200px</text:span>. Tudo será consumido através das variáveis definidas aqui.</text:p>
      <text:p text:style-name="P6"/>
      <text:h text:style-name="P12" text:outline-level="1">Responsabilidade do <text:span text:style-name="Source_20_Text">variables.css</text:span></text:h>
      <text:p text:style-name="Text_20_body">Este arquivo armazenará apenas <text:span text:style-name="Strong_20_Emphasis">tokens de design</text:span>, ou seja:</text:p>
      <text:list text:style-name="L10">
        <text:list-item>
          <text:p text:style-name="P16">Cores</text:p>
        </text:list-item>
        <text:list-item>
          <text:p text:style-name="P16">Tipografia</text:p>
        </text:list-item>
        <text:list-item>
          <text:p text:style-name="P16">Tamanhos de fonte</text:p>
        </text:list-item>
        <text:list-item>
          <text:p text:style-name="P16">Espaçamentos</text:p>
        </text:list-item>
        <text:list-item>
          <text:p text:style-name="P16">Bordas</text:p>
        </text:list-item>
        <text:list-item>
          <text:p text:style-name="P16">Sombras</text:p>
        </text:list-item>
        <text:list-item>
          <text:p text:style-name="P16">Containers</text:p>
        </text:list-item>
        <text:list-item>
          <text:p text:style-name="P16">Breakpoints</text:p>
        </text:list-item>
        <text:list-item>
          <text:p text:style-name="P16">Transições</text:p>
        </text:list-item>
      </text:list>
      <text:p text:style-name="Text_20_body"><text:soft-page-break/>Ele <text:span text:style-name="Strong_20_Emphasis">não terá nenhuma classe CSS</text:span> (<text:span text:style-name="Source_20_Text">.button</text:span>, <text:span text:style-name="Source_20_Text">.card</text:span>, etc.).</text:p>
      <text:p text:style-name="P6"/>
      <text:h text:style-name="P7" text:outline-level="2"><text:span text:style-name="Source_20_Text">assets/css/variables.css</text:span></text:h>
      <text:p text:style-name="P5"><text:span text:style-name="Source_20_Text">/* ==========================================================</text:span></text:p>
      <text:p text:style-name="P5"><text:span text:style-name="Source_20_Text"><text:s text:c="3"/>DESIGN TOKENS</text:span></text:p>
      <text:p text:style-name="P5"><text:span text:style-name="Source_20_Text"><text:s text:c="3"/>Biblioteca Apócrifa - Design System v1.0</text:span></text:p>
      <text:p text:style-name="P5"><text:span text:style-name="Source_20_Text">========================================================== */</text:span></text:p>
      <text:p text:style-name="P5"/>
      <text:p text:style-name="P5"><text:span text:style-name="Source_20_Text">:root {</text:span></text:p>
      <text:p text:style-name="P5"/>
      <text:p text:style-name="P5"><text:span text:style-name="Source_20_Text"><text:s text:c="4"/>/* ======================================================</text:span></text:p>
      <text:p text:style-name="P5"><text:span text:style-name="Source_20_Text"><text:s text:c="7"/>CORES</text:span></text:p>
      <text:p text:style-name="P5"><text:span text:style-name="Source_20_Text"><text:s text:c="4"/>====================================================== */</text:span></text:p>
      <text:p text:style-name="P5"/>
      <text:p text:style-name="P5"><text:span text:style-name="Source_20_Text"><text:s text:c="4"/>/* Cores principais */</text:span></text:p>
      <text:p text:style-name="P5"><text:span text:style-name="Source_20_Text"><text:s text:c="4"/>--color-primary: #243447;</text:span></text:p>
      <text:p text:style-name="P5"><text:span text:style-name="Source_20_Text"><text:s text:c="4"/>--color-secondary: #9A7B4F;</text:span></text:p>
      <text:p text:style-name="P5"/>
      <text:p text:style-name="P5"><text:span text:style-name="Source_20_Text"><text:s text:c="4"/>/* Fundos */</text:span></text:p>
      <text:p text:style-name="P5"><text:span text:style-name="Source_20_Text"><text:s text:c="4"/>--color-background: #F8F5EF;</text:span></text:p>
      <text:p text:style-name="P5"><text:span text:style-name="Source_20_Text"><text:s text:c="4"/>--color-reading-background: #FCFAF5;</text:span></text:p>
      <text:p text:style-name="P5"><text:span text:style-name="Source_20_Text"><text:s text:c="4"/>--color-surface: #FFFFFF;</text:span></text:p>
      <text:p text:style-name="P5"/>
      <text:p text:style-name="P5"><text:span text:style-name="Source_20_Text"><text:s text:c="4"/>/* Textos */</text:span></text:p>
      <text:p text:style-name="P5"><text:span text:style-name="Source_20_Text"><text:s text:c="4"/>--color-text: #2C2C2C;</text:span></text:p>
      <text:p text:style-name="P5"><text:span text:style-name="Source_20_Text"><text:s text:c="4"/>--color-text-muted: #6B6B6B;</text:span></text:p>
      <text:p text:style-name="P5"/>
      <text:p text:style-name="P5"><text:span text:style-name="Source_20_Text"><text:s text:c="4"/>/* Bordas */</text:span></text:p>
      <text:p text:style-name="P5"><text:span text:style-name="Source_20_Text"><text:s text:c="4"/>--color-border: #D8D2C8;</text:span></text:p>
      <text:p text:style-name="P5"/>
      <text:p text:style-name="P5"><text:span text:style-name="Source_20_Text"><text:s text:c="4"/>/* Estados */</text:span></text:p>
      <text:p text:style-name="P5"><text:span text:style-name="Source_20_Text"><text:s text:c="4"/>--color-success: #2E7D32;</text:span></text:p>
      <text:p text:style-name="P5"><text:span text:style-name="Source_20_Text"><text:s text:c="4"/>--color-warning: #ED6C02;</text:span></text:p>
      <text:p text:style-name="P5"><text:span text:style-name="Source_20_Text"><text:s text:c="4"/>--color-error: #C62828;</text:span></text:p>
      <text:p text:style-name="P5"><text:span text:style-name="Source_20_Text"><text:s text:c="4"/>--color-info: #1565C0;</text:span></text:p>
      <text:p text:style-name="P5"/>
      <text:p text:style-name="P5"><text:soft-page-break/><text:span text:style-name="Source_20_Text"><text:s text:c="4"/>/* ======================================================</text:span></text:p>
      <text:p text:style-name="P5"><text:span text:style-name="Source_20_Text"><text:s text:c="7"/>TIPOGRAFIA</text:span></text:p>
      <text:p text:style-name="P5"><text:span text:style-name="Source_20_Text"><text:s text:c="4"/>====================================================== */</text:span></text:p>
      <text:p text:style-name="P5"/>
      <text:p text:style-name="P5"><text:span text:style-name="Source_20_Text"><text:s text:c="4"/>/* Famílias */</text:span></text:p>
      <text:p text:style-name="P5"><text:span text:style-name="Source_20_Text"><text:s text:c="4"/>--font-interface: "Open Sans", sans-serif;</text:span></text:p>
      <text:p text:style-name="P5"><text:span text:style-name="Source_20_Text"><text:s text:c="4"/>--font-reading: "Merriweather", serif;</text:span></text:p>
      <text:p text:style-name="P5"/>
      <text:p text:style-name="P5"><text:span text:style-name="Source_20_Text"><text:s text:c="4"/>/* Escala tipográfica */</text:span></text:p>
      <text:p text:style-name="P5"><text:span text:style-name="Source_20_Text"><text:s text:c="4"/>--font-size-h1: 2.5rem;</text:span></text:p>
      <text:p text:style-name="P5"><text:span text:style-name="Source_20_Text"><text:s text:c="4"/>--font-size-h2: 2rem;</text:span></text:p>
      <text:p text:style-name="P5"><text:span text:style-name="Source_20_Text"><text:s text:c="4"/>--font-size-h3: 1.5rem;</text:span></text:p>
      <text:p text:style-name="P5"/>
      <text:p text:style-name="P5"><text:span text:style-name="Source_20_Text"><text:s text:c="4"/>--font-size-body: 1.125rem;</text:span></text:p>
      <text:p text:style-name="P5"><text:span text:style-name="Source_20_Text"><text:s text:c="4"/>--font-size-small: 0.875rem;</text:span></text:p>
      <text:p text:style-name="P5"/>
      <text:p text:style-name="P5"><text:span text:style-name="Source_20_Text"><text:s text:c="4"/>/* Pesos */</text:span></text:p>
      <text:p text:style-name="P5"><text:span text:style-name="Source_20_Text"><text:s text:c="4"/>--font-weight-regular: 400;</text:span></text:p>
      <text:p text:style-name="P5"><text:span text:style-name="Source_20_Text"><text:s text:c="4"/>--font-weight-semibold: 600;</text:span></text:p>
      <text:p text:style-name="P5"><text:span text:style-name="Source_20_Text"><text:s text:c="4"/>--font-weight-bold: 700;</text:span></text:p>
      <text:p text:style-name="P5"/>
      <text:p text:style-name="P5"><text:span text:style-name="Source_20_Text"><text:s text:c="4"/>/* Altura das linhas */</text:span></text:p>
      <text:p text:style-name="P5"><text:span text:style-name="Source_20_Text"><text:s text:c="4"/>--line-height-heading: 1.3;</text:span></text:p>
      <text:p text:style-name="P5"><text:span text:style-name="Source_20_Text"><text:s text:c="4"/>--line-height-body: 1.7;</text:span></text:p>
      <text:p text:style-name="P5"/>
      <text:p text:style-name="P5"><text:span text:style-name="Source_20_Text"><text:s text:c="4"/>/* ======================================================</text:span></text:p>
      <text:p text:style-name="P5"><text:span text:style-name="Source_20_Text"><text:s text:c="7"/>ESPAÇAMENTO</text:span></text:p>
      <text:p text:style-name="P5"><text:span text:style-name="Source_20_Text"><text:s text:c="4"/>====================================================== */</text:span></text:p>
      <text:p text:style-name="P5"/>
      <text:p text:style-name="P5"><text:span text:style-name="Source_20_Text"><text:s text:c="4"/>--space-xs: .25rem;</text:span></text:p>
      <text:p text:style-name="P5"><text:span text:style-name="Source_20_Text"><text:s text:c="4"/>--space-sm: .5rem;</text:span></text:p>
      <text:p text:style-name="P5"><text:span text:style-name="Source_20_Text"><text:s text:c="4"/>--space-md: 1rem;</text:span></text:p>
      <text:p text:style-name="P5"><text:span text:style-name="Source_20_Text"><text:s text:c="4"/>--space-lg: 2rem;</text:span></text:p>
      <text:p text:style-name="P5"><text:span text:style-name="Source_20_Text"><text:s text:c="4"/>--space-xl: 4rem;</text:span></text:p>
      <text:p text:style-name="P5"/>
      <text:p text:style-name="P5"><text:span text:style-name="Source_20_Text"><text:s text:c="4"/>/* ======================================================</text:span></text:p>
      <text:p text:style-name="P5"><text:soft-page-break/><text:span text:style-name="Source_20_Text"><text:s text:c="7"/>CONTAINERS</text:span></text:p>
      <text:p text:style-name="P5"><text:span text:style-name="Source_20_Text"><text:s text:c="4"/>====================================================== */</text:span></text:p>
      <text:p text:style-name="P5"/>
      <text:p text:style-name="P5"><text:span text:style-name="Source_20_Text"><text:s text:c="4"/>--container-width: 1200px;</text:span></text:p>
      <text:p text:style-name="P5"><text:span text:style-name="Source_20_Text"><text:s text:c="4"/>--reading-width: 750px;</text:span></text:p>
      <text:p text:style-name="P5"/>
      <text:p text:style-name="P5"><text:span text:style-name="Source_20_Text"><text:s text:c="4"/>/* ======================================================</text:span></text:p>
      <text:p text:style-name="P5"><text:span text:style-name="Source_20_Text"><text:s text:c="7"/>BORDAS</text:span></text:p>
      <text:p text:style-name="P5"><text:span text:style-name="Source_20_Text"><text:s text:c="4"/>====================================================== */</text:span></text:p>
      <text:p text:style-name="P5"/>
      <text:p text:style-name="P5"><text:span text:style-name="Source_20_Text"><text:s text:c="4"/>--radius-sm: 4px;</text:span></text:p>
      <text:p text:style-name="P5"><text:span text:style-name="Source_20_Text"><text:s text:c="4"/>--radius-md: 8px;</text:span></text:p>
      <text:p text:style-name="P5"><text:span text:style-name="Source_20_Text"><text:s text:c="4"/>--radius-lg: 16px;</text:span></text:p>
      <text:p text:style-name="P5"/>
      <text:p text:style-name="P5"><text:span text:style-name="Source_20_Text"><text:s text:c="4"/>/* ======================================================</text:span></text:p>
      <text:p text:style-name="P5"><text:span text:style-name="Source_20_Text"><text:s text:c="7"/>SOMBRAS</text:span></text:p>
      <text:p text:style-name="P5"><text:span text:style-name="Source_20_Text"><text:s text:c="4"/>====================================================== */</text:span></text:p>
      <text:p text:style-name="P5"/>
      <text:p text:style-name="P5"><text:span text:style-name="Source_20_Text"><text:s text:c="4"/>--shadow-sm: 0 2px 6px rgba(0, 0, 0, 0.08);</text:span></text:p>
      <text:p text:style-name="P5"><text:span text:style-name="Source_20_Text"><text:s text:c="4"/>--shadow-md: 0 6px 18px rgba(0, 0, 0, 0.12);</text:span></text:p>
      <text:p text:style-name="P5"/>
      <text:p text:style-name="P5"><text:span text:style-name="Source_20_Text"><text:s text:c="4"/>/* ======================================================</text:span></text:p>
      <text:p text:style-name="P5"><text:span text:style-name="Source_20_Text"><text:s text:c="7"/>TRANSIÇÕES</text:span></text:p>
      <text:p text:style-name="P5"><text:span text:style-name="Source_20_Text"><text:s text:c="4"/>====================================================== */</text:span></text:p>
      <text:p text:style-name="P5"/>
      <text:p text:style-name="P5"><text:span text:style-name="Source_20_Text"><text:s text:c="4"/>--transition-fast: .2s ease;</text:span></text:p>
      <text:p text:style-name="P5"><text:span text:style-name="Source_20_Text"><text:s text:c="4"/>--transition-normal: .3s ease;</text:span></text:p>
      <text:p text:style-name="P5"/>
      <text:p text:style-name="P5"><text:span text:style-name="Source_20_Text"><text:s text:c="4"/>/* ======================================================</text:span></text:p>
      <text:p text:style-name="P5"><text:span text:style-name="Source_20_Text"><text:s text:c="7"/>BREAKPOINTS</text:span></text:p>
      <text:p text:style-name="P5"><text:span text:style-name="Source_20_Text"><text:s text:c="4"/>====================================================== */</text:span></text:p>
      <text:p text:style-name="P5"/>
      <text:p text:style-name="P5"><text:span text:style-name="Source_20_Text"><text:s text:c="4"/>--breakpoint-mobile: 640px;</text:span></text:p>
      <text:p text:style-name="P5"><text:span text:style-name="Source_20_Text"><text:s text:c="4"/>--breakpoint-tablet: 1024px;</text:span></text:p>
      <text:p text:style-name="P5"><text:span text:style-name="Source_20_Text"><text:s text:c="4"/>--breakpoint-desktop: 1200px;</text:span></text:p>
      <text:p text:style-name="P5"/>
      <text:p text:style-name="P5"><text:soft-page-break/><text:span text:style-name="Source_20_Text">}</text:span></text:p>
      <text:p text:style-name="P6"/>
      <text:h text:style-name="P7" text:outline-level="2">Avaliação da arquitetura</text:h>
      <text:p text:style-name="Text_20_body">Esse arquivo ficou alinhado ao Design System que definimos. Ele também é escalável: se no futuro você quiser alterar a cor principal da plataforma ou aumentar o tamanho dos títulos, bastará mudar uma variável.</text:p>
      <text:h text:style-name="P8" text:outline-level="3">Uma sugestão de melhoria</text:h>
      <text:p text:style-name="Text_20_body">Pensando na <text:span text:style-name="Strong_20_Emphasis">Área de Leitura</text:span>, que será o núcleo da plataforma, eu acrescentaria mais dois tokens de tipografia:</text:p>
      <text:p text:style-name="P5"><text:span text:style-name="Source_20_Text">/* Largura ideal para leitura */</text:span></text:p>
      <text:p text:style-name="P5"><text:span text:style-name="Source_20_Text">--reading-line-height: 1.9;</text:span></text:p>
      <text:p text:style-name="P5"/>
      <text:p text:style-name="P5"><text:span text:style-name="Source_20_Text">/* Espaçamento entre parágrafos */</text:span></text:p>
      <text:p text:style-name="P5"><text:span text:style-name="Source_20_Text">--paragraph-spacing: 1.5rem;</text:span></text:p>
      <text:p text:style-name="Text_20_body"><text:span text:style-name="Strong_20_Emphasis">Por quê?</text:span></text:p>
      <text:p text:style-name="Text_20_body">A página de leitura terá capítulos longos, exegeses e comentários. Usar uma altura de linha um pouco maior e um espaçamento específico entre parágrafos melhora bastante a legibilidade sem afetar as outras páginas.</text:p>
      <text:p text:style-name="Text_20_body">Não é obrigatório adicionar agora, mas considero uma boa preparação para quando começarmos a desenvolver a <text:span text:style-name="Strong_20_Emphasis">Área de Leitura</text:span>.</text:p>
      <text:p text:style-name="Text_20_body"/>
      <text:p text:style-name="Text_20_body">Essa ideia vale a pena manter, mas neste projeto a memória está desativada, então não consigo guardá-la para conversas futuras.</text:p>
      <text:p text:style-name="Text_20_body">A melhor alternativa é registrá-la na documentação do projeto. Podemos criar um arquivo como <text:span text:style-name="Source_20_Text">DESIGN_SYSTEM.md</text:span> ou adicionar uma seção chamada <text:span text:style-name="Strong_20_Emphasis">"Decisões de Arquitetura"</text:span>, por exemplo:</text:p>
      <text:p text:style-name="Quotations"><text:span text:style-name="Strong_20_Emphasis">Área de Leitura</text:span></text:p>
      <text:p text:style-name="Quotations">Quando a página de leitura for implementada, utilizar:</text:p>
      <text:list text:style-name="L11">
        <text:list-item>
          <text:p text:style-name="P17"><text:span text:style-name="Source_20_Text">--reading-line-height: 1.9;</text:span></text:p>
        </text:list-item>
        <text:list-item>
          <text:p text:style-name="P17"><text:span text:style-name="Source_20_Text">--paragraph-spacing: 1.5rem;</text:span></text:p>
        </text:list-item>
      </text:list>
      <text:p text:style-name="Quotations"><text:span text:style-name="Strong_20_Emphasis">Justificativa:</text:span> melhorar a legibilidade de textos longos, comentários e exegeses.</text:p>
      <text:p text:style-name="Text_20_body">Assim essa decisão fica documentada e não depende da memória da conversa.</text:p>
      <text:p text:style-name="Horizontal_20_Line"/>
      <text:h text:style-name="Heading_20_1" text:outline-level="1"><text:soft-page-break/>Agora vamos para <text:span text:style-name="Source_20_Text">components.css</text:span></text:h>
      <text:h text:style-name="Heading_20_2" text:outline-level="2">Objetivo</text:h>
      <text:p text:style-name="Text_20_body">O <text:span text:style-name="Source_20_Text">components.css</text:span> conterá <text:span text:style-name="Strong_20_Emphasis">todos os componentes reutilizáveis</text:span> da plataforma.</text:p>
      <text:p text:style-name="Text_20_body">Ele <text:span text:style-name="Strong_20_Emphasis">não</text:span> deve conter estilos exclusivos da Home, Biblioteca ou Leitura. Esses ficam nos respectivos arquivos (<text:span text:style-name="Source_20_Text">home.css</text:span>, <text:span text:style-name="Source_20_Text">biblioteca.css</text:span>, <text:span text:style-name="Source_20_Text">leitura.css</text:span>).</text:p>
      <text:p text:style-name="Text_20_body">Nossa divisão será esta:</text:p>
      <text:p text:style-name="Preformatted_20_Text"><text:span text:style-name="Source_20_Text">components.css</text:span></text:p>
      <text:p text:style-name="Preformatted_20_Text"/>
      <text:p text:style-name="Preformatted_20_Text"><text:span text:style-name="Source_20_Text">• Botões</text:span></text:p>
      <text:p text:style-name="Preformatted_20_Text"><text:span text:style-name="Source_20_Text">• Cards</text:span></text:p>
      <text:p text:style-name="Preformatted_20_Text"><text:span text:style-name="Source_20_Text">• Cabeçalho (Header)</text:span></text:p>
      <text:p text:style-name="Preformatted_20_Text"><text:span text:style-name="Source_20_Text">• Navegação</text:span></text:p>
      <text:p text:style-name="Preformatted_20_Text"><text:span text:style-name="Source_20_Text">• Footer</text:span></text:p>
      <text:p text:style-name="Preformatted_20_Text"><text:span text:style-name="Source_20_Text">• Ícones</text:span></text:p>
      <text:p text:style-name="P2"><text:span text:style-name="Source_20_Text">• Section Header</text:span></text:p>
      <text:p text:style-name="Text_20_body">Perceba que <text:span text:style-name="Strong_20_Emphasis">Hero</text:span>, <text:span text:style-name="Strong_20_Emphasis">Intro</text:span>, <text:span text:style-name="Strong_20_Emphasis">History</text:span>, <text:span text:style-name="Strong_20_Emphasis">Platform</text:span> e <text:span text:style-name="Strong_20_Emphasis">Featured Books</text:span> <text:span text:style-name="Strong_20_Emphasis">não</text:span> entram aqui, porque são seções específicas da página inicial.</text:p>
      <text:p text:style-name="Horizontal_20_Line"/>
      <text:h text:style-name="Heading_20_2" text:outline-level="2"><text:span text:style-name="Source_20_Text">assets/css/components.css</text:span></text:h>
      <text:p text:style-name="Preformatted_20_Text"><text:span text:style-name="Source_20_Text">/* ==========================================================</text:span></text:p>
      <text:p text:style-name="Preformatted_20_Text"><text:span text:style-name="Source_20_Text"><text:s text:c="3"/>BOTÕES</text:span></text:p>
      <text:p text:style-name="Preformatted_20_Text"><text:span text:style-name="Source_20_Text">========================================================== */</text:span></text:p>
      <text:p text:style-name="Preformatted_20_Text"/>
      <text:p text:style-name="Preformatted_20_Text"><text:span text:style-name="Source_20_Text">.button-primary {</text:span></text:p>
      <text:p text:style-name="Preformatted_20_Text"><text:span text:style-name="Source_20_Text"><text:s text:c="4"/>display: inline-flex;</text:span></text:p>
      <text:p text:style-name="Preformatted_20_Text"><text:span text:style-name="Source_20_Text"><text:s text:c="4"/>align-items: center;</text:span></text:p>
      <text:p text:style-name="Preformatted_20_Text"><text:span text:style-name="Source_20_Text"><text:s text:c="4"/>justify-content: center;</text:span></text:p>
      <text:p text:style-name="Preformatted_20_Text"/>
      <text:p text:style-name="Preformatted_20_Text"><text:span text:style-name="Source_20_Text"><text:s text:c="4"/>padding: var(--space-sm) var(--space-lg);</text:span></text:p>
      <text:p text:style-name="Preformatted_20_Text"/>
      <text:p text:style-name="Preformatted_20_Text"><text:span text:style-name="Source_20_Text"><text:s text:c="4"/>font-family: var(--font-interface);</text:span></text:p>
      <text:p text:style-name="Preformatted_20_Text"><text:span text:style-name="Source_20_Text"><text:s text:c="4"/>font-weight: var(--font-weight-semibold);</text:span></text:p>
      <text:p text:style-name="Preformatted_20_Text"/>
      <text:p text:style-name="Preformatted_20_Text"><text:span text:style-name="Source_20_Text"><text:s text:c="4"/>color: var(--color-surface);</text:span></text:p>
      <text:p text:style-name="Preformatted_20_Text"><text:span text:style-name="Source_20_Text"><text:s text:c="4"/>background-color: var(--color-primary);</text:span></text:p>
      <text:p text:style-name="Preformatted_20_Text"/>
      <text:p text:style-name="Preformatted_20_Text"><text:span text:style-name="Source_20_Text"><text:s text:c="4"/>border: none;</text:span></text:p>
      <text:p text:style-name="Preformatted_20_Text"><text:span text:style-name="Source_20_Text"><text:s text:c="4"/>border-radius: var(--radius-md);</text:span></text:p>
      <text:p text:style-name="Preformatted_20_Text"/>
      <text:p text:style-name="Preformatted_20_Text"><text:span text:style-name="Source_20_Text"><text:s text:c="4"/>cursor: pointer;</text:span></text:p>
      <text:p text:style-name="Preformatted_20_Text"/>
      <text:p text:style-name="Preformatted_20_Text"><text:span text:style-name="Source_20_Text"><text:s text:c="4"/>transition:</text:span></text:p>
      <text:p text:style-name="Preformatted_20_Text"><text:span text:style-name="Source_20_Text"><text:s text:c="8"/>background-color var(--transition-normal),</text:span></text:p>
      <text:p text:style-name="Preformatted_20_Text"><text:span text:style-name="Source_20_Text"><text:s text:c="8"/>transform var(--transition-fast)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.button-primary:hover {</text:span></text:p>
      <text:p text:style-name="Preformatted_20_Text"><text:span text:style-name="Source_20_Text"><text:s text:c="4"/>background-color: var(--color-secondary);</text:span></text:p>
      <text:p text:style-name="Preformatted_20_Text"><text:span text:style-name="Source_20_Text"><text:s text:c="4"/>transform: translateY(-2px);</text:span></text:p>
      <text:p text:style-name="Preformatted_20_Text"><text:span text:style-name="Source_20_Text">}</text:span></text:p>
      <text:p text:style-name="Preformatted_20_Text"><text:soft-page-break/></text:p>
      <text:p text:style-name="Preformatted_20_Text"><text:span text:style-name="Source_20_Text">.button-primary:focus-visible {</text:span></text:p>
      <text:p text:style-name="Preformatted_20_Text"><text:span text:style-name="Source_20_Text"><text:s text:c="4"/>outline: 2px solid var(--color-secondary);</text:span></text:p>
      <text:p text:style-name="Preformatted_20_Text"><text:span text:style-name="Source_20_Text"><text:s text:c="4"/>outline-offset: 3px;</text:span></text:p>
      <text:p text:style-name="Preformatted_20_Text"><text:span text:style-name="Source_20_Text">}</text:span></text:p>
      <text:p text:style-name="Preformatted_20_Text"/>
      <text:p text:style-name="Preformatted_20_Text"/>
      <text:p text:style-name="Preformatted_20_Text"><text:span text:style-name="Source_20_Text">/* ==========================================================</text:span></text:p>
      <text:p text:style-name="Preformatted_20_Text"><text:span text:style-name="Source_20_Text"><text:s text:c="3"/>BOTÃO SECUNDÁRIO</text:span></text:p>
      <text:p text:style-name="Preformatted_20_Text"><text:span text:style-name="Source_20_Text">========================================================== */</text:span></text:p>
      <text:p text:style-name="Preformatted_20_Text"/>
      <text:p text:style-name="Preformatted_20_Text"><text:span text:style-name="Source_20_Text">.button-secondary {</text:span></text:p>
      <text:p text:style-name="Preformatted_20_Text"><text:span text:style-name="Source_20_Text"><text:s text:c="4"/>display: inline-flex;</text:span></text:p>
      <text:p text:style-name="Preformatted_20_Text"><text:span text:style-name="Source_20_Text"><text:s text:c="4"/>align-items: center;</text:span></text:p>
      <text:p text:style-name="Preformatted_20_Text"><text:span text:style-name="Source_20_Text"><text:s text:c="4"/>justify-content: center;</text:span></text:p>
      <text:p text:style-name="Preformatted_20_Text"/>
      <text:p text:style-name="Preformatted_20_Text"><text:span text:style-name="Source_20_Text"><text:s text:c="4"/>padding: var(--space-sm) var(--space-lg);</text:span></text:p>
      <text:p text:style-name="Preformatted_20_Text"/>
      <text:p text:style-name="Preformatted_20_Text"><text:span text:style-name="Source_20_Text"><text:s text:c="4"/>color: var(--color-primary);</text:span></text:p>
      <text:p text:style-name="Preformatted_20_Text"/>
      <text:p text:style-name="Preformatted_20_Text"><text:span text:style-name="Source_20_Text"><text:s text:c="4"/>background: transparent;</text:span></text:p>
      <text:p text:style-name="Preformatted_20_Text"/>
      <text:p text:style-name="Preformatted_20_Text"><text:span text:style-name="Source_20_Text"><text:s text:c="4"/>border: 1px solid var(--color-primary);</text:span></text:p>
      <text:p text:style-name="Preformatted_20_Text"><text:span text:style-name="Source_20_Text"><text:s text:c="4"/>border-radius: var(--radius-md);</text:span></text:p>
      <text:p text:style-name="Preformatted_20_Text"/>
      <text:p text:style-name="Preformatted_20_Text"><text:span text:style-name="Source_20_Text"><text:s text:c="4"/>transition: all var(--transition-normal)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.button-secondary:hover {</text:span></text:p>
      <text:p text:style-name="Preformatted_20_Text"><text:span text:style-name="Source_20_Text"><text:s text:c="4"/>background: var(--color-primary);</text:span></text:p>
      <text:p text:style-name="Preformatted_20_Text"><text:span text:style-name="Source_20_Text"><text:s text:c="4"/>color: var(--color-surface);</text:span></text:p>
      <text:p text:style-name="Preformatted_20_Text"><text:span text:style-name="Source_20_Text">}</text:span></text:p>
      <text:p text:style-name="Preformatted_20_Text"/>
      <text:p text:style-name="Preformatted_20_Text"/>
      <text:p text:style-name="Preformatted_20_Text"><text:span text:style-name="Source_20_Text">/* ==========================================================</text:span></text:p>
      <text:p text:style-name="Preformatted_20_Text"><text:span text:style-name="Source_20_Text"><text:s text:c="3"/>BOTÃO DE ÍCONE</text:span></text:p>
      <text:p text:style-name="Preformatted_20_Text"><text:span text:style-name="Source_20_Text">========================================================== */</text:span></text:p>
      <text:p text:style-name="Preformatted_20_Text"/>
      <text:p text:style-name="Preformatted_20_Text"><text:span text:style-name="Source_20_Text">.icon-button {</text:span></text:p>
      <text:p text:style-name="Preformatted_20_Text"><text:span text:style-name="Source_20_Text"><text:s text:c="4"/>display: flex;</text:span></text:p>
      <text:p text:style-name="Preformatted_20_Text"><text:span text:style-name="Source_20_Text"><text:s text:c="4"/>align-items: center;</text:span></text:p>
      <text:p text:style-name="Preformatted_20_Text"><text:span text:style-name="Source_20_Text"><text:s text:c="4"/>justify-content: center;</text:span></text:p>
      <text:p text:style-name="Preformatted_20_Text"/>
      <text:p text:style-name="Preformatted_20_Text"><text:span text:style-name="Source_20_Text"><text:s text:c="4"/>width: 42px;</text:span></text:p>
      <text:p text:style-name="Preformatted_20_Text"><text:span text:style-name="Source_20_Text"><text:s text:c="4"/>height: 42px;</text:span></text:p>
      <text:p text:style-name="Preformatted_20_Text"/>
      <text:p text:style-name="Preformatted_20_Text"><text:span text:style-name="Source_20_Text"><text:s text:c="4"/>border: none;</text:span></text:p>
      <text:p text:style-name="Preformatted_20_Text"><text:span text:style-name="Source_20_Text"><text:s text:c="4"/>border-radius: 50%;</text:span></text:p>
      <text:p text:style-name="Preformatted_20_Text"/>
      <text:p text:style-name="Preformatted_20_Text"><text:span text:style-name="Source_20_Text"><text:s text:c="4"/>background: transparent;</text:span></text:p>
      <text:p text:style-name="Preformatted_20_Text"/>
      <text:p text:style-name="Preformatted_20_Text"><text:span text:style-name="Source_20_Text"><text:s text:c="4"/>cursor: pointer;</text:span></text:p>
      <text:p text:style-name="Preformatted_20_Text"/>
      <text:p text:style-name="Preformatted_20_Text"><text:span text:style-name="Source_20_Text"><text:s text:c="4"/>transition: background-color var(--transition-normal)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.icon-button:hover {</text:span></text:p>
      <text:p text:style-name="Preformatted_20_Text"><text:span text:style-name="Source_20_Text"><text:s text:c="4"/>background-color: rgba(0,0,0,.08);</text:span></text:p>
      <text:p text:style-name="Preformatted_20_Text"><text:span text:style-name="Source_20_Text">}</text:span></text:p>
      <text:p text:style-name="Preformatted_20_Text"/>
      <text:p text:style-name="Preformatted_20_Text"/>
      <text:p text:style-name="Preformatted_20_Text"><text:span text:style-name="Source_20_Text">/* ==========================================================</text:span></text:p>
      <text:p text:style-name="Preformatted_20_Text"><text:span text:style-name="Source_20_Text"><text:s text:c="3"/>HEADER</text:span></text:p>
      <text:p text:style-name="Preformatted_20_Text"><text:span text:style-name="Source_20_Text">========================================================== */</text:span></text:p>
      <text:p text:style-name="Preformatted_20_Text"><text:soft-page-break/></text:p>
      <text:p text:style-name="Preformatted_20_Text"><text:span text:style-name="Source_20_Text">.app-header {</text:span></text:p>
      <text:p text:style-name="Preformatted_20_Text"><text:span text:style-name="Source_20_Text"><text:s text:c="4"/>background: var(--color-surface);</text:span></text:p>
      <text:p text:style-name="Preformatted_20_Text"><text:span text:style-name="Source_20_Text"><text:s text:c="4"/>border-bottom: 1px solid var(--color-border)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.app-header__container {</text:span></text:p>
      <text:p text:style-name="Preformatted_20_Text"><text:span text:style-name="Source_20_Text"><text:s text:c="4"/>display: flex;</text:span></text:p>
      <text:p text:style-name="Preformatted_20_Text"><text:span text:style-name="Source_20_Text"><text:s text:c="4"/>align-items: center;</text:span></text:p>
      <text:p text:style-name="Preformatted_20_Text"><text:span text:style-name="Source_20_Text"><text:s text:c="4"/>justify-content: space-between;</text:span></text:p>
      <text:p text:style-name="Preformatted_20_Text"/>
      <text:p text:style-name="Preformatted_20_Text"><text:span text:style-name="Source_20_Text"><text:s text:c="4"/>min-height: 80px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.app-header__logo {</text:span></text:p>
      <text:p text:style-name="Preformatted_20_Text"><text:span text:style-name="Source_20_Text"><text:s text:c="4"/>font-family: var(--font-reading);</text:span></text:p>
      <text:p text:style-name="Preformatted_20_Text"><text:span text:style-name="Source_20_Text"><text:s text:c="4"/>font-size: 1.5rem;</text:span></text:p>
      <text:p text:style-name="Preformatted_20_Text"><text:span text:style-name="Source_20_Text"><text:s text:c="4"/>font-weight: var(--font-weight-bold);</text:span></text:p>
      <text:p text:style-name="Preformatted_20_Text"/>
      <text:p text:style-name="Preformatted_20_Text"><text:span text:style-name="Source_20_Text"><text:s text:c="4"/>color: var(--color-primary)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.app-header__nav {</text:span></text:p>
      <text:p text:style-name="Preformatted_20_Text"><text:span text:style-name="Source_20_Text"><text:s text:c="4"/>display: flex;</text:span></text:p>
      <text:p text:style-name="Preformatted_20_Text"><text:span text:style-name="Source_20_Text"><text:s text:c="4"/>gap: var(--space-lg)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.app-header__nav a {</text:span></text:p>
      <text:p text:style-name="Preformatted_20_Text"><text:span text:style-name="Source_20_Text"><text:s text:c="4"/>font-weight: var(--font-weight-semibold)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.app-header__actions {</text:span></text:p>
      <text:p text:style-name="Preformatted_20_Text"><text:span text:style-name="Source_20_Text"><text:s text:c="4"/>display: flex;</text:span></text:p>
      <text:p text:style-name="Preformatted_20_Text"><text:span text:style-name="Source_20_Text"><text:s text:c="4"/>gap: var(--space-sm);</text:span></text:p>
      <text:p text:style-name="Preformatted_20_Text"><text:span text:style-name="Source_20_Text">}</text:span></text:p>
      <text:p text:style-name="Preformatted_20_Text"/>
      <text:p text:style-name="Preformatted_20_Text"/>
      <text:p text:style-name="Preformatted_20_Text"><text:span text:style-name="Source_20_Text">/* ==========================================================</text:span></text:p>
      <text:p text:style-name="Preformatted_20_Text"><text:span text:style-name="Source_20_Text"><text:s text:c="3"/>CARD DO LIVRO</text:span></text:p>
      <text:p text:style-name="Preformatted_20_Text"><text:span text:style-name="Source_20_Text">========================================================== */</text:span></text:p>
      <text:p text:style-name="Preformatted_20_Text"/>
      <text:p text:style-name="Preformatted_20_Text"><text:span text:style-name="Source_20_Text">.book-card {</text:span></text:p>
      <text:p text:style-name="Preformatted_20_Text"><text:span text:style-name="Source_20_Text"><text:s text:c="4"/>background: var(--color-surface);</text:span></text:p>
      <text:p text:style-name="Preformatted_20_Text"/>
      <text:p text:style-name="Preformatted_20_Text"><text:span text:style-name="Source_20_Text"><text:s text:c="4"/>border: 1px solid var(--color-border);</text:span></text:p>
      <text:p text:style-name="Preformatted_20_Text"/>
      <text:p text:style-name="Preformatted_20_Text"><text:span text:style-name="Source_20_Text"><text:s text:c="4"/>border-radius: var(--radius-md);</text:span></text:p>
      <text:p text:style-name="Preformatted_20_Text"/>
      <text:p text:style-name="Preformatted_20_Text"><text:span text:style-name="Source_20_Text"><text:s text:c="4"/>padding: var(--space-lg);</text:span></text:p>
      <text:p text:style-name="Preformatted_20_Text"/>
      <text:p text:style-name="Preformatted_20_Text"><text:span text:style-name="Source_20_Text"><text:s text:c="4"/>box-shadow: var(--shadow-sm);</text:span></text:p>
      <text:p text:style-name="Preformatted_20_Text"/>
      <text:p text:style-name="Preformatted_20_Text"><text:span text:style-name="Source_20_Text"><text:s text:c="4"/>transition:</text:span></text:p>
      <text:p text:style-name="Preformatted_20_Text"><text:span text:style-name="Source_20_Text"><text:s text:c="8"/>transform var(--transition-fast),</text:span></text:p>
      <text:p text:style-name="Preformatted_20_Text"><text:span text:style-name="Source_20_Text"><text:s text:c="8"/>box-shadow var(--transition-normal)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.book-card:hover {</text:span></text:p>
      <text:p text:style-name="Preformatted_20_Text"><text:span text:style-name="Source_20_Text"><text:s text:c="4"/>transform: translateY(-4px);</text:span></text:p>
      <text:p text:style-name="Preformatted_20_Text"><text:span text:style-name="Source_20_Text"><text:s text:c="4"/>box-shadow: var(--shadow-md);</text:span></text:p>
      <text:p text:style-name="Preformatted_20_Text"><text:span text:style-name="Source_20_Text">}</text:span></text:p>
      <text:p text:style-name="Preformatted_20_Text"/>
      <text:p text:style-name="Preformatted_20_Text"/>
      <text:p text:style-name="Preformatted_20_Text"><text:span text:style-name="Source_20_Text">/* ==========================================================</text:span></text:p>
      <text:p text:style-name="Preformatted_20_Text"><text:soft-page-break/><text:span text:style-name="Source_20_Text"><text:s text:c="3"/>CARD DE FUNCIONALIDADE</text:span></text:p>
      <text:p text:style-name="Preformatted_20_Text"><text:span text:style-name="Source_20_Text">========================================================== */</text:span></text:p>
      <text:p text:style-name="Preformatted_20_Text"/>
      <text:p text:style-name="Preformatted_20_Text"><text:span text:style-name="Source_20_Text">.feature-card {</text:span></text:p>
      <text:p text:style-name="Preformatted_20_Text"><text:span text:style-name="Source_20_Text"><text:s text:c="4"/>padding: var(--space-lg);</text:span></text:p>
      <text:p text:style-name="Preformatted_20_Text"/>
      <text:p text:style-name="Preformatted_20_Text"><text:span text:style-name="Source_20_Text"><text:s text:c="4"/>background: var(--color-surface);</text:span></text:p>
      <text:p text:style-name="Preformatted_20_Text"/>
      <text:p text:style-name="Preformatted_20_Text"><text:span text:style-name="Source_20_Text"><text:s text:c="4"/>border-radius: var(--radius-md);</text:span></text:p>
      <text:p text:style-name="Preformatted_20_Text"/>
      <text:p text:style-name="Preformatted_20_Text"><text:span text:style-name="Source_20_Text"><text:s text:c="4"/>border: 1px solid var(--color-border);</text:span></text:p>
      <text:p text:style-name="Preformatted_20_Text"/>
      <text:p text:style-name="Preformatted_20_Text"><text:span text:style-name="Source_20_Text"><text:s text:c="4"/>box-shadow: var(--shadow-sm);</text:span></text:p>
      <text:p text:style-name="Preformatted_20_Text"><text:span text:style-name="Source_20_Text">}</text:span></text:p>
      <text:p text:style-name="Preformatted_20_Text"/>
      <text:p text:style-name="Preformatted_20_Text"/>
      <text:p text:style-name="Preformatted_20_Text"><text:span text:style-name="Source_20_Text">/* ==========================================================</text:span></text:p>
      <text:p text:style-name="Preformatted_20_Text"><text:span text:style-name="Source_20_Text"><text:s text:c="3"/>TÍTULO DAS SEÇÕES</text:span></text:p>
      <text:p text:style-name="Preformatted_20_Text"><text:span text:style-name="Source_20_Text">========================================================== */</text:span></text:p>
      <text:p text:style-name="Preformatted_20_Text"/>
      <text:p text:style-name="Preformatted_20_Text"><text:span text:style-name="Source_20_Text">.section-header {</text:span></text:p>
      <text:p text:style-name="Preformatted_20_Text"><text:span text:style-name="Source_20_Text"><text:s text:c="4"/>margin-bottom: var(--space-lg);</text:span></text:p>
      <text:p text:style-name="Preformatted_20_Text"><text:span text:style-name="Source_20_Text"><text:s text:c="4"/>text-align: center;</text:span></text:p>
      <text:p text:style-name="Preformatted_20_Text"><text:span text:style-name="Source_20_Text">}</text:span></text:p>
      <text:p text:style-name="Preformatted_20_Text"/>
      <text:p text:style-name="Preformatted_20_Text"/>
      <text:p text:style-name="Preformatted_20_Text"><text:span text:style-name="Source_20_Text">/* ==========================================================</text:span></text:p>
      <text:p text:style-name="Preformatted_20_Text"><text:span text:style-name="Source_20_Text"><text:s text:c="3"/>RODAPÉ</text:span></text:p>
      <text:p text:style-name="Preformatted_20_Text"><text:span text:style-name="Source_20_Text">========================================================== */</text:span></text:p>
      <text:p text:style-name="Preformatted_20_Text"/>
      <text:p text:style-name="Preformatted_20_Text"><text:span text:style-name="Source_20_Text">.footer {</text:span></text:p>
      <text:p text:style-name="Preformatted_20_Text"><text:span text:style-name="Source_20_Text"><text:s text:c="4"/>margin-top: var(--space-xl);</text:span></text:p>
      <text:p text:style-name="Preformatted_20_Text"/>
      <text:p text:style-name="Preformatted_20_Text"><text:span text:style-name="Source_20_Text"><text:s text:c="4"/>border-top: 1px solid var(--color-border);</text:span></text:p>
      <text:p text:style-name="Preformatted_20_Text"/>
      <text:p text:style-name="Preformatted_20_Text"><text:span text:style-name="Source_20_Text"><text:s text:c="4"/>background: var(--color-surface)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.footer__content {</text:span></text:p>
      <text:p text:style-name="Preformatted_20_Text"><text:span text:style-name="Source_20_Text"><text:s text:c="4"/>padding: var(--space-lg) 0;</text:span></text:p>
      <text:p text:style-name="Preformatted_20_Text"/>
      <text:p text:style-name="Preformatted_20_Text"><text:span text:style-name="Source_20_Text"><text:s text:c="4"/>text-align: center;</text:span></text:p>
      <text:p text:style-name="P2"><text:span text:style-name="Source_20_Text">}</text:span></text:p>
      <text:p text:style-name="Horizontal_20_Line"/>
      <text:h text:style-name="Heading_20_3" text:outline-level="3">Avaliação</text:h>
      <text:p text:style-name="Text_20_body">Esse <text:span text:style-name="Source_20_Text">components.css</text:span> está totalmente compatível com o HTML que você construiu e com o nosso Design System.</text:p>
      <text:p text:style-name="Text_20_body">Ele também respeita a responsabilidade de cada arquivo:</text:p>
      <text:list text:style-name="L12">
        <text:list-item>
          <text:p text:style-name="P18">✅ <text:span text:style-name="Source_20_Text">variables.css</text:span> → apenas tokens.</text:p>
        </text:list-item>
        <text:list-item>
          <text:p text:style-name="P18">✅ <text:span text:style-name="Source_20_Text">base.css</text:span> → estilos globais.</text:p>
        </text:list-item>
        <text:list-item>
          <text:p text:style-name="P18">✅ <text:bookmark-start text:name="__DdeLink__3364_829906918"/><text:bookmark-start text:name="__DdeLink__3362_829906918"/><text:span text:style-name="Source_20_Text">layout.css</text:span> <text:bookmark-end text:name="__DdeLink__3364_829906918"/><text:bookmark-end text:name="__DdeLink__3362_829906918"/>→ estrutura e containers.</text:p>
        </text:list-item>
        <text:list-item>
          <text:p text:style-name="P18">✅ <text:span text:style-name="Source_20_Text">components.css</text:span> → componentes reutilizáveis.</text:p>
        </text:list-item>
        <text:list-item>
          <text:p text:style-name="P18">⏳ <text:span text:style-name="Source_20_Text">home.css</text:span> → apenas estilos específicos da página inicial.</text:p>
        </text:list-item>
      </text:list>
      <text:p text:style-name="Text_20_body"><text:soft-page-break/>Essa separação vai facilitar muito a manutenção conforme a plataforma crescer.</text:p>
      <text:p text:style-name="Standard">/* ==========================================================</text:p>
      <text:p text:style-name="Standard"><text:s text:c="3"/>CONTAINER</text:p>
      <text:p text:style-name="Standard">========================================================== */</text:p>
      <text:p text:style-name="Standard"/>
      <text:p text:style-name="Standard">.container {</text:p>
      <text:p text:style-name="Standard"><text:s text:c="4"/>width: min(100% - 2rem, var(--container-width));</text:p>
      <text:p text:style-name="Standard"><text:s text:c="4"/>margin-inline: auto;</text:p>
      <text:p text:style-name="Standard">}</text:p>
      <text:p text:style-name="Standard"/>
      <text:p text:style-name="Standard">/* ==========================================================</text:p>
      <text:p text:style-name="Standard"><text:s text:c="3"/>SEÇÕES</text:p>
      <text:p text:style-name="Standard">========================================================== */</text:p>
      <text:p text:style-name="Standard"/>
      <text:p text:style-name="Standard">section {</text:p>
      <text:p text:style-name="Standard"><text:s text:c="4"/>padding-block: var(--space-xl);</text:p>
      <text:p text:style-name="Standard">}</text:p>
      <text:p text:style-name="Standard"/>
      <text:p text:style-name="Standard">/* ==========================================================</text:p>
      <text:p text:style-name="Standard"><text:s text:c="3"/>ÁREA DE LEITURA</text:p>
      <text:p text:style-name="Standard">========================================================== */</text:p>
      <text:p text:style-name="Standard"/>
      <text:p text:style-name="Standard">.reading-container {</text:p>
      <text:p text:style-name="Standard"><text:s text:c="4"/>width: min(100% - 2rem, var(--reading-width));</text:p>
      <text:p text:style-name="Standard"><text:s text:c="4"/>margin-inline: auto;</text:p>
      <text:p text:style-name="Standard">}</text:p>
      <text:p text:style-name="Standard"/>
      <text:p text:style-name="Standard">/* ==========================================================</text:p>
      <text:p text:style-name="Standard"><text:s text:c="3"/>GRID GENÉRICO</text:p>
      <text:p text:style-name="Standard">========================================================== */</text:p>
      <text:p text:style-name="Standard"/>
      <text:p text:style-name="Standard">.grid {</text:p>
      <text:p text:style-name="Standard"><text:s text:c="4"/>display: grid;</text:p>
      <text:p text:style-name="Standard"><text:s text:c="4"/>gap: var(--space-lg);</text:p>
      <text:p text:style-name="Standard">}</text:p>
      <text:p text:style-name="Standard"/>
      <text:p text:style-name="Standard">/* ==========================================================</text:p>
      <text:p text:style-name="Standard"><text:s text:c="3"/>GRID DE 2 COLUNAS</text:p>
      <text:p text:style-name="Standard">========================================================== */</text:p>
      <text:p text:style-name="Standard"/>
      <text:p text:style-name="Standard">.grid-2 {</text:p>
      <text:p text:style-name="Standard"><text:s text:c="4"/>display: grid;</text:p>
      <text:p text:style-name="Standard"><text:s text:c="4"/>grid-template-columns: repeat(2, 1fr);</text:p>
      <text:p text:style-name="Standard"><text:s text:c="4"/>gap: var(--space-lg);</text:p>
      <text:p text:style-name="Standard">}</text:p>
      <text:p text:style-name="Standard"/>
      <text:p text:style-name="Standard">/* ==========================================================</text:p>
      <text:p text:style-name="Standard"><text:s text:c="3"/>GRID DE 3 COLUNAS</text:p>
      <text:p text:style-name="Standard">========================================================== */</text:p>
      <text:p text:style-name="Standard"/>
      <text:p text:style-name="Standard">.grid-3 {</text:p>
      <text:p text:style-name="Standard"><text:s text:c="4"/>display: grid;</text:p>
      <text:p text:style-name="Standard"><text:soft-page-break/><text:s text:c="4"/>grid-template-columns: repeat(3, 1fr);</text:p>
      <text:p text:style-name="Standard"><text:s text:c="4"/>gap: var(--space-lg);</text:p>
      <text:p text:style-name="Standard">}</text:p>
      <text:p text:style-name="Standard"/>
      <text:p text:style-name="Standard">/* ==========================================================</text:p>
      <text:p text:style-name="Standard"><text:s text:c="3"/>FLEX GENÉRICO</text:p>
      <text:p text:style-name="Standard">========================================================== */</text:p>
      <text:p text:style-name="Standard"/>
      <text:p text:style-name="Standard">.flex {</text:p>
      <text:p text:style-name="Standard"><text:s text:c="4"/>display: flex;</text:p>
      <text:p text:style-name="Standard">}</text:p>
      <text:p text:style-name="Standard"/>
      <text:p text:style-name="Standard">.flex-center {</text:p>
      <text:p text:style-name="Standard"><text:s text:c="4"/>display: flex;</text:p>
      <text:p text:style-name="Standard"><text:s text:c="4"/>justify-content: center;</text:p>
      <text:p text:style-name="Standard"><text:s text:c="4"/>align-items: center;</text:p>
      <text:p text:style-name="Standard">}</text:p>
      <text:p text:style-name="Standard"/>
      <text:p text:style-name="Standard">.flex-between {</text:p>
      <text:p text:style-name="Standard"><text:s text:c="4"/>display: flex;</text:p>
      <text:p text:style-name="Standard"><text:s text:c="4"/>justify-content: space-between;</text:p>
      <text:p text:style-name="Standard"><text:s text:c="4"/>align-items: center;</text:p>
      <text:p text:style-name="Standard">}</text:p>
      <text:p text:style-name="Standard"/>
      <text:p text:style-name="Standard">/* ==========================================================</text:p>
      <text:p text:style-name="Standard"><text:s text:c="3"/>RESPONSIVIDADE</text:p>
      <text:p text:style-name="Standard">========================================================== */</text:p>
      <text:p text:style-name="Standard"/>
      <text:p text:style-name="Standard">@media (max-width: 1024px) {</text:p>
      <text:p text:style-name="Standard"/>
      <text:p text:style-name="Standard"><text:s text:c="4"/>.grid-3 {</text:p>
      <text:p text:style-name="Standard"><text:s text:c="8"/>grid-template-columns: repeat(2, 1fr);</text:p>
      <text:p text:style-name="Standard"><text:s text:c="4"/>}</text:p>
      <text:p text:style-name="Standard"/>
      <text:p text:style-name="Standard">}</text:p>
      <text:p text:style-name="Standard"/>
      <text:p text:style-name="Standard">@media (max-width: 640px) {</text:p>
      <text:p text:style-name="Standard"/>
      <text:p text:style-name="Standard"><text:s text:c="4"/>.grid-2,</text:p>
      <text:p text:style-name="Standard"><text:s text:c="4"/>.grid-3 {</text:p>
      <text:p text:style-name="Standard"><text:s text:c="8"/>grid-template-columns: 1fr;</text:p>
      <text:p text:style-name="Standard"><text:s text:c="4"/>}</text:p>
      <text:p text:style-name="Standard"/>
      <text:p text:style-name="Standard">}</text:p>
      <text:p text:style-name="Standard"/>
      <text:p text:style-name="Text_20_body">Sim. Para o <text:span text:style-name="Strong_20_Emphasis"><text:span text:style-name="Source_20_Text">index.html</text:span></text:span>, devem estar linkados apenas os arquivos necessários para a Home.</text:p>
      <text:p text:style-name="Text_20_body">Na ordem correta:</text:p>
      <text:p text:style-name="Preformatted_20_Text"><text:span text:style-name="Source_20_Text">&lt;!-- Google Fonts --&gt;</text:span></text:p>
      <text:p text:style-name="Preformatted_20_Text"><text:span text:style-name="Source_20_Text">&lt;link rel="preconnect" href="https://fonts.googleapis.com"&gt;</text:span></text:p>
      <text:p text:style-name="Preformatted_20_Text"><text:span text:style-name="Source_20_Text">&lt;link rel="preconnect" href="https://fonts.gstatic.com" crossorigin&gt;</text:span></text:p>
      <text:p text:style-name="Preformatted_20_Text"><text:soft-page-break/><text:span text:style-name="Source_20_Text">&lt;link href="https://fonts.googleapis.com/css2?family=Merriweather:wght@300;400;700&amp;family=Open+Sans:wght@300;400;600;700&amp;display=swap" rel="stylesheet"&gt;</text:span></text:p>
      <text:p text:style-name="Preformatted_20_Text"/>
      <text:p text:style-name="Preformatted_20_Text"><text:span text:style-name="Source_20_Text">&lt;!-- Design System --&gt;</text:span></text:p>
      <text:p text:style-name="Preformatted_20_Text"><text:span text:style-name="Source_20_Text">&lt;link rel="stylesheet" href="assets/css/variables.css"&gt;</text:span></text:p>
      <text:p text:style-name="Preformatted_20_Text"/>
      <text:p text:style-name="Preformatted_20_Text"><text:span text:style-name="Source_20_Text">&lt;!-- Estilos Globais --&gt;</text:span></text:p>
      <text:p text:style-name="Preformatted_20_Text"><text:span text:style-name="Source_20_Text">&lt;link rel="stylesheet" href="assets/css/base.css"&gt;</text:span></text:p>
      <text:p text:style-name="Preformatted_20_Text"/>
      <text:p text:style-name="Preformatted_20_Text"><text:span text:style-name="Source_20_Text">&lt;!-- Estrutura --&gt;</text:span></text:p>
      <text:p text:style-name="Preformatted_20_Text"><text:span text:style-name="Source_20_Text">&lt;link rel="stylesheet" href="assets/css/layout.css"&gt;</text:span></text:p>
      <text:p text:style-name="Preformatted_20_Text"/>
      <text:p text:style-name="Preformatted_20_Text"><text:span text:style-name="Source_20_Text">&lt;!-- Componentes Reutilizáveis --&gt;</text:span></text:p>
      <text:p text:style-name="Preformatted_20_Text"><text:span text:style-name="Source_20_Text">&lt;link rel="stylesheet" href="assets/css/components.css"&gt;</text:span></text:p>
      <text:p text:style-name="Preformatted_20_Text"/>
      <text:p text:style-name="Preformatted_20_Text"><text:span text:style-name="Source_20_Text">&lt;!-- Página Inicial --&gt;</text:span></text:p>
      <text:p text:style-name="P2"><text:span text:style-name="Source_20_Text">&lt;link rel="stylesheet" href="assets/css/home.css"&gt;</text:span></text:p>
      <text:p text:style-name="Horizontal_20_Line"/>
      <text:h text:style-name="Heading_20_2" text:outline-level="2">O que cada arquivo faz</text:h>
      <table:table table:name="Tabela1" table:style-name="Tabela1">
        <table:table-column table:style-name="Tabela1.A"/>
        <table:table-column table:style-name="Tabela1.B"/>
        <table:table-header-rows>
          <table:table-row>
            <table:table-cell table:style-name="Tabela1.A1" office:value-type="string">
              <text:p text:style-name="Table_20_Heading">Arquivo</text:p>
            </table:table-cell>
            <table:table-cell table:style-name="Tabela1.A1" office:value-type="string">
              <text:p text:style-name="Table_20_Heading">Responsabilidade</text:p>
            </table:table-cell>
          </table:table-row>
        </table:table-header-rows>
        <table:table-row>
          <table:table-cell table:style-name="Tabela1.A1" office:value-type="string">
            <text:p text:style-name="Table_20_Contents"><text:span text:style-name="Source_20_Text">variables.css</text:span></text:p>
          </table:table-cell>
          <table:table-cell table:style-name="Tabela1.A1" office:value-type="string">
            <text:p text:style-name="Table_20_Contents">Variáveis do Design System (cores, fontes, espaçamentos, etc.)</text:p>
          </table:table-cell>
        </table:table-row>
        <table:table-row>
          <table:table-cell table:style-name="Tabela1.A1" office:value-type="string">
            <text:p text:style-name="Table_20_Contents"><text:span text:style-name="Source_20_Text">base.css</text:span></text:p>
          </table:table-cell>
          <table:table-cell table:style-name="Tabela1.A1" office:value-type="string">
            <text:p text:style-name="Table_20_Contents">Reset e estilos globais (<text:span text:style-name="Source_20_Text">body</text:span>, títulos, links, imagens, listas...)</text:p>
          </table:table-cell>
        </table:table-row>
        <table:table-row>
          <table:table-cell table:style-name="Tabela1.A1" office:value-type="string">
            <text:p text:style-name="Table_20_Contents"><text:span text:style-name="Source_20_Text">layout.css</text:span></text:p>
          </table:table-cell>
          <table:table-cell table:style-name="Tabela1.A1" office:value-type="string">
            <text:p text:style-name="Table_20_Contents">Containers, grids, flex, estrutura e responsividade</text:p>
          </table:table-cell>
        </table:table-row>
        <table:table-row>
          <table:table-cell table:style-name="Tabela1.A1" office:value-type="string">
            <text:p text:style-name="Table_20_Contents"><text:span text:style-name="Source_20_Text">components.css</text:span></text:p>
          </table:table-cell>
          <table:table-cell table:style-name="Tabela1.A1" office:value-type="string">
            <text:p text:style-name="Table_20_Contents">Componentes reutilizáveis (header, footer, botões, cards, navegação...)</text:p>
          </table:table-cell>
        </table:table-row>
        <table:table-row>
          <table:table-cell table:style-name="Tabela1.A1" office:value-type="string">
            <text:p text:style-name="Table_20_Contents"><text:span text:style-name="Source_20_Text">home.css</text:span></text:p>
          </table:table-cell>
          <table:table-cell table:style-name="Tabela1.A1" office:value-type="string">
            <text:p text:style-name="Table_20_Contents">Estilos exclusivos da página inicial</text:p>
          </table:table-cell>
        </table:table-row>
      </table:table>
      <text:p text:style-name="Horizontal_20_Line"/>
      <text:h text:style-name="Heading_20_2" text:outline-level="2">O que <text:span text:style-name="Strong_20_Emphasis">não</text:span> deve estar no <text:span text:style-name="Source_20_Text">index.html</text:span></text:h>
      <text:p text:style-name="Text_20_body">Por exemplo:</text:p>
      <text:p text:style-name="Preformatted_20_Text"><text:span text:style-name="Source_20_Text">biblioteca.css</text:span></text:p>
      <text:p text:style-name="Preformatted_20_Text"><text:span text:style-name="Source_20_Text">leitura.css</text:span></text:p>
      <text:p text:style-name="Preformatted_20_Text"><text:span text:style-name="Source_20_Text">perfil.css</text:span></text:p>
      <text:p text:style-name="P2"><text:span text:style-name="Source_20_Text">comunidade.css</text:span></text:p>
      <text:p text:style-name="Text_20_body">Esses arquivos devem ser carregados <text:span text:style-name="Strong_20_Emphasis">apenas</text:span> nas respectivas páginas.</text:p>
      <text:p text:style-name="Horizontal_20_Line"/>
      <text:h text:style-name="Heading_20_2" text:outline-level="2">Como ficará nas outras páginas</text:h>
      <text:h text:style-name="Heading_20_3" text:outline-level="3"><text:span text:style-name="Source_20_Text">biblioteca.html</text:span></text:h>
      <text:p text:style-name="Preformatted_20_Text"><text:span text:style-name="Source_20_Text">variables.css</text:span></text:p>
      <text:p text:style-name="Preformatted_20_Text"><text:span text:style-name="Source_20_Text">base.css</text:span></text:p>
      <text:p text:style-name="Preformatted_20_Text"><text:span text:style-name="Source_20_Text">layout.css</text:span></text:p>
      <text:p text:style-name="Preformatted_20_Text"><text:span text:style-name="Source_20_Text">components.css</text:span></text:p>
      <text:p text:style-name="P2"><text:span text:style-name="Source_20_Text">biblioteca.css</text:span></text:p>
      <text:h text:style-name="Heading_20_3" text:outline-level="3"><text:soft-page-break/><text:span text:style-name="Source_20_Text">leitura.html</text:span></text:h>
      <text:p text:style-name="Preformatted_20_Text"><text:span text:style-name="Source_20_Text">variables.css</text:span></text:p>
      <text:p text:style-name="Preformatted_20_Text"><text:span text:style-name="Source_20_Text">base.css</text:span></text:p>
      <text:p text:style-name="Preformatted_20_Text"><text:span text:style-name="Source_20_Text">layout.css</text:span></text:p>
      <text:p text:style-name="Preformatted_20_Text"><text:span text:style-name="Source_20_Text">components.css</text:span></text:p>
      <text:p text:style-name="P2"><text:span text:style-name="Source_20_Text">leitura.css</text:span></text:p>
      <text:h text:style-name="Heading_20_3" text:outline-level="3"><text:span text:style-name="Source_20_Text">comunidade.html</text:span></text:h>
      <text:p text:style-name="Preformatted_20_Text"><text:span text:style-name="Source_20_Text">variables.css</text:span></text:p>
      <text:p text:style-name="Preformatted_20_Text"><text:span text:style-name="Source_20_Text">base.css</text:span></text:p>
      <text:p text:style-name="Preformatted_20_Text"><text:span text:style-name="Source_20_Text">layout.css</text:span></text:p>
      <text:p text:style-name="Preformatted_20_Text"><text:span text:style-name="Source_20_Text">components.css</text:span></text:p>
      <text:p text:style-name="P2"><text:span text:style-name="Source_20_Text">comunidade.css</text:span></text:p>
      <text:h text:style-name="Heading_20_3" text:outline-level="3"><text:span text:style-name="Source_20_Text">perfil.html</text:span></text:h>
      <text:p text:style-name="Preformatted_20_Text"><text:span text:style-name="Source_20_Text">variables.css</text:span></text:p>
      <text:p text:style-name="Preformatted_20_Text"><text:span text:style-name="Source_20_Text">base.css</text:span></text:p>
      <text:p text:style-name="Preformatted_20_Text"><text:span text:style-name="Source_20_Text">layout.css</text:span></text:p>
      <text:p text:style-name="Preformatted_20_Text"><text:span text:style-name="Source_20_Text">components.css</text:span></text:p>
      <text:p text:style-name="P2"><text:span text:style-name="Source_20_Text">perfil.css</text:span></text:p>
      <text:p text:style-name="Horizontal_20_Line"/>
      <text:h text:style-name="Heading_20_3" text:outline-level="3">Uma observação importante</text:h>
      <text:p text:style-name="Text_20_body">A única exceção são as <text:span text:style-name="Strong_20_Emphasis">Google Fonts</text:span>. Como todas as páginas usam <text:span text:style-name="Strong_20_Emphasis">Open Sans</text:span> e <text:span text:style-name="Strong_20_Emphasis">Merriweather</text:span>, elas também devem ser incluídas em todas as páginas da aplicação (ou centralizadas futuramente, se o projeto evoluir para um template comum).</text:p>
      <text:p text:style-name="Text_20_body">Essa organização segue a arquitetura que planejamos e evita carregar CSS desnecessário em cada página.</text:p>
      <text:p text:style-name="Text_20_body">Perfeito. Agora sim faz sentido começar o <text:span text:style-name="Source_20_Text">home.css</text:span>.</text:p>
      <text:p text:style-name="Text_20_body">Mas quero estabelecer uma regra que seguiremos até o final do projeto.</text:p>
      <text:h text:style-name="Heading_20_2" text:outline-level="2">Regra da arquitetura</text:h>
      <text:p text:style-name="Text_20_body">Cada arquivo CSS terá apenas uma responsabilidade.</text:p>
      <table:table table:name="Tabela2" table:style-name="Tabela2">
        <table:table-column table:style-name="Tabela2.A"/>
        <table:table-column table:style-name="Tabela2.B"/>
        <table:table-header-rows>
          <table:table-row>
            <table:table-cell table:style-name="Tabela2.A1" office:value-type="string">
              <text:p text:style-name="Table_20_Heading">Arquivo</text:p>
            </table:table-cell>
            <table:table-cell table:style-name="Tabela2.A1" office:value-type="string">
              <text:p text:style-name="Table_20_Heading">Responsabilidade</text:p>
            </table:table-cell>
          </table:table-row>
        </table:table-header-rows>
        <table:table-row>
          <table:table-cell table:style-name="Tabela2.A1" office:value-type="string">
            <text:p text:style-name="Table_20_Contents"><text:span text:style-name="Source_20_Text">variables.css</text:span></text:p>
          </table:table-cell>
          <table:table-cell table:style-name="Tabela2.A1" office:value-type="string">
            <text:p text:style-name="Table_20_Contents">Tokens (cores, fontes, espaçamentos...)</text:p>
          </table:table-cell>
        </table:table-row>
        <table:table-row>
          <table:table-cell table:style-name="Tabela2.A1" office:value-type="string">
            <text:p text:style-name="Table_20_Contents"><text:span text:style-name="Source_20_Text">base.css</text:span></text:p>
          </table:table-cell>
          <table:table-cell table:style-name="Tabela2.A1" office:value-type="string">
            <text:p text:style-name="Table_20_Contents">Estilos globais</text:p>
          </table:table-cell>
        </table:table-row>
        <table:table-row>
          <table:table-cell table:style-name="Tabela2.A1" office:value-type="string">
            <text:p text:style-name="Table_20_Contents"><text:span text:style-name="Source_20_Text">layout.css</text:span></text:p>
          </table:table-cell>
          <table:table-cell table:style-name="Tabela2.A1" office:value-type="string">
            <text:p text:style-name="Table_20_Contents">Estrutura (container, grid, flex...)</text:p>
          </table:table-cell>
        </table:table-row>
        <table:table-row>
          <table:table-cell table:style-name="Tabela2.A1" office:value-type="string">
            <text:p text:style-name="Table_20_Contents"><text:span text:style-name="Source_20_Text">components.css</text:span></text:p>
          </table:table-cell>
          <table:table-cell table:style-name="Tabela2.A1" office:value-type="string">
            <text:p text:style-name="Table_20_Contents">Componentes reutilizáveis</text:p>
          </table:table-cell>
        </table:table-row>
        <table:table-row>
          <table:table-cell table:style-name="Tabela2.A1" office:value-type="string">
            <text:p text:style-name="Table_20_Contents"><text:span text:style-name="Source_20_Text">home.css</text:span></text:p>
          </table:table-cell>
          <table:table-cell table:style-name="Tabela2.A1" office:value-type="string">
            <text:p text:style-name="Table_20_Contents"><text:span text:style-name="Strong_20_Emphasis">Somente o layout e aparência da Home</text:span></text:p>
          </table:table-cell>
        </table:table-row>
      </table:table>
      <text:p text:style-name="Text_20_body">Isso significa que no <text:span text:style-name="Source_20_Text">home.css</text:span> <text:span text:style-name="Strong_20_Emphasis">não criaremos estilos para</text:span>:</text:p>
      <text:list text:style-name="L13">
        <text:list-item>
          <text:p text:style-name="P19"><text:span text:style-name="Source_20_Text">.container</text:span></text:p>
        </text:list-item>
        <text:list-item>
          <text:p text:style-name="P19"><text:span text:style-name="Source_20_Text">.button-primary</text:span></text:p>
        </text:list-item>
        <text:list-item>
          <text:p text:style-name="P19"><text:span text:style-name="Source_20_Text">.book-card</text:span></text:p>
        </text:list-item>
        <text:list-item>
          <text:p text:style-name="P19"><text:soft-page-break/><text:span text:style-name="Source_20_Text">.feature-card</text:span></text:p>
        </text:list-item>
        <text:list-item>
          <text:p text:style-name="P19"><text:span text:style-name="Source_20_Text">.app-header</text:span></text:p>
        </text:list-item>
        <text:list-item>
          <text:p text:style-name="P19"><text:span text:style-name="Source_20_Text">.footer</text:span></text:p>
        </text:list-item>
      </text:list>
      <text:p text:style-name="Text_20_body">Porque esses já existem em outros arquivos.</text:p>
      <text:p text:style-name="Horizontal_20_Line"/>
      <text:h text:style-name="Heading_20_1" text:outline-level="1">O que existe na Home?</text:h>
      <text:p text:style-name="Text_20_body">Analisando o seu HTML, a Home possui estas seções:</text:p>
      <text:p text:style-name="Preformatted_20_Text"><text:span text:style-name="Source_20_Text">Hero</text:span></text:p>
      <text:p text:style-name="Preformatted_20_Text"/>
      <text:p text:style-name="Preformatted_20_Text"><text:span text:style-name="Source_20_Text">Introdução</text:span></text:p>
      <text:p text:style-name="Preformatted_20_Text"/>
      <text:p text:style-name="Preformatted_20_Text"><text:span text:style-name="Source_20_Text">Contexto Histórico</text:span></text:p>
      <text:p text:style-name="Preformatted_20_Text"/>
      <text:p text:style-name="Preformatted_20_Text"><text:span text:style-name="Source_20_Text">History Section</text:span></text:p>
      <text:p text:style-name="Preformatted_20_Text"/>
      <text:p text:style-name="Preformatted_20_Text"><text:span text:style-name="Source_20_Text">Platform</text:span></text:p>
      <text:p text:style-name="Preformatted_20_Text"/>
      <text:p text:style-name="Preformatted_20_Text"><text:span text:style-name="Source_20_Text">Featured Books</text:span></text:p>
      <text:p text:style-name="Preformatted_20_Text"/>
      <text:p text:style-name="P2"><text:span text:style-name="Source_20_Text">Editor Note</text:span></text:p>
      <text:p text:style-name="Text_20_body">Então o <text:span text:style-name="Source_20_Text">home.css</text:span> será organizado exatamente nessa ordem.</text:p>
      <text:p text:style-name="Horizontal_20_Line"/>
      <text:h text:style-name="Heading_20_1" text:outline-level="1">assets/css/home.css</text:h>
      <text:p text:style-name="Preformatted_20_Text"><text:span text:style-name="Source_20_Text">/* ==========================================================</text:span></text:p>
      <text:p text:style-name="Preformatted_20_Text"><text:span text:style-name="Source_20_Text"><text:s text:c="3"/>HERO</text:span></text:p>
      <text:p text:style-name="Preformatted_20_Text"><text:span text:style-name="Source_20_Text">========================================================== */</text:span></text:p>
      <text:p text:style-name="Preformatted_20_Text"/>
      <text:p text:style-name="Preformatted_20_Text"><text:span text:style-name="Source_20_Text">.hero {</text:span></text:p>
      <text:p text:style-name="Preformatted_20_Text"><text:span text:style-name="Source_20_Text"><text:s text:c="4"/>display: flex;</text:span></text:p>
      <text:p text:style-name="Preformatted_20_Text"><text:span text:style-name="Source_20_Text"><text:s text:c="4"/>align-items: center;</text:span></text:p>
      <text:p text:style-name="Preformatted_20_Text"><text:span text:style-name="Source_20_Text"><text:s text:c="4"/>min-height: 80vh;</text:span></text:p>
      <text:p text:style-name="Preformatted_20_Text"/>
      <text:p text:style-name="Preformatted_20_Text"><text:span text:style-name="Source_20_Text"><text:s text:c="4"/>text-align: center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.hero__content,</text:span></text:p>
      <text:p text:style-name="Preformatted_20_Text"><text:span text:style-name="Source_20_Text">.hero_content {</text:span></text:p>
      <text:p text:style-name="Preformatted_20_Text"><text:span text:style-name="Source_20_Text"><text:s text:c="4"/>max-width: 760px;</text:span></text:p>
      <text:p text:style-name="Preformatted_20_Text"><text:span text:style-name="Source_20_Text"><text:s text:c="4"/>margin: 0 auto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.hero h1 {</text:span></text:p>
      <text:p text:style-name="Preformatted_20_Text"><text:span text:style-name="Source_20_Text"><text:s text:c="4"/>margin-bottom: var(--space-md)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.hero p {</text:span></text:p>
      <text:p text:style-name="Preformatted_20_Text"><text:span text:style-name="Source_20_Text"><text:s text:c="4"/>margin-bottom: var(--space-lg);</text:span></text:p>
      <text:p text:style-name="Preformatted_20_Text"><text:span text:style-name="Source_20_Text">}</text:span></text:p>
      <text:p text:style-name="Preformatted_20_Text"/>
      <text:p text:style-name="Preformatted_20_Text"><text:soft-page-break/><text:span text:style-name="Source_20_Text">/* ==========================================================</text:span></text:p>
      <text:p text:style-name="Preformatted_20_Text"><text:span text:style-name="Source_20_Text"><text:s text:c="3"/>INTRODUÇÃO</text:span></text:p>
      <text:p text:style-name="Preformatted_20_Text"><text:span text:style-name="Source_20_Text">========================================================== */</text:span></text:p>
      <text:p text:style-name="Preformatted_20_Text"/>
      <text:p text:style-name="Preformatted_20_Text"><text:span text:style-name="Source_20_Text">.intro__content {</text:span></text:p>
      <text:p text:style-name="Preformatted_20_Text"><text:span text:style-name="Source_20_Text"><text:s text:c="4"/>max-width: var(--reading-width);</text:span></text:p>
      <text:p text:style-name="Preformatted_20_Text"><text:span text:style-name="Source_20_Text"><text:s text:c="4"/>margin: 0 auto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/* ==========================================================</text:span></text:p>
      <text:p text:style-name="Preformatted_20_Text"><text:span text:style-name="Source_20_Text"><text:s text:c="3"/>CONTEXTO HISTÓRICO</text:span></text:p>
      <text:p text:style-name="Preformatted_20_Text"><text:span text:style-name="Source_20_Text">========================================================== */</text:span></text:p>
      <text:p text:style-name="Preformatted_20_Text"/>
      <text:p text:style-name="Preformatted_20_Text"><text:span text:style-name="Source_20_Text">.history {</text:span></text:p>
      <text:p text:style-name="Preformatted_20_Text"><text:span text:style-name="Source_20_Text"><text:s text:c="4"/>padding-bottom: 0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.history-section article {</text:span></text:p>
      <text:p text:style-name="Preformatted_20_Text"><text:span text:style-name="Source_20_Text"><text:s text:c="4"/>max-width: var(--reading-width);</text:span></text:p>
      <text:p text:style-name="Preformatted_20_Text"><text:span text:style-name="Source_20_Text"><text:s text:c="4"/>margin: 0 auto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.history-section h3 {</text:span></text:p>
      <text:p text:style-name="Preformatted_20_Text"><text:span text:style-name="Source_20_Text"><text:s text:c="4"/>margin-bottom: var(--space-md)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.history-section p:last-child {</text:span></text:p>
      <text:p text:style-name="Preformatted_20_Text"><text:span text:style-name="Source_20_Text"><text:s text:c="4"/>margin-bottom: 0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/* ==========================================================</text:span></text:p>
      <text:p text:style-name="Preformatted_20_Text"><text:span text:style-name="Source_20_Text"><text:s text:c="3"/>COMO FUNCIONA</text:span></text:p>
      <text:p text:style-name="Preformatted_20_Text"><text:span text:style-name="Source_20_Text">========================================================== */</text:span></text:p>
      <text:p text:style-name="Preformatted_20_Text"/>
      <text:p text:style-name="Preformatted_20_Text"><text:span text:style-name="Source_20_Text">.platform__content {</text:span></text:p>
      <text:p text:style-name="Preformatted_20_Text"><text:span text:style-name="Source_20_Text"><text:s text:c="4"/>text-align: center;</text:span></text:p>
      <text:p text:style-name="Preformatted_20_Text"><text:span text:style-name="Source_20_Text"><text:s text:c="4"/>margin-bottom: var(--space-xl)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.platform-grid {</text:span></text:p>
      <text:p text:style-name="Preformatted_20_Text"><text:span text:style-name="Source_20_Text"><text:s text:c="4"/>display: grid;</text:span></text:p>
      <text:p text:style-name="Preformatted_20_Text"><text:span text:style-name="Source_20_Text"><text:s text:c="4"/>grid-template-columns: repeat(3, 1fr);</text:span></text:p>
      <text:p text:style-name="Preformatted_20_Text"><text:span text:style-name="Source_20_Text"><text:s text:c="4"/>gap: var(--space-lg)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/* ==========================================================</text:span></text:p>
      <text:p text:style-name="Preformatted_20_Text"><text:span text:style-name="Source_20_Text"><text:s text:c="3"/>LIVROS EM DESTAQUE</text:span></text:p>
      <text:p text:style-name="Preformatted_20_Text"><text:span text:style-name="Source_20_Text">========================================================== */</text:span></text:p>
      <text:p text:style-name="Preformatted_20_Text"/>
      <text:p text:style-name="Preformatted_20_Text"><text:span text:style-name="Source_20_Text">.featured-books h2 {</text:span></text:p>
      <text:p text:style-name="Preformatted_20_Text"><text:span text:style-name="Source_20_Text"><text:s text:c="4"/>text-align: center;</text:span></text:p>
      <text:p text:style-name="Preformatted_20_Text"><text:span text:style-name="Source_20_Text"><text:s text:c="4"/>margin-bottom: var(--space-xl)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.books-grid {</text:span></text:p>
      <text:p text:style-name="Preformatted_20_Text"><text:span text:style-name="Source_20_Text"><text:s text:c="4"/>display: grid;</text:span></text:p>
      <text:p text:style-name="Preformatted_20_Text"><text:span text:style-name="Source_20_Text"><text:s text:c="4"/>grid-template-columns: repeat(auto-fit, minmax(280px, 1fr));</text:span></text:p>
      <text:p text:style-name="Preformatted_20_Text"><text:span text:style-name="Source_20_Text"><text:s text:c="4"/>gap: var(--space-lg)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/* ==========================================================</text:span></text:p>
      <text:p text:style-name="Preformatted_20_Text"><text:span text:style-name="Source_20_Text"><text:s text:c="3"/>NOTA DO EDITOR</text:span></text:p>
      <text:p text:style-name="Preformatted_20_Text"><text:span text:style-name="Source_20_Text">========================================================== */</text:span></text:p>
      <text:p text:style-name="Preformatted_20_Text"/>
      <text:p text:style-name="Preformatted_20_Text"><text:soft-page-break/><text:span text:style-name="Source_20_Text">.editor-note {</text:span></text:p>
      <text:p text:style-name="Preformatted_20_Text"><text:span text:style-name="Source_20_Text"><text:s text:c="4"/>text-align: center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.editor-note p {</text:span></text:p>
      <text:p text:style-name="Preformatted_20_Text"><text:span text:style-name="Source_20_Text"><text:s text:c="4"/>max-width: 700px;</text:span></text:p>
      <text:p text:style-name="Preformatted_20_Text"><text:span text:style-name="Source_20_Text"><text:s text:c="4"/>margin: 0 auto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/* ==========================================================</text:span></text:p>
      <text:p text:style-name="Preformatted_20_Text"><text:span text:style-name="Source_20_Text"><text:s text:c="3"/>RESPONSIVIDADE</text:span></text:p>
      <text:p text:style-name="Preformatted_20_Text"><text:span text:style-name="Source_20_Text">========================================================== */</text:span></text:p>
      <text:p text:style-name="Preformatted_20_Text"/>
      <text:p text:style-name="Preformatted_20_Text"><text:span text:style-name="Source_20_Text">@media (max-width: 1024px) {</text:span></text:p>
      <text:p text:style-name="Preformatted_20_Text"/>
      <text:p text:style-name="Preformatted_20_Text"><text:span text:style-name="Source_20_Text"><text:s text:c="4"/>.platform-grid {</text:span></text:p>
      <text:p text:style-name="Preformatted_20_Text"><text:span text:style-name="Source_20_Text"><text:s text:c="8"/>grid-template-columns: repeat(2, 1fr);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}</text:span></text:p>
      <text:p text:style-name="Preformatted_20_Text"/>
      <text:p text:style-name="Preformatted_20_Text"><text:span text:style-name="Source_20_Text">@media (max-width: 640px) {</text:span></text:p>
      <text:p text:style-name="Preformatted_20_Text"/>
      <text:p text:style-name="Preformatted_20_Text"><text:span text:style-name="Source_20_Text"><text:s text:c="4"/>.hero {</text:span></text:p>
      <text:p text:style-name="Preformatted_20_Text"><text:span text:style-name="Source_20_Text"><text:s text:c="8"/>min-height: 60vh;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.platform-grid,</text:span></text:p>
      <text:p text:style-name="Preformatted_20_Text"><text:span text:style-name="Source_20_Text"><text:s text:c="4"/>.books-grid {</text:span></text:p>
      <text:p text:style-name="Preformatted_20_Text"><text:span text:style-name="Source_20_Text"><text:s text:c="8"/>grid-template-columns: 1fr;</text:span></text:p>
      <text:p text:style-name="Preformatted_20_Text"><text:span text:style-name="Source_20_Text"><text:s text:c="4"/>}</text:span></text:p>
      <text:p text:style-name="Preformatted_20_Text"/>
      <text:p text:style-name="P2"><text:span text:style-name="Source_20_Text">}</text:span></text:p>
      <text:p text:style-name="Horizontal_20_Line"/>
      <text:h text:style-name="Heading_20_1" text:outline-level="1">Agora quero fazer uma observação importante</text:h>
      <text:p text:style-name="Text_20_body">Analisando todo o projeto, percebi um padrão que pode deixá-lo ainda mais profissional.</text:p>
      <text:p text:style-name="Text_20_body">Você começou a usar classes como:</text:p>
      <text:p text:style-name="Preformatted_20_Text"><text:span text:style-name="Source_20_Text">hero_content</text:span></text:p>
      <text:p text:style-name="Preformatted_20_Text"/>
      <text:p text:style-name="Preformatted_20_Text"><text:span text:style-name="Source_20_Text">intro__content</text:span></text:p>
      <text:p text:style-name="Preformatted_20_Text"/>
      <text:p text:style-name="Preformatted_20_Text"><text:span text:style-name="Source_20_Text">platform__content</text:span></text:p>
      <text:p text:style-name="Preformatted_20_Text"/>
      <text:p text:style-name="Preformatted_20_Text"><text:span text:style-name="Source_20_Text">featured-books__content</text:span></text:p>
      <text:p text:style-name="Preformatted_20_Text"/>
      <text:p text:style-name="P2"><text:span text:style-name="Source_20_Text">footer__content</text:span></text:p>
      <text:p text:style-name="Text_20_body">Há uma inconsistência aí:</text:p>
      <text:list text:style-name="L14">
        <text:list-item>
          <text:p text:style-name="P20"><text:span text:style-name="Source_20_Text">hero_content</text:span> usa um único <text:span text:style-name="Source_20_Text">_</text:span>.</text:p>
        </text:list-item>
        <text:list-item>
          <text:p text:style-name="P20"><text:span text:style-name="Source_20_Text">intro__content</text:span> usa dois <text:span text:style-name="Source_20_Text">__</text:span>.</text:p>
        </text:list-item>
        <text:list-item>
          <text:p text:style-name="P20"><text:span text:style-name="Source_20_Text">platform__content</text:span> usa dois <text:span text:style-name="Source_20_Text">__</text:span>.</text:p>
        </text:list-item>
      </text:list>
      <text:p text:style-name="Text_20_body">Se decidirmos usar a metodologia <text:span text:style-name="Strong_20_Emphasis">BEM</text:span>, devemos ser consistentes.</text:p>
      <text:p text:style-name="Text_20_body"><text:soft-page-break/>O correto seria:</text:p>
      <text:p text:style-name="P2"><text:span text:style-name="Source_20_Text">hero__content</text:span></text:p>
      <text:p text:style-name="Text_20_body">em vez de</text:p>
      <text:p text:style-name="P2"><text:span text:style-name="Source_20_Text">hero_content</text:span></text:p>
      <text:p text:style-name="Text_20_body">Assim, todos os blocos seguem o mesmo padrão:</text:p>
      <text:p text:style-name="Preformatted_20_Text"><text:span text:style-name="Source_20_Text">hero__content</text:span></text:p>
      <text:p text:style-name="Preformatted_20_Text"/>
      <text:p text:style-name="Preformatted_20_Text"><text:span text:style-name="Source_20_Text">intro__content</text:span></text:p>
      <text:p text:style-name="Preformatted_20_Text"/>
      <text:p text:style-name="Preformatted_20_Text"><text:span text:style-name="Source_20_Text">platform__content</text:span></text:p>
      <text:p text:style-name="Preformatted_20_Text"/>
      <text:p text:style-name="Preformatted_20_Text"><text:span text:style-name="Source_20_Text">featured-books__content</text:span></text:p>
      <text:p text:style-name="Preformatted_20_Text"/>
      <text:p text:style-name="P2"><text:span text:style-name="Source_20_Text">footer__content</text:span></text:p>
      <text:h text:style-name="Heading_20_2" text:outline-level="2">Minha recomendação</text:h>
      <text:p text:style-name="Text_20_body">Antes de continuarmos construindo as outras páginas, eu faria essa pequena correção no HTML para adotar <text:span text:style-name="Strong_20_Emphasis">BEM</text:span> de forma consistente. É uma alteração simples agora e evita inconsistências quando o projeto crescer. Depois disso, manteremos esse padrão em toda a Biblioteca Apócrifa.</text:p>
      <text:p text:style-name="Text_20_body">Perfeito. Concluímos a etapa dos <text:span text:style-name="Strong_20_Emphasis">componentes reutilizáveis</text:span> da arquitetura.</text:p>
      <text:p text:style-name="Text_20_body">Agora entramos no próximo ponto da Fase 4:</text:p>
      <text:h text:style-name="Heading_20_1" text:outline-level="1">Desenvolvimento JavaScript — Sistema de componentes</text:h>
      <text:p text:style-name="Text_20_body">Objetivo:</text:p>
      <text:p text:style-name="Text_20_body">Criar o mecanismo que vai carregar automaticamente:</text:p>
      <text:list text:style-name="L15">
        <text:list-item>
          <text:p text:style-name="P21"><text:span text:style-name="Source_20_Text">header.html</text:span></text:p>
        </text:list-item>
        <text:list-item>
          <text:p text:style-name="P21"><text:span text:style-name="Source_20_Text">navbar.html</text:span></text:p>
        </text:list-item>
        <text:list-item>
          <text:p text:style-name="P21"><text:span text:style-name="Source_20_Text">footer.html</text:span></text:p>
        </text:list-item>
        <text:list-item>
          <text:p text:style-name="P21"><text:span text:style-name="Source_20_Text">book-card.html</text:span></text:p>
        </text:list-item>
        <text:list-item>
          <text:p text:style-name="P21"><text:span text:style-name="Source_20_Text">loading.html</text:span></text:p>
        </text:list-item>
        <text:list-item>
          <text:p text:style-name="P21"><text:span text:style-name="Source_20_Text">reading-section.html</text:span></text:p>
        </text:list-item>
        <text:list-item>
          <text:p text:style-name="P21"><text:span text:style-name="Source_20_Text">search.html</text:span></text:p>
        </text:list-item>
        <text:list-item>
          <text:p text:style-name="P21"><text:span text:style-name="Source_20_Text">sidebar.html</text:span></text:p>
        </text:list-item>
      </text:list>
      <text:p text:style-name="Text_20_body">Sem precisar copiar e colar código em todas as páginas.</text:p>
      <text:p text:style-name="Horizontal_20_Line"/>
      <text:h text:style-name="Heading_20_2" text:outline-level="2"><text:soft-page-break/>Estrutura JavaScript</text:h>
      <text:p text:style-name="Text_20_body">Vamos criar:</text:p>
      <text:p text:style-name="Preformatted_20_Text"><text:span text:style-name="Source_20_Text">assets/</text:span></text:p>
      <text:p text:style-name="Preformatted_20_Text"><text:span text:style-name="Source_20_Text">│</text:span></text:p>
      <text:p text:style-name="Preformatted_20_Text"><text:span text:style-name="Source_20_Text">└── js/</text:span></text:p>
      <text:p text:style-name="Preformatted_20_Text"><text:span text:style-name="Source_20_Text"><text:s text:c="4"/>│</text:span></text:p>
      <text:p text:style-name="Preformatted_20_Text"><text:span text:style-name="Source_20_Text"><text:s text:c="4"/>├── components.js</text:span></text:p>
      <text:p text:style-name="Preformatted_20_Text"><text:span text:style-name="Source_20_Text"><text:s text:c="4"/>├── main.js</text:span></text:p>
      <text:p text:style-name="P2"><text:span text:style-name="Source_20_Text"><text:s text:c="4"/>└── library.js</text:span></text:p>
      <text:p text:style-name="Text_20_body">Primeiro vamos trabalhar apenas com:</text:p>
      <text:p text:style-name="P2"><text:span text:style-name="Source_20_Text">components.js</text:span></text:p>
      <text:p text:style-name="Text_20_body">Responsabilidade:</text:p>
      <text:list text:style-name="L16">
        <text:list-item>
          <text:p text:style-name="P22">localizar elementos reservados para componentes;</text:p>
        </text:list-item>
        <text:list-item>
          <text:p text:style-name="P22">buscar o arquivo HTML;</text:p>
        </text:list-item>
        <text:list-item>
          <text:p text:style-name="P22">inserir o conteúdo automaticamente.</text:p>
        </text:list-item>
      </text:list>
      <text:p text:style-name="Horizontal_20_Line"/>
      <text:h text:style-name="Heading_20_2" text:outline-level="2">Como vamos usar nas páginas</text:h>
      <text:p text:style-name="Text_20_body">Agora o HTML deixa de ter:</text:p>
      <text:p text:style-name="Preformatted_20_Text"><text:span text:style-name="Source_20_Text">&lt;header class="app-header"&gt;</text:span></text:p>
      <text:p text:style-name="Preformatted_20_Text"><text:span text:style-name="Source_20_Text">...</text:span></text:p>
      <text:p text:style-name="P2"><text:span text:style-name="Source_20_Text">&lt;/header&gt;</text:span></text:p>
      <text:p text:style-name="Text_20_body">e passa a ter:</text:p>
      <text:p text:style-name="P2"><text:span text:style-name="Source_20_Text">&lt;div data-component="header"&gt;&lt;/div&gt;</text:span></text:p>
      <text:p text:style-name="Text_20_body">O JavaScript coloca o conteúdo automaticamente.</text:p>
      <text:p text:style-name="Horizontal_20_Line"/>
      <text:p text:style-name="Text_20_body">No footer:</text:p>
      <text:p text:style-name="Text_20_body">Antes:</text:p>
      <text:p text:style-name="Preformatted_20_Text"><text:span text:style-name="Source_20_Text">&lt;footer class="footer"&gt;</text:span></text:p>
      <text:p text:style-name="Preformatted_20_Text"><text:span text:style-name="Source_20_Text">...</text:span></text:p>
      <text:p text:style-name="P2"><text:span text:style-name="Source_20_Text">&lt;/footer&gt;</text:span></text:p>
      <text:p text:style-name="Text_20_body">Agora:</text:p>
      <text:p text:style-name="P2"><text:span text:style-name="Source_20_Text">&lt;div data-component="footer"&gt;&lt;/div&gt;</text:span></text:p>
      <text:p text:style-name="Horizontal_20_Line"/>
      <text:h text:style-name="Heading_20_2" text:outline-level="2">Ligação nas páginas</text:h>
      <text:p text:style-name="Text_20_body">Todas as páginas terão:</text:p>
      <text:p text:style-name="P2"><text:soft-page-break/><text:span text:style-name="Source_20_Text">&lt;script src="../assets/js/components.js"&gt;&lt;/script&gt;</text:span></text:p>
      <text:p text:style-name="Text_20_body">ou no <text:span text:style-name="Source_20_Text">index.html</text:span>:</text:p>
      <text:p text:style-name="P2"><text:span text:style-name="Source_20_Text">&lt;script src="assets/js/components.js"&gt;&lt;/script&gt;</text:span></text:p>
      <text:p text:style-name="Horizontal_20_Line"/>
      <text:p text:style-name="Text_20_body">Próxima etapa depois deste arquivo:</text:p>
      <text:list text:style-name="L17">
        <text:list-item>
          <text:p text:style-name="P23">Ajustar os caminhos dos componentes (<text:span text:style-name="Source_20_Text">index</text:span> e páginas internas);</text:p>
        </text:list-item>
      </text:list>
      <text:p text:style-name="Text_20_body">Está <text:span text:style-name="T1">bem. A</text:span>gora é seguinte estamos no ponto sobre a navegação principal, as única<text:span text:style-name="T1">s</text:span> navegaçõ<text:span text:style-name="T1">es</text:span> que tivemos ate agora são: header e footer agora quanto as outras navegações como por exemplo: book-car.html, loading, reading-section, search, sidebar. E a proposito <text:s/>qual é a finalidade do componete sidebar?</text:p>
      <text:p text:style-name="Text_20_body"/>
      <text:p text:style-name="Text_20_body">Essa é uma ótima pergunta. Na verdade, estamos num momento importante da arquitetura do projeto.</text:p>
      <text:p text:style-name="Text_20_body">Primeiro, uma distinção:</text:p>
      <text:list text:style-name="L18">
        <text:list-item>
          <text:p text:style-name="P24"><text:span text:style-name="Strong_20_Emphasis">Navegação principal</text:span> → diz respeito ao usuário se deslocar entre as páginas da aplicação (Header, Navbar, Footer).</text:p>
        </text:list-item>
        <text:list-item>
          <text:p text:style-name="P24"><text:span text:style-name="Strong_20_Emphasis">Componentes reutilizáveis</text:span> → são blocos da interface que podem aparecer em várias páginas, mas <text:span text:style-name="Strong_20_Emphasis">não são necessariamente navegação</text:span>.</text:p>
        </text:list-item>
      </text:list>
      <text:p text:style-name="Text_20_body">Então, neste momento:</text:p>
      <text:h text:style-name="P8" text:outline-level="3">✅ Navegação principal</text:h>
      <text:list text:style-name="L19">
        <text:list-item>
          <text:p text:style-name="P25"><text:span text:style-name="Source_20_Text">header.html</text:span></text:p>
        </text:list-item>
        <text:list-item>
          <text:p text:style-name="P25"><text:span text:style-name="Source_20_Text">navbar.html</text:span></text:p>
        </text:list-item>
        <text:list-item>
          <text:p text:style-name="P25"><text:span text:style-name="Source_20_Text">footer.html</text:span></text:p>
        </text:list-item>
      </text:list>
      <text:p text:style-name="Text_20_body">Esse ponto do roadmap pode ser considerado praticamente concluído.</text:p>
      <text:p text:style-name="P6"/>
      <text:h text:style-name="P7" text:outline-level="2">Agora sobre os outros componentes</text:h>
      <text:h text:style-name="P8" text:outline-level="3">📖 <text:span text:style-name="Source_20_Text">book-card.html</text:span></text:h>
      <text:p text:style-name="Text_20_body"><text:span text:style-name="Strong_20_Emphasis">Finalidade:</text:span></text:p>
      <text:p text:style-name="Text_20_body">Representar um livro em qualquer lista da plataforma.</text:p>
      <text:p text:style-name="Text_20_body">Será usado em:</text:p>
      <text:list text:style-name="L20">
        <text:list-item>
          <text:p text:style-name="P26">Biblioteca</text:p>
        </text:list-item>
        <text:list-item>
          <text:p text:style-name="P26">Pesquisa</text:p>
        </text:list-item>
        <text:list-item>
          <text:p text:style-name="P26">Livros relacionados</text:p>
        </text:list-item>
        <text:list-item>
          <text:p text:style-name="P26"><text:soft-page-break/>Favoritos</text:p>
        </text:list-item>
        <text:list-item>
          <text:p text:style-name="P26">Recomendações</text:p>
        </text:list-item>
      </text:list>
      <text:p text:style-name="P6"/>
      <text:h text:style-name="P8" text:outline-level="3">🔍 <text:span text:style-name="Source_20_Text">search.html</text:span></text:h>
      <text:p text:style-name="Text_20_body"><text:span text:style-name="Strong_20_Emphasis">Finalidade:</text:span></text:p>
      <text:p text:style-name="Text_20_body">Campo de pesquisa reutilizável.</text:p>
      <text:p text:style-name="Text_20_body">Será usado em:</text:p>
      <text:list text:style-name="L21">
        <text:list-item>
          <text:p text:style-name="P27">Biblioteca</text:p>
        </text:list-item>
        <text:list-item>
          <text:p text:style-name="P27">Área de leitura</text:p>
        </text:list-item>
        <text:list-item>
          <text:p text:style-name="P27">Comunidade (no futuro)</text:p>
        </text:list-item>
        <text:list-item>
          <text:p text:style-name="P27">Sidebar (se existir)</text:p>
        </text:list-item>
      </text:list>
      <text:p text:style-name="P6"/>
      <text:h text:style-name="P8" text:outline-level="3">⏳ <text:span text:style-name="Source_20_Text">loading.html</text:span></text:h>
      <text:p text:style-name="Text_20_body"><text:span text:style-name="Strong_20_Emphasis">Finalidade:</text:span></text:p>
      <text:p text:style-name="Text_20_body">Mostrar um estado de carregamento.</text:p>
      <text:p text:style-name="Text_20_body">Exemplo:</text:p>
      <text:p text:style-name="P5"><text:span text:style-name="Source_20_Text">Carregando livros...</text:span></text:p>
      <text:p text:style-name="P5"/>
      <text:p text:style-name="P5"><text:span text:style-name="Source_20_Text">████████░░░░</text:span></text:p>
      <text:p text:style-name="Text_20_body">Será utilizado sempre que estivermos aguardando dados do <text:span text:style-name="Source_20_Text">livros.json</text:span>.</text:p>
      <text:p text:style-name="P6"/>
      <text:h text:style-name="P8" text:outline-level="3">📄 <text:span text:style-name="Source_20_Text">reading-section.html</text:span></text:h>
      <text:p text:style-name="Text_20_body"><text:span text:style-name="Strong_20_Emphasis">Finalidade:</text:span></text:p>
      <text:p text:style-name="Text_20_body">É um bloco de conteúdo para a página de leitura.</text:p>
      <text:p text:style-name="Text_20_body">Exemplo:</text:p>
      <text:p text:style-name="P5"><text:span text:style-name="Source_20_Text">Título</text:span></text:p>
      <text:p text:style-name="P5"/>
      <text:p text:style-name="P5"><text:span text:style-name="Source_20_Text">Texto...</text:span></text:p>
      <text:p text:style-name="P5"/>
      <text:p text:style-name="P5"><text:span text:style-name="Source_20_Text">Notas</text:span></text:p>
      <text:p text:style-name="P5"/>
      <text:p text:style-name="P5"><text:span text:style-name="Source_20_Text">Comentários</text:span></text:p>
      <text:p text:style-name="Text_20_body">Um livro será composto por várias <text:span text:style-name="Source_20_Text">reading-section</text:span>.</text:p>
      <text:p text:style-name="P6"/>
      <text:h text:style-name="P7" text:outline-level="2"><text:soft-page-break/>📚 <text:span text:style-name="Source_20_Text">sidebar.html</text:span></text:h>
      <text:p text:style-name="Text_20_body">Esse é o componente que merece uma decisão arquitetural.</text:p>
      <text:p text:style-name="Text_20_body">Quando fizemos o planejamento, colocamos uma sidebar pensando numa plataforma de estudos. Hoje o projeto está mais claro, então podemos definir exatamente sua função.</text:p>
      <text:h text:style-name="P8" text:outline-level="3">Minha proposta</text:h>
      <text:p text:style-name="Text_20_body">A sidebar <text:span text:style-name="Strong_20_Emphasis">não será um menu lateral de navegação</text:span>.</text:p>
      <text:p text:style-name="Text_20_body">Ela será um <text:span text:style-name="Strong_20_Emphasis">painel de apoio ao estudo</text:span>.</text:p>
      <text:p text:style-name="Text_20_body">Por exemplo, na página de leitura:</text:p>
      <text:p text:style-name="P5"><text:span text:style-name="Source_20_Text">┌───────────────────────────────┬───────────────────┐</text:span></text:p>
      <text:p text:style-name="P5"><text:span text:style-name="Source_20_Text">│ <text:s text:c="30"/>│ <text:s text:c="18"/>│</text:span></text:p>
      <text:p text:style-name="P5"><text:span text:style-name="Source_20_Text">│ <text:s text:c="30"/>│ Índice <text:s text:c="11"/>│</text:span></text:p>
      <text:p text:style-name="P5"><text:span text:style-name="Source_20_Text">│ <text:s text:c="30"/>│ <text:s text:c="18"/>│</text:span></text:p>
      <text:p text:style-name="P5"><text:span text:style-name="Source_20_Text">│ Texto <text:s text:c="24"/>│ Capítulo 1 <text:s text:c="7"/>│</text:span></text:p>
      <text:p text:style-name="P5"><text:span text:style-name="Source_20_Text">│ <text:s text:c="30"/>│ Capítulo 2 <text:s text:c="7"/>│</text:span></text:p>
      <text:p text:style-name="P5"><text:span text:style-name="Source_20_Text">│ <text:s text:c="30"/>│ Capítulo 3 <text:s text:c="7"/>│</text:span></text:p>
      <text:p text:style-name="P5"><text:span text:style-name="Source_20_Text">│ <text:s text:c="30"/>│ <text:s text:c="18"/>│</text:span></text:p>
      <text:p text:style-name="P5"><text:span text:style-name="Source_20_Text">│ <text:s text:c="30"/>│ Livros relacionados│</text:span></text:p>
      <text:p text:style-name="P5"><text:span text:style-name="Source_20_Text">│ <text:s text:c="30"/>│ <text:s text:c="18"/>│</text:span></text:p>
      <text:p text:style-name="P5"><text:span text:style-name="Source_20_Text">└───────────────────────────────┴───────────────────┘</text:span></text:p>
      <text:p text:style-name="Text_20_body">Ela pode conter:</text:p>
      <text:list text:style-name="L22">
        <text:list-item>
          <text:p text:style-name="P28">Índice do livro.</text:p>
        </text:list-item>
        <text:list-item>
          <text:p text:style-name="P28">Capítulos.</text:p>
        </text:list-item>
        <text:list-item>
          <text:p text:style-name="P28">Progresso de leitura.</text:p>
        </text:list-item>
        <text:list-item>
          <text:p text:style-name="P28">Livros relacionados.</text:p>
        </text:list-item>
        <text:list-item>
          <text:p text:style-name="P28">Anotações (futuramente).</text:p>
        </text:list-item>
        <text:list-item>
          <text:p text:style-name="P28">Favoritos (futuramente).</text:p>
        </text:list-item>
      </text:list>
      <text:p text:style-name="Text_20_body">Perceba que ela <text:span text:style-name="Strong_20_Emphasis">não substitui o Header</text:span>. Ela auxilia o usuário enquanto estuda.</text:p>
      <text:p text:style-name="P6"/>
      <text:h text:style-name="P7" text:outline-level="2">Minha recomendação</text:h>
      <text:p text:style-name="Text_20_body">Eu manteria todos os componentes que planejamos. Eles continuam fazendo sentido, mas cada um com uma responsabilidade bem definida:</text:p>
      <table:table table:name="Tabela3" table:style-name="Tabela3">
        <table:table-column table:style-name="Tabela3.A"/>
        <table:table-column table:style-name="Tabela3.B"/>
        <table:table-header-rows>
          <table:table-row>
            <table:table-cell table:style-name="Tabela3.A1" office:value-type="string">
              <text:p text:style-name="Table_20_Heading">Componente</text:p>
            </table:table-cell>
            <table:table-cell table:style-name="Tabela3.A1" office:value-type="string">
              <text:p text:style-name="Table_20_Heading">Responsabilidade</text:p>
            </table:table-cell>
          </table:table-row>
        </table:table-header-rows>
        <table:table-row>
          <table:table-cell table:style-name="Tabela3.A1" office:value-type="string">
            <text:p text:style-name="Table_20_Contents"><text:span text:style-name="Source_20_Text">header.html</text:span></text:p>
          </table:table-cell>
          <table:table-cell table:style-name="Tabela3.A1" office:value-type="string">
            <text:p text:style-name="Table_20_Contents">Cabeçalho da aplicação</text:p>
          </table:table-cell>
        </table:table-row>
        <table:table-row>
          <table:table-cell table:style-name="Tabela3.A1" office:value-type="string">
            <text:p text:style-name="Table_20_Contents"><text:span text:style-name="Source_20_Text">navbar.html</text:span></text:p>
          </table:table-cell>
          <table:table-cell table:style-name="Tabela3.A1" office:value-type="string">
            <text:p text:style-name="Table_20_Contents">Navegação principal (desktop e mobile)</text:p>
          </table:table-cell>
        </table:table-row>
        <text:soft-page-break/>
        <table:table-row>
          <table:table-cell table:style-name="Tabela3.A1" office:value-type="string">
            <text:p text:style-name="Table_20_Contents"><text:span text:style-name="Source_20_Text">footer.html</text:span></text:p>
          </table:table-cell>
          <table:table-cell table:style-name="Tabela3.A1" office:value-type="string">
            <text:p text:style-name="Table_20_Contents">Rodapé institucional</text:p>
          </table:table-cell>
        </table:table-row>
        <table:table-row>
          <table:table-cell table:style-name="Tabela3.A1" office:value-type="string">
            <text:p text:style-name="Table_20_Contents"><text:span text:style-name="Source_20_Text">book-card.html</text:span></text:p>
          </table:table-cell>
          <table:table-cell table:style-name="Tabela3.A1" office:value-type="string">
            <text:p text:style-name="Table_20_Contents">Exibir um livro</text:p>
          </table:table-cell>
        </table:table-row>
        <table:table-row>
          <table:table-cell table:style-name="Tabela3.A1" office:value-type="string">
            <text:p text:style-name="Table_20_Contents"><text:span text:style-name="Source_20_Text">search.html</text:span></text:p>
          </table:table-cell>
          <table:table-cell table:style-name="Tabela3.A1" office:value-type="string">
            <text:p text:style-name="Table_20_Contents">Campo de pesquisa</text:p>
          </table:table-cell>
        </table:table-row>
        <table:table-row>
          <table:table-cell table:style-name="Tabela3.A1" office:value-type="string">
            <text:p text:style-name="Table_20_Contents"><text:span text:style-name="Source_20_Text">loading.html</text:span></text:p>
          </table:table-cell>
          <table:table-cell table:style-name="Tabela3.A1" office:value-type="string">
            <text:p text:style-name="Table_20_Contents">Estado de carregamento</text:p>
          </table:table-cell>
        </table:table-row>
        <table:table-row>
          <table:table-cell table:style-name="Tabela3.A1" office:value-type="string">
            <text:p text:style-name="Table_20_Contents"><text:span text:style-name="Source_20_Text">reading-section.html</text:span></text:p>
          </table:table-cell>
          <table:table-cell table:style-name="Tabela3.A1" office:value-type="string">
            <text:p text:style-name="Table_20_Contents">Seção de leitura de um livro</text:p>
          </table:table-cell>
        </table:table-row>
        <table:table-row>
          <table:table-cell table:style-name="Tabela3.A1" office:value-type="string">
            <text:p text:style-name="Table_20_Contents"><text:span text:style-name="Source_20_Text">sidebar.html</text:span></text:p>
          </table:table-cell>
          <table:table-cell table:style-name="Tabela3.A1" office:value-type="string">
            <text:p text:style-name="Table_20_Contents">Painel de apoio ao estudo</text:p>
          </table:table-cell>
        </table:table-row>
      </table:table>
      <text:p text:style-name="Text_20_body">Essa divisão está alinhada com o objetivo da Biblioteca Apócrifa como <text:span text:style-name="Strong_20_Emphasis">plataforma de estudo</text:span>, e deixa a arquitetura preparada para as próximas fases sem precisarmos refatorar componentes depois.</text:p>
      <text:h text:style-name="P7" text:outline-level="2">✅ Concluído</text:h>
      <text:p text:style-name="Text_20_body"><text:span text:style-name="Strong_20_Emphasis">Fase 4 — Desenvolvimento da Base</text:span></text:p>
      <text:list text:style-name="L23">
        <text:list-item>
          <text:p text:style-name="P29">✅ Desenvolver a página inicial. </text:p>
        </text:list-item>
        <text:list-item>
          <text:p text:style-name="P29">✅ Desenvolver a página Biblioteca. </text:p>
        </text:list-item>
        <text:list-item>
          <text:p text:style-name="P29">✅ Desenvolver a página Área de Leitura. </text:p>
        </text:list-item>
        <text:list-item>
          <text:p text:style-name="P29">✅ Desenvolver a página Comunidade. </text:p>
        </text:list-item>
        <text:list-item>
          <text:p text:style-name="P29">✅ Desenvolver a página Perfil. </text:p>
        </text:list-item>
        <text:list-item>
          <text:p text:style-name="P29">✅ Desenvolver a navegação principal. </text:p>
        </text:list-item>
        <text:list-item>
          <text:p text:style-name="P30">✅ Criar os componentes reutilizáveis.</text:p>
        </text:list-item>
      </text:list>
      <text:p text:style-name="Text_20_body">Também estou satisfeito com o andamento. O projeto está seguindo um caminho consistente, e isso vai facilitar bastante as próximas fases.</text:p>
      <text:h text:style-name="P7" text:outline-level="2">✅ Concluído</text:h>
      <text:p text:style-name="Text_20_body"><text:span text:style-name="Strong_20_Emphasis">Fase 4 — Desenvolvimento da Base</text:span></text:p>
      <text:list text:style-name="L24">
        <text:list-item>
          <text:p text:style-name="P31">✅ Desenvolver a página inicial.</text:p>
        </text:list-item>
        <text:list-item>
          <text:p text:style-name="P31">✅ Desenvolver a página Biblioteca.</text:p>
        </text:list-item>
        <text:list-item>
          <text:p text:style-name="P31">✅ Desenvolver a página Área de Leitura.</text:p>
        </text:list-item>
        <text:list-item>
          <text:p text:style-name="P31">✅ Desenvolver a página Comunidade.</text:p>
        </text:list-item>
        <text:list-item>
          <text:p text:style-name="P31">✅ Desenvolver a página Perfil.</text:p>
        </text:list-item>
        <text:list-item>
          <text:p text:style-name="P31">✅ Desenvolver a navegação principal.</text:p>
        </text:list-item>
        <text:list-item>
          <text:p text:style-name="P31">✅ Criar os componentes reutilizáveis.</text:p>
        </text:list-item>
      </text:list>
      <text:p text:style-name="Text_20_body">Agora podemos avançar para:</text:p>
      <text:h text:style-name="P12" text:outline-level="1">Fase 4 — Construir o layout responsivo</text:h>
      <text:p text:style-name="Text_20_body">Mas antes de escrever qualquer CSS, vamos definir <text:span text:style-name="Strong_20_Emphasis">como</text:span> vamos tornar a aplicação responsiva. Isso evita retrabalho.</text:p>
      <text:h text:style-name="P7" text:outline-level="2"><text:soft-page-break/>Objetivo</text:h>
      <text:p text:style-name="Text_20_body"><text:bookmark-start text:name="__DdeLink__5805_4055040419"/>Garantir que toda a plataforma funcione bem em:</text:p>
      <text:list text:style-name="L25">
        <text:list-item>
          <text:p text:style-name="P32">📱 Smartphone</text:p>
        </text:list-item>
        <text:list-item>
          <text:p text:style-name="P32">📱 Tablet</text:p>
        </text:list-item>
        <text:list-item>
          <text:p text:style-name="P32">💻 Desktop</text:p>
        </text:list-item>
      </text:list>
      <text:p text:style-name="Text_20_body">seguindo a estratégia <text:span text:style-name="Strong_20_Emphasis">Mobile First</text:span>,<text:bookmark-end text:name="__DdeLink__5805_4055040419"/> que já definimos no Design System.</text:p>
      <text:p text:style-name="P6"/>
      <text:h text:style-name="P7" text:outline-level="2">O que vamos adaptar</text:h>
      <text:h text:style-name="P8" text:outline-level="3"><text:bookmark-start text:name="__DdeLink__5816_4055040419"/>Sprint 1 — Estrutura Global</text:h>
      <text:list text:style-name="L26">
        <text:list-item>
          <text:p text:style-name="P33">Container responsivo.</text:p>
        </text:list-item>
        <text:list-item>
          <text:p text:style-name="P33">Header responsivo.</text:p>
        </text:list-item>
        <text:list-item>
          <text:p text:style-name="P33">Navbar responsiva.</text:p>
        </text:list-item>
        <text:list-item>
          <text:p text:style-name="P33">Footer responsivo.</text:p>
        </text:list-item>
        <text:list-item>
          <text:p text:style-name="P33">Espaçamentos responsivos.<text:bookmark-end text:name="__DdeLink__5816_4055040419"/></text:p>
        </text:list-item>
      </text:list>
      <text:p text:style-name="P6"/>
      <text:h text:style-name="P8" text:outline-level="3">Sprint 2 — Página Inicial</text:h>
      <text:list text:style-name="L27">
        <text:list-item>
          <text:p text:style-name="P34">Hero.</text:p>
        </text:list-item>
        <text:list-item>
          <text:p text:style-name="P34">Introdução.</text:p>
        </text:list-item>
        <text:list-item>
          <text:p text:style-name="P34">História.</text:p>
        </text:list-item>
        <text:list-item>
          <text:p text:style-name="P34">Cards.</text:p>
        </text:list-item>
        <text:list-item>
          <text:p text:style-name="P34">Grid dos livros.</text:p>
        </text:list-item>
      </text:list>
      <text:p text:style-name="P6"/>
      <text:h text:style-name="P8" text:outline-level="3">Sprint 3 — Biblioteca</text:h>
      <text:list text:style-name="L28">
        <text:list-item>
          <text:p text:style-name="P35">Pesquisa.</text:p>
        </text:list-item>
        <text:list-item>
          <text:p text:style-name="P35">Filtros.</text:p>
        </text:list-item>
        <text:list-item>
          <text:p text:style-name="P35">Grid dos livros.</text:p>
        </text:list-item>
      </text:list>
      <text:p text:style-name="P6"/>
      <text:h text:style-name="P8" text:outline-level="3">Sprint 4 — Área de Leitura</text:h>
      <text:list text:style-name="L29">
        <text:list-item>
          <text:p text:style-name="P36">Área principal.</text:p>
        </text:list-item>
        <text:list-item>
          <text:p text:style-name="P36">Sidebar.</text:p>
        </text:list-item>
        <text:list-item>
          <text:p text:style-name="P36">Tipografia para leitura.</text:p>
        </text:list-item>
      </text:list>
      <text:p text:style-name="P6"/>
      <text:h text:style-name="P8" text:outline-level="3"><text:soft-page-break/>Sprint 5 — Comunidade</text:h>
      <text:list text:style-name="L30">
        <text:list-item>
          <text:p text:style-name="P37">Cards.</text:p>
        </text:list-item>
        <text:list-item>
          <text:p text:style-name="P37">Comentários.</text:p>
        </text:list-item>
        <text:list-item>
          <text:p text:style-name="P37">Layout.</text:p>
        </text:list-item>
      </text:list>
      <text:p text:style-name="P6"/>
      <text:h text:style-name="P8" text:outline-level="3">Sprint 6 — Perfil</text:h>
      <text:list text:style-name="L31">
        <text:list-item>
          <text:p text:style-name="P38">Informações do usuário.</text:p>
        </text:list-item>
        <text:list-item>
          <text:p text:style-name="P38">Estatísticas.</text:p>
        </text:list-item>
        <text:list-item>
          <text:p text:style-name="P38">Livros favoritos.</text:p>
        </text:list-item>
      </text:list>
      <text:p text:style-name="P6"/>
      <text:h text:style-name="P7" text:outline-level="2">Ordem de implementação</text:h>
      <text:p text:style-name="Text_20_body">Vamos seguir esta sequência:</text:p>
      <text:list text:style-name="L32">
        <text:list-item>
          <text:p text:style-name="P39"><text:span text:style-name="Source_20_Text">layout.css</text:span> (estrutura global responsiva)</text:p>
        </text:list-item>
        <text:list-item>
          <text:p text:style-name="P39"><text:span text:style-name="Source_20_Text">components.css</text:span> (componentes responsivos)</text:p>
        </text:list-item>
        <text:list-item>
          <text:p text:style-name="P39"><text:span text:style-name="Source_20_Text">home.css</text:span></text:p>
        </text:list-item>
        <text:list-item>
          <text:p text:style-name="P39"><text:span text:style-name="Source_20_Text">biblioteca.css</text:span></text:p>
        </text:list-item>
        <text:list-item>
          <text:p text:style-name="P39"><text:span text:style-name="Source_20_Text">leitura.css</text:span></text:p>
        </text:list-item>
        <text:list-item>
          <text:p text:style-name="P39"><text:span text:style-name="Source_20_Text">comunidade.css</text:span></text:p>
        </text:list-item>
        <text:list-item>
          <text:p text:style-name="P39"><text:span text:style-name="Source_20_Text">perfil.css</text:span></text:p>
        </text:list-item>
      </text:list>
      <text:p text:style-name="Text_20_body">Essa ordem é importante porque <text:span text:style-name="Strong_20_Emphasis">as páginas dependem do layout e dos componentes globais</text:span>.</text:p>
      <text:p text:style-name="P6"/>
      <text:h text:style-name="P8" text:outline-level="3">Antes de começar</text:h>
      <text:p text:style-name="Text_20_body">Nós já escrevemos <text:span text:style-name="Source_20_Text">layout.css</text:span> e <text:span text:style-name="Source_20_Text">components.css</text:span> pensando em responsividade, mas ainda não implementamos os <text:span text:style-name="Emphasis">breakpoints</text:span> nem o menu mobile.</text:p>
      <text:p text:style-name="Text_20_body">Por isso, o próximo passo natural é <text:span text:style-name="Strong_20_Emphasis">revisar e evoluir o </text:span><text:span text:style-name="Strong_20_Emphasis"><text:span text:style-name="Source_20_Text">layout.css</text:span></text:span>, adicionando a base responsiva (breakpoints, comportamento do container e estrutura do header). Depois seguimos para os componentes e, por fim, ajustamos cada página. Essa abordagem evita duplicação de código e mantém a arquitetura organizada.</text:p>
      <text:p text:style-name="Text_20_body">Perfeito. Como definimos no Design System, vamos implementar isso <text:span text:style-name="Strong_20_Emphasis">na base da aplicação</text:span>, não nas páginas individuais. Assim, todas as páginas herdarão automaticamente o comportamento responsivo.</text:p>
      <text:p text:style-name="P6"/>
      <text:h text:style-name="P12" text:outline-level="1"><text:soft-page-break/>Sprint 1 — Estrutura Global</text:h>
      <text:h text:style-name="P7" text:outline-level="2">Arquivos envolvidos</text:h>
      <text:p text:style-name="P5"><text:span text:style-name="Source_20_Text">assets/css/</text:span></text:p>
      <text:p text:style-name="P5"><text:span text:style-name="Source_20_Text">│</text:span></text:p>
      <text:p text:style-name="P5"><text:span text:style-name="Source_20_Text">├── layout.css <text:s text:c="7"/>← Principal</text:span></text:p>
      <text:p text:style-name="P5"><text:span text:style-name="Source_20_Text">├── components.css <text:s text:c="3"/>← Navbar, botões, cards...</text:span></text:p>
      <text:p text:style-name="P5"><text:span text:style-name="Source_20_Text">├── variables.css <text:s text:c="4"/>← Breakpoints</text:span></text:p>
      <text:p text:style-name="P5"><text:span text:style-name="Source_20_Text">└── base.css <text:s text:c="9"/>← Sem alterações</text:span></text:p>
      <text:p text:style-name="P6"/>
      <text:h text:style-name="P12" text:outline-level="1">1. Container responsivo</text:h>
      <text:p text:style-name="Text_20_body"><text:span text:style-name="Strong_20_Emphasis">Arquivo:</text:span> <text:span text:style-name="Source_20_Text">layout.css</text:span></text:p>
      <text:p text:style-name="Text_20_body">O <text:span text:style-name="Source_20_Text">.container</text:span> deve ter largura fluida e padding lateral.</text:p>
      <text:p text:style-name="P5"><text:span text:style-name="Source_20_Text">.container {</text:span></text:p>
      <text:p text:style-name="P5"><text:span text:style-name="Source_20_Text"><text:s text:c="4"/>width: min(100% - 2rem, var(--container-width));</text:span></text:p>
      <text:p text:style-name="P5"><text:span text:style-name="Source_20_Text"><text:s text:c="4"/>margin-inline: auto;</text:span></text:p>
      <text:p text:style-name="P5"><text:span text:style-name="Source_20_Text">}</text:span></text:p>
      <text:p text:style-name="Text_20_body">Isso evita:</text:p>
      <text:list text:style-name="L33">
        <text:list-item>
          <text:p text:style-name="P40">conteúdo colado nas bordas do celular;</text:p>
        </text:list-item>
        <text:list-item>
          <text:p text:style-name="P40">necessidade de definir <text:span text:style-name="Source_20_Text">padding</text:span> em cada seção.</text:p>
        </text:list-item>
      </text:list>
      <text:p text:style-name="P6"/>
      <text:h text:style-name="P12" text:outline-level="1">2. Header responsivo</text:h>
      <text:p text:style-name="Text_20_body">No desktop:</text:p>
      <text:p text:style-name="P5"><text:span text:style-name="Source_20_Text">LOGO <text:s text:c="5"/>MENU <text:s text:c="5"/>BOTÕES</text:span></text:p>
      <text:p text:style-name="Text_20_body">No mobile:</text:p>
      <text:p text:style-name="P5"><text:span text:style-name="Source_20_Text">LOGO <text:s text:c="13"/>☰</text:span></text:p>
      <text:p text:style-name="Text_20_body">Os botões de pesquisa e perfil podem permanecer visíveis ou serem agrupados no menu, conforme decidirmos depois.</text:p>
      <text:p text:style-name="P6"/>
      <text:h text:style-name="P12" text:outline-level="1">3. Navbar responsiva</text:h>
      <text:p text:style-name="Text_20_body">Desktop:</text:p>
      <text:p text:style-name="P5"><text:span text:style-name="Source_20_Text">Início</text:span></text:p>
      <text:p text:style-name="P5"><text:span text:style-name="Source_20_Text">Biblioteca</text:span></text:p>
      <text:p text:style-name="P5"><text:soft-page-break/><text:span text:style-name="Source_20_Text">Leitura</text:span></text:p>
      <text:p text:style-name="P5"><text:span text:style-name="Source_20_Text">Comunidade</text:span></text:p>
      <text:p text:style-name="P5"><text:span text:style-name="Source_20_Text">Perfil</text:span></text:p>
      <text:p text:style-name="Text_20_body">Mobile:</text:p>
      <text:p text:style-name="P5"><text:span text:style-name="Source_20_Text">☰</text:span></text:p>
      <text:p text:style-name="P5"/>
      <text:p text:style-name="P5"><text:span text:style-name="Source_20_Text">↓</text:span></text:p>
      <text:p text:style-name="P5"/>
      <text:p text:style-name="P5"><text:span text:style-name="Source_20_Text">Início</text:span></text:p>
      <text:p text:style-name="P5"><text:span text:style-name="Source_20_Text">Biblioteca</text:span></text:p>
      <text:p text:style-name="P5"><text:span text:style-name="Source_20_Text">Leitura</text:span></text:p>
      <text:p text:style-name="P5"><text:span text:style-name="Source_20_Text">Comunidade</text:span></text:p>
      <text:p text:style-name="P5"><text:span text:style-name="Source_20_Text">Perfil</text:span></text:p>
      <text:p text:style-name="Text_20_body">Como planejamos, o <text:span text:style-name="Source_20_Text">navbar.html</text:span> será reutilizado também no menu mobile.</text:p>
      <text:p text:style-name="P6"/>
      <text:h text:style-name="P12" text:outline-level="1">4. Footer responsivo</text:h>
      <text:p text:style-name="Text_20_body">Desktop:</text:p>
      <text:p text:style-name="P5"><text:span text:style-name="Source_20_Text">Marca | Explorar | Recursos | Nota</text:span></text:p>
      <text:p text:style-name="Text_20_body">Tablet:</text:p>
      <text:p text:style-name="P5"><text:span text:style-name="Source_20_Text">Marca</text:span></text:p>
      <text:p text:style-name="P5"><text:span text:style-name="Source_20_Text">Explorar</text:span></text:p>
      <text:p text:style-name="P5"/>
      <text:p text:style-name="P5"><text:span text:style-name="Source_20_Text">Recursos</text:span></text:p>
      <text:p text:style-name="P5"><text:span text:style-name="Source_20_Text">Nota</text:span></text:p>
      <text:p text:style-name="Text_20_body">Mobile:</text:p>
      <text:p text:style-name="P5"><text:span text:style-name="Source_20_Text">Marca</text:span></text:p>
      <text:p text:style-name="P5"/>
      <text:p text:style-name="P5"><text:span text:style-name="Source_20_Text">Explorar</text:span></text:p>
      <text:p text:style-name="P5"/>
      <text:p text:style-name="P5"><text:span text:style-name="Source_20_Text">Recursos</text:span></text:p>
      <text:p text:style-name="P5"/>
      <text:p text:style-name="P5"><text:span text:style-name="Source_20_Text">Nota</text:span></text:p>
      <text:p text:style-name="Text_20_body">Ou seja, as colunas passam a ficar empilhadas.</text:p>
      <text:p text:style-name="P6"/>
      <text:h text:style-name="P12" text:outline-level="1"><text:soft-page-break/>5. Espaçamentos responsivos</text:h>
      <text:p text:style-name="Text_20_body">Não vamos usar valores aleatórios.</text:p>
      <text:p text:style-name="Text_20_body">A escala continuará sendo:</text:p>
      <text:p text:style-name="P5"><text:span text:style-name="Source_20_Text">--space-xs</text:span></text:p>
      <text:p text:style-name="P5"><text:span text:style-name="Source_20_Text">--space-sm</text:span></text:p>
      <text:p text:style-name="P5"><text:span text:style-name="Source_20_Text">--space-md</text:span></text:p>
      <text:p text:style-name="P5"><text:span text:style-name="Source_20_Text">--space-lg</text:span></text:p>
      <text:p text:style-name="P5"><text:span text:style-name="Source_20_Text">--space-xl</text:span></text:p>
      <text:p text:style-name="Text_20_body">Mas nos dispositivos menores reduziremos apenas os espaçamentos entre seções.</text:p>
      <text:p text:style-name="Text_20_body">Exemplo:</text:p>
      <text:p text:style-name="Text_20_body">Desktop</text:p>
      <text:p text:style-name="P5"><text:span text:style-name="Source_20_Text">padding-block: var(--space-xl);</text:span></text:p>
      <text:p text:style-name="Text_20_body">Mobile</text:p>
      <text:p text:style-name="P5"><text:span text:style-name="Source_20_Text">padding-block: var(--space-lg);</text:span></text:p>
      <text:p text:style-name="Text_20_body">Sem alterar a identidade visual.</text:p>
      <text:p text:style-name="P6"/>
      <text:h text:style-name="P12" text:outline-level="1">Breakpoints</text:h>
      <text:p text:style-name="Text_20_body">Seguiremos exatamente o Design System:</text:p>
      <text:p text:style-name="P5"><text:span text:style-name="Source_20_Text">/* Mobile */</text:span></text:p>
      <text:p text:style-name="P5"><text:span text:style-name="Source_20_Text">@media (max-width: 640px) {</text:span></text:p>
      <text:p text:style-name="P5"/>
      <text:p text:style-name="P5"><text:span text:style-name="Source_20_Text">}</text:span></text:p>
      <text:p text:style-name="P5"/>
      <text:p text:style-name="P5"><text:span text:style-name="Source_20_Text">/* Tablet */</text:span></text:p>
      <text:p text:style-name="P5"><text:span text:style-name="Source_20_Text">@media (min-width: 641px) and (max-width: 1024px) {</text:span></text:p>
      <text:p text:style-name="P5"/>
      <text:p text:style-name="P5"><text:span text:style-name="Source_20_Text">}</text:span></text:p>
      <text:p text:style-name="P5"/>
      <text:p text:style-name="P5"><text:span text:style-name="Source_20_Text">/* Desktop */</text:span></text:p>
      <text:p text:style-name="P5"><text:span text:style-name="Source_20_Text">/* Estilos padrão */</text:span></text:p>
      <text:p text:style-name="P6"/>
      <text:h text:style-name="P7" text:outline-level="2">Ordem de implementação</text:h>
      <text:p text:style-name="Text_20_body">Agora vamos implementar nesta sequência:</text:p>
      <text:list text:style-name="L34">
        <text:list-item>
          <text:p text:style-name="P41"><text:bookmark-start text:name="__DdeLink__5818_4055040419"/><text:soft-page-break/>✅ Container responsivo (<text:span text:style-name="Source_20_Text">layout.css</text:span>)<text:bookmark-end text:name="__DdeLink__5818_4055040419"/></text:p>
        </text:list-item>
        <text:list-item>
          <text:p text:style-name="P41">✅ Header responsivo (<text:span text:style-name="Source_20_Text">layout.css</text:span>)</text:p>
        </text:list-item>
        <text:list-item>
          <text:p text:style-name="P41">✅ Navbar responsiva (<text:span text:style-name="Source_20_Text">components.css</text:span>)</text:p>
        </text:list-item>
        <text:list-item>
          <text:p text:style-name="P41">✅ Footer responsivo (<text:span text:style-name="Source_20_Text">layout.css</text:span>)</text:p>
        </text:list-item>
        <text:list-item>
          <text:p text:style-name="P41">✅ Espaçamentos responsivos (<text:span text:style-name="Source_20_Text">layout.css</text:span>)</text:p>
        </text:list-item>
      </text:list>
      <text:p text:style-name="Text_20_body">Essa divisão mantém a responsabilidade de cada arquivo clara:</text:p>
      <text:list text:style-name="L35">
        <text:list-item>
          <text:p text:style-name="P42"><text:span text:style-name="Strong_20_Emphasis"><text:span text:style-name="Source_20_Text">layout.css</text:span></text:span> controla a estrutura global.</text:p>
        </text:list-item>
        <text:list-item>
          <text:p text:style-name="P42"><text:span text:style-name="Strong_20_Emphasis"><text:span text:style-name="Source_20_Text">components.css</text:span></text:span> controla o comportamento dos componentes reutilizáveis, como a navbar e os botões.</text:p>
        </text:list-item>
      </text:list>
      <text:p text:style-name="Text_20_body">Essa organização evita conflitos e facilita a manutenção conforme o projeto cresce.</text:p>
      <text:p text:style-name="Text_20_body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João António</meta:initial-creator>
    <meta:creation-date>2026-07-08T19:03:34.568484422</meta:creation-date>
    <dc:date>2026-07-09T16:19:07.624262605</dc:date>
    <dc:creator>João António</dc:creator>
    <meta:editing-duration>PT8H21M50S</meta:editing-duration>
    <meta:editing-cycles>14</meta:editing-cycles>
    <meta:generator>LibreOffice/26.2.4.2$Linux_X86_64 LibreOffice_project/620$Build-2</meta:generator>
    <meta:document-statistic meta:table-count="3" meta:image-count="0" meta:object-count="0" meta:page-count="50" meta:paragraph-count="1386" meta:word-count="4750" meta:character-count="39594" meta:non-whitespace-character-count="34345"/>
  </office:meta>
</office:document-meta>
</file>